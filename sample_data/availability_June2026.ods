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FreeSans" svg:font-family="FreeSans" style:font-family-generic="system" style:font-pitch="variable"/>
    <style:font-face style:name="Google Sans" svg:font-family="'Google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5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5.567cm"/>
    </style:style>
    <style:style style:name="co4" style:family="table-column">
      <style:table-column-properties fo:break-before="auto" style:column-width="5.258cm"/>
    </style:style>
    <style:style style:name="co5" style:family="table-column">
      <style:table-column-properties fo:break-before="auto" style:column-width="4.168cm"/>
    </style:style>
    <style:style style:name="co6" style:family="table-column">
      <style:table-column-properties fo:break-before="auto" style:column-width="4.531cm"/>
    </style:style>
    <style:style style:name="co7" style:family="table-column">
      <style:table-column-properties fo:break-before="auto" style:column-width="4.223cm"/>
    </style:style>
    <style:style style:name="co8" style:family="table-column">
      <style:table-column-properties fo:break-before="auto" style:column-width="4.588cm"/>
    </style:style>
    <style:style style:name="co9" style:family="table-column">
      <style:table-column-properties fo:break-before="auto" style:column-width="2.826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28cm"/>
    </style:style>
    <style:style style:name="co12" style:family="table-column">
      <style:table-column-properties fo:break-before="auto" style:column-width="2.265cm"/>
    </style:style>
    <style:style style:name="co13" style:family="table-column">
      <style:table-column-properties fo:break-before="auto" style:column-width="0.699cm"/>
    </style:style>
    <style:style style:name="co14" style:family="table-column">
      <style:table-column-properties fo:break-before="auto" style:column-width="2.069cm"/>
    </style:style>
    <style:style style:name="co15" style:family="table-column">
      <style:table-column-properties fo:break-before="auto" style:column-width="2.043cm"/>
    </style:style>
    <style:style style:name="co16" style:family="table-column">
      <style:table-column-properties fo:break-before="auto" style:column-width="0.783cm"/>
    </style:style>
    <style:style style:name="co17" style:family="table-column">
      <style:table-column-properties fo:break-before="auto" style:column-width="1.286cm"/>
    </style:style>
    <style:style style:name="co18" style:family="table-column">
      <style:table-column-properties fo:break-before="auto" style:column-width="1.651cm"/>
    </style:style>
    <style:style style:name="co19" style:family="table-column">
      <style:table-column-properties fo:break-before="auto" style:column-width="2.238cm"/>
    </style:style>
    <style:style style:name="co20" style:family="table-column">
      <style:table-column-properties fo:break-before="auto" style:column-width="1.371cm"/>
    </style:style>
    <style:style style:name="co21" style:family="table-column">
      <style:table-column-properties fo:break-before="auto" style:column-width="2.461cm"/>
    </style:style>
    <style:style style:name="co22" style:family="table-column">
      <style:table-column-properties fo:break-before="auto" style:column-width="1.064cm"/>
    </style:style>
    <style:style style:name="co23" style:family="table-column">
      <style:table-column-properties fo:break-before="auto" style:column-width="9.426cm"/>
    </style:style>
    <style:style style:name="co24" style:family="table-column">
      <style:table-column-properties fo:break-before="auto" style:column-width="2.182cm"/>
    </style:style>
    <style:style style:name="co25" style:family="table-column">
      <style:table-column-properties fo:break-before="auto" style:column-width="2.378cm"/>
    </style:style>
    <style:style style:name="co26" style:family="table-column">
      <style:table-column-properties fo:break-before="auto" style:column-width="2.154cm"/>
    </style:style>
    <style:style style:name="co27" style:family="table-column">
      <style:table-column-properties fo:break-before="auto" style:column-width="0.476cm"/>
    </style:style>
    <style:style style:name="co28" style:family="table-column">
      <style:table-column-properties fo:break-before="auto" style:column-width="1.79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953cm" fo:break-before="auto" style:use-optimal-row-height="fals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1.191cm" fo:break-before="auto" style:use-optimal-row-height="false"/>
    </style:style>
    <style:style style:name="ro5" style:family="table-row">
      <style:table-row-properties style:row-height="1.164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0.291cm" fo:break-before="auto" style:use-optimal-row-height="false"/>
    </style:style>
    <style:style style:name="ro10" style:family="table-row">
      <style:table-row-properties style:row-height="3.784cm" fo:break-before="auto" style:use-optimal-row-height="false"/>
    </style:style>
    <style:style style:name="ro11" style:family="table-row">
      <style:table-row-properties style:row-height="0.45cm" fo:break-before="auto" style:use-optimal-row-height="false"/>
    </style:style>
    <style:style style:name="ro12" style:family="table-row">
      <style:table-row-properties style:row-height="0.529cm" fo:break-before="auto" style:use-optimal-row-height="true"/>
    </style:style>
    <style:style style:name="ta1" style:family="table" style:master-page-name="PageStyle_5f_Datasheet">
      <style:table-properties table:display="true" style:writing-mode="lr-tb"/>
    </style:style>
    <style:style style:name="ta2" style:family="table" style:master-page-name="PageStyle_5f_Masterlist">
      <style:table-properties table:display="true" style:writing-mode="lr-tb"/>
    </style:style>
    <style:style style:name="ce1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ackground-color="#6d9ee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fo:background-color="#4f81bd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3298dc" style:diagonal-bl-tr="none" style:diagonal-tl-br="none" style:text-align-source="fix" style:repeat-content="false" fo:wrap-option="no-wrap" fo:border="0.74pt solid #aaaaaa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cceac0" style:diagonal-bl-tr="none" style:diagonal-tl-br="none" style:text-align-source="fix" style:repeat-content="false" fo:wrap-option="no-wrap" fo:border="0.74pt solid #aaaaaa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8c774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#ref!" style:apply-style-name="ConditionalStyle_5f_7" style:base-cell-address="Datasheet.D177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M&quot;" style:apply-style-name="ConditionalStyle_5f_1" style:base-cell-address="Masterlist.B1"/>
      <style:map style:condition="cell-content()=&quot;L&quot;" style:apply-style-name="ConditionalStyle_5f_2" style:base-cell-address="Masterlist.B1"/>
      <style:map style:condition="cell-content()=&quot;A&quot;" style:apply-style-name="ConditionalStyle_5f_3" style:base-cell-address="Masterlist.B1"/>
      <style:map style:condition="cell-content()=&quot;AL&quot;" style:apply-style-name="ConditionalStyle_5f_4" style:base-cell-address="Masterlist.B1"/>
      <style:map style:condition="cell-content()=&quot;p&quot;" style:apply-style-name="ConditionalStyle_5f_5" style:base-cell-address="Masterlist.B1"/>
    </style:style>
    <style:style style:name="ce21" style:family="table-cell" style:parent-style-name="Default">
      <style:table-cell-properties fo:background-color="#00206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22" style:family="table-cell" style:parent-style-name="Default">
      <style:table-cell-properties fo:background-color="#00206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  <style:map style:condition="cell-content()=&quot;M&quot;" style:apply-style-name="ConditionalStyle_5f_1" style:base-cell-address="Masterlist.B1"/>
      <style:map style:condition="cell-content()=&quot;L&quot;" style:apply-style-name="ConditionalStyle_5f_2" style:base-cell-address="Masterlist.B1"/>
      <style:map style:condition="cell-content()=&quot;A&quot;" style:apply-style-name="ConditionalStyle_5f_3" style:base-cell-address="Masterlist.B1"/>
      <style:map style:condition="cell-content()=&quot;AL&quot;" style:apply-style-name="ConditionalStyle_5f_4" style:base-cell-address="Masterlist.B1"/>
      <style:map style:condition="cell-content()=&quot;p&quot;" style:apply-style-name="ConditionalStyle_5f_5" style:base-cell-address="Masterlist.B1"/>
    </style:style>
    <style:style style:name="ce23" style:family="table-cell" style:parent-style-name="Default">
      <style:table-cell-properties fo:border-bottom="none" fo:background-color="#00206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  <style:map style:condition="cell-content()=&quot;M&quot;" style:apply-style-name="ConditionalStyle_5f_1" style:base-cell-address="Masterlist.B1"/>
      <style:map style:condition="cell-content()=&quot;L&quot;" style:apply-style-name="ConditionalStyle_5f_2" style:base-cell-address="Masterlist.B1"/>
      <style:map style:condition="cell-content()=&quot;A&quot;" style:apply-style-name="ConditionalStyle_5f_3" style:base-cell-address="Masterlist.B1"/>
      <style:map style:condition="cell-content()=&quot;AL&quot;" style:apply-style-name="ConditionalStyle_5f_4" style:base-cell-address="Masterlist.B1"/>
      <style:map style:condition="cell-content()=&quot;p&quot;" style:apply-style-name="ConditionalStyle_5f_5" style:base-cell-address="Masterlist.B1"/>
    </style:style>
    <style:style style:name="ce24" style:family="table-cell" style:parent-style-name="Default">
      <style:table-cell-properties fo:background-color="#3f3f3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  <style:map style:condition="cell-content()=&quot;M&quot;" style:apply-style-name="ConditionalStyle_5f_1" style:base-cell-address="Masterlist.B1"/>
      <style:map style:condition="cell-content()=&quot;L&quot;" style:apply-style-name="ConditionalStyle_5f_2" style:base-cell-address="Masterlist.B1"/>
      <style:map style:condition="cell-content()=&quot;A&quot;" style:apply-style-name="ConditionalStyle_5f_3" style:base-cell-address="Masterlist.B1"/>
      <style:map style:condition="cell-content()=&quot;AL&quot;" style:apply-style-name="ConditionalStyle_5f_4" style:base-cell-address="Masterlist.B1"/>
      <style:map style:condition="cell-content()=&quot;p&quot;" style:apply-style-name="ConditionalStyle_5f_5" style:base-cell-address="Masterlist.B1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M&quot;" style:apply-style-name="ConditionalStyle_5f_1" style:base-cell-address="Masterlist.B1"/>
      <style:map style:condition="cell-content()=&quot;L&quot;" style:apply-style-name="ConditionalStyle_5f_2" style:base-cell-address="Masterlist.B1"/>
      <style:map style:condition="cell-content()=&quot;A&quot;" style:apply-style-name="ConditionalStyle_5f_3" style:base-cell-address="Masterlist.B1"/>
      <style:map style:condition="cell-content()=&quot;AL&quot;" style:apply-style-name="ConditionalStyle_5f_4" style:base-cell-address="Masterlist.B1"/>
      <style:map style:condition="cell-content()=&quot;p&quot;" style:apply-style-name="ConditionalStyle_5f_5" style:base-cell-address="Masterlist.B1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M&quot;" style:apply-style-name="ConditionalStyle_5f_1" style:base-cell-address="Masterlist.B1"/>
      <style:map style:condition="cell-content()=&quot;L&quot;" style:apply-style-name="ConditionalStyle_5f_2" style:base-cell-address="Masterlist.B1"/>
      <style:map style:condition="cell-content()=&quot;A&quot;" style:apply-style-name="ConditionalStyle_5f_3" style:base-cell-address="Masterlist.B1"/>
      <style:map style:condition="cell-content()=&quot;AL&quot;" style:apply-style-name="ConditionalStyle_5f_4" style:base-cell-address="Masterlist.B1"/>
      <style:map style:condition="cell-content()=&quot;p&quot;" style:apply-style-name="ConditionalStyle_5f_5" style:base-cell-address="Masterlist.B1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M&quot;" style:apply-style-name="ConditionalStyle_5f_1" style:base-cell-address="Masterlist.B1"/>
      <style:map style:condition="cell-content()=&quot;L&quot;" style:apply-style-name="ConditionalStyle_5f_2" style:base-cell-address="Masterlist.B1"/>
      <style:map style:condition="cell-content()=&quot;A&quot;" style:apply-style-name="ConditionalStyle_5f_3" style:base-cell-address="Masterlist.B1"/>
      <style:map style:condition="cell-content()=&quot;AL&quot;" style:apply-style-name="ConditionalStyle_5f_4" style:base-cell-address="Masterlist.B1"/>
      <style:map style:condition="cell-content()=&quot;p&quot;" style:apply-style-name="ConditionalStyle_5f_5" style:base-cell-address="Masterlist.B1"/>
    </style:style>
    <style:style style:name="ce28" style:family="table-cell" style:parent-style-name="Default">
      <style:table-cell-properties fo:background-color="#239934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  <style:map style:condition="cell-content()=&quot;M&quot;" style:apply-style-name="ConditionalStyle_5f_1" style:base-cell-address="Masterlist.B1"/>
      <style:map style:condition="cell-content()=&quot;L&quot;" style:apply-style-name="ConditionalStyle_5f_2" style:base-cell-address="Masterlist.B1"/>
      <style:map style:condition="cell-content()=&quot;A&quot;" style:apply-style-name="ConditionalStyle_5f_3" style:base-cell-address="Masterlist.B1"/>
      <style:map style:condition="cell-content()=&quot;AL&quot;" style:apply-style-name="ConditionalStyle_5f_4" style:base-cell-address="Masterlist.B1"/>
      <style:map style:condition="cell-content()=&quot;p&quot;" style:apply-style-name="ConditionalStyle_5f_5" style:base-cell-address="Masterlist.B1"/>
    </style:style>
    <style:style style:name="ce29" style:family="table-cell" style:parent-style-name="Default">
      <style:table-cell-properties fo:background-color="#e5b8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M&quot;" style:apply-style-name="ConditionalStyle_5f_1" style:base-cell-address="Masterlist.B1"/>
      <style:map style:condition="cell-content()=&quot;L&quot;" style:apply-style-name="ConditionalStyle_5f_2" style:base-cell-address="Masterlist.B1"/>
      <style:map style:condition="cell-content()=&quot;A&quot;" style:apply-style-name="ConditionalStyle_5f_3" style:base-cell-address="Masterlist.B1"/>
      <style:map style:condition="cell-content()=&quot;AL&quot;" style:apply-style-name="ConditionalStyle_5f_4" style:base-cell-address="Masterlist.B1"/>
      <style:map style:condition="cell-content()=&quot;p&quot;" style:apply-style-name="ConditionalStyle_5f_5" style:base-cell-address="Masterlist.B1"/>
    </style:style>
    <style:style style:name="ce30" style:family="table-cell" style:parent-style-name="Default">
      <style:table-cell-properties fo:background-color="#8def8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M&quot;" style:apply-style-name="ConditionalStyle_5f_1" style:base-cell-address="Masterlist.B1"/>
      <style:map style:condition="cell-content()=&quot;L&quot;" style:apply-style-name="ConditionalStyle_5f_2" style:base-cell-address="Masterlist.B1"/>
      <style:map style:condition="cell-content()=&quot;A&quot;" style:apply-style-name="ConditionalStyle_5f_3" style:base-cell-address="Masterlist.B1"/>
      <style:map style:condition="cell-content()=&quot;AL&quot;" style:apply-style-name="ConditionalStyle_5f_4" style:base-cell-address="Masterlist.B1"/>
      <style:map style:condition="cell-content()=&quot;p&quot;" style:apply-style-name="ConditionalStyle_5f_5" style:base-cell-address="Masterlist.B1"/>
    </style:style>
    <style:style style:name="ce31" style:family="table-cell" style:parent-style-name="Default">
      <style:table-cell-properties fo:background-color="#ffe381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()=&quot;M&quot;" style:apply-style-name="ConditionalStyle_5f_1" style:base-cell-address="Masterlist.B1"/>
      <style:map style:condition="cell-content()=&quot;L&quot;" style:apply-style-name="ConditionalStyle_5f_2" style:base-cell-address="Masterlist.B1"/>
      <style:map style:condition="cell-content()=&quot;A&quot;" style:apply-style-name="ConditionalStyle_5f_3" style:base-cell-address="Masterlist.B1"/>
      <style:map style:condition="cell-content()=&quot;AL&quot;" style:apply-style-name="ConditionalStyle_5f_4" style:base-cell-address="Masterlist.B1"/>
      <style:map style:condition="cell-content()=&quot;p&quot;" style:apply-style-name="ConditionalStyle_5f_5" style:base-cell-address="Masterlist.B1"/>
    </style:style>
    <style:style style:name="ce32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M&quot;" style:apply-style-name="ConditionalStyle_5f_1" style:base-cell-address="Masterlist.B1"/>
      <style:map style:condition="cell-content()=&quot;L&quot;" style:apply-style-name="ConditionalStyle_5f_2" style:base-cell-address="Masterlist.B1"/>
      <style:map style:condition="cell-content()=&quot;A&quot;" style:apply-style-name="ConditionalStyle_5f_3" style:base-cell-address="Masterlist.B1"/>
      <style:map style:condition="cell-content()=&quot;AL&quot;" style:apply-style-name="ConditionalStyle_5f_4" style:base-cell-address="Masterlist.B1"/>
      <style:map style:condition="cell-content()=&quot;p&quot;" style:apply-style-name="ConditionalStyle_5f_5" style:base-cell-address="Masterlist.B1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M&quot;" style:apply-style-name="ConditionalStyle_5f_1" style:base-cell-address="Masterlist.B1"/>
      <style:map style:condition="cell-content()=&quot;L&quot;" style:apply-style-name="ConditionalStyle_5f_2" style:base-cell-address="Masterlist.B1"/>
      <style:map style:condition="cell-content()=&quot;A&quot;" style:apply-style-name="ConditionalStyle_5f_3" style:base-cell-address="Masterlist.B1"/>
      <style:map style:condition="cell-content()=&quot;AL&quot;" style:apply-style-name="ConditionalStyle_5f_4" style:base-cell-address="Masterlist.B1"/>
      <style:map style:condition="cell-content()=&quot;p&quot;" style:apply-style-name="ConditionalStyle_5f_5" style:base-cell-address="Masterlist.B1"/>
    </style:style>
    <style:style style:name="ce34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M&quot;" style:apply-style-name="ConditionalStyle_5f_1" style:base-cell-address="Masterlist.B1"/>
      <style:map style:condition="cell-content()=&quot;L&quot;" style:apply-style-name="ConditionalStyle_5f_2" style:base-cell-address="Masterlist.B1"/>
      <style:map style:condition="cell-content()=&quot;A&quot;" style:apply-style-name="ConditionalStyle_5f_3" style:base-cell-address="Masterlist.B1"/>
      <style:map style:condition="cell-content()=&quot;AL&quot;" style:apply-style-name="ConditionalStyle_5f_4" style:base-cell-address="Masterlist.B1"/>
      <style:map style:condition="cell-content()=&quot;p&quot;" style:apply-style-name="ConditionalStyle_5f_5" style:base-cell-address="Masterlist.B1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M&quot;" style:apply-style-name="ConditionalStyle_5f_1" style:base-cell-address="Masterlist.B1"/>
      <style:map style:condition="cell-content()=&quot;L&quot;" style:apply-style-name="ConditionalStyle_5f_2" style:base-cell-address="Masterlist.B1"/>
      <style:map style:condition="cell-content()=&quot;A&quot;" style:apply-style-name="ConditionalStyle_5f_3" style:base-cell-address="Masterlist.B1"/>
      <style:map style:condition="cell-content()=&quot;AL&quot;" style:apply-style-name="ConditionalStyle_5f_4" style:base-cell-address="Masterlist.B1"/>
      <style:map style:condition="cell-content()=&quot;p&quot;" style:apply-style-name="ConditionalStyle_5f_5" style:base-cell-address="Masterlist.B1"/>
    </style:style>
    <style:style style:name="ce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M&quot;" style:apply-style-name="ConditionalStyle_5f_1" style:base-cell-address="Masterlist.B1"/>
      <style:map style:condition="cell-content()=&quot;L&quot;" style:apply-style-name="ConditionalStyle_5f_2" style:base-cell-address="Masterlist.B1"/>
      <style:map style:condition="cell-content()=&quot;A&quot;" style:apply-style-name="ConditionalStyle_5f_3" style:base-cell-address="Masterlist.B1"/>
      <style:map style:condition="cell-content()=&quot;AL&quot;" style:apply-style-name="ConditionalStyle_5f_4" style:base-cell-address="Masterlist.B1"/>
      <style:map style:condition="cell-content()=&quot;p&quot;" style:apply-style-name="ConditionalStyle_5f_5" style:base-cell-address="Masterlist.B1"/>
    </style:style>
    <style:style style:name="ce37" style:family="table-cell" style:parent-style-name="Default">
      <style:table-cell-properties fo:background-color="#cc00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  <style:map style:condition="cell-content()=&quot;M&quot;" style:apply-style-name="ConditionalStyle_5f_1" style:base-cell-address="Masterlist.B1"/>
      <style:map style:condition="cell-content()=&quot;L&quot;" style:apply-style-name="ConditionalStyle_5f_2" style:base-cell-address="Masterlist.B1"/>
      <style:map style:condition="cell-content()=&quot;A&quot;" style:apply-style-name="ConditionalStyle_5f_3" style:base-cell-address="Masterlist.B1"/>
      <style:map style:condition="cell-content()=&quot;AL&quot;" style:apply-style-name="ConditionalStyle_5f_4" style:base-cell-address="Masterlist.B1"/>
      <style:map style:condition="cell-content()=&quot;p&quot;" style:apply-style-name="ConditionalStyle_5f_5" style:base-cell-address="Masterlist.B1"/>
    </style:style>
    <style:style style:name="ce38" style:family="table-cell" style:parent-style-name="Default">
      <style:table-cell-properties fo:background-color="#ff00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M&quot;" style:apply-style-name="ConditionalStyle_5f_1" style:base-cell-address="Masterlist.B1"/>
      <style:map style:condition="cell-content()=&quot;L&quot;" style:apply-style-name="ConditionalStyle_5f_2" style:base-cell-address="Masterlist.B1"/>
      <style:map style:condition="cell-content()=&quot;A&quot;" style:apply-style-name="ConditionalStyle_5f_3" style:base-cell-address="Masterlist.B1"/>
      <style:map style:condition="cell-content()=&quot;AL&quot;" style:apply-style-name="ConditionalStyle_5f_4" style:base-cell-address="Masterlist.B1"/>
      <style:map style:condition="cell-content()=&quot;p&quot;" style:apply-style-name="ConditionalStyle_5f_5" style:base-cell-address="Masterlist.B1"/>
    </style:style>
    <style:style style:name="ce39" style:family="table-cell" style:parent-style-name="Default">
      <style:table-cell-properties fo:background-color="#dd690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()=&quot;M&quot;" style:apply-style-name="ConditionalStyle_5f_1" style:base-cell-address="Masterlist.B1"/>
      <style:map style:condition="cell-content()=&quot;L&quot;" style:apply-style-name="ConditionalStyle_5f_2" style:base-cell-address="Masterlist.B1"/>
      <style:map style:condition="cell-content()=&quot;A&quot;" style:apply-style-name="ConditionalStyle_5f_3" style:base-cell-address="Masterlist.B1"/>
      <style:map style:condition="cell-content()=&quot;AL&quot;" style:apply-style-name="ConditionalStyle_5f_4" style:base-cell-address="Masterlist.B1"/>
      <style:map style:condition="cell-content()=&quot;p&quot;" style:apply-style-name="ConditionalStyle_5f_5" style:base-cell-address="Masterlist.B1"/>
    </style:style>
    <style:style style:name="ce40" style:family="table-cell" style:parent-style-name="Default">
      <style:table-cell-properties fo:background-color="#0070c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  <style:map style:condition="cell-content()=&quot;M&quot;" style:apply-style-name="ConditionalStyle_5f_1" style:base-cell-address="Masterlist.B1"/>
      <style:map style:condition="cell-content()=&quot;L&quot;" style:apply-style-name="ConditionalStyle_5f_2" style:base-cell-address="Masterlist.B1"/>
      <style:map style:condition="cell-content()=&quot;A&quot;" style:apply-style-name="ConditionalStyle_5f_3" style:base-cell-address="Masterlist.B1"/>
      <style:map style:condition="cell-content()=&quot;AL&quot;" style:apply-style-name="ConditionalStyle_5f_4" style:base-cell-address="Masterlist.B1"/>
      <style:map style:condition="cell-content()=&quot;p&quot;" style:apply-style-name="ConditionalStyle_5f_5" style:base-cell-address="Masterlist.B1"/>
    </style:style>
    <style:style style:name="ce41" style:family="table-cell" style:parent-style-name="Default">
      <style:table-cell-properties fo:background-color="#0041c4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M&quot;" style:apply-style-name="ConditionalStyle_5f_1" style:base-cell-address="Masterlist.B1"/>
      <style:map style:condition="cell-content()=&quot;L&quot;" style:apply-style-name="ConditionalStyle_5f_2" style:base-cell-address="Masterlist.B1"/>
      <style:map style:condition="cell-content()=&quot;A&quot;" style:apply-style-name="ConditionalStyle_5f_3" style:base-cell-address="Masterlist.B1"/>
      <style:map style:condition="cell-content()=&quot;AL&quot;" style:apply-style-name="ConditionalStyle_5f_4" style:base-cell-address="Masterlist.B1"/>
      <style:map style:condition="cell-content()=&quot;p&quot;" style:apply-style-name="ConditionalStyle_5f_5" style:base-cell-address="Masterlist.B1"/>
    </style:style>
    <style:style style:name="ce42" style:family="table-cell" style:parent-style-name="Default">
      <style:table-cell-properties fo:background-color="#8064a2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>
        <loext:background-complex-color loext:theme-type="accent4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  <style:map style:condition="cell-content()=&quot;M&quot;" style:apply-style-name="ConditionalStyle_5f_1" style:base-cell-address="Masterlist.B1"/>
      <style:map style:condition="cell-content()=&quot;L&quot;" style:apply-style-name="ConditionalStyle_5f_2" style:base-cell-address="Masterlist.B1"/>
      <style:map style:condition="cell-content()=&quot;A&quot;" style:apply-style-name="ConditionalStyle_5f_3" style:base-cell-address="Masterlist.B1"/>
      <style:map style:condition="cell-content()=&quot;AL&quot;" style:apply-style-name="ConditionalStyle_5f_4" style:base-cell-address="Masterlist.B1"/>
      <style:map style:condition="cell-content()=&quot;p&quot;" style:apply-style-name="ConditionalStyle_5f_5" style:base-cell-address="Masterlist.B1"/>
    </style:style>
    <style:style style:name="ce43" style:family="table-cell" style:parent-style-name="Default">
      <style:table-cell-properties fo:background-color="#b2a1c7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M&quot;" style:apply-style-name="ConditionalStyle_5f_1" style:base-cell-address="Masterlist.B1"/>
      <style:map style:condition="cell-content()=&quot;L&quot;" style:apply-style-name="ConditionalStyle_5f_2" style:base-cell-address="Masterlist.B1"/>
      <style:map style:condition="cell-content()=&quot;A&quot;" style:apply-style-name="ConditionalStyle_5f_3" style:base-cell-address="Masterlist.B1"/>
      <style:map style:condition="cell-content()=&quot;AL&quot;" style:apply-style-name="ConditionalStyle_5f_4" style:base-cell-address="Masterlist.B1"/>
      <style:map style:condition="cell-content()=&quot;p&quot;" style:apply-style-name="ConditionalStyle_5f_5" style:base-cell-address="Masterlist.B1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yes&quot;" style:apply-style-name="ConditionalStyle_5f_6" style:base-cell-address="Masterlist.C1"/>
    </style:style>
    <style:style style:name="ce4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()=&quot;yes&quot;" style:apply-style-name="ConditionalStyle_5f_6" style:base-cell-address="Masterlist.C1"/>
    </style:style>
    <style:style style:name="ce47" style:family="table-cell" style:parent-style-name="Default">
      <style:table-cell-properties fo:background-color="#7f7f7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()=&quot;yes&quot;" style:apply-style-name="ConditionalStyle_5f_6" style:base-cell-address="Masterlist.C1"/>
    </style:style>
    <style:style style:name="ce4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6" style:base-cell-address="Masterlist.C1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yes&quot;" style:apply-style-name="ConditionalStyle_5f_6" style:base-cell-address="Masterlist.C1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yes&quot;" style:apply-style-name="ConditionalStyle_5f_6" style:base-cell-address="Masterlist.C1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yes&quot;" style:apply-style-name="ConditionalStyle_5f_6" style:base-cell-address="Masterlist.C1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yes&quot;" style:apply-style-name="ConditionalStyle_5f_6" style:base-cell-address="Masterlist.C1"/>
    </style:style>
    <style:style style:name="ce5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yes&quot;" style:apply-style-name="ConditionalStyle_5f_6" style:base-cell-address="Masterlist.C1"/>
    </style:style>
    <style:style style:name="ce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yes&quot;" style:apply-style-name="ConditionalStyle_5f_6" style:base-cell-address="Masterlist.C1"/>
    </style:style>
    <style:style style:name="ce5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6" style:base-cell-address="Masterlist.C1"/>
    </style:style>
    <style:style style:name="ce5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6" style:base-cell-address="Masterlist.C1"/>
    </style:style>
    <style:style style:name="ce5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yes&quot;" style:apply-style-name="ConditionalStyle_5f_6" style:base-cell-address="Masterlist.C1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yes&quot;" style:apply-style-name="ConditionalStyle_5f_6" style:base-cell-address="Masterlist.C1"/>
    </style:style>
    <style:style style:name="ce5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yes&quot;" style:apply-style-name="ConditionalStyle_5f_6" style:base-cell-address="Masterlist.C1"/>
    </style:style>
    <style:style style:name="ce6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yes&quot;" style:apply-style-name="ConditionalStyle_5f_6" style:base-cell-address="Masterlist.C1"/>
    </style:style>
    <style:style style:name="ce6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yes&quot;" style:apply-style-name="ConditionalStyle_5f_6" style:base-cell-address="Masterlist.C1"/>
    </style:style>
    <style:style style:name="ce62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yes&quot;" style:apply-style-name="ConditionalStyle_5f_6" style:base-cell-address="Masterlist.C1"/>
    </style:style>
    <style:style style:name="ce63" style:family="table-cell" style:parent-style-name="Default">
      <style:table-cell-properties fo:background-color="#a5a5a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()=&quot;yes&quot;" style:apply-style-name="ConditionalStyle_5f_6" style:base-cell-address="Masterlist.C1"/>
    </style:style>
    <style:style style:name="ce6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yes&quot;" style:apply-style-name="ConditionalStyle_5f_6" style:base-cell-address="Masterlist.C1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yes&quot;" style:apply-style-name="ConditionalStyle_5f_6" style:base-cell-address="Masterlist.C1"/>
    </style:style>
    <style:style style:name="ce6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6" style:base-cell-address="Masterlist.C1"/>
    </style:style>
    <style:style style:name="ce67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()=&quot;yes&quot;" style:apply-style-name="ConditionalStyle_5f_6" style:base-cell-address="Masterlist.C1"/>
    </style:style>
    <style:style style:name="ce68" style:family="table-cell" style:parent-style-name="Default">
      <style:table-cell-properties fo:background-color="#d8d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()=&quot;yes&quot;" style:apply-style-name="ConditionalStyle_5f_6" style:base-cell-address="Masterlist.C1"/>
    </style:style>
    <style:style style:name="ce69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()=&quot;yes&quot;" style:apply-style-name="ConditionalStyle_5f_6" style:base-cell-address="Masterlist.C1"/>
    </style:style>
    <style:style style:name="ce70" style:family="table-cell" style:parent-style-name="Default">
      <style:map style:condition="cell-content()=&quot;yes&quot;" style:apply-style-name="ConditionalStyle_5f_6" style:base-cell-address="Masterlist.C1"/>
    </style:style>
    <style:style style:name="ce7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yes&quot;" style:apply-style-name="ConditionalStyle_5f_6" style:base-cell-address="Masterlist.C1"/>
    </style:style>
    <style:style style:name="ce7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yes&quot;" style:apply-style-name="ConditionalStyle_5f_6" style:base-cell-address="Masterlist.C1"/>
    </style:style>
    <style:style style:name="ce73" style:family="table-cell" style:parent-style-name="Default">
      <style:table-cell-properties fo:background-color="#b6dd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()=&quot;yes&quot;" style:apply-style-name="ConditionalStyle_5f_6" style:base-cell-address="Masterlist.C1"/>
    </style:style>
    <style:style style:name="ce74" style:family="table-cell" style:parent-style-name="Default">
      <style:table-cell-properties fo:background-color="#cc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yes&quot;" style:apply-style-name="ConditionalStyle_5f_6" style:base-cell-address="Masterlist.C1"/>
    </style:style>
    <style:style style:name="ce7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yes&quot;" style:apply-style-name="ConditionalStyle_5f_6" style:base-cell-address="Masterlist.C1"/>
    </style:style>
    <style:style style:name="ce76" style:family="table-cell" style:parent-style-name="Default">
      <style:table-cell-properties fo:background-color="#92cd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()=&quot;yes&quot;" style:apply-style-name="ConditionalStyle_5f_6" style:base-cell-address="Masterlist.C1"/>
    </style:style>
    <style:style style:name="ce77" style:family="table-cell" style:parent-style-name="Default">
      <style:table-cell-properties fo:background-color="#63b9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()=&quot;yes&quot;" style:apply-style-name="ConditionalStyle_5f_6" style:base-cell-address="Masterlist.C1"/>
    </style:style>
    <style:style style:name="ce78" style:family="table-cell" style:parent-style-name="Default">
      <style:table-cell-properties fo:background-color="#3185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()=&quot;yes&quot;" style:apply-style-name="ConditionalStyle_5f_6" style:base-cell-address="Masterlist.C1"/>
    </style:style>
    <style:style style:name="ce79" style:family="table-cell" style:parent-style-name="Default">
      <style:table-cell-properties fo:background-color="#548dd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()=&quot;yes&quot;" style:apply-style-name="ConditionalStyle_5f_6" style:base-cell-address="Masterlist.C1"/>
    </style:style>
    <style:style style:name="ce80" style:family="table-cell" style:parent-style-name="Default">
      <style:table-cell-properties fo:background-color="#c6efc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6" style:base-cell-address="Masterlist.C1"/>
    </style:style>
    <style:style style:name="ce81" style:family="table-cell" style:parent-style-name="Default">
      <style:table-cell-properties fo:background-color="#8db3e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()=&quot;yes&quot;" style:apply-style-name="ConditionalStyle_5f_6" style:base-cell-address="Masterlist.C1"/>
    </style:style>
    <style:style style:name="ce82" style:family="table-cell" style:parent-style-name="Default">
      <style:table-cell-properties fo:background-color="#c6d9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()=&quot;yes&quot;" style:apply-style-name="ConditionalStyle_5f_6" style:base-cell-address="Masterlist.C1"/>
    </style:style>
    <style:style style:name="ce8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yes&quot;" style:apply-style-name="ConditionalStyle_5f_6" style:base-cell-address="Masterlist.C1"/>
    </style:style>
    <style:style style:name="ce8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yes&quot;" style:apply-style-name="ConditionalStyle_5f_6" style:base-cell-address="Masterlist.C1"/>
    </style:style>
    <style:style style:name="ce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yes&quot;" style:apply-style-name="ConditionalStyle_5f_6" style:base-cell-address="Masterlist.C1"/>
    </style:style>
    <style:style style:name="ce8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yes&quot;" style:apply-style-name="ConditionalStyle_5f_6" style:base-cell-address="Masterlist.C1"/>
    </style:style>
    <style:style style:name="ce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ackground-color="#d8d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Default">
      <style:table-cell-properties fo:background-color="#3f3f3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Default">
      <style:table-cell-properties fo:border-bottom="1.76pt solid #000000" fo:background-color="#23993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1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Default">
      <style:table-cell-properties fo:background-color="#ffe381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3" style:family="table-cell" style:parent-style-name="Default">
      <style:table-cell-properties fo:background-color="#cc00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124" style:family="table-cell" style:parent-style-name="Default">
      <style:table-cell-properties fo:background-color="#dd690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5" style:family="table-cell" style:parent-style-name="Default">
      <style:table-cell-properties fo:border-bottom="1.76pt solid #000000" fo:background-color="#0070c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126" style:family="table-cell" style:parent-style-name="Default">
      <style:table-cell-properties fo:background-color="#0041c4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127" style:family="table-cell" style:parent-style-name="Default">
      <style:table-cell-properties fo:background-color="#8064a2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>
        <loext:background-complex-color loext:theme-type="accent4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128" style:family="table-cell" style:parent-style-name="Default">
      <style:table-cell-properties fo:background-color="#b2a1c7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0" style:family="table-cell" style:parent-style-name="Default" style:data-style-name="N126">
      <style:table-cell-properties fo:background-color="#e36c0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>
      <style:table-cell-properties fo:background-color="#3f3f3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</style:style>
    <style:style style:name="ce133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</style:style>
    <style:style style:name="ce134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#ref!" style:apply-style-name="ConditionalStyle_5f_7" style:base-cell-address="Masterlist.R21"/>
    </style:style>
    <style:style style:name="ce135" style:family="table-cell" style:parent-style-name="Default">
      <style:table-cell-properties fo:border-bottom="none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</style:style>
    <style:style style:name="ce136" style:family="table-cell" style:parent-style-name="Default">
      <style:table-cell-properties fo:background-color="#239934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  <style:map style:condition="cell-content()=[.$AK$8]" style:apply-style-name="ConditionalStyle_5f_7" style:base-cell-address="Masterlist.R7"/>
    </style:style>
    <style:style style:name="ce137" style:family="table-cell" style:parent-style-name="Default">
      <style:table-cell-properties fo:border-bottom="0.74pt solid #000000" fo:background-color="#c2d6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</style:style>
    <style:style style:name="ce138" style:family="table-cell" style:parent-style-name="Default">
      <style:table-cell-properties fo:border-bottom="0.74pt solid #000000" fo:background-color="#d8d8d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</style:style>
    <style:style style:name="ce139" style:family="table-cell" style:parent-style-name="Default">
      <style:table-cell-properties fo:border-bottom="none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</style:style>
    <style:style style:name="ce140" style:family="table-cell" style:parent-style-name="Default">
      <style:table-cell-properties fo:background-color="#ffe381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()=[.$AK$8]" style:apply-style-name="ConditionalStyle_5f_7" style:base-cell-address="Masterlist.R7"/>
    </style:style>
    <style:style style:name="ce141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#ref!" style:apply-style-name="ConditionalStyle_5f_7" style:base-cell-address="Masterlist.R21"/>
    </style:style>
    <style:style style:name="ce142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#ref!" style:apply-style-name="ConditionalStyle_5f_7" style:base-cell-address="Masterlist.R21"/>
    </style:style>
    <style:style style:name="ce143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#ref!" style:apply-style-name="ConditionalStyle_5f_7" style:base-cell-address="Masterlist.R21"/>
    </style:style>
    <style:style style:name="ce144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#ref!" style:apply-style-name="ConditionalStyle_5f_7" style:base-cell-address="Masterlist.R21"/>
    </style:style>
    <style:style style:name="ce145" style:family="table-cell" style:parent-style-name="Default">
      <style:table-cell-properties fo:border-bottom="1.76pt solid #000000" fo:background-color="#e5b8b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#ref!" style:apply-style-name="ConditionalStyle_5f_7" style:base-cell-address="Masterlist.R21"/>
    </style:style>
    <style:style style:name="ce146" style:family="table-cell" style:parent-style-name="Default">
      <style:table-cell-properties fo:background-color="#cc00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  <style:map style:condition="cell-content()=#ref!" style:apply-style-name="ConditionalStyle_5f_7" style:base-cell-address="Masterlist.R21"/>
    </style:style>
    <style:style style:name="ce147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#ref!" style:apply-style-name="ConditionalStyle_5f_7" style:base-cell-address="Masterlist.R21"/>
    </style:style>
    <style:style style:name="ce148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#ref!" style:apply-style-name="ConditionalStyle_5f_7" style:base-cell-address="Masterlist.R21"/>
    </style:style>
    <style:style style:name="ce149" style:family="table-cell" style:parent-style-name="Default">
      <style:table-cell-properties fo:background-color="#e5b8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#ref!" style:apply-style-name="ConditionalStyle_5f_7" style:base-cell-address="Masterlist.R21"/>
    </style:style>
    <style:style style:name="ce150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#ref!" style:apply-style-name="ConditionalStyle_5f_7" style:base-cell-address="Masterlist.R21"/>
    </style:style>
    <style:style style:name="ce151" style:family="table-cell" style:parent-style-name="Default">
      <style:table-cell-properties fo:background-color="#dd690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()=[.$AK$8]" style:apply-style-name="ConditionalStyle_5f_7" style:base-cell-address="Masterlist.R7"/>
    </style:style>
    <style:style style:name="ce152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[.$AK$7]" style:apply-style-name="ConditionalStyle_5f_8" style:base-cell-address="Masterlist.R21"/>
      <style:map style:condition="cell-content()=[.$AK$5]" style:apply-style-name="ConditionalStyle_5f_9" style:base-cell-address="Masterlist.R21"/>
    </style:style>
    <style:style style:name="ce153" style:family="table-cell" style:parent-style-name="Default">
      <style:table-cell-properties fo:border-bottom="none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#ref!" style:apply-style-name="ConditionalStyle_5f_7" style:base-cell-address="Masterlist.R21"/>
    </style:style>
    <style:style style:name="ce154" style:family="table-cell" style:parent-style-name="Default">
      <style:table-cell-properties fo:background-color="#0070c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  <style:map style:condition="cell-content()=&quot;M&quot;" style:apply-style-name="ConditionalStyle_5f_1" style:base-cell-address="Masterlist.B1"/>
      <style:map style:condition="cell-content()=&quot;L&quot;" style:apply-style-name="ConditionalStyle_5f_2" style:base-cell-address="Masterlist.B1"/>
      <style:map style:condition="cell-content()=&quot;A&quot;" style:apply-style-name="ConditionalStyle_5f_3" style:base-cell-address="Masterlist.B1"/>
      <style:map style:condition="cell-content()=&quot;AL&quot;" style:apply-style-name="ConditionalStyle_5f_4" style:base-cell-address="Masterlist.B1"/>
      <style:map style:condition="cell-content()=&quot;p&quot;" style:apply-style-name="ConditionalStyle_5f_5" style:base-cell-address="Masterlist.B1"/>
    </style:style>
    <style:style style:name="ce155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</style:style>
    <style:style style:name="ce156" style:family="table-cell" style:parent-style-name="Default">
      <style:table-cell-properties fo:background-color="#e5b8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</style:style>
    <style:style style:name="ce157" style:family="table-cell" style:parent-style-name="Default">
      <style:table-cell-properties fo:background-color="#e5b8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#ref!" style:apply-style-name="ConditionalStyle_5f_7" style:base-cell-address="Masterlist.R21"/>
    </style:style>
    <style:style style:name="ce158" style:family="table-cell" style:parent-style-name="Default">
      <style:table-cell-properties fo:background-color="#0041c4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  <style:map style:condition="cell-content()=[.$AK$8]" style:apply-style-name="ConditionalStyle_5f_7" style:base-cell-address="Masterlist.R7"/>
    </style:style>
    <style:style style:name="ce159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#ref!" style:apply-style-name="ConditionalStyle_5f_7" style:base-cell-address="Masterlist.R21"/>
    </style:style>
    <style:style style:name="ce160" style:family="table-cell" style:parent-style-name="Default">
      <style:table-cell-properties fo:border-bottom="none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#ref!" style:apply-style-name="ConditionalStyle_5f_7" style:base-cell-address="Masterlist.R21"/>
    </style:style>
    <style:style style:name="ce161" style:family="table-cell" style:parent-style-name="Default">
      <style:table-cell-properties fo:background-color="#8064a2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>
        <loext:background-complex-color loext:theme-type="accent4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  <style:map style:condition="cell-content()=[.$AK$8]" style:apply-style-name="ConditionalStyle_5f_7" style:base-cell-address="Masterlist.R7"/>
    </style:style>
    <style:style style:name="ce162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#ref!" style:apply-style-name="ConditionalStyle_5f_7" style:base-cell-address="Masterlist.R227"/>
      <style:map style:condition="cell-content()=[.$AK$7]" style:apply-style-name="ConditionalStyle_5f_8" style:base-cell-address="Masterlist.R227"/>
      <style:map style:condition="cell-content()=[.$AK$5]" style:apply-style-name="ConditionalStyle_5f_9" style:base-cell-address="Masterlist.R227"/>
    </style:style>
    <style:style style:name="ce163" style:family="table-cell" style:parent-style-name="Default">
      <style:table-cell-properties fo:border-bottom="none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#ref!" style:apply-style-name="ConditionalStyle_5f_7" style:base-cell-address="Masterlist.R227"/>
      <style:map style:condition="cell-content()=[.$AK$7]" style:apply-style-name="ConditionalStyle_5f_8" style:base-cell-address="Masterlist.R227"/>
      <style:map style:condition="cell-content()=[.$AK$5]" style:apply-style-name="ConditionalStyle_5f_9" style:base-cell-address="Masterlist.R227"/>
    </style:style>
    <style:style style:name="ce164" style:family="table-cell" style:parent-style-name="Default">
      <style:table-cell-properties fo:background-color="#b2a1c7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()=[.$AK$8]" style:apply-style-name="ConditionalStyle_5f_7" style:base-cell-address="Masterlist.R7"/>
    </style:style>
    <style:style style:name="ce165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</style:style>
    <style:style style:name="ce166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</style:style>
    <style:style style:name="ce167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#ref!" style:apply-style-name="ConditionalStyle_5f_7" style:base-cell-address="Masterlist.R87"/>
      <style:map style:condition="cell-content()=[.$AK$7]" style:apply-style-name="ConditionalStyle_5f_8" style:base-cell-address="Masterlist.R87"/>
      <style:map style:condition="cell-content()=[.$AK$5]" style:apply-style-name="ConditionalStyle_5f_9" style:base-cell-address="Masterlist.R87"/>
    </style:style>
    <style:style style:name="ce168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#ref!" style:apply-style-name="ConditionalStyle_5f_7" style:base-cell-address="Masterlist.R21"/>
    </style:style>
    <style:style style:name="ce169" style:family="table-cell" style:parent-style-name="Default">
      <style:table-cell-properties fo:background-color="#f0f4f9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70" style:family="table-cell" style:parent-style-name="Default">
      <style:table-cell-properties fo:background-color="#ffffff" style:diagonal-bl-tr="none" style:diagonal-tl-br="none" fo:border="none" style:rotation-align="none"/>
      <style:text-properties fo:color="#1f1f1f" style:text-outline="false" style:text-line-through-style="none" style:text-line-through-type="none" style:font-name="Google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126">
      <style:table-cell-properties fo:background-color="#fabf8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</style:style>
    <style:style style:name="ce173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#ref!" style:apply-style-name="ConditionalStyle_5f_7" style:base-cell-address="Masterlist.R21"/>
    </style:style>
    <style:style style:name="ce174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#ref!" style:apply-style-name="ConditionalStyle_5f_7" style:base-cell-address="Masterlist.R21"/>
    </style:style>
    <style:style style:name="ce175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#ref!" style:apply-style-name="ConditionalStyle_5f_7" style:base-cell-address="Masterlist.R21"/>
    </style:style>
    <style:style style:name="ce176" style:family="table-cell" style:parent-style-name="Default">
      <style:table-cell-properties fo:border-bottom="1.76pt solid #000000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#ref!" style:apply-style-name="ConditionalStyle_5f_7" style:base-cell-address="Masterlist.R21"/>
    </style:style>
    <style:style style:name="ce17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#ref!" style:apply-style-name="ConditionalStyle_5f_7" style:base-cell-address="Masterlist.R21"/>
    </style:style>
    <style:style style:name="ce178" style:family="table-cell" style:parent-style-name="Default" style:data-style-name="N126">
      <style:table-cell-properties fo:background-color="#fbd4b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9" style:family="table-cell" style:parent-style-name="Default">
      <style:table-cell-properties fo:border-bottom="0.74pt solid #000000" fo:background-color="#c2d6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#ref!" style:apply-style-name="ConditionalStyle_5f_7" style:base-cell-address="Masterlist.R21"/>
    </style:style>
    <style:style style:name="ce180" style:family="table-cell" style:parent-style-name="Default" style:data-style-name="N126">
      <style:table-cell-properties fo:background-color="#fde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2" style:family="table-cell" style:parent-style-name="Default">
      <style:table-cell-properties fo:background-color="#f0f4f9" style:diagonal-bl-tr="none" style:diagonal-tl-br="none" fo:border="none" style:rotation-align="none"/>
      <style:text-properties fo:color="#1f1f1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4" style:family="table-cell" style:parent-style-name="Default" style:data-style-name="N126">
      <style:table-cell-properties fo:background-color="#daee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</style:style>
    <style:style style:name="ce186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#ref!" style:apply-style-name="ConditionalStyle_5f_7" style:base-cell-address="Masterlist.R21"/>
    </style:style>
    <style:style style:name="ce187" style:family="table-cell" style:parent-style-name="Default">
      <style:table-cell-properties fo:border-bottom="0.74pt solid #000000" fo:background-color="#c2d6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</style:style>
    <style:style style:name="ce188" style:family="table-cell" style:parent-style-name="Default">
      <style:table-cell-properties fo:border-bottom="0.74pt solid #000000" fo:background-color="#d8d8d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</style:style>
    <style:style style:name="ce189" style:family="table-cell" style:parent-style-name="Default">
      <style:table-cell-properties fo:border-bottom="none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</style:style>
    <style:style style:name="ce190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#ref!" style:apply-style-name="ConditionalStyle_5f_7" style:base-cell-address="Masterlist.R21"/>
    </style:style>
    <style:style style:name="ce191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#ref!" style:apply-style-name="ConditionalStyle_5f_7" style:base-cell-address="Masterlist.R21"/>
    </style:style>
    <style:style style:name="ce192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#ref!" style:apply-style-name="ConditionalStyle_5f_7" style:base-cell-address="Masterlist.R21"/>
    </style:style>
    <style:style style:name="ce193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#ref!" style:apply-style-name="ConditionalStyle_5f_7" style:base-cell-address="Masterlist.R21"/>
    </style:style>
    <style:style style:name="ce194" style:family="table-cell" style:parent-style-name="Default">
      <style:table-cell-properties fo:border-bottom="1.76pt solid #000000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#ref!" style:apply-style-name="ConditionalStyle_5f_7" style:base-cell-address="Masterlist.R21"/>
    </style:style>
    <style:style style:name="ce195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#ref!" style:apply-style-name="ConditionalStyle_5f_7" style:base-cell-address="Masterlist.R21"/>
    </style:style>
    <style:style style:name="ce196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#ref!" style:apply-style-name="ConditionalStyle_5f_7" style:base-cell-address="Masterlist.R21"/>
    </style:style>
    <style:style style:name="ce197" style:family="table-cell" style:parent-style-name="Default">
      <style:table-cell-properties fo:background-color="#e5b8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#ref!" style:apply-style-name="ConditionalStyle_5f_7" style:base-cell-address="Masterlist.R21"/>
    </style:style>
    <style:style style:name="ce198" style:family="table-cell" style:parent-style-name="Default">
      <style:table-cell-properties fo:border-bottom="0.74pt solid #000000" fo:background-color="#c2d6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#ref!" style:apply-style-name="ConditionalStyle_5f_7" style:base-cell-address="Masterlist.R21"/>
    </style:style>
    <style:style style:name="ce199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[.$AK$7]" style:apply-style-name="ConditionalStyle_5f_8" style:base-cell-address="Masterlist.R21"/>
      <style:map style:condition="cell-content()=[.$AK$5]" style:apply-style-name="ConditionalStyle_5f_9" style:base-cell-address="Masterlist.R21"/>
    </style:style>
    <style:style style:name="ce200" style:family="table-cell" style:parent-style-name="Default">
      <style:table-cell-properties fo:border-bottom="none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#ref!" style:apply-style-name="ConditionalStyle_5f_7" style:base-cell-address="Masterlist.R21"/>
    </style:style>
    <style:style style:name="ce201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</style:style>
    <style:style style:name="ce202" style:family="table-cell" style:parent-style-name="Default">
      <style:table-cell-properties fo:background-color="#e5b8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</style:style>
    <style:style style:name="ce203" style:family="table-cell" style:parent-style-name="Default">
      <style:table-cell-properties fo:background-color="#e5b8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#ref!" style:apply-style-name="ConditionalStyle_5f_7" style:base-cell-address="Masterlist.R21"/>
    </style:style>
    <style:style style:name="ce204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#ref!" style:apply-style-name="ConditionalStyle_5f_7" style:base-cell-address="Masterlist.R21"/>
    </style:style>
    <style:style style:name="ce205" style:family="table-cell" style:parent-style-name="Default">
      <style:table-cell-properties fo:border-bottom="none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#ref!" style:apply-style-name="ConditionalStyle_5f_7" style:base-cell-address="Masterlist.R21"/>
    </style:style>
    <style:style style:name="ce206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#ref!" style:apply-style-name="ConditionalStyle_5f_7" style:base-cell-address="Masterlist.R227"/>
      <style:map style:condition="cell-content()=[.$AK$7]" style:apply-style-name="ConditionalStyle_5f_8" style:base-cell-address="Masterlist.R227"/>
      <style:map style:condition="cell-content()=[.$AK$5]" style:apply-style-name="ConditionalStyle_5f_9" style:base-cell-address="Masterlist.R227"/>
    </style:style>
    <style:style style:name="ce207" style:family="table-cell" style:parent-style-name="Default">
      <style:table-cell-properties fo:border-bottom="none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#ref!" style:apply-style-name="ConditionalStyle_5f_7" style:base-cell-address="Masterlist.R227"/>
      <style:map style:condition="cell-content()=[.$AK$7]" style:apply-style-name="ConditionalStyle_5f_8" style:base-cell-address="Masterlist.R227"/>
      <style:map style:condition="cell-content()=[.$AK$5]" style:apply-style-name="ConditionalStyle_5f_9" style:base-cell-address="Masterlist.R227"/>
    </style:style>
    <style:style style:name="ce208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</style:style>
    <style:style style:name="ce209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</style:style>
    <style:style style:name="ce210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#ref!" style:apply-style-name="ConditionalStyle_5f_7" style:base-cell-address="Masterlist.R87"/>
      <style:map style:condition="cell-content()=[.$AK$7]" style:apply-style-name="ConditionalStyle_5f_8" style:base-cell-address="Masterlist.R87"/>
      <style:map style:condition="cell-content()=[.$AK$5]" style:apply-style-name="ConditionalStyle_5f_9" style:base-cell-address="Masterlist.R87"/>
    </style:style>
    <style:style style:name="ce21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3" style:family="table-cell" style:parent-style-name="Default" style:data-style-name="N126">
      <style:table-cell-properties fo:background-color="#b6dd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4" style:family="table-cell" style:parent-style-name="Default">
      <style:table-cell-properties fo:border-bottom="none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[.$AK$7]" style:apply-style-name="ConditionalStyle_5f_8" style:base-cell-address="Masterlist.R21"/>
      <style:map style:condition="cell-content()=[.$AK$5]" style:apply-style-name="ConditionalStyle_5f_9" style:base-cell-address="Masterlist.R21"/>
    </style:style>
    <style:style style:name="ce215" style:family="table-cell" style:parent-style-name="Default" style:data-style-name="N126">
      <style:table-cell-properties fo:background-color="#92cd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7" style:family="table-cell" style:parent-style-name="Default" style:data-style-name="N126">
      <style:table-cell-properties fo:background-color="#3490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8" style:family="table-cell" style:parent-style-name="Default" style:data-style-name="N126">
      <style:table-cell-properties fo:background-color="#dbe5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9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#ref!" style:apply-style-name="ConditionalStyle_5f_7" style:base-cell-address="Masterlist.R21"/>
    </style:style>
    <style:style style:name="ce220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</style:style>
    <style:style style:name="ce221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</style:style>
    <style:style style:name="ce222" style:family="table-cell" style:parent-style-name="Default" style:data-style-name="N126">
      <style:table-cell-properties fo:background-color="#8db3e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3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</style:style>
    <style:style style:name="ce224" style:family="table-cell" style:parent-style-name="Default">
      <style:table-cell-properties fo:border-bottom="none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</style:style>
    <style:style style:name="ce225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</style:style>
    <style:style style:name="ce226" style:family="table-cell" style:parent-style-name="Default">
      <style:table-cell-properties fo:border-bottom="none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</style:style>
    <style:style style:name="ce227" style:family="table-cell" style:parent-style-name="Default" style:data-style-name="N126">
      <style:table-cell-properties fo:background-color="#548dd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8" style:family="table-cell" style:parent-style-name="Default" style:data-style-name="N126">
      <style:table-cell-properties fo:background-color="#eaf1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9" style:family="table-cell" style:parent-style-name="Default" style:data-style-name="N126">
      <style:table-cell-properties fo:background-color="#d6e3b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0" style:family="table-cell" style:parent-style-name="Default" style:data-style-name="N126">
      <style:table-cell-properties fo:background-color="#c2d69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1" style:family="table-cell" style:parent-style-name="Default" style:data-style-name="N126">
      <style:table-cell-properties fo:background-color="#76923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2" style:family="table-cell" style:parent-style-name="Default" style:data-style-name="N126">
      <style:table-cell-properties fo:background-color="#ff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3" style:family="table-cell" style:parent-style-name="Default" style:data-style-name="N126">
      <style:table-cell-properties fo:background-color="#ff9b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4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</style:style>
    <style:style style:name="ce235" style:family="table-cell" style:parent-style-name="Default">
      <style:table-cell-properties fo:border-bottom="none" fo:background-color="#e5b8b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</style:style>
    <style:style style:name="ce236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</style:style>
    <style:style style:name="ce237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</style:style>
    <style:style style:name="ce238" style:family="table-cell" style:parent-style-name="Default" style:data-style-name="N126">
      <style:table-cell-properties fo:background-color="#cc66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fo:background-color="#e5b8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</style:style>
    <style:style style:name="ce241" style:family="table-cell" style:parent-style-name="Default">
      <style:table-cell-properties fo:border-bottom="none" fo:background-color="#e5b8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</style:style>
    <style:style style:name="ce242" style:family="table-cell" style:parent-style-name="Default">
      <style:table-cell-properties fo:background-color="#e5b8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  <style:map style:condition="cell-content()=[.$AK$5]" style:apply-style-name="ConditionalStyle_5f_9" style:base-cell-address="Masterlist.R7"/>
      <style:map style:condition="cell-content()=[.$AK$7]" style:apply-style-name="ConditionalStyle_5f_8" style:base-cell-address="Masterlist.R7"/>
    </style:style>
    <style:style style:name="ce243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#ref!" style:apply-style-name="ConditionalStyle_5f_7" style:base-cell-address="Masterlist.R21"/>
    </style:style>
    <style:style style:name="ce244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#ref!" style:apply-style-name="ConditionalStyle_5f_7" style:base-cell-address="Masterlist.R21"/>
    </style:style>
    <style:style style:name="ce245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#ref!" style:apply-style-name="ConditionalStyle_5f_7" style:base-cell-address="Masterlist.R21"/>
    </style:style>
    <style:style style:name="ce246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#ref!" style:apply-style-name="ConditionalStyle_5f_7" style:base-cell-address="Masterlist.R21"/>
    </style:style>
    <style:style style:name="ce247" style:family="table-cell" style:parent-style-name="Default">
      <style:table-cell-properties fo:border-bottom="1.76pt solid #000000" fo:background-color="#e5b8b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#ref!" style:apply-style-name="ConditionalStyle_5f_7" style:base-cell-address="Masterlist.R21"/>
    </style:style>
    <style:style style:name="ce24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#ref!" style:apply-style-name="ConditionalStyle_5f_7" style:base-cell-address="Masterlist.R21"/>
    </style:style>
    <style:style style:name="ce249" style:family="table-cell" style:parent-style-name="Default">
      <style:table-cell-properties style:diagonal-bl-tr="none" style:diagonal-tl-br="none" style:text-align-source="fix" style:repeat-content="false" fo:wrap-option="no-wrap" fo:border="0.74pt solid #aaaaa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250" style:family="table-cell" style:parent-style-name="Default">
      <style:table-cell-properties fo:background-color="#c2d69b" style:diagonal-bl-tr="none" style:diagonal-tl-br="none" style:text-align-source="fix" style:repeat-content="false" fo:wrap-option="no-wrap" fo:border="0.74pt solid #aaaaa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251" style:family="table-cell" style:parent-style-name="Default">
      <style:table-cell-properties fo:background-color="#edcbcb" style:diagonal-bl-tr="none" style:diagonal-tl-br="none" style:text-align-source="fix" style:repeat-content="false" fo:wrap-option="no-wrap" fo:border="0.74pt solid #aaaaa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de4c4a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3.556cm" loext:decorative="false"/>
      <style:paragraph-properties style:writing-mode="lr-tb" fo:text-align="start"/>
    </style:style>
    <style:style style:name="gr2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0.646cm" loext:decorative="false"/>
      <style:paragraph-properties style:writing-mode="lr-tb" fo:text-align="start"/>
    </style:style>
    <style:style style:name="gr3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186cm" loext:decorative="false"/>
      <style:paragraph-properties style:writing-mode="lr-tb" fo:text-align="start"/>
    </style:style>
    <style:style style:name="gr4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148cm" loext:decorative="false"/>
      <style:paragraph-properties style:writing-mode="lr-tb" fo:text-align="start"/>
    </style:style>
    <style:style style:name="gr5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651cm" loext:decorative="false"/>
      <style:paragraph-properties style:writing-mode="lr-tb" fo:text-align="start"/>
    </style:style>
    <style:style style:name="P1" style:family="paragraph">
      <loext:graphic-properties draw:fill="solid" draw:fill-color="#ffffe1"/>
      <style:paragraph-properties fo:text-align="star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64" table:default-cell-style-name="Default"/>
        <table:table-row table:style-name="ro1">
          <table:table-cell table:style-name="ce1"/>
          <table:table-cell table:style-name="ce4" office:value-type="string" calcext:value-type="string">
            <text:p>Name</text:p>
          </table:table-cell>
          <table:table-cell table:style-name="ce9" office:value-type="string" calcext:value-type="string">
            <text:p>02 May - Prayer</text:p>
          </table:table-cell>
          <table:table-cell table:style-name="ce9" office:value-type="string" calcext:value-type="string">
            <text:p>03 May - Services</text:p>
          </table:table-cell>
          <table:table-cell table:style-name="ce9" office:value-type="string" calcext:value-type="string">
            <text:p>23 May - Prayer</text:p>
          </table:table-cell>
          <table:table-cell table:style-name="ce9" office:value-type="string" calcext:value-type="string">
            <text:p>24 May - Services</text:p>
          </table:table-cell>
          <table:table-cell table:style-name="ce9" office:value-type="string" calcext:value-type="string">
            <text:p>30 May - Prayer</text:p>
          </table:table-cell>
          <table:table-cell table:style-name="ce9" office:value-type="string" calcext:value-type="string">
            <text:p>31 May - Services</text:p>
          </table:table-cell>
          <table:table-cell table:style-name="ce9" office:value-type="string" calcext:value-type="string">
            <text:p>06 June - Prayer</text:p>
          </table:table-cell>
          <table:table-cell table:style-name="ce9" office:value-type="string" calcext:value-type="string">
            <text:p>07 June - Services</text:p>
          </table:table-cell>
          <table:table-cell table:style-name="ce9" office:value-type="string" calcext:value-type="string">
            <text:p>13 June - Prayer</text:p>
          </table:table-cell>
          <table:table-cell table:style-name="ce9" office:value-type="string" calcext:value-type="string">
            <text:p>14 June - Services</text:p>
          </table:table-cell>
          <table:table-cell table:style-name="ce9" office:value-type="string" calcext:value-type="string">
            <text:p>20 June - Prayer</text:p>
          </table:table-cell>
          <table:table-cell table:style-name="ce9" office:value-type="string" calcext:value-type="string">
            <text:p>21 June - Services</text:p>
          </table:table-cell>
          <table:table-cell table:style-name="ce9" office:value-type="string" calcext:value-type="string">
            <text:p>27 June - Prayer</text:p>
          </table:table-cell>
          <table:table-cell table:style-name="ce9" office:value-type="string" calcext:value-type="string">
            <text:p>28 June - Services</text:p>
          </table:table-cell>
          <table:table-cell table:number-columns-repeated="16364"/>
        </table:table-row>
        <table:table-row table:style-name="ro2">
          <table:table-cell table:style-name="ce2"/>
          <table:table-cell table:style-name="ce5" office:value-type="string" calcext:value-type="string">
            <text:p>Jayl Pretorius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5"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Tristan Badenhorst</text:p>
          </table:table-cell>
          <table:table-cell table:number-columns-repeated="14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Christo Swanepoel</text:p>
          </table:table-cell>
          <table:table-cell table:number-columns-repeated="14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Renier Gerbe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6" office:value-type="string" calcext:value-type="string">
            <text:p>Jarryd Sevenoaks</text:p>
          </table:table-cell>
          <table:table-cell table:number-columns-repeated="14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Morne Coetzee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Lize Heu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Jayden du Toit</text:p>
          </table:table-cell>
          <table:table-cell table:number-columns-repeated="14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Mandre Smit</text:p>
          </table:table-cell>
          <table:table-cell table:number-columns-repeated="14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Moshidi Mabaso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Karla Naude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Francois Pieters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2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Tiaan Nel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David Jansen Van Vuuren</text:p>
          </table:table-cell>
          <table:table-cell table:number-columns-repeated="14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Wayne Ferreira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Justin Robertse</text:p>
          </table:table-cell>
          <table:table-cell table:number-columns-repeated="14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Sean Botha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Gavin de Villier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Malerato Mosia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Nicole Barlow</text:p>
          </table:table-cell>
          <table:table-cell table:number-columns-repeated="14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Johan Strydom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6" office:value-type="string" calcext:value-type="string">
            <text:p>Christian van der Merwe</text:p>
          </table:table-cell>
          <table:table-cell table:number-columns-repeated="14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Juan-Jacques Koch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Christo Pretorius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Amber Chen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Bertus Janse van Rensburg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7" office:value-type="string" calcext:value-type="string">
            <text:p>Brian Mvukwe</text:p>
          </table:table-cell>
          <table:table-cell table:number-columns-repeated="14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7" office:value-type="string" calcext:value-type="string">
            <text:p>Wian Laing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2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Vanessa Botsime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Andy Urquhart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Martin Oosthuizen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7" office:value-type="string" calcext:value-type="string">
            <text:p>Kevin Emsli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2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Armand Visser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Werner Vermeulen</text:p>
          </table:table-cell>
          <table:table-cell table:number-columns-repeated="1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Michelle Engelbrecht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Danika Oosthuizen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Anrich Kruger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Walter Jacob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Rikus Conradie</text:p>
          </table:table-cell>
          <table:table-cell table:number-columns-repeated="14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William Wentzel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2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Anro Conradie</text:p>
          </table:table-cell>
          <table:table-cell table:number-columns-repeated="14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Michelle Grobler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7" office:value-type="string" calcext:value-type="string">
            <text:p>Nadette Norris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Ntando Ngob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6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Lindie van der Westhuizen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Isabel Robberts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Erastus Heystek</text:p>
          </table:table-cell>
          <table:table-cell table:number-columns-repeated="8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Zioné Pretoriu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2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Elbert Loubser</text:p>
          </table:table-cell>
          <table:table-cell table:number-columns-repeated="9"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Vida Ras</text:p>
          </table:table-cell>
          <table:table-cell table:number-columns-repeated="14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Reinhardt Visse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Zea de Wet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Chris Myburgh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Franco Conradi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Jenique Mouton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" table:style-name="ce11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7" office:value-type="string" calcext:value-type="string">
            <text:p>Eugene Snyders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7" office:value-type="string" calcext:value-type="string">
            <text:p>André Lesch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7" office:value-type="string" calcext:value-type="string">
            <text:p>Saskia Marais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7" office:value-type="string" calcext:value-type="string">
            <text:p>JP Marais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Anke Amsenga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7" office:value-type="string" calcext:value-type="string">
            <text:p>Victoria Cope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Iddo Smith</text:p>
          </table:table-cell>
          <table:table-cell table:number-columns-repeated="10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Wiehan Delafield</text:p>
          </table:table-cell>
          <table:table-cell table:number-columns-repeated="14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2">
          <table:table-cell table:style-name="ce2"/>
          <table:table-cell table:style-name="ce5" office:value-type="string" calcext:value-type="string">
            <text:p>Refilwe Mohasi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2">
          <table:table-cell table:style-name="ce2"/>
          <table:table-cell table:style-name="ce7" office:value-type="string" calcext:value-type="string">
            <text:p>Robert Lyon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16364"/>
        </table:table-row>
        <table:table-row table:style-name="ro2">
          <table:table-cell table:style-name="ce2"/>
          <table:table-cell table:style-name="ce5" office:value-type="string" calcext:value-type="string">
            <text:p>Krystal-Lee van Heerden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Gerrie Moolman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Chanie Erasmus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Kayla Mouton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style-name="ce2"/>
          <table:table-cell table:style-name="ce5" office:value-type="string" calcext:value-type="string">
            <text:p>Llewelyn Marais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/>
          <table:table-cell table:style-name="ce7" office:value-type="string" calcext:value-type="string">
            <text:p>Marianka Jacob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2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/>
          <table:table-cell table:style-name="ce7" office:value-type="string" calcext:value-type="string">
            <text:p>Christo Schoeman</text:p>
          </table:table-cell>
          <table:table-cell table:number-columns-repeated="1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6364"/>
        </table:table-row>
        <table:table-row table:style-name="ro3">
          <table:table-cell/>
          <table:table-cell table:style-name="ce5" office:value-type="string" calcext:value-type="string">
            <text:p>Ilana Pels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6364"/>
        </table:table-row>
        <table:table-row table:style-name="ro3">
          <table:table-cell/>
          <table:table-cell table:style-name="ce5" office:value-type="string" calcext:value-type="string">
            <text:p>Philip Ler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 table:style-name="ce11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16364"/>
        </table:table-row>
        <table:table-row table:style-name="ro3">
          <table:table-cell/>
          <table:table-cell table:style-name="ce5" office:value-type="string" calcext:value-type="string">
            <text:p>Thanos Kanellopoulos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/>
          <table:table-cell table:style-name="ce7" office:value-type="string" calcext:value-type="string">
            <text:p>Zander Stemmet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3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/>
          <table:table-cell table:style-name="ce5" office:value-type="string" calcext:value-type="string">
            <text:p>Zené Willems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6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/>
          <table:table-cell table:style-name="ce7" office:value-type="string" calcext:value-type="string">
            <text:p>Henry Norri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2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/>
          <table:table-cell table:style-name="ce5" office:value-type="string" calcext:value-type="string">
            <text:p>Charl Wehrs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6364"/>
        </table:table-row>
        <table:table-row table:style-name="ro3">
          <table:table-cell/>
          <table:table-cell table:style-name="ce7" office:value-type="string" calcext:value-type="string">
            <text:p>Christoph Snell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/>
          <table:table-cell table:style-name="ce5" office:value-type="string" calcext:value-type="string">
            <text:p>Dieune Mostert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6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/>
          <table:table-cell table:style-name="ce7" office:value-type="string" calcext:value-type="string">
            <text:p>Joe Meyer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16364"/>
        </table:table-row>
        <table:table-row table:style-name="ro3">
          <table:table-cell/>
          <table:table-cell table:style-name="ce5" office:value-type="string" calcext:value-type="string">
            <text:p>Roux-Han Basson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number-columns-repeated="16364"/>
        </table:table-row>
        <table:table-row table:style-name="ro3">
          <table:table-cell/>
          <table:table-cell table:style-name="ce5" office:value-type="string" calcext:value-type="string">
            <text:p>Danielle Rossouw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/>
          <table:table-cell table:style-name="ce5" office:value-type="string" calcext:value-type="string">
            <text:p>Lida-Marie Huysamen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4">
          <table:table-cell/>
          <table:table-cell table:style-name="ce7" office:value-type="string" calcext:value-type="string">
            <text:p>Ewald Fourie</text:p>
          </table:table-cell>
          <table:table-cell table:number-columns-repeated="6" table:style-name="ce11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4">
          <table:table-cell/>
          <table:table-cell table:style-name="ce5" office:value-type="string" calcext:value-type="string">
            <text:p>Luke Nel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4">
          <table:table-cell/>
          <table:table-cell table:style-name="ce5" office:value-type="string" calcext:value-type="string">
            <text:p>Laura-Lee Kruyswijk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4">
          <table:table-cell/>
          <table:table-cell table:style-name="ce5" office:value-type="string" calcext:value-type="string">
            <text:p>Ruan Van Tonder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4">
          <table:table-cell/>
          <table:table-cell table:style-name="ce5" office:value-type="string" calcext:value-type="string">
            <text:p>Casandri Klopper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4">
          <table:table-cell/>
          <table:table-cell table:style-name="ce5" office:value-type="string" calcext:value-type="string">
            <text:p>Jaco Smit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16364"/>
        </table:table-row>
        <table:table-row table:style-name="ro4">
          <table:table-cell/>
          <table:table-cell table:style-name="ce5" office:value-type="string" calcext:value-type="string">
            <text:p>Zelmi du Toit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6364"/>
        </table:table-row>
        <table:table-row table:style-name="ro4">
          <table:table-cell/>
          <table:table-cell table:style-name="ce7" office:value-type="string" calcext:value-type="string">
            <text:p>Ruan de Jong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4">
          <table:table-cell/>
          <table:table-cell table:style-name="ce7" office:value-type="string" calcext:value-type="string">
            <text:p>Laenita de Jonge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6364"/>
        </table:table-row>
        <table:table-row table:style-name="ro4">
          <table:table-cell/>
          <table:table-cell table:style-name="ce5" office:value-type="string" calcext:value-type="string">
            <text:p>Christopher Geye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4">
          <table:table-cell/>
          <table:table-cell table:style-name="ce5" office:value-type="string" calcext:value-type="string">
            <text:p>Creflo Goliath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4">
          <table:table-cell/>
          <table:table-cell table:style-name="ce5" office:value-type="string" calcext:value-type="string">
            <text:p>Lunga Sibya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4">
          <table:table-cell/>
          <table:table-cell table:style-name="ce5" office:value-type="string" calcext:value-type="string">
            <text:p>Prince Nguban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4">
          <table:table-cell/>
          <table:table-cell table:style-name="ce5" office:value-type="string" calcext:value-type="string">
            <text:p>Dane Robertse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4">
          <table:table-cell/>
          <table:table-cell table:style-name="ce7" office:value-type="string" calcext:value-type="string">
            <text:p>Jaco Bezuidenhout</text:p>
          </table:table-cell>
          <table:table-cell table:number-columns-repeated="14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4">
          <table:table-cell/>
          <table:table-cell table:style-name="ce7" office:value-type="string" calcext:value-type="string">
            <text:p>Sarnia Schoeman</text:p>
          </table:table-cell>
          <table:table-cell table:number-columns-repeated="1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6364"/>
        </table:table-row>
        <table:table-row table:style-name="ro4">
          <table:table-cell/>
          <table:table-cell table:style-name="ce7" office:value-type="string" calcext:value-type="string">
            <text:p>Xavier Nunes</text:p>
          </table:table-cell>
          <table:table-cell table:number-columns-repeated="14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4">
          <table:table-cell/>
          <table:table-cell table:style-name="ce5" office:value-type="string" calcext:value-type="string">
            <text:p>Solett Smuts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6364"/>
        </table:table-row>
        <table:table-row table:style-name="ro4">
          <table:table-cell/>
          <table:table-cell table:style-name="ce5" office:value-type="string" calcext:value-type="string">
            <text:p>Stefan Smuts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6364"/>
        </table:table-row>
        <table:table-row table:style-name="ro4">
          <table:table-cell/>
          <table:table-cell table:style-name="ce5" office:value-type="string" calcext:value-type="string">
            <text:p>Brandon Roberts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4">
          <table:table-cell/>
          <table:table-cell table:style-name="ce5" office:value-type="string" calcext:value-type="string">
            <text:p>Ephert Roodt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6364"/>
        </table:table-row>
        <table:table-row table:style-name="ro4">
          <table:table-cell/>
          <table:table-cell table:style-name="ce5" office:value-type="string" calcext:value-type="string">
            <text:p>Anke van Rooyen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4">
          <table:table-cell/>
          <table:table-cell table:style-name="ce5" office:value-type="string" calcext:value-type="string">
            <text:p>Kendra Botha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6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4">
          <table:table-cell/>
          <table:table-cell table:style-name="ce5" office:value-type="string" calcext:value-type="string">
            <text:p>Zandri Urquhart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6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4">
          <table:table-cell/>
          <table:table-cell table:style-name="ce7" office:value-type="string" calcext:value-type="string">
            <text:p>Jeandre Jacob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2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4">
          <table:table-cell/>
          <table:table-cell table:style-name="ce5" office:value-type="string" calcext:value-type="string">
            <text:p>Richann Ellis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number-columns-repeated="16364"/>
        </table:table-row>
        <table:table-row table:style-name="ro4">
          <table:table-cell/>
          <table:table-cell table:style-name="ce5" office:value-type="string" calcext:value-type="string">
            <text:p>Rudolph Bezuidenhout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6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6364"/>
        </table:table-row>
        <table:table-row table:style-name="ro4">
          <table:table-cell/>
          <table:table-cell table:style-name="ce5" office:value-type="string" calcext:value-type="string">
            <text:p>Monique Esterhuizen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6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4">
          <table:table-cell/>
          <table:table-cell table:style-name="ce5" office:value-type="string" calcext:value-type="string">
            <text:p>Demi de Oliveira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4">
          <table:table-cell/>
          <table:table-cell table:style-name="ce5" office:value-type="string" calcext:value-type="string">
            <text:p>Chante Hattingh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7"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5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4">
          <table:table-cell/>
          <table:table-cell table:style-name="ce5" office:value-type="string" calcext:value-type="string">
            <text:p>Danika van Wyk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4">
          <table:table-cell/>
          <table:table-cell table:style-name="ce5" office:value-type="string" calcext:value-type="string">
            <text:p>Gcobisa ziki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4">
          <table:table-cell/>
          <table:table-cell table:style-name="ce5" office:value-type="string" calcext:value-type="string">
            <text:p>Jaco Kriek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number-columns-repeated="16364"/>
        </table:table-row>
        <table:table-row table:style-name="ro4">
          <table:table-cell/>
          <table:table-cell table:style-name="ce5" office:value-type="string" calcext:value-type="string">
            <text:p>Shardone Cronj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6364"/>
        </table:table-row>
        <table:table-row table:style-name="ro4">
          <table:table-cell/>
          <table:table-cell table:style-name="ce5" office:value-type="string" calcext:value-type="string">
            <text:p>Walco Mathewson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6" table:style-name="ce11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4">
          <table:table-cell/>
          <table:table-cell table:style-name="ce5" office:value-type="string" calcext:value-type="string">
            <text:p>Philcu Hattingh</text:p>
          </table:table-cell>
          <table:table-cell table:number-columns-repeated="14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4">
          <table:table-cell/>
          <table:table-cell table:style-name="ce5" office:value-type="string" calcext:value-type="string">
            <text:p>Johan Koekemoer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6364"/>
        </table:table-row>
        <table:table-row table:style-name="ro4">
          <table:table-cell table:style-name="ce3"/>
          <table:table-cell table:style-name="ce5" office:value-type="string" calcext:value-type="string">
            <text:p>Kira Kriessbach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6358"/>
        </table:table-row>
        <table:table-row table:style-name="ro4">
          <table:table-cell table:style-name="ce3"/>
          <table:table-cell table:style-name="ce5" office:value-type="string" calcext:value-type="string">
            <text:p>Nadia Carolus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6358"/>
        </table:table-row>
        <table:table-row table:style-name="ro4">
          <table:table-cell table:style-name="ce3"/>
          <table:table-cell table:style-name="ce5" office:value-type="string" calcext:value-type="string">
            <text:p>Kalven de Oliveira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6358"/>
        </table:table-row>
        <table:table-row table:style-name="ro4">
          <table:table-cell table:style-name="ce3"/>
          <table:table-cell table:style-name="ce5" office:value-type="string" calcext:value-type="string">
            <text:p>Marco Delport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6358"/>
        </table:table-row>
        <table:table-row table:style-name="ro4">
          <table:table-cell table:style-name="ce3"/>
          <table:table-cell table:style-name="ce5" office:value-type="string" calcext:value-type="string">
            <text:p>Elbert Smith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6358"/>
        </table:table-row>
        <table:table-row table:style-name="ro4">
          <table:table-cell table:style-name="ce3"/>
          <table:table-cell table:style-name="ce5" office:value-type="string" calcext:value-type="string">
            <text:p>Ash-Lee La Grange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6358"/>
        </table:table-row>
        <table:table-row table:style-name="ro4">
          <table:table-cell table:style-name="ce3"/>
          <table:table-cell table:style-name="ce5" office:value-type="string" calcext:value-type="string">
            <text:p>Armand La Grange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6358"/>
        </table:table-row>
        <table:table-row table:style-name="ro4">
          <table:table-cell table:style-name="ce3"/>
          <table:table-cell table:style-name="ce5" office:value-type="string" calcext:value-type="string">
            <text:p>Anmarie Scheepers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6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6358"/>
        </table:table-row>
        <table:table-row table:style-name="ro4">
          <table:table-cell table:style-name="ce3"/>
          <table:table-cell table:style-name="ce5" office:value-type="string" calcext:value-type="string">
            <text:p>Jacques Kotze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3" table:number-columns-repeated="6"/>
          <table:table-cell table:number-columns-repeated="16358"/>
        </table:table-row>
        <table:table-row table:style-name="ro4">
          <table:table-cell table:style-name="ce3"/>
          <table:table-cell table:style-name="ce5" office:value-type="string" calcext:value-type="string">
            <text:p>Rynhardt Nel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6358"/>
        </table:table-row>
        <table:table-row table:style-name="ro4">
          <table:table-cell table:style-name="ce3"/>
          <table:table-cell table:style-name="ce5" office:value-type="string" calcext:value-type="string">
            <text:p>Marco Grobler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3" table:number-columns-repeated="6"/>
          <table:table-cell table:number-columns-repeated="16358"/>
        </table:table-row>
        <table:table-row table:style-name="ro4">
          <table:table-cell table:style-name="ce3"/>
          <table:table-cell table:style-name="ce5" office:value-type="string" calcext:value-type="string">
            <text:p>Ben Van Zyl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6358"/>
        </table:table-row>
        <table:table-row table:style-name="ro4">
          <table:table-cell table:style-name="ce3"/>
          <table:table-cell table:style-name="ce5" office:value-type="string" calcext:value-type="string">
            <text:p>Tiaan Botes</text:p>
          </table:table-cell>
          <table:table-cell table:number-columns-repeated="6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6" table:style-name="ce11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6358"/>
        </table:table-row>
        <table:table-row table:style-name="ro4">
          <table:table-cell table:style-name="ce3"/>
          <table:table-cell table:style-name="ce5" office:value-type="string" calcext:value-type="string">
            <text:p>Morne Pretorius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5"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3" table:number-columns-repeated="6"/>
          <table:table-cell table:number-columns-repeated="16358"/>
        </table:table-row>
        <table:table-row table:style-name="ro4">
          <table:table-cell table:style-name="ce3"/>
          <table:table-cell table:style-name="ce5" office:value-type="string" calcext:value-type="string">
            <text:p>Magnus Koola</text:p>
          </table:table-cell>
          <table:table-cell table:number-columns-repeated="14" table:style-name="ce11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6358"/>
        </table:table-row>
        <table:table-row table:style-name="ro4">
          <table:table-cell table:style-name="ce3"/>
          <table:table-cell table:style-name="ce5" office:value-type="string" calcext:value-type="string">
            <text:p>Minkateko Nkuna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6358"/>
        </table:table-row>
        <table:table-row table:style-name="ro4">
          <table:table-cell table:style-name="ce3"/>
          <table:table-cell table:style-name="ce5" office:value-type="string" calcext:value-type="string">
            <text:p>Daniel de Kock</text:p>
          </table:table-cell>
          <table:table-cell table:number-columns-repeated="14" table:style-name="ce11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6358"/>
        </table:table-row>
        <table:table-row table:style-name="ro4">
          <table:table-cell table:style-name="ce3"/>
          <table:table-cell table:style-name="ce5" office:value-type="string" calcext:value-type="string">
            <text:p>Werner Myburgh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6358"/>
        </table:table-row>
        <table:table-row table:style-name="ro4">
          <table:table-cell table:style-name="ce3"/>
          <table:table-cell table:style-name="ce5" office:value-type="string" calcext:value-type="string">
            <text:p>Werner Schulte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6358"/>
        </table:table-row>
        <table:table-row table:style-name="ro4">
          <table:table-cell table:style-name="ce3"/>
          <table:table-cell table:style-name="ce5" office:value-type="string" calcext:value-type="string">
            <text:p>Justin Jooste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6358"/>
        </table:table-row>
        <table:table-row table:style-name="ro4">
          <table:table-cell table:style-name="ce3"/>
          <table:table-cell table:style-name="ce5" office:value-type="string" calcext:value-type="string">
            <text:p>Jonker Koorts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3" table:number-columns-repeated="6"/>
          <table:table-cell table:number-columns-repeated="16358"/>
        </table:table-row>
        <table:table-row table:style-name="ro4">
          <table:table-cell table:style-name="ce3"/>
          <table:table-cell table:style-name="ce5" office:value-type="string" calcext:value-type="string">
            <text:p>Rossouw Venter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6358"/>
        </table:table-row>
        <table:table-row table:style-name="ro5">
          <table:table-cell table:style-name="ce3"/>
          <table:table-cell table:style-name="ce5" office:value-type="string" calcext:value-type="string">
            <text:p>Cara Koorts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6358"/>
        </table:table-row>
        <table:table-row table:style-name="ro5">
          <table:table-cell table:style-name="ce3"/>
          <table:table-cell table:style-name="ce5" office:value-type="string" calcext:value-type="string">
            <text:p>Elrisa Kruger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Jonathan Solomon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6364"/>
        </table:table-row>
        <table:table-row table:style-name="ro5">
          <table:table-cell/>
          <table:table-cell table:style-name="ce5" office:value-type="string" calcext:value-type="string">
            <text:p>Nkomi Selapa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5">
          <table:table-cell/>
          <table:table-cell table:style-name="ce5" office:value-type="string" calcext:value-type="string">
            <text:p>Kian Cronj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6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5">
          <table:table-cell/>
          <table:table-cell table:style-name="ce5" office:value-type="string" calcext:value-type="string">
            <text:p>Righard van der Vyver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5">
          <table:table-cell/>
          <table:table-cell table:style-name="ce5" office:value-type="string" calcext:value-type="string">
            <text:p>Hennie Van Jaarsvel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2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5">
          <table:table-cell/>
          <table:table-cell table:style-name="ce5" office:value-type="string" calcext:value-type="string">
            <text:p>Shevonne Dick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number-columns-repeated="16364"/>
        </table:table-row>
        <table:table-row table:style-name="ro5">
          <table:table-cell/>
          <table:table-cell table:style-name="ce5" office:value-type="string" calcext:value-type="string">
            <text:p>Chané Swanepoel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5">
          <table:table-cell/>
          <table:table-cell table:style-name="ce7" office:value-type="string" calcext:value-type="string">
            <text:p>Jestus Fouche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5">
          <table:table-cell/>
          <table:table-cell table:style-name="ce5" office:value-type="string" calcext:value-type="string">
            <text:p>Jan Bakker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6364"/>
        </table:table-row>
        <table:table-row table:style-name="ro5">
          <table:table-cell/>
          <table:table-cell table:style-name="ce5" office:value-type="string" calcext:value-type="string">
            <text:p>Jandre Strydom</text:p>
          </table:table-cell>
          <table:table-cell table:number-columns-repeated="14" table:style-name="ce11"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/>
          <table:table-cell table:style-name="ce5" office:value-type="string" calcext:value-type="string">
            <text:p>Janco Weyers</text:p>
          </table:table-cell>
          <table:table-cell table:number-columns-repeated="14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6362"/>
        </table:table-row>
        <table:table-row table:style-name="ro1">
          <table:table-cell/>
          <table:table-cell table:style-name="ce5" office:value-type="string" calcext:value-type="string">
            <text:p>Mikael Pretorius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/>
          <table:table-cell table:style-name="ce5" office:value-type="string" calcext:value-type="string">
            <text:p>Cara Koorts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" table:style-name="ce12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number-columns-repeated="16366"/>
        </table:table-row>
        <table:table-row table:style-name="ro1">
          <table:table-cell/>
          <table:table-cell table:style-name="ce5" office:value-type="string" calcext:value-type="string">
            <text:p>Elrisa Kruger</text:p>
          </table:table-cell>
          <table:table-cell table:style-name="ce12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2" office:value-type="string" calcext:value-type="string">
            <text:p>-</text:p>
          </table:table-cell>
          <table:table-cell table:number-columns-repeated="16366"/>
        </table:table-row>
        <table:table-row table:style-name="ro1">
          <table:table-cell/>
          <table:table-cell table:style-name="ce5" office:value-type="string" calcext:value-type="string">
            <text:p>Jonathan Solomon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table:style-name="ce12" office:value-type="string" calcext:value-type="string">
            <text:p>-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6366"/>
        </table:table-row>
        <table:table-row table:style-name="ro1">
          <table:table-cell/>
          <table:table-cell table:style-name="ce5" office:value-type="string" calcext:value-type="string">
            <text:p>Nkomi Selapa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8" table:style-name="ce12" office:value-type="string" calcext:value-type="string">
            <text:p>-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6366"/>
        </table:table-row>
        <table:table-row table:style-name="ro1">
          <table:table-cell/>
          <table:table-cell table:style-name="ce5" office:value-type="string" calcext:value-type="string">
            <text:p>Kian Cronje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6366"/>
        </table:table-row>
        <table:table-row table:style-name="ro1">
          <table:table-cell/>
          <table:table-cell table:style-name="ce5" office:value-type="string" calcext:value-type="string">
            <text:p>Righard van der Vyver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2" office:value-type="string" calcext:value-type="string">
            <text:p>-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6"/>
        </table:table-row>
        <table:table-row table:style-name="ro1">
          <table:table-cell/>
          <table:table-cell table:style-name="ce5" office:value-type="string" calcext:value-type="string">
            <text:p>Hennie Van Jaarsveld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10" table:style-name="ce11" office:value-type="float" office:value="1" calcext:value-type="float">
            <text:p>1</text:p>
          </table:table-cell>
          <table:table-cell table:number-columns-repeated="16366"/>
        </table:table-row>
        <table:table-row table:style-name="ro1">
          <table:table-cell/>
          <table:table-cell table:style-name="ce5" office:value-type="string" calcext:value-type="string">
            <text:p>Shevonne Dick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6" table:style-name="ce12" office:value-type="string" calcext:value-type="string">
            <text:p>-</text:p>
          </table:table-cell>
          <table:table-cell table:number-columns-repeated="16366"/>
        </table:table-row>
        <table:table-row table:style-name="ro1">
          <table:table-cell/>
          <table:table-cell table:style-name="ce5" office:value-type="string" calcext:value-type="string">
            <text:p>Chané Swanepoel</text:p>
          </table:table-cell>
          <table:table-cell table:style-name="ce12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6366"/>
        </table:table-row>
        <table:table-row table:style-name="ro1">
          <table:table-cell/>
          <table:table-cell table:style-name="ce5" office:value-type="string" calcext:value-type="string">
            <text:p>Jestus Fouche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4" table:style-name="ce12" office:value-type="string" calcext:value-type="string">
            <text:p>-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6366"/>
        </table:table-row>
        <table:table-row table:style-name="ro1">
          <table:table-cell/>
          <table:table-cell table:style-name="ce5" office:value-type="string" calcext:value-type="string">
            <text:p>Jan Bakker</text:p>
          </table:table-cell>
          <table:table-cell table:style-name="ce12" office:value-type="string" calcext:value-type="string">
            <text:p>-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6"/>
        </table:table-row>
        <table:table-row table:style-name="ro1">
          <table:table-cell/>
          <table:table-cell table:style-name="ce5" office:value-type="string" calcext:value-type="string">
            <text:p>Jandre Strydom</text:p>
          </table:table-cell>
          <table:table-cell table:number-columns-repeated="12" table:style-name="ce11" office:value-type="float" office:value="1" calcext:value-type="float">
            <text:p>1</text:p>
          </table:table-cell>
          <table:table-cell table:number-columns-repeated="16366"/>
        </table:table-row>
        <table:table-row table:style-name="ro1">
          <table:table-cell/>
          <table:table-cell table:style-name="ce5" office:value-type="string" calcext:value-type="string">
            <text:p>Janco Weyers</text:p>
          </table:table-cell>
          <table:table-cell table:number-columns-repeated="12" table:style-name="ce11" office:value-type="float" office:value="1" calcext:value-type="float">
            <text:p>1</text:p>
          </table:table-cell>
          <table:table-cell table:number-columns-repeated="16366"/>
        </table:table-row>
        <table:table-row table:style-name="ro1">
          <table:table-cell/>
          <table:table-cell table:style-name="ce7" office:value-type="string" calcext:value-type="string">
            <text:p>Mikael Pretorius</text:p>
          </table:table-cell>
          <table:table-cell table:style-name="ce12" office:value-type="string" calcext:value-type="string">
            <text:p>-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6"/>
        </table:table-row>
        <table:table-row table:style-name="ro1">
          <table:table-cell/>
          <table:table-cell table:style-name="ce5" office:value-type="string" calcext:value-type="string">
            <text:p>Reinold Brink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number-columns-repeated="9" table:style-name="ce11" office:value-type="float" office:value="1" calcext:value-type="float">
            <text:p>1</text:p>
          </table:table-cell>
          <table:table-cell table:number-columns-repeated="16366"/>
        </table:table-row>
        <table:table-row table:style-name="ro1">
          <table:table-cell/>
          <table:table-cell table:style-name="ce5" office:value-type="string" calcext:value-type="string">
            <text:p>Anrich Venter</text:p>
          </table:table-cell>
          <table:table-cell table:style-name="ce12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4" table:style-name="ce12" office:value-type="string" calcext:value-type="string">
            <text:p>-</text:p>
          </table:table-cell>
          <table:table-cell table:number-columns-repeated="16366"/>
        </table:table-row>
        <table:table-row table:style-name="ro1">
          <table:table-cell/>
          <table:table-cell table:style-name="ce5" office:value-type="string" calcext:value-type="string">
            <text:p>Shardoné Cronje</text:p>
          </table:table-cell>
          <table:table-cell table:style-name="ce12" office:value-type="string" calcext:value-type="string">
            <text:p>-</text:p>
          </table:table-cell>
          <table:table-cell table:number-columns-repeated="11" table:style-name="ce11" office:value-type="float" office:value="1" calcext:value-type="float">
            <text:p>1</text:p>
          </table:table-cell>
          <table:table-cell table:number-columns-repeated="16366"/>
        </table:table-row>
        <table:table-row table:style-name="ro1">
          <table:table-cell/>
          <table:table-cell table:style-name="ce8" office:value-type="string" calcext:value-type="string">
            <text:p>Saskia Marais</text:p>
          </table:table-cell>
          <table:table-cell table:style-name="ce13" table:formula="of:=IF(ISNUMBER(MATCH([.B177];[$Datasheet.$B$1:.$B$9809];0));&quot;✓&quot;;&quot;x&quot;)" office:value-type="string" office:string-value="✓" calcext:value-type="string">
            <text:p>✓</text:p>
          </table:table-cell>
          <table:table-cell table:style-name="ce14" table:formula="of:=IFERROR(VLOOKUP([$Masterlist.$P177];[$Datasheet.$B$1:.$AV$9809];2;FALSE());&quot;-&quot;)" office:value-type="float" office:value="1" calcext:value-type="float">
            <text:p>1</text:p>
          </table:table-cell>
          <table:table-cell table:style-name="ce14" table:formula="of:=IFERROR(VLOOKUP([$Masterlist.$P177];[$Datasheet.$B$1:.$AV$9809];7;FALSE());&quot;-&quot;)" office:value-type="float" office:value="1" calcext:value-type="float">
            <text:p>1</text:p>
          </table:table-cell>
          <table:table-cell table:style-name="ce14" table:formula="of:=IFERROR(VLOOKUP([$Masterlist.$P177];[$Datasheet.$B$1:.$AV$9809];8;FALSE());&quot;-&quot;)" office:value-type="float" office:value="0" calcext:value-type="float">
            <text:p>0</text:p>
          </table:table-cell>
          <table:table-cell table:style-name="ce14" table:formula="of:=IFERROR(VLOOKUP([$Masterlist.$P177];[$Datasheet.$B$1:.$AV$9809];9;FALSE());&quot;-&quot;)" office:value-type="float" office:value="0" calcext:value-type="float">
            <text:p>0</text:p>
          </table:table-cell>
          <table:table-cell table:style-name="ce14" table:formula="of:=IFERROR(VLOOKUP([$Masterlist.$P177];[$Datasheet.$B$1:.$AV$9809];10;FALSE());&quot;-&quot;)" office:value-type="float" office:value="1" calcext:value-type="float">
            <text:p>1</text:p>
          </table:table-cell>
          <table:table-cell table:style-name="ce14" table:formula="of:=IFERROR(VLOOKUP([$Masterlist.$P177];[$Datasheet.$B$1:.$AV$9809];11;FALSE());&quot;-&quot;)" office:value-type="float" office:value="1" calcext:value-type="float">
            <text:p>1</text:p>
          </table:table-cell>
          <table:table-cell table:style-name="ce14" table:formula="of:=IFERROR(VLOOKUP([$Masterlist.$P177];[$Datasheet.$B$1:.$AV$9809];12;FALSE());&quot;-&quot;)" office:value-type="float" office:value="0" calcext:value-type="float">
            <text:p>0</text:p>
          </table:table-cell>
          <table:table-cell table:style-name="ce14" table:formula="of:=IFERROR(VLOOKUP([$Masterlist.$P177];[$Datasheet.$B$1:.$AV$9809];13;FALSE());&quot;-&quot;)" office:value-type="float" office:value="1" calcext:value-type="float">
            <text:p>1</text:p>
          </table:table-cell>
          <table:table-cell table:style-name="ce14" table:formula="of:=IFERROR(VLOOKUP([$Masterlist.$P177];[$Datasheet.$B$1:.$AV$9809];14;FALSE());&quot;-&quot;)" office:value-type="float" office:value="0" calcext:value-type="float">
            <text:p>0</text:p>
          </table:table-cell>
          <table:table-cell table:style-name="ce14" table:formula="of:=IFERROR(VLOOKUP([$Masterlist.$P177];[$Datasheet.$B$1:.$AV$9809];15;FALSE());&quot;-&quot;)" office:value-type="float" office:value="1" calcext:value-type="float">
            <text:p>1</text:p>
          </table:table-cell>
          <table:table-cell table:style-name="ce14" table:formula="of:=IFERROR(VLOOKUP([$Masterlist.$P177];[$Datasheet.$B$1:.$AV$9809];16;FALSE());&quot;-&quot;)" office:value-type="float" office:value="0" calcext:value-type="float">
            <text:p/>
          </table:table-cell>
          <table:table-cell table:style-name="ce14" table:formula="of:=IFERROR(VLOOKUP([$Masterlist.$P177];[$Datasheet.$B$1:.$AV$9809];17;FALSE());&quot;-&quot;)" office:value-type="float" office:value="0" calcext:value-type="float">
            <text:p/>
          </table:table-cell>
          <table:table-cell table:style-name="ce14" table:formula="of:=IFERROR(VLOOKUP([$Masterlist.$P177];[$Datasheet.$B$1:.$AV$9809];18;FALSE());&quot;-&quot;)" office:value-type="float" office:value="0" calcext:value-type="float">
            <text:p/>
          </table:table-cell>
          <table:table-cell table:style-name="ce14" table:formula="of:=IFERROR(VLOOKUP([$Masterlist.$P177];[$Datasheet.$B$1:.$AV$9809];19;FALSE());&quot;-&quot;)" office:value-type="float" office:value="0" calcext:value-type="float">
            <text:p/>
          </table:table-cell>
          <table:table-cell table:number-columns-repeated="16363"/>
        </table:table-row>
        <table:table-row table:style-name="ro1" table:number-rows-repeated="143">
          <table:table-cell table:number-columns-repeated="16380"/>
        </table:table-row>
        <table:table-row table:style-name="ro6" table:number-rows-repeated="676">
          <table:table-cell table:number-columns-repeated="16380"/>
        </table:table-row>
        <table:table-row table:style-name="ro7" table:number-rows-repeated="1047579">
          <table:table-cell table:number-columns-repeated="16380"/>
        </table:table-row>
        <table:table-row table:style-name="ro7">
          <table:table-cell table:number-columns-repeated="16380"/>
        </table:table-row>
        <calcext:conditional-formats>
          <calcext:conditional-format calcext:target-range-address="Datasheet.D177:Datasheet.Q177">
            <calcext:condition calcext:apply-style-name="ConditionalStyle_7" calcext:value="=#ref!" calcext:base-cell-address="Datasheet.D177"/>
          </calcext:conditional-format>
          <calcext:conditional-format calcext:target-range-address="Datasheet.D177:Datasheet.Q177">
            <calcext:condition calcext:apply-style-name="ConditionalStyle_9" calcext:value="=[.$AG$5]" calcext:base-cell-address="Datasheet.D177"/>
            <calcext:condition calcext:apply-style-name="ConditionalStyle_8" calcext:value="=[.$AG$7]" calcext:base-cell-address="Datasheet.D177"/>
            <calcext:condition calcext:apply-style-name="ConditionalStyle_9" calcext:value="=[.$AG$5]" calcext:base-cell-address="Datasheet.D177"/>
            <calcext:condition calcext:apply-style-name="ConditionalStyle_8" calcext:value="=[.$AG$7]" calcext:base-cell-address="Datasheet.D177"/>
          </calcext:conditional-format>
          <calcext:conditional-format calcext:target-range-address="Datasheet.D177:Datasheet.Q177">
            <calcext:condition calcext:apply-style-name="ConditionalStyle_7" calcext:value="=#ref!" calcext:base-cell-address="Datasheet.D177"/>
            <calcext:condition calcext:apply-style-name="ConditionalStyle_8" calcext:value="=[.$AG$7]" calcext:base-cell-address="Datasheet.D177"/>
            <calcext:condition calcext:apply-style-name="ConditionalStyle_9" calcext:value="=[.$AG$5]" calcext:base-cell-address="Datasheet.D177"/>
            <calcext:condition calcext:apply-style-name="ConditionalStyle_7" calcext:value="=#ref!" calcext:base-cell-address="Datasheet.D177"/>
            <calcext:condition calcext:apply-style-name="ConditionalStyle_8" calcext:value="=[.$AG$7]" calcext:base-cell-address="Datasheet.D177"/>
            <calcext:condition calcext:apply-style-name="ConditionalStyle_9" calcext:value="=[.$AG$5]" calcext:base-cell-address="Datasheet.D177"/>
          </calcext:conditional-format>
          <calcext:conditional-format calcext:target-range-address="Datasheet.D177:Datasheet.Q177">
            <calcext:condition calcext:apply-style-name="ConditionalStyle_8" calcext:value="=[.$AG$7]" calcext:base-cell-address="Datasheet.D177"/>
            <calcext:condition calcext:apply-style-name="ConditionalStyle_9" calcext:value="=[.$AG$5]" calcext:base-cell-address="Datasheet.D177"/>
            <calcext:condition calcext:apply-style-name="ConditionalStyle_8" calcext:value="=[.$AG$7]" calcext:base-cell-address="Datasheet.D177"/>
            <calcext:condition calcext:apply-style-name="ConditionalStyle_9" calcext:value="=[.$AG$5]" calcext:base-cell-address="Datasheet.D177"/>
          </calcext:conditional-format>
          <calcext:conditional-format calcext:target-range-address="Datasheet.D177:Datasheet.Q177">
            <calcext:condition calcext:apply-style-name="ConditionalStyle_8" calcext:value="=[.$AG$7]" calcext:base-cell-address="Datasheet.D177"/>
            <calcext:condition calcext:apply-style-name="ConditionalStyle_9" calcext:value="=[.$AG$5]" calcext:base-cell-address="Datasheet.D177"/>
          </calcext:conditional-format>
          <calcext:conditional-format calcext:target-range-address="Datasheet.D177:Datasheet.Q177">
            <calcext:condition calcext:apply-style-name="ConditionalStyle_7" calcext:value="=[.$AG$8]" calcext:base-cell-address="Datasheet.D177"/>
          </calcext:conditional-format>
          <calcext:conditional-format calcext:target-range-address="Datasheet.D177:Datasheet.Q177">
            <calcext:condition calcext:apply-style-name="ConditionalStyle_9" calcext:value="=[.$AG$5]" calcext:base-cell-address="Datasheet.D177"/>
          </calcext:conditional-format>
        </calcext:conditional-formats>
      </table:table>
      <table:table table:name="Masterlist" table:style-name="ta2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14" table:number-columns-repeated="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19" table:visibility="collapse" table:default-cell-style-name="Default"/>
        <table:table-column table:style-name="co19" table:default-cell-style-name="Default"/>
        <table:table-column table:style-name="co12" table:number-columns-repeated="2" table:default-cell-style-name="Default"/>
        <table:table-column table:style-name="co19" table:number-columns-repeated="5" table:default-cell-style-name="Default"/>
        <table:table-column table:style-name="co27" table:default-cell-style-name="Default"/>
        <table:table-column table:style-name="co28" table:visibility="collapse" table:default-cell-style-name="Default"/>
        <table:table-column table:style-name="co9" table:number-columns-repeated="16347" table:default-cell-style-name="Default"/>
        <table:table-row table:style-name="ro8">
          <table:table-cell table:style-name="ce15" office:value-type="string" calcext:value-type="string">
            <text:p>F</text:p>
          </table:table-cell>
          <table:table-cell table:style-name="ce20"/>
          <table:table-cell table:style-name="ce44" table:number-columns-repeated="11"/>
          <table:table-cell table:style-name="ce44" office:value-type="string" calcext:value-type="string">
            <text:p>F</text:p>
          </table:table-cell>
          <table:table-cell table:style-name="ce87"/>
          <table:table-cell table:style-name="ce98" office:value-type="string" calcext:value-type="string">
            <text:p>F</text:p>
          </table:table-cell>
          <table:table-cell table:style-name="ce15" table:number-columns-repeated="21"/>
          <table:table-cell table:number-columns-repeated="16347"/>
        </table:table-row>
        <table:table-row table:style-name="ro2">
          <table:table-cell table:style-name="ce15" office:value-type="string" calcext:value-type="string">
            <text:p>Lourens </text:p>
          </table:table-cell>
          <table:table-cell table:style-name="ce21" office:value-type="string" calcext:value-type="string" table:number-columns-spanned="34" table:number-rows-spanned="1">
            <text:p>PRODUCTION VOLUNTEERS</text:p>
          </table:table-cell>
          <table:covered-table-cell table:number-columns-repeated="32" table:style-name="ce45"/>
          <table:covered-table-cell table:style-name="ce99"/>
          <table:table-cell table:style-name="ce15" table:number-columns-repeated="2"/>
          <table:table-cell table:number-columns-repeated="16347"/>
        </table:table-row>
        <table:table-row table:style-name="ro9">
          <table:table-cell table:style-name="ce15"/>
          <table:table-cell table:style-name="ce20"/>
          <table:table-cell table:style-name="ce46"/>
          <table:table-cell table:style-name="ce62" table:number-columns-spanned="19" table:number-rows-spanned="1"/>
          <table:covered-table-cell table:number-columns-repeated="10" table:style-name="ce66"/>
          <table:covered-table-cell table:number-columns-repeated="8" table:style-name="ce88"/>
          <table:table-cell table:style-name="ce212" table:number-columns-repeated="13"/>
          <table:table-cell table:style-name="ce15" table:number-columns-repeated="2"/>
          <table:table-cell table:number-columns-repeated="16347"/>
        </table:table-row>
        <table:table-row table:style-name="ro10">
          <table:table-cell table:style-name="ce15"/>
          <table:table-cell table:style-name="ce22" office:value-type="string" calcext:value-type="string">
            <text:p>M - Member, A - Assistant, L - Leader, AL - Area Leader, P - Pastor</text:p>
          </table:table-cell>
          <table:table-cell table:style-name="ce47" office:value-type="string" calcext:value-type="string">
            <text:p>UC</text:p>
          </table:table-cell>
          <table:table-cell table:style-name="ce63" office:value-type="string" calcext:value-type="string">
            <text:p>BROOKLYN</text:p>
          </table:table-cell>
          <table:table-cell table:style-name="ce67" office:value-type="string" calcext:value-type="string">
            <text:p>LYNNWOOD</text:p>
          </table:table-cell>
          <table:table-cell table:style-name="ce68" office:value-type="string" calcext:value-type="string">
            <text:p>JHB</text:p>
          </table:table-cell>
          <table:table-cell table:style-name="ce69" office:value-type="string" calcext:value-type="string">
            <text:p>POTCH</text:p>
          </table:table-cell>
          <table:table-cell table:style-name="ce73" office:value-type="string" calcext:value-type="string">
            <text:p>STELLIES</text:p>
          </table:table-cell>
          <table:table-cell table:style-name="ce76" office:value-type="string" calcext:value-type="string">
            <text:p>TYGERBERG</text:p>
          </table:table-cell>
          <table:table-cell table:style-name="ce77" office:value-type="string" calcext:value-type="string">
            <text:p>PAARL</text:p>
          </table:table-cell>
          <table:table-cell table:style-name="ce78" office:value-type="string" calcext:value-type="string">
            <text:p>THABA</text:p>
          </table:table-cell>
          <table:table-cell table:style-name="ce79" office:value-type="string" calcext:value-type="string">
            <text:p>NELSPRUIT</text:p>
          </table:table-cell>
          <table:table-cell table:style-name="ce81" office:value-type="string" calcext:value-type="string">
            <text:p>POLOKWANE</text:p>
          </table:table-cell>
          <table:table-cell table:style-name="ce82" office:value-type="string" calcext:value-type="string">
            <text:p>NAM</text:p>
          </table:table-cell>
          <table:table-cell table:style-name="ce89" office:value-type="string" calcext:value-type="string">
            <text:p>ROLE</text:p>
          </table:table-cell>
          <table:table-cell table:style-name="ce89" office:value-type="string" calcext:value-type="string">
            <text:p>VOLUNTEER</text:p>
          </table:table-cell>
          <table:table-cell table:style-name="ce89" office:value-type="string" calcext:value-type="string">
            <text:p>Filled in</text:p>
          </table:table-cell>
          <table:table-cell table:style-name="ce130" table:formula="of:=[$Datasheet.C1]" office:value-type="string" office:string-value="02 May - Prayer" calcext:value-type="string">
            <text:p>02 May - Prayer</text:p>
          </table:table-cell>
          <table:table-cell table:style-name="ce171" table:formula="of:=[$Datasheet.D1]" office:value-type="string" office:string-value="03 May - Services" calcext:value-type="string">
            <text:p>03 May - Services</text:p>
          </table:table-cell>
          <table:table-cell table:style-name="ce178" table:formula="of:=[#REF!]" office:value-type="string" office:string-value="" calcext:value-type="error">
            <text:p>#REF!</text:p>
          </table:table-cell>
          <table:table-cell table:style-name="ce180" table:formula="of:=[#REF!]" office:value-type="string" office:string-value="" calcext:value-type="error">
            <text:p>#REF!</text:p>
          </table:table-cell>
          <table:table-cell table:style-name="ce184" table:formula="of:=[#REF!]" office:value-type="string" office:string-value="" calcext:value-type="error">
            <text:p>#REF!</text:p>
          </table:table-cell>
          <table:table-cell table:style-name="ce213" table:formula="of:=[#REF!]" office:value-type="string" office:string-value="" calcext:value-type="error">
            <text:p>#REF!</text:p>
          </table:table-cell>
          <table:table-cell table:style-name="ce215" table:formula="of:=[$Datasheet.E1]" office:value-type="string" office:string-value="23 May - Prayer" calcext:value-type="string">
            <text:p>23 May - Prayer</text:p>
          </table:table-cell>
          <table:table-cell table:style-name="ce217" table:formula="of:=[$Datasheet.F1]" office:value-type="string" office:string-value="24 May - Services" calcext:value-type="string">
            <text:p>24 May - Services</text:p>
          </table:table-cell>
          <table:table-cell table:style-name="ce218" table:formula="of:=[$Datasheet.G1]" office:value-type="string" office:string-value="30 May - Prayer" calcext:value-type="string">
            <text:p>30 May - Prayer</text:p>
          </table:table-cell>
          <table:table-cell table:style-name="ce222" table:formula="of:=[$Datasheet.H1]" office:value-type="string" office:string-value="31 May - Services" calcext:value-type="string">
            <text:p>31 May - Services</text:p>
          </table:table-cell>
          <table:table-cell table:style-name="ce227" table:formula="of:=[$Datasheet.I1]" office:value-type="string" office:string-value="06 June - Prayer" calcext:value-type="string">
            <text:p>06 June - Prayer</text:p>
          </table:table-cell>
          <table:table-cell table:style-name="ce228" table:formula="of:=[$Datasheet.J1]" office:value-type="string" office:string-value="07 June - Services" calcext:value-type="string">
            <text:p>07 June - Services</text:p>
          </table:table-cell>
          <table:table-cell table:style-name="ce229" table:formula="of:=[$Datasheet.K1]" office:value-type="string" office:string-value="13 June - Prayer" calcext:value-type="string">
            <text:p>13 June - Prayer</text:p>
          </table:table-cell>
          <table:table-cell table:style-name="ce230" table:formula="of:=[$Datasheet.L1]" office:value-type="string" office:string-value="14 June - Services" calcext:value-type="string">
            <text:p>14 June - Services</text:p>
          </table:table-cell>
          <table:table-cell table:style-name="ce231" table:formula="of:=[$Datasheet.M1]" office:value-type="string" office:string-value="20 June - Prayer" calcext:value-type="string">
            <text:p>20 June - Prayer</text:p>
          </table:table-cell>
          <table:table-cell table:style-name="ce232" table:formula="of:=[$Datasheet.N1]" office:value-type="string" office:string-value="21 June - Services" calcext:value-type="string">
            <text:p>21 June - Services</text:p>
          </table:table-cell>
          <table:table-cell table:style-name="ce233" table:formula="of:=[$Datasheet.O1]" office:value-type="string" office:string-value="27 June - Prayer" calcext:value-type="string">
            <text:p>27 June - Prayer</text:p>
          </table:table-cell>
          <table:table-cell table:style-name="ce238" table:formula="of:=[$Datasheet.P1]" office:value-type="string" office:string-value="28 June - Services" calcext:value-type="string">
            <text:p>28 June - Services</text:p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3" office:value-type="string" calcext:value-type="string" table:number-columns-spanned="34" table:number-rows-spanned="1">
            <text:p>#UniterOne Phil 1:27 -Whatever happens, conduct yourselves in a manner worthy of the gospel of Christ. Then, whether I come and see you or only hear about you in my absence, I will know that you stand firm in the one Spirit, striving together as one for the faith of the gospel </text:p>
          </table:table-cell>
          <table:covered-table-cell table:number-columns-repeated="12" table:style-name="ce48"/>
          <table:covered-table-cell table:number-columns-repeated="20" table:style-name="ce90"/>
          <table:covered-table-cell table:style-name="ce239"/>
          <table:table-cell table:style-name="ce15"/>
          <table:table-cell table:style-name="ce249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15"/>
          <table:table-cell table:style-name="ce24" office:value-type="string" calcext:value-type="string" table:number-columns-spanned="15" table:number-rows-spanned="1">
            <text:p>DIRECTORS - JANDRE STRYDOM</text:p>
          </table:table-cell>
          <table:covered-table-cell table:number-columns-repeated="13" table:style-name="ce45"/>
          <table:covered-table-cell table:style-name="ce99"/>
          <table:table-cell table:style-name="ce115"/>
          <table:table-cell table:style-name="ce131" office:value-type="string" calcext:value-type="string" table:number-columns-spanned="18" table:number-rows-spanned="1">
            <text:p>DIRECTORS - NICOLE BARLOW</text:p>
          </table:table-cell>
          <table:covered-table-cell table:number-columns-repeated="16" table:style-name="ce45"/>
          <table:covered-table-cell table:style-name="ce99"/>
          <table:table-cell table:style-name="ce15"/>
          <table:table-cell table:style-name="ce250"/>
          <table:table-cell table:number-columns-repeated="16347"/>
        </table:table-row>
        <table:table-row table:style-name="ro11">
          <table:table-cell table:style-name="ce15"/>
          <table:table-cell table:style-name="ce25" office:value-type="string" calcext:value-type="string">
            <text:p>P</text:p>
          </table:table-cell>
          <table:table-cell table:style-name="ce49" office:value-type="string" calcext:value-type="string">
            <text:p>Yes</text:p>
          </table:table-cell>
          <table:table-cell table:style-name="ce49" table:number-columns-repeated="2"/>
          <table:table-cell table:style-name="ce49" office:value-type="string" calcext:value-type="string">
            <text:p>Yes</text:p>
          </table:table-cell>
          <table:table-cell table:style-name="ce49" table:number-columns-repeated="4"/>
          <table:table-cell table:style-name="ce49" office:value-type="string" calcext:value-type="string">
            <text:p><text:s/></text:p>
          </table:table-cell>
          <table:table-cell table:style-name="ce49" table:number-columns-repeated="3"/>
          <table:table-cell table:style-name="ce91" office:value-type="string" calcext:value-type="string">
            <text:p>Director</text:p>
          </table:table-cell>
          <table:table-cell table:style-name="ce100" office:value-type="string" calcext:value-type="string">
            <text:p>Reinold Brink</text:p>
          </table:table-cell>
          <table:table-cell table:style-name="ce13" table:formula="of:=IF(ISNUMBER(MATCH([.P7];[$Datasheet.$B$1:.$B$9809];0));&quot;✓&quot;;&quot;x&quot;)" office:value-type="string" office:string-value="✓" calcext:value-type="string">
            <text:p>✓</text:p>
          </table:table-cell>
          <table:table-cell table:style-name="ce132" table:formula="of:=IFERROR(VLOOKUP([$Masterlist.$P7];[$Datasheet.$B$1:.$AV$9809];2;FALSE());&quot;-&quot;)" office:value-type="float" office:value="1" calcext:value-type="float">
            <text:p>1</text:p>
          </table:table-cell>
          <table:table-cell table:style-name="ce132" table:formula="of:=IFERROR(VLOOKUP([$Masterlist.$P7];[$Datasheet.$B$1:.$AV$9809];3;FALSE());&quot;-&quot;)" office:value-type="float" office:value="1" calcext:value-type="float">
            <text:p>1</text:p>
          </table:table-cell>
          <table:table-cell table:style-name="ce132" table:formula="of:=IFERROR(VLOOKUP([$Masterlist.$P7];[$Datasheet.$B$1:.$AV$9809];4;FALSE());&quot;-&quot;)" office:value-type="string" office:string-value="-" calcext:value-type="string">
            <text:p>-</text:p>
          </table:table-cell>
          <table:table-cell table:style-name="ce132" table:formula="of:=IFERROR(VLOOKUP([$Masterlist.$P7];[$Datasheet.$B$1:.$AV$9809];5;FALSE());&quot;-&quot;)" office:value-type="float" office:value="1" calcext:value-type="float">
            <text:p>1</text:p>
          </table:table-cell>
          <table:table-cell table:style-name="ce132" table:formula="of:=IFERROR(VLOOKUP([$Masterlist.$P7];[$Datasheet.$B$1:.$AV$9809];6;FALSE());&quot;-&quot;)" office:value-type="float" office:value="1" calcext:value-type="float">
            <text:p>1</text:p>
          </table:table-cell>
          <table:table-cell table:style-name="ce132" table:formula="of:=IFERROR(VLOOKUP([$Masterlist.$P7];[$Datasheet.$B$1:.$AV$9809];7;FALSE());&quot;-&quot;)" office:value-type="float" office:value="1" calcext:value-type="float">
            <text:p>1</text:p>
          </table:table-cell>
          <table:table-cell table:style-name="ce132" table:formula="of:=IFERROR(VLOOKUP([$Masterlist.$P7];[$Datasheet.$B$1:.$AV$9809];8;FALSE());&quot;-&quot;)" office:value-type="float" office:value="1" calcext:value-type="float">
            <text:p>1</text:p>
          </table:table-cell>
          <table:table-cell table:style-name="ce132" table:formula="of:=IFERROR(VLOOKUP([$Masterlist.$P7];[$Datasheet.$B$1:.$AV$9809];9;FALSE());&quot;-&quot;)" office:value-type="float" office:value="1" calcext:value-type="float">
            <text:p>1</text:p>
          </table:table-cell>
          <table:table-cell table:style-name="ce132" table:formula="of:=IFERROR(VLOOKUP([$Masterlist.$P7];[$Datasheet.$B$1:.$AV$9809];10;FALSE());&quot;-&quot;)" office:value-type="float" office:value="1" calcext:value-type="float">
            <text:p>1</text:p>
          </table:table-cell>
          <table:table-cell table:style-name="ce132" table:formula="of:=IFERROR(VLOOKUP([$Masterlist.$P7];[$Datasheet.$B$1:.$AV$9809];11;FALSE());&quot;-&quot;)" office:value-type="float" office:value="1" calcext:value-type="float">
            <text:p>1</text:p>
          </table:table-cell>
          <table:table-cell table:style-name="ce132" table:formula="of:=IFERROR(VLOOKUP([$Masterlist.$P7];[$Datasheet.$B$1:.$AV$9809];12;FALSE());&quot;-&quot;)" office:value-type="float" office:value="1" calcext:value-type="float">
            <text:p>1</text:p>
          </table:table-cell>
          <table:table-cell table:style-name="ce132" table:formula="of:=IFERROR(VLOOKUP([$Masterlist.$P7];[$Datasheet.$B$1:.$AV$9809];13;FALSE());&quot;-&quot;)" office:value-type="float" office:value="1" calcext:value-type="float">
            <text:p>1</text:p>
          </table:table-cell>
          <table:table-cell table:style-name="ce132" table:formula="of:=IFERROR(VLOOKUP([$Masterlist.$P7];[$Datasheet.$B$1:.$AV$9809];14;FALSE());&quot;-&quot;)" office:value-type="float" office:value="0" calcext:value-type="float">
            <text:p/>
          </table:table-cell>
          <table:table-cell table:style-name="ce132" table:formula="of:=IFERROR(VLOOKUP([$Masterlist.$P7];[$Datasheet.$B$1:.$AV$9809];15;FALSE());&quot;-&quot;)" office:value-type="float" office:value="0" calcext:value-type="float">
            <text:p/>
          </table:table-cell>
          <table:table-cell table:style-name="ce132" table:formula="of:=IFERROR(VLOOKUP([$Masterlist.$P7];[$Datasheet.$B$1:.$AV$9809];16;FALSE());&quot;-&quot;)" office:value-type="float" office:value="0" calcext:value-type="float">
            <text:p/>
          </table:table-cell>
          <table:table-cell table:style-name="ce132" table:formula="of:=IFERROR(VLOOKUP([$Masterlist.$P7];[$Datasheet.$B$1:.$AV$9809];17;FALSE());&quot;-&quot;)" office:value-type="float" office:value="0" calcext:value-type="float">
            <text:p/>
          </table:table-cell>
          <table:table-cell table:style-name="ce132" table:formula="of:=IFERROR(VLOOKUP([$Masterlist.$P7];[$Datasheet.$B$1:.$AV$9809];18;FALSE());&quot;-&quot;)" office:value-type="float" office:value="0" calcext:value-type="float">
            <text:p/>
          </table:table-cell>
          <table:table-cell table:style-name="ce132" table:formula="of:=IFERROR(VLOOKUP([$Masterlist.$P7];[$Datasheet.$B$1:.$AV$9809];19;FALSE());&quot;-&quot;)" office:value-type="float" office:value="0" calcext:value-type="float">
            <text:p/>
          </table:table-cell>
          <table:table-cell table:style-name="ce15"/>
          <table:table-cell table:style-name="ce251" office:value-type="float" office:value="0" calcext:value-type="float">
            <text:p>0</text:p>
          </table:table-cell>
          <table:table-cell table:number-columns-repeated="16347"/>
        </table:table-row>
        <table:table-row table:style-name="ro11">
          <table:table-cell table:style-name="ce15"/>
          <table:table-cell table:style-name="ce26" office:value-type="string" calcext:value-type="string">
            <text:p>AL</text:p>
          </table:table-cell>
          <table:table-cell table:number-columns-repeated="3" table:style-name="ce50" office:value-type="string" calcext:value-type="string">
            <text:p>Yes</text:p>
          </table:table-cell>
          <table:table-cell table:style-name="ce50" table:number-columns-repeated="9"/>
          <table:table-cell table:style-name="ce92" office:value-type="string" calcext:value-type="string">
            <text:p>Director / Assistant Director</text:p>
          </table:table-cell>
          <table:table-cell table:style-name="ce8" office:value-type="string" calcext:value-type="string">
            <text:p>Chante Hattingh</text:p>
          </table:table-cell>
          <table:table-cell table:style-name="ce13" table:formula="of:=IF(ISNUMBER(MATCH([.P8];[$Datasheet.$B$1:.$B$9809];0));&quot;✓&quot;;&quot;x&quot;)" office:value-type="string" office:string-value="✓" calcext:value-type="string">
            <text:p>✓</text:p>
          </table:table-cell>
          <table:table-cell table:style-name="ce132" table:formula="of:=IFERROR(VLOOKUP([$Masterlist.$P8];[$Datasheet.$B$1:.$AV$9809];2;FALSE());&quot;-&quot;)" office:value-type="float" office:value="0" calcext:value-type="float">
            <text:p>0</text:p>
          </table:table-cell>
          <table:table-cell table:style-name="ce132" table:formula="of:=IFERROR(VLOOKUP([$Masterlist.$P8];[$Datasheet.$B$1:.$AV$9809];3;FALSE());&quot;-&quot;)" office:value-type="float" office:value="1" calcext:value-type="float">
            <text:p>1</text:p>
          </table:table-cell>
          <table:table-cell table:style-name="ce132" table:formula="of:=IFERROR(VLOOKUP([$Masterlist.$P8];[$Datasheet.$B$1:.$AV$9809];4;FALSE());&quot;-&quot;)" office:value-type="float" office:value="1" calcext:value-type="float">
            <text:p>1</text:p>
          </table:table-cell>
          <table:table-cell table:style-name="ce132" table:formula="of:=IFERROR(VLOOKUP([$Masterlist.$P8];[$Datasheet.$B$1:.$AV$9809];5;FALSE());&quot;-&quot;)" office:value-type="float" office:value="1" calcext:value-type="float">
            <text:p>1</text:p>
          </table:table-cell>
          <table:table-cell table:style-name="ce132" table:formula="of:=IFERROR(VLOOKUP([$Masterlist.$P8];[$Datasheet.$B$1:.$AV$9809];6;FALSE());&quot;-&quot;)" office:value-type="float" office:value="1" calcext:value-type="float">
            <text:p>1</text:p>
          </table:table-cell>
          <table:table-cell table:style-name="ce132" table:formula="of:=IFERROR(VLOOKUP([$Masterlist.$P8];[$Datasheet.$B$1:.$AV$9809];7;FALSE());&quot;-&quot;)" office:value-type="float" office:value="1" calcext:value-type="float">
            <text:p>1</text:p>
          </table:table-cell>
          <table:table-cell table:style-name="ce132" table:formula="of:=IFERROR(VLOOKUP([$Masterlist.$P8];[$Datasheet.$B$1:.$AV$9809];8;FALSE());&quot;-&quot;)" office:value-type="float" office:value="1" calcext:value-type="float">
            <text:p>1</text:p>
          </table:table-cell>
          <table:table-cell table:style-name="ce132" table:formula="of:=IFERROR(VLOOKUP([$Masterlist.$P8];[$Datasheet.$B$1:.$AV$9809];9;FALSE());&quot;-&quot;)" office:value-type="float" office:value="1" calcext:value-type="float">
            <text:p>1</text:p>
          </table:table-cell>
          <table:table-cell table:style-name="ce132" table:formula="of:=IFERROR(VLOOKUP([$Masterlist.$P8];[$Datasheet.$B$1:.$AV$9809];10;FALSE());&quot;-&quot;)" office:value-type="float" office:value="0" calcext:value-type="float">
            <text:p>0</text:p>
          </table:table-cell>
          <table:table-cell table:style-name="ce132" table:formula="of:=IFERROR(VLOOKUP([$Masterlist.$P8];[$Datasheet.$B$1:.$AV$9809];11;FALSE());&quot;-&quot;)" office:value-type="float" office:value="1" calcext:value-type="float">
            <text:p>1</text:p>
          </table:table-cell>
          <table:table-cell table:style-name="ce132" table:formula="of:=IFERROR(VLOOKUP([$Masterlist.$P8];[$Datasheet.$B$1:.$AV$9809];12;FALSE());&quot;-&quot;)" office:value-type="float" office:value="1" calcext:value-type="float">
            <text:p>1</text:p>
          </table:table-cell>
          <table:table-cell table:style-name="ce132" table:formula="of:=IFERROR(VLOOKUP([$Masterlist.$P8];[$Datasheet.$B$1:.$AV$9809];13;FALSE());&quot;-&quot;)" office:value-type="float" office:value="1" calcext:value-type="float">
            <text:p>1</text:p>
          </table:table-cell>
          <table:table-cell table:style-name="ce132" table:formula="of:=IFERROR(VLOOKUP([$Masterlist.$P8];[$Datasheet.$B$1:.$AV$9809];14;FALSE());&quot;-&quot;)" office:value-type="float" office:value="1" calcext:value-type="float">
            <text:p>1</text:p>
          </table:table-cell>
          <table:table-cell table:style-name="ce132" table:formula="of:=IFERROR(VLOOKUP([$Masterlist.$P8];[$Datasheet.$B$1:.$AV$9809];15;FALSE());&quot;-&quot;)" office:value-type="float" office:value="1" calcext:value-type="float">
            <text:p>1</text:p>
          </table:table-cell>
          <table:table-cell table:style-name="ce132" table:formula="of:=IFERROR(VLOOKUP([$Masterlist.$P8];[$Datasheet.$B$1:.$AV$9809];16;FALSE());&quot;-&quot;)" office:value-type="float" office:value="0" calcext:value-type="float">
            <text:p/>
          </table:table-cell>
          <table:table-cell table:style-name="ce132" table:formula="of:=IFERROR(VLOOKUP([$Masterlist.$P8];[$Datasheet.$B$1:.$AV$9809];17;FALSE());&quot;-&quot;)" office:value-type="float" office:value="0" calcext:value-type="float">
            <text:p/>
          </table:table-cell>
          <table:table-cell table:style-name="ce132" table:formula="of:=IFERROR(VLOOKUP([$Masterlist.$P8];[$Datasheet.$B$1:.$AV$9809];18;FALSE());&quot;-&quot;)" office:value-type="float" office:value="0" calcext:value-type="float">
            <text:p/>
          </table:table-cell>
          <table:table-cell table:style-name="ce132" table:formula="of:=IFERROR(VLOOKUP([$Masterlist.$P8];[$Datasheet.$B$1:.$AV$9809];19;FALSE());&quot;-&quot;)" office:value-type="float" office:value="0" calcext:value-type="float">
            <text:p/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number-columns-repeated="16347"/>
        </table:table-row>
        <table:table-row table:style-name="ro11">
          <table:table-cell table:style-name="ce15"/>
          <table:table-cell table:style-name="ce26" office:value-type="string" calcext:value-type="string">
            <text:p>AL</text:p>
          </table:table-cell>
          <table:table-cell table:number-columns-repeated="3" table:style-name="ce50" office:value-type="string" calcext:value-type="string">
            <text:p>Yes</text:p>
          </table:table-cell>
          <table:table-cell table:style-name="ce50" table:number-columns-repeated="9"/>
          <table:table-cell table:style-name="ce92" office:value-type="string" calcext:value-type="string">
            <text:p>Director / Assistant Director</text:p>
          </table:table-cell>
          <table:table-cell table:style-name="ce8" office:value-type="string" calcext:value-type="string">
            <text:p>Juan-Jacques Koch</text:p>
          </table:table-cell>
          <table:table-cell table:style-name="ce13" table:formula="of:=IF(ISNUMBER(MATCH([.P9];[$Datasheet.$B$1:.$B$9809];0));&quot;✓&quot;;&quot;x&quot;)" office:value-type="string" office:string-value="✓" calcext:value-type="string">
            <text:p>✓</text:p>
          </table:table-cell>
          <table:table-cell table:style-name="ce132" table:formula="of:=IFERROR(VLOOKUP([$Masterlist.$P9];[$Datasheet.$B$1:.$AV$9809];2;FALSE());&quot;-&quot;)" office:value-type="float" office:value="0" calcext:value-type="float">
            <text:p>0</text:p>
          </table:table-cell>
          <table:table-cell table:style-name="ce132" table:formula="of:=IFERROR(VLOOKUP([$Masterlist.$P9];[$Datasheet.$B$1:.$AV$9809];3;FALSE());&quot;-&quot;)" office:value-type="float" office:value="1" calcext:value-type="float">
            <text:p>1</text:p>
          </table:table-cell>
          <table:table-cell table:style-name="ce132" table:formula="of:=IFERROR(VLOOKUP([$Masterlist.$P9];[$Datasheet.$B$1:.$AV$9809];4;FALSE());&quot;-&quot;)" office:value-type="float" office:value="0" calcext:value-type="float">
            <text:p>0</text:p>
          </table:table-cell>
          <table:table-cell table:style-name="ce132" table:formula="of:=IFERROR(VLOOKUP([$Masterlist.$P9];[$Datasheet.$B$1:.$AV$9809];5;FALSE());&quot;-&quot;)" office:value-type="float" office:value="1" calcext:value-type="float">
            <text:p>1</text:p>
          </table:table-cell>
          <table:table-cell table:style-name="ce132" table:formula="of:=IFERROR(VLOOKUP([$Masterlist.$P9];[$Datasheet.$B$1:.$AV$9809];6;FALSE());&quot;-&quot;)" office:value-type="float" office:value="0" calcext:value-type="float">
            <text:p>0</text:p>
          </table:table-cell>
          <table:table-cell table:style-name="ce132" table:formula="of:=IFERROR(VLOOKUP([$Masterlist.$P9];[$Datasheet.$B$1:.$AV$9809];7;FALSE());&quot;-&quot;)" office:value-type="float" office:value="1" calcext:value-type="float">
            <text:p>1</text:p>
          </table:table-cell>
          <table:table-cell table:style-name="ce132" table:formula="of:=IFERROR(VLOOKUP([$Masterlist.$P9];[$Datasheet.$B$1:.$AV$9809];8;FALSE());&quot;-&quot;)" office:value-type="float" office:value="0" calcext:value-type="float">
            <text:p>0</text:p>
          </table:table-cell>
          <table:table-cell table:style-name="ce132" table:formula="of:=IFERROR(VLOOKUP([$Masterlist.$P9];[$Datasheet.$B$1:.$AV$9809];9;FALSE());&quot;-&quot;)" office:value-type="float" office:value="0" calcext:value-type="float">
            <text:p>0</text:p>
          </table:table-cell>
          <table:table-cell table:style-name="ce132" table:formula="of:=IFERROR(VLOOKUP([$Masterlist.$P9];[$Datasheet.$B$1:.$AV$9809];10;FALSE());&quot;-&quot;)" office:value-type="float" office:value="0" calcext:value-type="float">
            <text:p>0</text:p>
          </table:table-cell>
          <table:table-cell table:style-name="ce132" table:formula="of:=IFERROR(VLOOKUP([$Masterlist.$P9];[$Datasheet.$B$1:.$AV$9809];11;FALSE());&quot;-&quot;)" office:value-type="float" office:value="1" calcext:value-type="float">
            <text:p>1</text:p>
          </table:table-cell>
          <table:table-cell table:style-name="ce132" table:formula="of:=IFERROR(VLOOKUP([$Masterlist.$P9];[$Datasheet.$B$1:.$AV$9809];12;FALSE());&quot;-&quot;)" office:value-type="float" office:value="0" calcext:value-type="float">
            <text:p>0</text:p>
          </table:table-cell>
          <table:table-cell table:style-name="ce132" table:formula="of:=IFERROR(VLOOKUP([$Masterlist.$P9];[$Datasheet.$B$1:.$AV$9809];13;FALSE());&quot;-&quot;)" office:value-type="float" office:value="0" calcext:value-type="float">
            <text:p>0</text:p>
          </table:table-cell>
          <table:table-cell table:style-name="ce132" table:formula="of:=IFERROR(VLOOKUP([$Masterlist.$P9];[$Datasheet.$B$1:.$AV$9809];14;FALSE());&quot;-&quot;)" office:value-type="float" office:value="0" calcext:value-type="float">
            <text:p>0</text:p>
          </table:table-cell>
          <table:table-cell table:style-name="ce132" table:formula="of:=IFERROR(VLOOKUP([$Masterlist.$P9];[$Datasheet.$B$1:.$AV$9809];15;FALSE());&quot;-&quot;)" office:value-type="float" office:value="0" calcext:value-type="float">
            <text:p>0</text:p>
          </table:table-cell>
          <table:table-cell table:style-name="ce132" table:formula="of:=IFERROR(VLOOKUP([$Masterlist.$P9];[$Datasheet.$B$1:.$AV$9809];16;FALSE());&quot;-&quot;)" office:value-type="float" office:value="0" calcext:value-type="float">
            <text:p/>
          </table:table-cell>
          <table:table-cell table:style-name="ce132" table:formula="of:=IFERROR(VLOOKUP([$Masterlist.$P9];[$Datasheet.$B$1:.$AV$9809];17;FALSE());&quot;-&quot;)" office:value-type="float" office:value="0" calcext:value-type="float">
            <text:p/>
          </table:table-cell>
          <table:table-cell table:style-name="ce132" table:formula="of:=IFERROR(VLOOKUP([$Masterlist.$P9];[$Datasheet.$B$1:.$AV$9809];18;FALSE());&quot;-&quot;)" office:value-type="float" office:value="0" calcext:value-type="float">
            <text:p/>
          </table:table-cell>
          <table:table-cell table:style-name="ce132" table:formula="of:=IFERROR(VLOOKUP([$Masterlist.$P9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1">
          <table:table-cell table:style-name="ce15"/>
          <table:table-cell table:style-name="ce26" office:value-type="string" calcext:value-type="string">
            <text:p>AL</text:p>
          </table:table-cell>
          <table:table-cell table:number-columns-repeated="2" table:style-name="ce50" office:value-type="string" calcext:value-type="string">
            <text:p>Yes</text:p>
          </table:table-cell>
          <table:table-cell table:style-name="ce50"/>
          <table:table-cell table:style-name="ce50" office:value-type="string" calcext:value-type="string">
            <text:p>Yes</text:p>
          </table:table-cell>
          <table:table-cell table:style-name="ce50" table:number-columns-repeated="8"/>
          <table:table-cell table:style-name="ce92" office:value-type="string" calcext:value-type="string">
            <text:p>Assistant Director / Director Shadow</text:p>
          </table:table-cell>
          <table:table-cell table:style-name="ce8" office:value-type="string" calcext:value-type="string">
            <text:p>Gerrie Moolman</text:p>
          </table:table-cell>
          <table:table-cell table:style-name="ce13" table:formula="of:=IF(ISNUMBER(MATCH([.P10];[$Datasheet.$B$1:.$B$9809];0));&quot;✓&quot;;&quot;x&quot;)" office:value-type="string" office:string-value="✓" calcext:value-type="string">
            <text:p>✓</text:p>
          </table:table-cell>
          <table:table-cell table:style-name="ce132" table:formula="of:=IFERROR(VLOOKUP([$Masterlist.$P10];[$Datasheet.$B$1:.$AV$9809];2;FALSE());&quot;-&quot;)" office:value-type="float" office:value="0" calcext:value-type="float">
            <text:p>0</text:p>
          </table:table-cell>
          <table:table-cell table:style-name="ce132" table:formula="of:=IFERROR(VLOOKUP([$Masterlist.$P10];[$Datasheet.$B$1:.$AV$9809];3;FALSE());&quot;-&quot;)" office:value-type="float" office:value="0" calcext:value-type="float">
            <text:p>0</text:p>
          </table:table-cell>
          <table:table-cell table:style-name="ce132" table:formula="of:=IFERROR(VLOOKUP([$Masterlist.$P10];[$Datasheet.$B$1:.$AV$9809];4;FALSE());&quot;-&quot;)" office:value-type="float" office:value="1" calcext:value-type="float">
            <text:p>1</text:p>
          </table:table-cell>
          <table:table-cell table:style-name="ce132" table:formula="of:=IFERROR(VLOOKUP([$Masterlist.$P10];[$Datasheet.$B$1:.$AV$9809];5;FALSE());&quot;-&quot;)" office:value-type="float" office:value="1" calcext:value-type="float">
            <text:p>1</text:p>
          </table:table-cell>
          <table:table-cell table:style-name="ce132" table:formula="of:=IFERROR(VLOOKUP([$Masterlist.$P10];[$Datasheet.$B$1:.$AV$9809];6;FALSE());&quot;-&quot;)" office:value-type="float" office:value="1" calcext:value-type="float">
            <text:p>1</text:p>
          </table:table-cell>
          <table:table-cell table:style-name="ce132" table:formula="of:=IFERROR(VLOOKUP([$Masterlist.$P10];[$Datasheet.$B$1:.$AV$9809];7;FALSE());&quot;-&quot;)" office:value-type="float" office:value="1" calcext:value-type="float">
            <text:p>1</text:p>
          </table:table-cell>
          <table:table-cell table:style-name="ce132" table:formula="of:=IFERROR(VLOOKUP([$Masterlist.$P10];[$Datasheet.$B$1:.$AV$9809];8;FALSE());&quot;-&quot;)" office:value-type="float" office:value="0" calcext:value-type="float">
            <text:p>0</text:p>
          </table:table-cell>
          <table:table-cell table:style-name="ce132" table:formula="of:=IFERROR(VLOOKUP([$Masterlist.$P10];[$Datasheet.$B$1:.$AV$9809];9;FALSE());&quot;-&quot;)" office:value-type="float" office:value="0" calcext:value-type="float">
            <text:p>0</text:p>
          </table:table-cell>
          <table:table-cell table:style-name="ce132" table:formula="of:=IFERROR(VLOOKUP([$Masterlist.$P10];[$Datasheet.$B$1:.$AV$9809];10;FALSE());&quot;-&quot;)" office:value-type="float" office:value="0" calcext:value-type="float">
            <text:p>0</text:p>
          </table:table-cell>
          <table:table-cell table:style-name="ce132" table:formula="of:=IFERROR(VLOOKUP([$Masterlist.$P10];[$Datasheet.$B$1:.$AV$9809];11;FALSE());&quot;-&quot;)" office:value-type="float" office:value="0" calcext:value-type="float">
            <text:p>0</text:p>
          </table:table-cell>
          <table:table-cell table:style-name="ce132" table:formula="of:=IFERROR(VLOOKUP([$Masterlist.$P10];[$Datasheet.$B$1:.$AV$9809];12;FALSE());&quot;-&quot;)" office:value-type="float" office:value="0" calcext:value-type="float">
            <text:p>0</text:p>
          </table:table-cell>
          <table:table-cell table:style-name="ce132" table:formula="of:=IFERROR(VLOOKUP([$Masterlist.$P10];[$Datasheet.$B$1:.$AV$9809];13;FALSE());&quot;-&quot;)" office:value-type="float" office:value="0" calcext:value-type="float">
            <text:p>0</text:p>
          </table:table-cell>
          <table:table-cell table:style-name="ce132" table:formula="of:=IFERROR(VLOOKUP([$Masterlist.$P10];[$Datasheet.$B$1:.$AV$9809];14;FALSE());&quot;-&quot;)" office:value-type="float" office:value="1" calcext:value-type="float">
            <text:p>1</text:p>
          </table:table-cell>
          <table:table-cell table:style-name="ce132" table:formula="of:=IFERROR(VLOOKUP([$Masterlist.$P10];[$Datasheet.$B$1:.$AV$9809];15;FALSE());&quot;-&quot;)" office:value-type="float" office:value="1" calcext:value-type="float">
            <text:p>1</text:p>
          </table:table-cell>
          <table:table-cell table:style-name="ce132" table:formula="of:=IFERROR(VLOOKUP([$Masterlist.$P10];[$Datasheet.$B$1:.$AV$9809];16;FALSE());&quot;-&quot;)" office:value-type="float" office:value="0" calcext:value-type="float">
            <text:p/>
          </table:table-cell>
          <table:table-cell table:style-name="ce132" table:formula="of:=IFERROR(VLOOKUP([$Masterlist.$P10];[$Datasheet.$B$1:.$AV$9809];17;FALSE());&quot;-&quot;)" office:value-type="float" office:value="0" calcext:value-type="float">
            <text:p/>
          </table:table-cell>
          <table:table-cell table:style-name="ce132" table:formula="of:=IFERROR(VLOOKUP([$Masterlist.$P10];[$Datasheet.$B$1:.$AV$9809];18;FALSE());&quot;-&quot;)" office:value-type="float" office:value="0" calcext:value-type="float">
            <text:p/>
          </table:table-cell>
          <table:table-cell table:style-name="ce132" table:formula="of:=IFERROR(VLOOKUP([$Masterlist.$P10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1">
          <table:table-cell table:style-name="ce15"/>
          <table:table-cell table:style-name="ce26" office:value-type="string" calcext:value-type="string">
            <text:p>AL</text:p>
          </table:table-cell>
          <table:table-cell table:number-columns-repeated="2" table:style-name="ce50" office:value-type="string" calcext:value-type="string">
            <text:p>Yes</text:p>
          </table:table-cell>
          <table:table-cell table:style-name="ce50"/>
          <table:table-cell table:style-name="ce50" office:value-type="string" calcext:value-type="string">
            <text:p>Yes</text:p>
          </table:table-cell>
          <table:table-cell table:style-name="ce50" table:number-columns-repeated="8"/>
          <table:table-cell table:style-name="ce92" office:value-type="string" calcext:value-type="string">
            <text:p>Director / Assistant Director</text:p>
          </table:table-cell>
          <table:table-cell table:style-name="ce8" office:value-type="string" calcext:value-type="string">
            <text:p>Justin Robertse</text:p>
          </table:table-cell>
          <table:table-cell table:style-name="ce13" table:formula="of:=IF(ISNUMBER(MATCH([.P11];[$Datasheet.$B$1:.$B$9809];0));&quot;✓&quot;;&quot;x&quot;)" office:value-type="string" office:string-value="✓" calcext:value-type="string">
            <text:p>✓</text:p>
          </table:table-cell>
          <table:table-cell table:style-name="ce132" table:formula="of:=IFERROR(VLOOKUP([$Masterlist.$P11];[$Datasheet.$B$1:.$AV$9809];2;FALSE());&quot;-&quot;)" office:value-type="float" office:value="1" calcext:value-type="float">
            <text:p>1</text:p>
          </table:table-cell>
          <table:table-cell table:style-name="ce132" table:formula="of:=IFERROR(VLOOKUP([$Masterlist.$P11];[$Datasheet.$B$1:.$AV$9809];3;FALSE());&quot;-&quot;)" office:value-type="float" office:value="1" calcext:value-type="float">
            <text:p>1</text:p>
          </table:table-cell>
          <table:table-cell table:style-name="ce132" table:formula="of:=IFERROR(VLOOKUP([$Masterlist.$P11];[$Datasheet.$B$1:.$AV$9809];4;FALSE());&quot;-&quot;)" office:value-type="float" office:value="1" calcext:value-type="float">
            <text:p>1</text:p>
          </table:table-cell>
          <table:table-cell table:style-name="ce132" table:formula="of:=IFERROR(VLOOKUP([$Masterlist.$P11];[$Datasheet.$B$1:.$AV$9809];5;FALSE());&quot;-&quot;)" office:value-type="float" office:value="1" calcext:value-type="float">
            <text:p>1</text:p>
          </table:table-cell>
          <table:table-cell table:style-name="ce132" table:formula="of:=IFERROR(VLOOKUP([$Masterlist.$P11];[$Datasheet.$B$1:.$AV$9809];6;FALSE());&quot;-&quot;)" office:value-type="float" office:value="1" calcext:value-type="float">
            <text:p>1</text:p>
          </table:table-cell>
          <table:table-cell table:style-name="ce132" table:formula="of:=IFERROR(VLOOKUP([$Masterlist.$P11];[$Datasheet.$B$1:.$AV$9809];7;FALSE());&quot;-&quot;)" office:value-type="float" office:value="1" calcext:value-type="float">
            <text:p>1</text:p>
          </table:table-cell>
          <table:table-cell table:style-name="ce132" table:formula="of:=IFERROR(VLOOKUP([$Masterlist.$P11];[$Datasheet.$B$1:.$AV$9809];8;FALSE());&quot;-&quot;)" office:value-type="float" office:value="1" calcext:value-type="float">
            <text:p>1</text:p>
          </table:table-cell>
          <table:table-cell table:style-name="ce132" table:formula="of:=IFERROR(VLOOKUP([$Masterlist.$P11];[$Datasheet.$B$1:.$AV$9809];9;FALSE());&quot;-&quot;)" office:value-type="float" office:value="1" calcext:value-type="float">
            <text:p>1</text:p>
          </table:table-cell>
          <table:table-cell table:style-name="ce132" table:formula="of:=IFERROR(VLOOKUP([$Masterlist.$P11];[$Datasheet.$B$1:.$AV$9809];10;FALSE());&quot;-&quot;)" office:value-type="float" office:value="1" calcext:value-type="float">
            <text:p>1</text:p>
          </table:table-cell>
          <table:table-cell table:style-name="ce132" table:formula="of:=IFERROR(VLOOKUP([$Masterlist.$P11];[$Datasheet.$B$1:.$AV$9809];11;FALSE());&quot;-&quot;)" office:value-type="float" office:value="1" calcext:value-type="float">
            <text:p>1</text:p>
          </table:table-cell>
          <table:table-cell table:style-name="ce132" table:formula="of:=IFERROR(VLOOKUP([$Masterlist.$P11];[$Datasheet.$B$1:.$AV$9809];12;FALSE());&quot;-&quot;)" office:value-type="float" office:value="1" calcext:value-type="float">
            <text:p>1</text:p>
          </table:table-cell>
          <table:table-cell table:style-name="ce132" table:formula="of:=IFERROR(VLOOKUP([$Masterlist.$P11];[$Datasheet.$B$1:.$AV$9809];13;FALSE());&quot;-&quot;)" office:value-type="float" office:value="1" calcext:value-type="float">
            <text:p>1</text:p>
          </table:table-cell>
          <table:table-cell table:style-name="ce132" table:formula="of:=IFERROR(VLOOKUP([$Masterlist.$P11];[$Datasheet.$B$1:.$AV$9809];14;FALSE());&quot;-&quot;)" office:value-type="float" office:value="1" calcext:value-type="float">
            <text:p>1</text:p>
          </table:table-cell>
          <table:table-cell table:style-name="ce132" table:formula="of:=IFERROR(VLOOKUP([$Masterlist.$P11];[$Datasheet.$B$1:.$AV$9809];15;FALSE());&quot;-&quot;)" office:value-type="float" office:value="1" calcext:value-type="float">
            <text:p>1</text:p>
          </table:table-cell>
          <table:table-cell table:style-name="ce132" table:formula="of:=IFERROR(VLOOKUP([$Masterlist.$P11];[$Datasheet.$B$1:.$AV$9809];16;FALSE());&quot;-&quot;)" office:value-type="float" office:value="0" calcext:value-type="float">
            <text:p/>
          </table:table-cell>
          <table:table-cell table:style-name="ce132" table:formula="of:=IFERROR(VLOOKUP([$Masterlist.$P11];[$Datasheet.$B$1:.$AV$9809];17;FALSE());&quot;-&quot;)" office:value-type="float" office:value="0" calcext:value-type="float">
            <text:p/>
          </table:table-cell>
          <table:table-cell table:style-name="ce132" table:formula="of:=IFERROR(VLOOKUP([$Masterlist.$P11];[$Datasheet.$B$1:.$AV$9809];18;FALSE());&quot;-&quot;)" office:value-type="float" office:value="0" calcext:value-type="float">
            <text:p/>
          </table:table-cell>
          <table:table-cell table:style-name="ce132" table:formula="of:=IFERROR(VLOOKUP([$Masterlist.$P11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1">
          <table:table-cell table:style-name="ce15"/>
          <table:table-cell table:style-name="ce26" office:value-type="string" calcext:value-type="string">
            <text:p>L</text:p>
          </table:table-cell>
          <table:table-cell table:style-name="ce50"/>
          <table:table-cell table:number-columns-repeated="3" table:style-name="ce50" office:value-type="string" calcext:value-type="string">
            <text:p>Yes</text:p>
          </table:table-cell>
          <table:table-cell table:style-name="ce50" table:number-columns-repeated="8"/>
          <table:table-cell table:style-name="ce92" office:value-type="string" calcext:value-type="string">
            <text:p>Director</text:p>
          </table:table-cell>
          <table:table-cell table:style-name="ce8" office:value-type="string" calcext:value-type="string">
            <text:p>Stefan Smuts</text:p>
          </table:table-cell>
          <table:table-cell table:style-name="ce13" table:formula="of:=IF(ISNUMBER(MATCH([.P12];[$Datasheet.$B$1:.$B$9809];0));&quot;✓&quot;;&quot;x&quot;)" office:value-type="string" office:string-value="✓" calcext:value-type="string">
            <text:p>✓</text:p>
          </table:table-cell>
          <table:table-cell table:style-name="ce132" table:formula="of:=IFERROR(VLOOKUP([$Masterlist.$P12];[$Datasheet.$B$1:.$AV$9809];2;FALSE());&quot;-&quot;)" office:value-type="float" office:value="0" calcext:value-type="float">
            <text:p>0</text:p>
          </table:table-cell>
          <table:table-cell table:style-name="ce132" table:formula="of:=IFERROR(VLOOKUP([$Masterlist.$P12];[$Datasheet.$B$1:.$AV$9809];3;FALSE());&quot;-&quot;)" office:value-type="float" office:value="1" calcext:value-type="float">
            <text:p>1</text:p>
          </table:table-cell>
          <table:table-cell table:style-name="ce132" table:formula="of:=IFERROR(VLOOKUP([$Masterlist.$P12];[$Datasheet.$B$1:.$AV$9809];4;FALSE());&quot;-&quot;)" office:value-type="float" office:value="0" calcext:value-type="float">
            <text:p>0</text:p>
          </table:table-cell>
          <table:table-cell table:style-name="ce132" table:formula="of:=IFERROR(VLOOKUP([$Masterlist.$P12];[$Datasheet.$B$1:.$AV$9809];5;FALSE());&quot;-&quot;)" office:value-type="float" office:value="0" calcext:value-type="float">
            <text:p>0</text:p>
          </table:table-cell>
          <table:table-cell table:style-name="ce132" table:formula="of:=IFERROR(VLOOKUP([$Masterlist.$P12];[$Datasheet.$B$1:.$AV$9809];6;FALSE());&quot;-&quot;)" office:value-type="float" office:value="1" calcext:value-type="float">
            <text:p>1</text:p>
          </table:table-cell>
          <table:table-cell table:style-name="ce132" table:formula="of:=IFERROR(VLOOKUP([$Masterlist.$P12];[$Datasheet.$B$1:.$AV$9809];7;FALSE());&quot;-&quot;)" office:value-type="float" office:value="1" calcext:value-type="float">
            <text:p>1</text:p>
          </table:table-cell>
          <table:table-cell table:style-name="ce132" table:formula="of:=IFERROR(VLOOKUP([$Masterlist.$P12];[$Datasheet.$B$1:.$AV$9809];8;FALSE());&quot;-&quot;)" office:value-type="float" office:value="1" calcext:value-type="float">
            <text:p>1</text:p>
          </table:table-cell>
          <table:table-cell table:style-name="ce132" table:formula="of:=IFERROR(VLOOKUP([$Masterlist.$P12];[$Datasheet.$B$1:.$AV$9809];9;FALSE());&quot;-&quot;)" office:value-type="float" office:value="1" calcext:value-type="float">
            <text:p>1</text:p>
          </table:table-cell>
          <table:table-cell table:style-name="ce132" table:formula="of:=IFERROR(VLOOKUP([$Masterlist.$P12];[$Datasheet.$B$1:.$AV$9809];10;FALSE());&quot;-&quot;)" office:value-type="float" office:value="0" calcext:value-type="float">
            <text:p>0</text:p>
          </table:table-cell>
          <table:table-cell table:style-name="ce132" table:formula="of:=IFERROR(VLOOKUP([$Masterlist.$P12];[$Datasheet.$B$1:.$AV$9809];11;FALSE());&quot;-&quot;)" office:value-type="float" office:value="0" calcext:value-type="float">
            <text:p>0</text:p>
          </table:table-cell>
          <table:table-cell table:style-name="ce132" table:formula="of:=IFERROR(VLOOKUP([$Masterlist.$P12];[$Datasheet.$B$1:.$AV$9809];12;FALSE());&quot;-&quot;)" office:value-type="float" office:value="1" calcext:value-type="float">
            <text:p>1</text:p>
          </table:table-cell>
          <table:table-cell table:style-name="ce132" table:formula="of:=IFERROR(VLOOKUP([$Masterlist.$P12];[$Datasheet.$B$1:.$AV$9809];13;FALSE());&quot;-&quot;)" office:value-type="float" office:value="1" calcext:value-type="float">
            <text:p>1</text:p>
          </table:table-cell>
          <table:table-cell table:style-name="ce132" table:formula="of:=IFERROR(VLOOKUP([$Masterlist.$P12];[$Datasheet.$B$1:.$AV$9809];14;FALSE());&quot;-&quot;)" office:value-type="float" office:value="0" calcext:value-type="float">
            <text:p>0</text:p>
          </table:table-cell>
          <table:table-cell table:style-name="ce132" table:formula="of:=IFERROR(VLOOKUP([$Masterlist.$P12];[$Datasheet.$B$1:.$AV$9809];15;FALSE());&quot;-&quot;)" office:value-type="float" office:value="0" calcext:value-type="float">
            <text:p>0</text:p>
          </table:table-cell>
          <table:table-cell table:style-name="ce132" table:formula="of:=IFERROR(VLOOKUP([$Masterlist.$P12];[$Datasheet.$B$1:.$AV$9809];16;FALSE());&quot;-&quot;)" office:value-type="float" office:value="0" calcext:value-type="float">
            <text:p/>
          </table:table-cell>
          <table:table-cell table:style-name="ce132" table:formula="of:=IFERROR(VLOOKUP([$Masterlist.$P12];[$Datasheet.$B$1:.$AV$9809];17;FALSE());&quot;-&quot;)" office:value-type="float" office:value="0" calcext:value-type="float">
            <text:p/>
          </table:table-cell>
          <table:table-cell table:style-name="ce132" table:formula="of:=IFERROR(VLOOKUP([$Masterlist.$P12];[$Datasheet.$B$1:.$AV$9809];18;FALSE());&quot;-&quot;)" office:value-type="float" office:value="0" calcext:value-type="float">
            <text:p/>
          </table:table-cell>
          <table:table-cell table:style-name="ce132" table:formula="of:=IFERROR(VLOOKUP([$Masterlist.$P12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1">
          <table:table-cell table:style-name="ce15"/>
          <table:table-cell table:style-name="ce26" office:value-type="string" calcext:value-type="string">
            <text:p>AL</text:p>
          </table:table-cell>
          <table:table-cell table:number-columns-repeated="2" table:style-name="ce50" office:value-type="string" calcext:value-type="string">
            <text:p>Yes</text:p>
          </table:table-cell>
          <table:table-cell table:style-name="ce50"/>
          <table:table-cell table:style-name="ce50" office:value-type="string" calcext:value-type="string">
            <text:p>Yes</text:p>
          </table:table-cell>
          <table:table-cell table:style-name="ce50" table:number-columns-repeated="8"/>
          <table:table-cell table:style-name="ce92" office:value-type="string" calcext:value-type="string">
            <text:p>Director</text:p>
          </table:table-cell>
          <table:table-cell table:style-name="ce8" office:value-type="string" calcext:value-type="string">
            <text:p>Jandre Strydom</text:p>
          </table:table-cell>
          <table:table-cell table:style-name="ce13" table:formula="of:=IF(ISNUMBER(MATCH([.P13];[$Datasheet.$B$1:.$B$9809];0));&quot;✓&quot;;&quot;x&quot;)" office:value-type="string" office:string-value="✓" calcext:value-type="string">
            <text:p>✓</text:p>
          </table:table-cell>
          <table:table-cell table:style-name="ce132" table:formula="of:=IFERROR(VLOOKUP([$Masterlist.$P13];[$Datasheet.$B$1:.$AV$9809];2;FALSE());&quot;-&quot;)" office:value-type="float" office:value="1" calcext:value-type="float">
            <text:p>1</text:p>
          </table:table-cell>
          <table:table-cell table:style-name="ce132" table:formula="of:=IFERROR(VLOOKUP([$Masterlist.$P13];[$Datasheet.$B$1:.$AV$9809];3;FALSE());&quot;-&quot;)" office:value-type="float" office:value="1" calcext:value-type="float">
            <text:p>1</text:p>
          </table:table-cell>
          <table:table-cell table:style-name="ce132" table:formula="of:=IFERROR(VLOOKUP([$Masterlist.$P13];[$Datasheet.$B$1:.$AV$9809];4;FALSE());&quot;-&quot;)" office:value-type="float" office:value="1" calcext:value-type="float">
            <text:p>1</text:p>
          </table:table-cell>
          <table:table-cell table:style-name="ce132" table:formula="of:=IFERROR(VLOOKUP([$Masterlist.$P13];[$Datasheet.$B$1:.$AV$9809];5;FALSE());&quot;-&quot;)" office:value-type="float" office:value="1" calcext:value-type="float">
            <text:p>1</text:p>
          </table:table-cell>
          <table:table-cell table:style-name="ce132" table:formula="of:=IFERROR(VLOOKUP([$Masterlist.$P13];[$Datasheet.$B$1:.$AV$9809];6;FALSE());&quot;-&quot;)" office:value-type="float" office:value="1" calcext:value-type="float">
            <text:p>1</text:p>
          </table:table-cell>
          <table:table-cell table:style-name="ce132" table:formula="of:=IFERROR(VLOOKUP([$Masterlist.$P13];[$Datasheet.$B$1:.$AV$9809];7;FALSE());&quot;-&quot;)" office:value-type="float" office:value="1" calcext:value-type="float">
            <text:p>1</text:p>
          </table:table-cell>
          <table:table-cell table:style-name="ce132" table:formula="of:=IFERROR(VLOOKUP([$Masterlist.$P13];[$Datasheet.$B$1:.$AV$9809];8;FALSE());&quot;-&quot;)" office:value-type="float" office:value="1" calcext:value-type="float">
            <text:p>1</text:p>
          </table:table-cell>
          <table:table-cell table:style-name="ce132" table:formula="of:=IFERROR(VLOOKUP([$Masterlist.$P13];[$Datasheet.$B$1:.$AV$9809];9;FALSE());&quot;-&quot;)" office:value-type="float" office:value="1" calcext:value-type="float">
            <text:p>1</text:p>
          </table:table-cell>
          <table:table-cell table:style-name="ce132" table:formula="of:=IFERROR(VLOOKUP([$Masterlist.$P13];[$Datasheet.$B$1:.$AV$9809];10;FALSE());&quot;-&quot;)" office:value-type="float" office:value="1" calcext:value-type="float">
            <text:p>1</text:p>
          </table:table-cell>
          <table:table-cell table:style-name="ce132" table:formula="of:=IFERROR(VLOOKUP([$Masterlist.$P13];[$Datasheet.$B$1:.$AV$9809];11;FALSE());&quot;-&quot;)" office:value-type="float" office:value="1" calcext:value-type="float">
            <text:p>1</text:p>
          </table:table-cell>
          <table:table-cell table:style-name="ce132" table:formula="of:=IFERROR(VLOOKUP([$Masterlist.$P13];[$Datasheet.$B$1:.$AV$9809];12;FALSE());&quot;-&quot;)" office:value-type="float" office:value="1" calcext:value-type="float">
            <text:p>1</text:p>
          </table:table-cell>
          <table:table-cell table:style-name="ce132" table:formula="of:=IFERROR(VLOOKUP([$Masterlist.$P13];[$Datasheet.$B$1:.$AV$9809];13;FALSE());&quot;-&quot;)" office:value-type="float" office:value="1" calcext:value-type="float">
            <text:p>1</text:p>
          </table:table-cell>
          <table:table-cell table:style-name="ce132" table:formula="of:=IFERROR(VLOOKUP([$Masterlist.$P13];[$Datasheet.$B$1:.$AV$9809];14;FALSE());&quot;-&quot;)" office:value-type="float" office:value="1" calcext:value-type="float">
            <text:p>1</text:p>
          </table:table-cell>
          <table:table-cell table:style-name="ce132" table:formula="of:=IFERROR(VLOOKUP([$Masterlist.$P13];[$Datasheet.$B$1:.$AV$9809];15;FALSE());&quot;-&quot;)" office:value-type="float" office:value="1" calcext:value-type="float">
            <text:p>1</text:p>
          </table:table-cell>
          <table:table-cell table:style-name="ce132" table:formula="of:=IFERROR(VLOOKUP([$Masterlist.$P13];[$Datasheet.$B$1:.$AV$9809];16;FALSE());&quot;-&quot;)" office:value-type="float" office:value="0" calcext:value-type="float">
            <text:p/>
          </table:table-cell>
          <table:table-cell table:style-name="ce132" table:formula="of:=IFERROR(VLOOKUP([$Masterlist.$P13];[$Datasheet.$B$1:.$AV$9809];17;FALSE());&quot;-&quot;)" office:value-type="float" office:value="0" calcext:value-type="float">
            <text:p/>
          </table:table-cell>
          <table:table-cell table:style-name="ce132" table:formula="of:=IFERROR(VLOOKUP([$Masterlist.$P13];[$Datasheet.$B$1:.$AV$9809];18;FALSE());&quot;-&quot;)" office:value-type="float" office:value="0" calcext:value-type="float">
            <text:p/>
          </table:table-cell>
          <table:table-cell table:style-name="ce132" table:formula="of:=IFERROR(VLOOKUP([$Masterlist.$P13];[$Datasheet.$B$1:.$AV$9809];19;FALSE());&quot;-&quot;)" office:value-type="float" office:value="0" calcext:value-type="float">
            <text:p/>
          </table:table-cell>
          <table:table-cell table:style-name="ce15"/>
          <table:table-cell table:number-columns-repeated="16348"/>
        </table:table-row>
        <table:table-row table:style-name="ro11">
          <table:table-cell table:style-name="ce15"/>
          <table:table-cell table:style-name="ce26" office:value-type="string" calcext:value-type="string">
            <text:p>AL</text:p>
          </table:table-cell>
          <table:table-cell table:style-name="ce50"/>
          <table:table-cell table:style-name="ce50" office:value-type="string" calcext:value-type="string">
            <text:p>Yes</text:p>
          </table:table-cell>
          <table:table-cell table:style-name="ce50" table:number-columns-repeated="10"/>
          <table:table-cell table:style-name="ce92" office:value-type="string" calcext:value-type="string">
            <text:p>Director</text:p>
          </table:table-cell>
          <table:table-cell table:style-name="ce8" office:value-type="string" calcext:value-type="string">
            <text:p>Zavier van der Westhuizen</text:p>
          </table:table-cell>
          <table:table-cell table:style-name="ce13" table:formula="of:=IF(ISNUMBER(MATCH([.P14];[$Datasheet.$B$1:.$B$9809];0));&quot;✓&quot;;&quot;x&quot;)" office:value-type="string" office:string-value="x" calcext:value-type="string">
            <text:p>x</text:p>
          </table:table-cell>
          <table:table-cell table:style-name="ce132" table:formula="of:=IFERROR(VLOOKUP([$Masterlist.$P14];[$Datasheet.$B$1:.$AV$9809];2;FALSE());&quot;-&quot;)" office:value-type="string" office:string-value="-" calcext:value-type="string">
            <text:p>-</text:p>
          </table:table-cell>
          <table:table-cell table:style-name="ce132" table:formula="of:=IFERROR(VLOOKUP([$Masterlist.$P14];[$Datasheet.$B$1:.$AV$9809];3;FALSE());&quot;-&quot;)" office:value-type="string" office:string-value="-" calcext:value-type="string">
            <text:p>-</text:p>
          </table:table-cell>
          <table:table-cell table:style-name="ce132" table:formula="of:=IFERROR(VLOOKUP([$Masterlist.$P14];[$Datasheet.$B$1:.$AV$9809];4;FALSE());&quot;-&quot;)" office:value-type="string" office:string-value="-" calcext:value-type="string">
            <text:p>-</text:p>
          </table:table-cell>
          <table:table-cell table:style-name="ce132" table:formula="of:=IFERROR(VLOOKUP([$Masterlist.$P14];[$Datasheet.$B$1:.$AV$9809];5;FALSE());&quot;-&quot;)" office:value-type="string" office:string-value="-" calcext:value-type="string">
            <text:p>-</text:p>
          </table:table-cell>
          <table:table-cell table:style-name="ce132" table:formula="of:=IFERROR(VLOOKUP([$Masterlist.$P14];[$Datasheet.$B$1:.$AV$9809];6;FALSE());&quot;-&quot;)" office:value-type="string" office:string-value="-" calcext:value-type="string">
            <text:p>-</text:p>
          </table:table-cell>
          <table:table-cell table:style-name="ce132" table:formula="of:=IFERROR(VLOOKUP([$Masterlist.$P14];[$Datasheet.$B$1:.$AV$9809];7;FALSE());&quot;-&quot;)" office:value-type="string" office:string-value="-" calcext:value-type="string">
            <text:p>-</text:p>
          </table:table-cell>
          <table:table-cell table:style-name="ce132" table:formula="of:=IFERROR(VLOOKUP([$Masterlist.$P14];[$Datasheet.$B$1:.$AV$9809];8;FALSE());&quot;-&quot;)" office:value-type="string" office:string-value="-" calcext:value-type="string">
            <text:p>-</text:p>
          </table:table-cell>
          <table:table-cell table:style-name="ce132" table:formula="of:=IFERROR(VLOOKUP([$Masterlist.$P14];[$Datasheet.$B$1:.$AV$9809];9;FALSE());&quot;-&quot;)" office:value-type="string" office:string-value="-" calcext:value-type="string">
            <text:p>-</text:p>
          </table:table-cell>
          <table:table-cell table:style-name="ce132" table:formula="of:=IFERROR(VLOOKUP([$Masterlist.$P14];[$Datasheet.$B$1:.$AV$9809];10;FALSE());&quot;-&quot;)" office:value-type="string" office:string-value="-" calcext:value-type="string">
            <text:p>-</text:p>
          </table:table-cell>
          <table:table-cell table:style-name="ce132" table:formula="of:=IFERROR(VLOOKUP([$Masterlist.$P14];[$Datasheet.$B$1:.$AV$9809];11;FALSE());&quot;-&quot;)" office:value-type="string" office:string-value="-" calcext:value-type="string">
            <text:p>-</text:p>
          </table:table-cell>
          <table:table-cell table:style-name="ce132" table:formula="of:=IFERROR(VLOOKUP([$Masterlist.$P14];[$Datasheet.$B$1:.$AV$9809];12;FALSE());&quot;-&quot;)" office:value-type="string" office:string-value="-" calcext:value-type="string">
            <text:p>-</text:p>
          </table:table-cell>
          <table:table-cell table:style-name="ce132" table:formula="of:=IFERROR(VLOOKUP([$Masterlist.$P14];[$Datasheet.$B$1:.$AV$9809];13;FALSE());&quot;-&quot;)" office:value-type="string" office:string-value="-" calcext:value-type="string">
            <text:p>-</text:p>
          </table:table-cell>
          <table:table-cell table:style-name="ce132" table:formula="of:=IFERROR(VLOOKUP([$Masterlist.$P14];[$Datasheet.$B$1:.$AV$9809];14;FALSE());&quot;-&quot;)" office:value-type="string" office:string-value="-" calcext:value-type="string">
            <text:p>-</text:p>
          </table:table-cell>
          <table:table-cell table:style-name="ce132" table:formula="of:=IFERROR(VLOOKUP([$Masterlist.$P14];[$Datasheet.$B$1:.$AV$9809];15;FALSE());&quot;-&quot;)" office:value-type="string" office:string-value="-" calcext:value-type="string">
            <text:p>-</text:p>
          </table:table-cell>
          <table:table-cell table:style-name="ce132" table:formula="of:=IFERROR(VLOOKUP([$Masterlist.$P14];[$Datasheet.$B$1:.$AV$9809];16;FALSE());&quot;-&quot;)" office:value-type="string" office:string-value="-" calcext:value-type="string">
            <text:p>-</text:p>
          </table:table-cell>
          <table:table-cell table:style-name="ce132" table:formula="of:=IFERROR(VLOOKUP([$Masterlist.$P14];[$Datasheet.$B$1:.$AV$9809];17;FALSE());&quot;-&quot;)" office:value-type="string" office:string-value="-" calcext:value-type="string">
            <text:p>-</text:p>
          </table:table-cell>
          <table:table-cell table:style-name="ce132" table:formula="of:=IFERROR(VLOOKUP([$Masterlist.$P14];[$Datasheet.$B$1:.$AV$9809];18;FALSE());&quot;-&quot;)" office:value-type="string" office:string-value="-" calcext:value-type="string">
            <text:p>-</text:p>
          </table:table-cell>
          <table:table-cell table:style-name="ce132" table:formula="of:=IFERROR(VLOOKUP([$Masterlist.$P14];[$Datasheet.$B$1:.$AV$9809];19;FALSE());&quot;-&quot;)" office:value-type="string" office:string-value="-" calcext:value-type="string">
            <text:p>-</text:p>
          </table:table-cell>
          <table:table-cell table:style-name="ce15" table:number-columns-repeated="2"/>
          <table:table-cell table:number-columns-repeated="16347"/>
        </table:table-row>
        <table:table-row table:style-name="ro11">
          <table:table-cell table:style-name="ce15"/>
          <table:table-cell table:style-name="ce26" office:value-type="string" calcext:value-type="string">
            <text:p>AL</text:p>
          </table:table-cell>
          <table:table-cell table:number-columns-repeated="4" table:style-name="ce50" office:value-type="string" calcext:value-type="string">
            <text:p>Yes</text:p>
          </table:table-cell>
          <table:table-cell table:style-name="ce50" table:number-columns-repeated="8"/>
          <table:table-cell table:style-name="ce92" office:value-type="string" calcext:value-type="string">
            <text:p>Director / Assistant Director</text:p>
          </table:table-cell>
          <table:table-cell table:style-name="ce8" office:value-type="string" calcext:value-type="string">
            <text:p>Louis Jacobs</text:p>
          </table:table-cell>
          <table:table-cell table:style-name="ce13" table:formula="of:=IF(ISNUMBER(MATCH([.P15];[$Datasheet.$B$1:.$B$9809];0));&quot;✓&quot;;&quot;x&quot;)" office:value-type="string" office:string-value="x" calcext:value-type="string">
            <text:p>x</text:p>
          </table:table-cell>
          <table:table-cell table:style-name="ce132" table:formula="of:=IFERROR(VLOOKUP([$Masterlist.$P15];[$Datasheet.$B$1:.$AV$9809];2;FALSE());&quot;-&quot;)" office:value-type="string" office:string-value="-" calcext:value-type="string">
            <text:p>-</text:p>
          </table:table-cell>
          <table:table-cell table:style-name="ce132" table:formula="of:=IFERROR(VLOOKUP([$Masterlist.$P15];[$Datasheet.$B$1:.$AV$9809];3;FALSE());&quot;-&quot;)" office:value-type="string" office:string-value="-" calcext:value-type="string">
            <text:p>-</text:p>
          </table:table-cell>
          <table:table-cell table:style-name="ce132" table:formula="of:=IFERROR(VLOOKUP([$Masterlist.$P15];[$Datasheet.$B$1:.$AV$9809];4;FALSE());&quot;-&quot;)" office:value-type="string" office:string-value="-" calcext:value-type="string">
            <text:p>-</text:p>
          </table:table-cell>
          <table:table-cell table:style-name="ce132" table:formula="of:=IFERROR(VLOOKUP([$Masterlist.$P15];[$Datasheet.$B$1:.$AV$9809];5;FALSE());&quot;-&quot;)" office:value-type="string" office:string-value="-" calcext:value-type="string">
            <text:p>-</text:p>
          </table:table-cell>
          <table:table-cell table:style-name="ce132" table:formula="of:=IFERROR(VLOOKUP([$Masterlist.$P15];[$Datasheet.$B$1:.$AV$9809];6;FALSE());&quot;-&quot;)" office:value-type="string" office:string-value="-" calcext:value-type="string">
            <text:p>-</text:p>
          </table:table-cell>
          <table:table-cell table:style-name="ce132" table:formula="of:=IFERROR(VLOOKUP([$Masterlist.$P15];[$Datasheet.$B$1:.$AV$9809];7;FALSE());&quot;-&quot;)" office:value-type="string" office:string-value="-" calcext:value-type="string">
            <text:p>-</text:p>
          </table:table-cell>
          <table:table-cell table:style-name="ce132" table:formula="of:=IFERROR(VLOOKUP([$Masterlist.$P15];[$Datasheet.$B$1:.$AV$9809];8;FALSE());&quot;-&quot;)" office:value-type="string" office:string-value="-" calcext:value-type="string">
            <text:p>-</text:p>
          </table:table-cell>
          <table:table-cell table:style-name="ce132" table:formula="of:=IFERROR(VLOOKUP([$Masterlist.$P15];[$Datasheet.$B$1:.$AV$9809];9;FALSE());&quot;-&quot;)" office:value-type="string" office:string-value="-" calcext:value-type="string">
            <text:p>-</text:p>
          </table:table-cell>
          <table:table-cell table:style-name="ce132" table:formula="of:=IFERROR(VLOOKUP([$Masterlist.$P15];[$Datasheet.$B$1:.$AV$9809];10;FALSE());&quot;-&quot;)" office:value-type="string" office:string-value="-" calcext:value-type="string">
            <text:p>-</text:p>
          </table:table-cell>
          <table:table-cell table:style-name="ce132" table:formula="of:=IFERROR(VLOOKUP([$Masterlist.$P15];[$Datasheet.$B$1:.$AV$9809];11;FALSE());&quot;-&quot;)" office:value-type="string" office:string-value="-" calcext:value-type="string">
            <text:p>-</text:p>
          </table:table-cell>
          <table:table-cell table:style-name="ce132" table:formula="of:=IFERROR(VLOOKUP([$Masterlist.$P15];[$Datasheet.$B$1:.$AV$9809];12;FALSE());&quot;-&quot;)" office:value-type="string" office:string-value="-" calcext:value-type="string">
            <text:p>-</text:p>
          </table:table-cell>
          <table:table-cell table:style-name="ce132" table:formula="of:=IFERROR(VLOOKUP([$Masterlist.$P15];[$Datasheet.$B$1:.$AV$9809];13;FALSE());&quot;-&quot;)" office:value-type="string" office:string-value="-" calcext:value-type="string">
            <text:p>-</text:p>
          </table:table-cell>
          <table:table-cell table:style-name="ce132" table:formula="of:=IFERROR(VLOOKUP([$Masterlist.$P15];[$Datasheet.$B$1:.$AV$9809];14;FALSE());&quot;-&quot;)" office:value-type="string" office:string-value="-" calcext:value-type="string">
            <text:p>-</text:p>
          </table:table-cell>
          <table:table-cell table:style-name="ce132" table:formula="of:=IFERROR(VLOOKUP([$Masterlist.$P15];[$Datasheet.$B$1:.$AV$9809];15;FALSE());&quot;-&quot;)" office:value-type="string" office:string-value="-" calcext:value-type="string">
            <text:p>-</text:p>
          </table:table-cell>
          <table:table-cell table:style-name="ce132" table:formula="of:=IFERROR(VLOOKUP([$Masterlist.$P15];[$Datasheet.$B$1:.$AV$9809];16;FALSE());&quot;-&quot;)" office:value-type="string" office:string-value="-" calcext:value-type="string">
            <text:p>-</text:p>
          </table:table-cell>
          <table:table-cell table:style-name="ce132" table:formula="of:=IFERROR(VLOOKUP([$Masterlist.$P15];[$Datasheet.$B$1:.$AV$9809];17;FALSE());&quot;-&quot;)" office:value-type="string" office:string-value="-" calcext:value-type="string">
            <text:p>-</text:p>
          </table:table-cell>
          <table:table-cell table:style-name="ce132" table:formula="of:=IFERROR(VLOOKUP([$Masterlist.$P15];[$Datasheet.$B$1:.$AV$9809];18;FALSE());&quot;-&quot;)" office:value-type="string" office:string-value="-" calcext:value-type="string">
            <text:p>-</text:p>
          </table:table-cell>
          <table:table-cell table:style-name="ce132" table:formula="of:=IFERROR(VLOOKUP([$Masterlist.$P15];[$Datasheet.$B$1:.$AV$9809];19;FALSE());&quot;-&quot;)" office:value-type="string" office:string-value="-" calcext:value-type="string">
            <text:p>-</text:p>
          </table:table-cell>
          <table:table-cell table:style-name="ce15" table:number-columns-repeated="2"/>
          <table:table-cell table:number-columns-repeated="16347"/>
        </table:table-row>
        <table:table-row table:style-name="ro11">
          <table:table-cell table:style-name="ce15"/>
          <table:table-cell table:style-name="ce26" office:value-type="string" calcext:value-type="string">
            <text:p>AL</text:p>
          </table:table-cell>
          <table:table-cell table:number-columns-repeated="4" table:style-name="ce50" office:value-type="string" calcext:value-type="string">
            <text:p>Yes</text:p>
          </table:table-cell>
          <table:table-cell table:style-name="ce50" table:number-columns-repeated="8"/>
          <table:table-cell table:style-name="ce92" office:value-type="string" calcext:value-type="string">
            <text:p>Director / Assistant Director / Director Shadow</text:p>
          </table:table-cell>
          <table:table-cell table:style-name="ce8" office:value-type="string" calcext:value-type="string">
            <text:p>Nicole Barlow</text:p>
          </table:table-cell>
          <table:table-cell table:style-name="ce13" table:formula="of:=IF(ISNUMBER(MATCH([.P16];[$Datasheet.$B$1:.$B$9809];0));&quot;✓&quot;;&quot;x&quot;)" office:value-type="string" office:string-value="✓" calcext:value-type="string">
            <text:p>✓</text:p>
          </table:table-cell>
          <table:table-cell table:style-name="ce132" table:formula="of:=IFERROR(VLOOKUP([$Masterlist.$P16];[$Datasheet.$B$1:.$AV$9809];2;FALSE());&quot;-&quot;)" office:value-type="float" office:value="1" calcext:value-type="float">
            <text:p>1</text:p>
          </table:table-cell>
          <table:table-cell table:style-name="ce132" table:formula="of:=IFERROR(VLOOKUP([$Masterlist.$P16];[$Datasheet.$B$1:.$AV$9809];3;FALSE());&quot;-&quot;)" office:value-type="float" office:value="1" calcext:value-type="float">
            <text:p>1</text:p>
          </table:table-cell>
          <table:table-cell table:style-name="ce132" table:formula="of:=IFERROR(VLOOKUP([$Masterlist.$P16];[$Datasheet.$B$1:.$AV$9809];4;FALSE());&quot;-&quot;)" office:value-type="float" office:value="1" calcext:value-type="float">
            <text:p>1</text:p>
          </table:table-cell>
          <table:table-cell table:style-name="ce132" table:formula="of:=IFERROR(VLOOKUP([$Masterlist.$P16];[$Datasheet.$B$1:.$AV$9809];5;FALSE());&quot;-&quot;)" office:value-type="float" office:value="1" calcext:value-type="float">
            <text:p>1</text:p>
          </table:table-cell>
          <table:table-cell table:style-name="ce132" table:formula="of:=IFERROR(VLOOKUP([$Masterlist.$P16];[$Datasheet.$B$1:.$AV$9809];6;FALSE());&quot;-&quot;)" office:value-type="float" office:value="1" calcext:value-type="float">
            <text:p>1</text:p>
          </table:table-cell>
          <table:table-cell table:style-name="ce132" table:formula="of:=IFERROR(VLOOKUP([$Masterlist.$P16];[$Datasheet.$B$1:.$AV$9809];7;FALSE());&quot;-&quot;)" office:value-type="float" office:value="1" calcext:value-type="float">
            <text:p>1</text:p>
          </table:table-cell>
          <table:table-cell table:style-name="ce132" table:formula="of:=IFERROR(VLOOKUP([$Masterlist.$P16];[$Datasheet.$B$1:.$AV$9809];8;FALSE());&quot;-&quot;)" office:value-type="float" office:value="1" calcext:value-type="float">
            <text:p>1</text:p>
          </table:table-cell>
          <table:table-cell table:style-name="ce132" table:formula="of:=IFERROR(VLOOKUP([$Masterlist.$P16];[$Datasheet.$B$1:.$AV$9809];9;FALSE());&quot;-&quot;)" office:value-type="float" office:value="1" calcext:value-type="float">
            <text:p>1</text:p>
          </table:table-cell>
          <table:table-cell table:style-name="ce132" table:formula="of:=IFERROR(VLOOKUP([$Masterlist.$P16];[$Datasheet.$B$1:.$AV$9809];10;FALSE());&quot;-&quot;)" office:value-type="float" office:value="1" calcext:value-type="float">
            <text:p>1</text:p>
          </table:table-cell>
          <table:table-cell table:style-name="ce132" table:formula="of:=IFERROR(VLOOKUP([$Masterlist.$P16];[$Datasheet.$B$1:.$AV$9809];11;FALSE());&quot;-&quot;)" office:value-type="float" office:value="1" calcext:value-type="float">
            <text:p>1</text:p>
          </table:table-cell>
          <table:table-cell table:style-name="ce132" table:formula="of:=IFERROR(VLOOKUP([$Masterlist.$P16];[$Datasheet.$B$1:.$AV$9809];12;FALSE());&quot;-&quot;)" office:value-type="float" office:value="1" calcext:value-type="float">
            <text:p>1</text:p>
          </table:table-cell>
          <table:table-cell table:style-name="ce132" table:formula="of:=IFERROR(VLOOKUP([$Masterlist.$P16];[$Datasheet.$B$1:.$AV$9809];13;FALSE());&quot;-&quot;)" office:value-type="float" office:value="1" calcext:value-type="float">
            <text:p>1</text:p>
          </table:table-cell>
          <table:table-cell table:style-name="ce132" table:formula="of:=IFERROR(VLOOKUP([$Masterlist.$P16];[$Datasheet.$B$1:.$AV$9809];14;FALSE());&quot;-&quot;)" office:value-type="float" office:value="1" calcext:value-type="float">
            <text:p>1</text:p>
          </table:table-cell>
          <table:table-cell table:style-name="ce132" table:formula="of:=IFERROR(VLOOKUP([$Masterlist.$P16];[$Datasheet.$B$1:.$AV$9809];15;FALSE());&quot;-&quot;)" office:value-type="float" office:value="1" calcext:value-type="float">
            <text:p>1</text:p>
          </table:table-cell>
          <table:table-cell table:style-name="ce132" table:formula="of:=IFERROR(VLOOKUP([$Masterlist.$P16];[$Datasheet.$B$1:.$AV$9809];16;FALSE());&quot;-&quot;)" office:value-type="float" office:value="0" calcext:value-type="float">
            <text:p/>
          </table:table-cell>
          <table:table-cell table:style-name="ce132" table:formula="of:=IFERROR(VLOOKUP([$Masterlist.$P16];[$Datasheet.$B$1:.$AV$9809];17;FALSE());&quot;-&quot;)" office:value-type="float" office:value="0" calcext:value-type="float">
            <text:p/>
          </table:table-cell>
          <table:table-cell table:style-name="ce132" table:formula="of:=IFERROR(VLOOKUP([$Masterlist.$P16];[$Datasheet.$B$1:.$AV$9809];18;FALSE());&quot;-&quot;)" office:value-type="float" office:value="0" calcext:value-type="float">
            <text:p/>
          </table:table-cell>
          <table:table-cell table:style-name="ce132" table:formula="of:=IFERROR(VLOOKUP([$Masterlist.$P16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1">
          <table:table-cell table:style-name="ce15"/>
          <table:table-cell table:style-name="ce26" office:value-type="string" calcext:value-type="string">
            <text:p>AL</text:p>
          </table:table-cell>
          <table:table-cell table:style-name="ce50" office:value-type="string" calcext:value-type="string">
            <text:p>Yes</text:p>
          </table:table-cell>
          <table:table-cell table:style-name="ce50" table:number-columns-repeated="11"/>
          <table:table-cell table:style-name="ce92" office:value-type="string" calcext:value-type="string">
            <text:p>Assistant Director</text:p>
          </table:table-cell>
          <table:table-cell table:style-name="ce8" office:value-type="string" calcext:value-type="string">
            <office:annotation draw:style-name="gr1" draw:text-style-name="P1" svg:width="8.388cm" svg:height="3.756cm" svg:x="37.038cm" svg:y="11.589cm" draw:caption-point-x="-0.407cm" draw:caption-point-y="-0.705cm">
              <dc:creator>Unknown Author</dc:creator>
              <dc:date>2026-05-18T20:20:00</dc:date>
              <text:p>[Threaded comment]</text:p>
              <text:p><text:s/>Your version of Excel allows you to read this threaded comment; however, any edits to it will get removed if the file is opened in a newer version of Excel. Learn more: https://go.microsoft.com/fwlink/?linkid=870924</text:p>
              <text:p>Comment:</text:p>
              <text:p><text:tab/>Only serves at UC as assistant director</text:p>
              <text:p/>
            </office:annotation>
            <text:p>Werner Vermeulen</text:p>
          </table:table-cell>
          <table:table-cell table:style-name="ce13" table:formula="of:=IF(ISNUMBER(MATCH([.P17];[$Datasheet.$B$1:.$B$9809];0));&quot;✓&quot;;&quot;x&quot;)" office:value-type="string" office:string-value="✓" calcext:value-type="string">
            <text:p>✓</text:p>
          </table:table-cell>
          <table:table-cell table:style-name="ce132" table:formula="of:=IFERROR(VLOOKUP([$Masterlist.$P17];[$Datasheet.$B$1:.$AV$9809];2;FALSE());&quot;-&quot;)" office:value-type="float" office:value="1" calcext:value-type="float">
            <text:p>1</text:p>
          </table:table-cell>
          <table:table-cell table:style-name="ce132" table:formula="of:=IFERROR(VLOOKUP([$Masterlist.$P17];[$Datasheet.$B$1:.$AV$9809];3;FALSE());&quot;-&quot;)" office:value-type="float" office:value="1" calcext:value-type="float">
            <text:p>1</text:p>
          </table:table-cell>
          <table:table-cell table:style-name="ce132" table:formula="of:=IFERROR(VLOOKUP([$Masterlist.$P17];[$Datasheet.$B$1:.$AV$9809];4;FALSE());&quot;-&quot;)" office:value-type="float" office:value="1" calcext:value-type="float">
            <text:p>1</text:p>
          </table:table-cell>
          <table:table-cell table:style-name="ce132" table:formula="of:=IFERROR(VLOOKUP([$Masterlist.$P17];[$Datasheet.$B$1:.$AV$9809];5;FALSE());&quot;-&quot;)" office:value-type="float" office:value="1" calcext:value-type="float">
            <text:p>1</text:p>
          </table:table-cell>
          <table:table-cell table:style-name="ce132" table:formula="of:=IFERROR(VLOOKUP([$Masterlist.$P17];[$Datasheet.$B$1:.$AV$9809];6;FALSE());&quot;-&quot;)" office:value-type="float" office:value="1" calcext:value-type="float">
            <text:p>1</text:p>
          </table:table-cell>
          <table:table-cell table:style-name="ce132" table:formula="of:=IFERROR(VLOOKUP([$Masterlist.$P17];[$Datasheet.$B$1:.$AV$9809];7;FALSE());&quot;-&quot;)" office:value-type="float" office:value="1" calcext:value-type="float">
            <text:p>1</text:p>
          </table:table-cell>
          <table:table-cell table:style-name="ce132" table:formula="of:=IFERROR(VLOOKUP([$Masterlist.$P17];[$Datasheet.$B$1:.$AV$9809];8;FALSE());&quot;-&quot;)" office:value-type="float" office:value="1" calcext:value-type="float">
            <text:p>1</text:p>
          </table:table-cell>
          <table:table-cell table:style-name="ce132" table:formula="of:=IFERROR(VLOOKUP([$Masterlist.$P17];[$Datasheet.$B$1:.$AV$9809];9;FALSE());&quot;-&quot;)" office:value-type="float" office:value="1" calcext:value-type="float">
            <text:p>1</text:p>
          </table:table-cell>
          <table:table-cell table:style-name="ce132" table:formula="of:=IFERROR(VLOOKUP([$Masterlist.$P17];[$Datasheet.$B$1:.$AV$9809];10;FALSE());&quot;-&quot;)" office:value-type="float" office:value="1" calcext:value-type="float">
            <text:p>1</text:p>
          </table:table-cell>
          <table:table-cell table:style-name="ce132" table:formula="of:=IFERROR(VLOOKUP([$Masterlist.$P17];[$Datasheet.$B$1:.$AV$9809];11;FALSE());&quot;-&quot;)" office:value-type="float" office:value="1" calcext:value-type="float">
            <text:p>1</text:p>
          </table:table-cell>
          <table:table-cell table:style-name="ce132" table:formula="of:=IFERROR(VLOOKUP([$Masterlist.$P17];[$Datasheet.$B$1:.$AV$9809];12;FALSE());&quot;-&quot;)" office:value-type="float" office:value="1" calcext:value-type="float">
            <text:p>1</text:p>
          </table:table-cell>
          <table:table-cell table:style-name="ce132" table:formula="of:=IFERROR(VLOOKUP([$Masterlist.$P17];[$Datasheet.$B$1:.$AV$9809];13;FALSE());&quot;-&quot;)" office:value-type="float" office:value="1" calcext:value-type="float">
            <text:p>1</text:p>
          </table:table-cell>
          <table:table-cell table:style-name="ce132" table:formula="of:=IFERROR(VLOOKUP([$Masterlist.$P17];[$Datasheet.$B$1:.$AV$9809];14;FALSE());&quot;-&quot;)" office:value-type="float" office:value="0" calcext:value-type="float">
            <text:p>0</text:p>
          </table:table-cell>
          <table:table-cell table:style-name="ce132" table:formula="of:=IFERROR(VLOOKUP([$Masterlist.$P17];[$Datasheet.$B$1:.$AV$9809];15;FALSE());&quot;-&quot;)" office:value-type="float" office:value="0" calcext:value-type="float">
            <text:p>0</text:p>
          </table:table-cell>
          <table:table-cell table:style-name="ce132" table:formula="of:=IFERROR(VLOOKUP([$Masterlist.$P17];[$Datasheet.$B$1:.$AV$9809];16;FALSE());&quot;-&quot;)" office:value-type="float" office:value="0" calcext:value-type="float">
            <text:p/>
          </table:table-cell>
          <table:table-cell table:style-name="ce132" table:formula="of:=IFERROR(VLOOKUP([$Masterlist.$P17];[$Datasheet.$B$1:.$AV$9809];17;FALSE());&quot;-&quot;)" office:value-type="float" office:value="0" calcext:value-type="float">
            <text:p/>
          </table:table-cell>
          <table:table-cell table:style-name="ce132" table:formula="of:=IFERROR(VLOOKUP([$Masterlist.$P17];[$Datasheet.$B$1:.$AV$9809];18;FALSE());&quot;-&quot;)" office:value-type="float" office:value="0" calcext:value-type="float">
            <text:p/>
          </table:table-cell>
          <table:table-cell table:style-name="ce132" table:formula="of:=IFERROR(VLOOKUP([$Masterlist.$P17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1">
          <table:table-cell table:style-name="ce15"/>
          <table:table-cell table:style-name="ce26" office:value-type="string" calcext:value-type="string">
            <text:p>AL</text:p>
          </table:table-cell>
          <table:table-cell table:style-name="ce50" office:value-type="string" calcext:value-type="string">
            <text:p>Yes</text:p>
          </table:table-cell>
          <table:table-cell table:style-name="ce50" table:number-columns-repeated="11"/>
          <table:table-cell table:style-name="ce92" office:value-type="string" calcext:value-type="string">
            <text:p>Director / Assistant Director</text:p>
          </table:table-cell>
          <table:table-cell table:style-name="ce8" office:value-type="string" calcext:value-type="string">
            <text:p>Jonker Koorts</text:p>
          </table:table-cell>
          <table:table-cell table:style-name="ce13" table:formula="of:=IF(ISNUMBER(MATCH([.P18];[$Datasheet.$B$1:.$B$9809];0));&quot;✓&quot;;&quot;x&quot;)" office:value-type="string" office:string-value="✓" calcext:value-type="string">
            <text:p>✓</text:p>
          </table:table-cell>
          <table:table-cell table:style-name="ce132" table:formula="of:=IFERROR(VLOOKUP([$Masterlist.$P18];[$Datasheet.$B$1:.$AV$9809];2;FALSE());&quot;-&quot;)" office:value-type="float" office:value="1" calcext:value-type="float">
            <text:p>1</text:p>
          </table:table-cell>
          <table:table-cell table:style-name="ce132" table:formula="of:=IFERROR(VLOOKUP([$Masterlist.$P18];[$Datasheet.$B$1:.$AV$9809];3;FALSE());&quot;-&quot;)" office:value-type="float" office:value="1" calcext:value-type="float">
            <text:p>1</text:p>
          </table:table-cell>
          <table:table-cell table:style-name="ce132" table:formula="of:=IFERROR(VLOOKUP([$Masterlist.$P18];[$Datasheet.$B$1:.$AV$9809];4;FALSE());&quot;-&quot;)" office:value-type="float" office:value="1" calcext:value-type="float">
            <text:p>1</text:p>
          </table:table-cell>
          <table:table-cell table:style-name="ce132" table:formula="of:=IFERROR(VLOOKUP([$Masterlist.$P18];[$Datasheet.$B$1:.$AV$9809];5;FALSE());&quot;-&quot;)" office:value-type="float" office:value="1" calcext:value-type="float">
            <text:p>1</text:p>
          </table:table-cell>
          <table:table-cell table:style-name="ce132" table:formula="of:=IFERROR(VLOOKUP([$Masterlist.$P18];[$Datasheet.$B$1:.$AV$9809];6;FALSE());&quot;-&quot;)" office:value-type="float" office:value="0" calcext:value-type="float">
            <text:p>0</text:p>
          </table:table-cell>
          <table:table-cell table:style-name="ce132" table:formula="of:=IFERROR(VLOOKUP([$Masterlist.$P18];[$Datasheet.$B$1:.$AV$9809];7;FALSE());&quot;-&quot;)" office:value-type="float" office:value="0" calcext:value-type="float">
            <text:p>0</text:p>
          </table:table-cell>
          <table:table-cell table:style-name="ce132" table:formula="of:=IFERROR(VLOOKUP([$Masterlist.$P18];[$Datasheet.$B$1:.$AV$9809];8;FALSE());&quot;-&quot;)" office:value-type="float" office:value="0" calcext:value-type="float">
            <text:p>0</text:p>
          </table:table-cell>
          <table:table-cell table:style-name="ce132" table:formula="of:=IFERROR(VLOOKUP([$Masterlist.$P18];[$Datasheet.$B$1:.$AV$9809];9;FALSE());&quot;-&quot;)" office:value-type="float" office:value="0" calcext:value-type="float">
            <text:p>0</text:p>
          </table:table-cell>
          <table:table-cell table:style-name="ce132" table:formula="of:=IFERROR(VLOOKUP([$Masterlist.$P18];[$Datasheet.$B$1:.$AV$9809];10;FALSE());&quot;-&quot;)" office:value-type="float" office:value="1" calcext:value-type="float">
            <text:p>1</text:p>
          </table:table-cell>
          <table:table-cell table:style-name="ce132" table:formula="of:=IFERROR(VLOOKUP([$Masterlist.$P18];[$Datasheet.$B$1:.$AV$9809];11;FALSE());&quot;-&quot;)" office:value-type="float" office:value="1" calcext:value-type="float">
            <text:p>1</text:p>
          </table:table-cell>
          <table:table-cell table:style-name="ce132" table:formula="of:=IFERROR(VLOOKUP([$Masterlist.$P18];[$Datasheet.$B$1:.$AV$9809];12;FALSE());&quot;-&quot;)" office:value-type="float" office:value="0" calcext:value-type="float">
            <text:p>0</text:p>
          </table:table-cell>
          <table:table-cell table:style-name="ce132" table:formula="of:=IFERROR(VLOOKUP([$Masterlist.$P18];[$Datasheet.$B$1:.$AV$9809];13;FALSE());&quot;-&quot;)" office:value-type="float" office:value="0" calcext:value-type="float">
            <text:p>0</text:p>
          </table:table-cell>
          <table:table-cell table:style-name="ce132" table:formula="of:=IFERROR(VLOOKUP([$Masterlist.$P18];[$Datasheet.$B$1:.$AV$9809];14;FALSE());&quot;-&quot;)" office:value-type="float" office:value="0" calcext:value-type="float">
            <text:p>0</text:p>
          </table:table-cell>
          <table:table-cell table:style-name="ce132" table:formula="of:=IFERROR(VLOOKUP([$Masterlist.$P18];[$Datasheet.$B$1:.$AV$9809];15;FALSE());&quot;-&quot;)" office:value-type="float" office:value="0" calcext:value-type="float">
            <text:p>0</text:p>
          </table:table-cell>
          <table:table-cell table:style-name="ce132" table:formula="of:=IFERROR(VLOOKUP([$Masterlist.$P18];[$Datasheet.$B$1:.$AV$9809];16;FALSE());&quot;-&quot;)" office:value-type="float" office:value="0" calcext:value-type="float">
            <text:p/>
          </table:table-cell>
          <table:table-cell table:style-name="ce132" table:formula="of:=IFERROR(VLOOKUP([$Masterlist.$P18];[$Datasheet.$B$1:.$AV$9809];17;FALSE());&quot;-&quot;)" office:value-type="float" office:value="0" calcext:value-type="float">
            <text:p/>
          </table:table-cell>
          <table:table-cell table:style-name="ce132" table:formula="of:=IFERROR(VLOOKUP([$Masterlist.$P18];[$Datasheet.$B$1:.$AV$9809];18;FALSE());&quot;-&quot;)" office:value-type="float" office:value="0" calcext:value-type="float">
            <text:p/>
          </table:table-cell>
          <table:table-cell table:style-name="ce132" table:formula="of:=IFERROR(VLOOKUP([$Masterlist.$P18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1">
          <table:table-cell table:style-name="ce15"/>
          <table:table-cell table:style-name="ce26" office:value-type="string" calcext:value-type="string">
            <text:p>AL</text:p>
          </table:table-cell>
          <table:table-cell table:style-name="ce50" office:value-type="string" calcext:value-type="string">
            <text:p>Yes</text:p>
          </table:table-cell>
          <table:table-cell table:style-name="ce50" table:number-columns-repeated="11"/>
          <table:table-cell table:style-name="ce92" office:value-type="string" calcext:value-type="string">
            <text:p>Assistant Director</text:p>
          </table:table-cell>
          <table:table-cell table:style-name="ce8" office:value-type="string" calcext:value-type="string">
            <text:p>Bertus Janse van Rensburg</text:p>
          </table:table-cell>
          <table:table-cell table:style-name="ce13" table:formula="of:=IF(ISNUMBER(MATCH([.P19];[$Datasheet.$B$1:.$B$9809];0));&quot;✓&quot;;&quot;x&quot;)" office:value-type="string" office:string-value="✓" calcext:value-type="string">
            <text:p>✓</text:p>
          </table:table-cell>
          <table:table-cell table:style-name="ce132" table:formula="of:=IFERROR(VLOOKUP([$Masterlist.$P19];[$Datasheet.$B$1:.$AV$9809];2;FALSE());&quot;-&quot;)" office:value-type="float" office:value="0" calcext:value-type="float">
            <text:p>0</text:p>
          </table:table-cell>
          <table:table-cell table:style-name="ce132" table:formula="of:=IFERROR(VLOOKUP([$Masterlist.$P19];[$Datasheet.$B$1:.$AV$9809];3;FALSE());&quot;-&quot;)" office:value-type="float" office:value="0" calcext:value-type="float">
            <text:p>0</text:p>
          </table:table-cell>
          <table:table-cell table:style-name="ce132" table:formula="of:=IFERROR(VLOOKUP([$Masterlist.$P19];[$Datasheet.$B$1:.$AV$9809];4;FALSE());&quot;-&quot;)" office:value-type="float" office:value="0" calcext:value-type="float">
            <text:p>0</text:p>
          </table:table-cell>
          <table:table-cell table:style-name="ce132" table:formula="of:=IFERROR(VLOOKUP([$Masterlist.$P19];[$Datasheet.$B$1:.$AV$9809];5;FALSE());&quot;-&quot;)" office:value-type="float" office:value="1" calcext:value-type="float">
            <text:p>1</text:p>
          </table:table-cell>
          <table:table-cell table:style-name="ce132" table:formula="of:=IFERROR(VLOOKUP([$Masterlist.$P19];[$Datasheet.$B$1:.$AV$9809];6;FALSE());&quot;-&quot;)" office:value-type="float" office:value="0" calcext:value-type="float">
            <text:p>0</text:p>
          </table:table-cell>
          <table:table-cell table:style-name="ce132" table:formula="of:=IFERROR(VLOOKUP([$Masterlist.$P19];[$Datasheet.$B$1:.$AV$9809];7;FALSE());&quot;-&quot;)" office:value-type="float" office:value="0" calcext:value-type="float">
            <text:p>0</text:p>
          </table:table-cell>
          <table:table-cell table:style-name="ce132" table:formula="of:=IFERROR(VLOOKUP([$Masterlist.$P19];[$Datasheet.$B$1:.$AV$9809];8;FALSE());&quot;-&quot;)" office:value-type="float" office:value="1" calcext:value-type="float">
            <text:p>1</text:p>
          </table:table-cell>
          <table:table-cell table:style-name="ce132" table:formula="of:=IFERROR(VLOOKUP([$Masterlist.$P19];[$Datasheet.$B$1:.$AV$9809];9;FALSE());&quot;-&quot;)" office:value-type="float" office:value="1" calcext:value-type="float">
            <text:p>1</text:p>
          </table:table-cell>
          <table:table-cell table:style-name="ce132" table:formula="of:=IFERROR(VLOOKUP([$Masterlist.$P19];[$Datasheet.$B$1:.$AV$9809];10;FALSE());&quot;-&quot;)" office:value-type="float" office:value="0" calcext:value-type="float">
            <text:p>0</text:p>
          </table:table-cell>
          <table:table-cell table:style-name="ce132" table:formula="of:=IFERROR(VLOOKUP([$Masterlist.$P19];[$Datasheet.$B$1:.$AV$9809];11;FALSE());&quot;-&quot;)" office:value-type="float" office:value="1" calcext:value-type="float">
            <text:p>1</text:p>
          </table:table-cell>
          <table:table-cell table:style-name="ce132" table:formula="of:=IFERROR(VLOOKUP([$Masterlist.$P19];[$Datasheet.$B$1:.$AV$9809];12;FALSE());&quot;-&quot;)" office:value-type="float" office:value="1" calcext:value-type="float">
            <text:p>1</text:p>
          </table:table-cell>
          <table:table-cell table:style-name="ce132" table:formula="of:=IFERROR(VLOOKUP([$Masterlist.$P19];[$Datasheet.$B$1:.$AV$9809];13;FALSE());&quot;-&quot;)" office:value-type="float" office:value="0" calcext:value-type="float">
            <text:p>0</text:p>
          </table:table-cell>
          <table:table-cell table:style-name="ce132" table:formula="of:=IFERROR(VLOOKUP([$Masterlist.$P19];[$Datasheet.$B$1:.$AV$9809];14;FALSE());&quot;-&quot;)" office:value-type="float" office:value="0" calcext:value-type="float">
            <text:p>0</text:p>
          </table:table-cell>
          <table:table-cell table:style-name="ce132" table:formula="of:=IFERROR(VLOOKUP([$Masterlist.$P19];[$Datasheet.$B$1:.$AV$9809];15;FALSE());&quot;-&quot;)" office:value-type="float" office:value="1" calcext:value-type="float">
            <text:p>1</text:p>
          </table:table-cell>
          <table:table-cell table:style-name="ce132" table:formula="of:=IFERROR(VLOOKUP([$Masterlist.$P19];[$Datasheet.$B$1:.$AV$9809];16;FALSE());&quot;-&quot;)" office:value-type="float" office:value="0" calcext:value-type="float">
            <text:p/>
          </table:table-cell>
          <table:table-cell table:style-name="ce132" table:formula="of:=IFERROR(VLOOKUP([$Masterlist.$P19];[$Datasheet.$B$1:.$AV$9809];17;FALSE());&quot;-&quot;)" office:value-type="float" office:value="0" calcext:value-type="float">
            <text:p/>
          </table:table-cell>
          <table:table-cell table:style-name="ce132" table:formula="of:=IFERROR(VLOOKUP([$Masterlist.$P19];[$Datasheet.$B$1:.$AV$9809];18;FALSE());&quot;-&quot;)" office:value-type="float" office:value="0" calcext:value-type="float">
            <text:p/>
          </table:table-cell>
          <table:table-cell table:style-name="ce132" table:formula="of:=IFERROR(VLOOKUP([$Masterlist.$P19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AL</text:p>
          </table:table-cell>
          <table:table-cell table:style-name="ce50"/>
          <table:table-cell table:number-columns-repeated="2" table:style-name="ce50" office:value-type="string" calcext:value-type="string">
            <text:p>Yes</text:p>
          </table:table-cell>
          <table:table-cell table:style-name="ce50" table:number-columns-repeated="9"/>
          <table:table-cell table:style-name="ce92" office:value-type="string" calcext:value-type="string">
            <text:p>Director Shadow</text:p>
          </table:table-cell>
          <table:table-cell table:style-name="ce8" office:value-type="string" calcext:value-type="string">
            <text:p>Elrisa Kruger</text:p>
          </table:table-cell>
          <table:table-cell table:style-name="ce13" table:formula="of:=IF(ISNUMBER(MATCH([.P20];[$Datasheet.$B$1:.$B$9809];0));&quot;✓&quot;;&quot;x&quot;)" office:value-type="string" office:string-value="✓" calcext:value-type="string">
            <text:p>✓</text:p>
          </table:table-cell>
          <table:table-cell table:style-name="ce133" table:formula="of:=IFERROR(VLOOKUP([$Masterlist.$P20];[$Datasheet.$B$1:.$AV$9809];2;FALSE());&quot;-&quot;)" office:value-type="float" office:value="0" calcext:value-type="float">
            <text:p>0</text:p>
          </table:table-cell>
          <table:table-cell table:style-name="ce133" table:formula="of:=IFERROR(VLOOKUP([$Masterlist.$P20];[$Datasheet.$B$1:.$AV$9809];3;FALSE());&quot;-&quot;)" office:value-type="float" office:value="1" calcext:value-type="float">
            <text:p>1</text:p>
          </table:table-cell>
          <table:table-cell table:style-name="ce133" table:formula="of:=IFERROR(VLOOKUP([$Masterlist.$P20];[$Datasheet.$B$1:.$AV$9809];4;FALSE());&quot;-&quot;)" office:value-type="float" office:value="0" calcext:value-type="float">
            <text:p>0</text:p>
          </table:table-cell>
          <table:table-cell table:style-name="ce133" table:formula="of:=IFERROR(VLOOKUP([$Masterlist.$P20];[$Datasheet.$B$1:.$AV$9809];5;FALSE());&quot;-&quot;)" office:value-type="float" office:value="0" calcext:value-type="float">
            <text:p>0</text:p>
          </table:table-cell>
          <table:table-cell table:style-name="ce185" table:formula="of:=IFERROR(VLOOKUP([$Masterlist.$P20];[$Datasheet.$B$1:.$AV$9809];6;FALSE());&quot;-&quot;)" office:value-type="float" office:value="0" calcext:value-type="float">
            <text:p>0</text:p>
          </table:table-cell>
          <table:table-cell table:style-name="ce133" table:formula="of:=IFERROR(VLOOKUP([$Masterlist.$P20];[$Datasheet.$B$1:.$AV$9809];7;FALSE());&quot;-&quot;)" office:value-type="float" office:value="1" calcext:value-type="float">
            <text:p>1</text:p>
          </table:table-cell>
          <table:table-cell table:style-name="ce133" table:formula="of:=IFERROR(VLOOKUP([$Masterlist.$P20];[$Datasheet.$B$1:.$AV$9809];8;FALSE());&quot;-&quot;)" office:value-type="float" office:value="0" calcext:value-type="float">
            <text:p>0</text:p>
          </table:table-cell>
          <table:table-cell table:style-name="ce133" table:formula="of:=IFERROR(VLOOKUP([$Masterlist.$P20];[$Datasheet.$B$1:.$AV$9809];9;FALSE());&quot;-&quot;)" office:value-type="float" office:value="1" calcext:value-type="float">
            <text:p>1</text:p>
          </table:table-cell>
          <table:table-cell table:style-name="ce133" table:formula="of:=IFERROR(VLOOKUP([$Masterlist.$P20];[$Datasheet.$B$1:.$AV$9809];10;FALSE());&quot;-&quot;)" office:value-type="float" office:value="0" calcext:value-type="float">
            <text:p>0</text:p>
          </table:table-cell>
          <table:table-cell table:style-name="ce133" table:formula="of:=IFERROR(VLOOKUP([$Masterlist.$P20];[$Datasheet.$B$1:.$AV$9809];11;FALSE());&quot;-&quot;)" office:value-type="float" office:value="0" calcext:value-type="float">
            <text:p>0</text:p>
          </table:table-cell>
          <table:table-cell table:style-name="ce133" table:formula="of:=IFERROR(VLOOKUP([$Masterlist.$P20];[$Datasheet.$B$1:.$AV$9809];12;FALSE());&quot;-&quot;)" office:value-type="float" office:value="0" calcext:value-type="float">
            <text:p>0</text:p>
          </table:table-cell>
          <table:table-cell table:style-name="ce133" table:formula="of:=IFERROR(VLOOKUP([$Masterlist.$P20];[$Datasheet.$B$1:.$AV$9809];13;FALSE());&quot;-&quot;)" office:value-type="float" office:value="0" calcext:value-type="float">
            <text:p>0</text:p>
          </table:table-cell>
          <table:table-cell table:style-name="ce133" table:formula="of:=IFERROR(VLOOKUP([$Masterlist.$P20];[$Datasheet.$B$1:.$AV$9809];14;FALSE());&quot;-&quot;)" office:value-type="float" office:value="0" calcext:value-type="float">
            <text:p>0</text:p>
          </table:table-cell>
          <table:table-cell table:style-name="ce133" table:formula="of:=IFERROR(VLOOKUP([$Masterlist.$P20];[$Datasheet.$B$1:.$AV$9809];15;FALSE());&quot;-&quot;)" office:value-type="float" office:value="1" calcext:value-type="float">
            <text:p>1</text:p>
          </table:table-cell>
          <table:table-cell table:style-name="ce133" table:formula="of:=IFERROR(VLOOKUP([$Masterlist.$P20];[$Datasheet.$B$1:.$AV$9809];16;FALSE());&quot;-&quot;)" office:value-type="float" office:value="0" calcext:value-type="float">
            <text:p/>
          </table:table-cell>
          <table:table-cell table:style-name="ce133" table:formula="of:=IFERROR(VLOOKUP([$Masterlist.$P20];[$Datasheet.$B$1:.$AV$9809];17;FALSE());&quot;-&quot;)" office:value-type="float" office:value="0" calcext:value-type="float">
            <text:p/>
          </table:table-cell>
          <table:table-cell table:style-name="ce133" table:formula="of:=IFERROR(VLOOKUP([$Masterlist.$P20];[$Datasheet.$B$1:.$AV$9809];18;FALSE());&quot;-&quot;)" office:value-type="float" office:value="0" calcext:value-type="float">
            <text:p/>
          </table:table-cell>
          <table:table-cell table:style-name="ce133" table:formula="of:=IFERROR(VLOOKUP([$Masterlist.$P20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7">
          <table:table-cell table:style-name="ce15"/>
          <table:table-cell table:style-name="ce26" office:value-type="string" calcext:value-type="string">
            <text:p>AL</text:p>
          </table:table-cell>
          <table:table-cell table:style-name="ce50" office:value-type="string" calcext:value-type="string">
            <text:p>yes</text:p>
          </table:table-cell>
          <table:table-cell table:style-name="ce50" table:number-columns-repeated="11"/>
          <table:table-cell table:style-name="ce92" office:value-type="string" calcext:value-type="string">
            <text:p>Director Shadow</text:p>
          </table:table-cell>
          <table:table-cell table:style-name="ce8" office:value-type="string" calcext:value-type="string">
            <text:p>Marco Delport</text:p>
          </table:table-cell>
          <table:table-cell table:style-name="ce13" table:formula="of:=IF(ISNUMBER(MATCH([.P21];[$Datasheet.$B$1:.$B$9809];0));&quot;✓&quot;;&quot;x&quot;)" office:value-type="string" office:string-value="✓" calcext:value-type="string">
            <text:p>✓</text:p>
          </table:table-cell>
          <table:table-cell table:style-name="ce134" table:formula="of:=IFERROR(VLOOKUP([$Masterlist.$P21];[$Datasheet.$B$1:.$AV$9809];2;FALSE());&quot;-&quot;)" office:value-type="float" office:value="0" calcext:value-type="float">
            <text:p>0</text:p>
          </table:table-cell>
          <table:table-cell table:style-name="ce134" table:formula="of:=IFERROR(VLOOKUP([$Masterlist.$P21];[$Datasheet.$B$1:.$AV$9809];3;FALSE());&quot;-&quot;)" office:value-type="float" office:value="0" calcext:value-type="float">
            <text:p>0</text:p>
          </table:table-cell>
          <table:table-cell table:style-name="ce134" table:formula="of:=IFERROR(VLOOKUP([$Masterlist.$P21];[$Datasheet.$B$1:.$AV$9809];4;FALSE());&quot;-&quot;)" office:value-type="float" office:value="0" calcext:value-type="float">
            <text:p>0</text:p>
          </table:table-cell>
          <table:table-cell table:style-name="ce134" table:formula="of:=IFERROR(VLOOKUP([$Masterlist.$P21];[$Datasheet.$B$1:.$AV$9809];5;FALSE());&quot;-&quot;)" office:value-type="float" office:value="0" calcext:value-type="float">
            <text:p>0</text:p>
          </table:table-cell>
          <table:table-cell table:style-name="ce186" table:formula="of:=IFERROR(VLOOKUP([$Masterlist.$P21];[$Datasheet.$B$1:.$AV$9809];6;FALSE());&quot;-&quot;)" office:value-type="float" office:value="0" calcext:value-type="float">
            <text:p>0</text:p>
          </table:table-cell>
          <table:table-cell table:style-name="ce152" table:formula="of:=IFERROR(VLOOKUP([$Masterlist.$P21];[$Datasheet.$B$1:.$AV$9809];7;FALSE());&quot;-&quot;)" office:value-type="float" office:value="1" calcext:value-type="float">
            <text:p>1</text:p>
          </table:table-cell>
          <table:table-cell table:style-name="ce152" table:formula="of:=IFERROR(VLOOKUP([$Masterlist.$P21];[$Datasheet.$B$1:.$AV$9809];8;FALSE());&quot;-&quot;)" office:value-type="float" office:value="0" calcext:value-type="float">
            <text:p>0</text:p>
          </table:table-cell>
          <table:table-cell table:style-name="ce152" table:formula="of:=IFERROR(VLOOKUP([$Masterlist.$P21];[$Datasheet.$B$1:.$AV$9809];9;FALSE());&quot;-&quot;)" office:value-type="float" office:value="0" calcext:value-type="float">
            <text:p>0</text:p>
          </table:table-cell>
          <table:table-cell table:style-name="ce152" table:formula="of:=IFERROR(VLOOKUP([$Masterlist.$P21];[$Datasheet.$B$1:.$AV$9809];10;FALSE());&quot;-&quot;)" office:value-type="float" office:value="0" calcext:value-type="float">
            <text:p>0</text:p>
          </table:table-cell>
          <table:table-cell table:style-name="ce223" table:formula="of:=IFERROR(VLOOKUP([$Masterlist.$P21];[$Datasheet.$B$1:.$AV$9809];11;FALSE());&quot;-&quot;)" office:value-type="float" office:value="0" calcext:value-type="float">
            <text:p>0</text:p>
          </table:table-cell>
          <table:table-cell table:style-name="ce223" office:value-type="float" office:value="1" calcext:value-type="float">
            <text:p>1</text:p>
          </table:table-cell>
          <table:table-cell table:style-name="ce223" table:formula="of:=IFERROR(VLOOKUP([$Masterlist.$P21];[$Datasheet.$B$1:.$AV$9809];13;FALSE());&quot;-&quot;)" office:value-type="float" office:value="0" calcext:value-type="float">
            <text:p>0</text:p>
          </table:table-cell>
          <table:table-cell table:style-name="ce223" table:formula="of:=IFERROR(VLOOKUP([$Masterlist.$P21];[$Datasheet.$B$1:.$AV$9809];14;FALSE());&quot;-&quot;)" office:value-type="float" office:value="1" calcext:value-type="float">
            <text:p>1</text:p>
          </table:table-cell>
          <table:table-cell table:style-name="ce223" table:formula="of:=IFERROR(VLOOKUP([$Masterlist.$P21];[$Datasheet.$B$1:.$AV$9809];15;FALSE());&quot;-&quot;)" office:value-type="float" office:value="1" calcext:value-type="float">
            <text:p>1</text:p>
          </table:table-cell>
          <table:table-cell table:style-name="ce223" table:formula="of:=IFERROR(VLOOKUP([$Masterlist.$P21];[$Datasheet.$B$1:.$AV$9809];16;FALSE());&quot;-&quot;)" office:value-type="float" office:value="0" calcext:value-type="float">
            <text:p/>
          </table:table-cell>
          <table:table-cell table:style-name="ce223" table:formula="of:=IFERROR(VLOOKUP([$Masterlist.$P21];[$Datasheet.$B$1:.$AV$9809];17;FALSE());&quot;-&quot;)" office:value-type="float" office:value="0" calcext:value-type="float">
            <text:p/>
          </table:table-cell>
          <table:table-cell table:style-name="ce223" table:formula="of:=IFERROR(VLOOKUP([$Masterlist.$P21];[$Datasheet.$B$1:.$AV$9809];18;FALSE());&quot;-&quot;)" office:value-type="float" office:value="0" calcext:value-type="float">
            <text:p/>
          </table:table-cell>
          <table:table-cell table:style-name="ce223" table:formula="of:=IFERROR(VLOOKUP([$Masterlist.$P21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table:number-columns-repeated="4"/>
          <table:table-cell table:style-name="ce50" office:value-type="string" calcext:value-type="string">
            <text:p>Yes</text:p>
          </table:table-cell>
          <table:table-cell table:style-name="ce50" table:number-columns-repeated="7"/>
          <table:table-cell table:style-name="ce92" office:value-type="string" calcext:value-type="string">
            <text:p>Director</text:p>
          </table:table-cell>
          <table:table-cell table:style-name="ce8" office:value-type="string" calcext:value-type="string">
            <text:p>Janco Weyers</text:p>
          </table:table-cell>
          <table:table-cell table:style-name="ce13" table:formula="of:=IF(ISNUMBER(MATCH([.P22];[$Datasheet.$B$1:.$B$9809];0));&quot;✓&quot;;&quot;x&quot;)" office:value-type="string" office:string-value="✓" calcext:value-type="string">
            <text:p>✓</text:p>
          </table:table-cell>
          <table:table-cell table:style-name="ce132" table:formula="of:=IFERROR(VLOOKUP([$Masterlist.$P22];[$Datasheet.$B$1:.$AV$9809];2;FALSE());&quot;-&quot;)" office:value-type="float" office:value="1" calcext:value-type="float">
            <text:p>1</text:p>
          </table:table-cell>
          <table:table-cell table:style-name="ce132" table:formula="of:=IFERROR(VLOOKUP([$Masterlist.$P22];[$Datasheet.$B$1:.$AV$9809];3;FALSE());&quot;-&quot;)" office:value-type="float" office:value="1" calcext:value-type="float">
            <text:p>1</text:p>
          </table:table-cell>
          <table:table-cell table:style-name="ce132" table:formula="of:=IFERROR(VLOOKUP([$Masterlist.$P22];[$Datasheet.$B$1:.$AV$9809];4;FALSE());&quot;-&quot;)" office:value-type="float" office:value="1" calcext:value-type="float">
            <text:p>1</text:p>
          </table:table-cell>
          <table:table-cell table:style-name="ce132" table:formula="of:=IFERROR(VLOOKUP([$Masterlist.$P22];[$Datasheet.$B$1:.$AV$9809];5;FALSE());&quot;-&quot;)" office:value-type="float" office:value="1" calcext:value-type="float">
            <text:p>1</text:p>
          </table:table-cell>
          <table:table-cell table:style-name="ce132" table:formula="of:=IFERROR(VLOOKUP([$Masterlist.$P22];[$Datasheet.$B$1:.$AV$9809];6;FALSE());&quot;-&quot;)" office:value-type="float" office:value="1" calcext:value-type="float">
            <text:p>1</text:p>
          </table:table-cell>
          <table:table-cell table:style-name="ce132" table:formula="of:=IFERROR(VLOOKUP([$Masterlist.$P22];[$Datasheet.$B$1:.$AV$9809];7;FALSE());&quot;-&quot;)" office:value-type="float" office:value="1" calcext:value-type="float">
            <text:p>1</text:p>
          </table:table-cell>
          <table:table-cell table:style-name="ce132" table:formula="of:=IFERROR(VLOOKUP([$Masterlist.$P22];[$Datasheet.$B$1:.$AV$9809];8;FALSE());&quot;-&quot;)" office:value-type="float" office:value="1" calcext:value-type="float">
            <text:p>1</text:p>
          </table:table-cell>
          <table:table-cell table:style-name="ce132" table:formula="of:=IFERROR(VLOOKUP([$Masterlist.$P22];[$Datasheet.$B$1:.$AV$9809];9;FALSE());&quot;-&quot;)" office:value-type="float" office:value="1" calcext:value-type="float">
            <text:p>1</text:p>
          </table:table-cell>
          <table:table-cell table:style-name="ce132" table:formula="of:=IFERROR(VLOOKUP([$Masterlist.$P22];[$Datasheet.$B$1:.$AV$9809];10;FALSE());&quot;-&quot;)" office:value-type="float" office:value="1" calcext:value-type="float">
            <text:p>1</text:p>
          </table:table-cell>
          <table:table-cell table:style-name="ce132" table:formula="of:=IFERROR(VLOOKUP([$Masterlist.$P22];[$Datasheet.$B$1:.$AV$9809];11;FALSE());&quot;-&quot;)" office:value-type="float" office:value="1" calcext:value-type="float">
            <text:p>1</text:p>
          </table:table-cell>
          <table:table-cell table:style-name="ce132" table:formula="of:=IFERROR(VLOOKUP([$Masterlist.$P22];[$Datasheet.$B$1:.$AV$9809];12;FALSE());&quot;-&quot;)" office:value-type="float" office:value="1" calcext:value-type="float">
            <text:p>1</text:p>
          </table:table-cell>
          <table:table-cell table:style-name="ce132" table:formula="of:=IFERROR(VLOOKUP([$Masterlist.$P22];[$Datasheet.$B$1:.$AV$9809];13;FALSE());&quot;-&quot;)" office:value-type="float" office:value="1" calcext:value-type="float">
            <text:p>1</text:p>
          </table:table-cell>
          <table:table-cell table:style-name="ce132" table:formula="of:=IFERROR(VLOOKUP([$Masterlist.$P22];[$Datasheet.$B$1:.$AV$9809];14;FALSE());&quot;-&quot;)" office:value-type="float" office:value="1" calcext:value-type="float">
            <text:p>1</text:p>
          </table:table-cell>
          <table:table-cell table:style-name="ce132" table:formula="of:=IFERROR(VLOOKUP([$Masterlist.$P22];[$Datasheet.$B$1:.$AV$9809];15;FALSE());&quot;-&quot;)" office:value-type="float" office:value="1" calcext:value-type="float">
            <text:p>1</text:p>
          </table:table-cell>
          <table:table-cell table:style-name="ce132" table:formula="of:=IFERROR(VLOOKUP([$Masterlist.$P22];[$Datasheet.$B$1:.$AV$9809];16;FALSE());&quot;-&quot;)" office:value-type="float" office:value="0" calcext:value-type="float">
            <text:p>0</text:p>
          </table:table-cell>
          <table:table-cell table:style-name="ce132" table:formula="of:=IFERROR(VLOOKUP([$Masterlist.$P22];[$Datasheet.$B$1:.$AV$9809];17;FALSE());&quot;-&quot;)" office:value-type="float" office:value="0" calcext:value-type="float">
            <text:p>0</text:p>
          </table:table-cell>
          <table:table-cell table:style-name="ce132" table:formula="of:=IFERROR(VLOOKUP([$Masterlist.$P22];[$Datasheet.$B$1:.$AV$9809];18;FALSE());&quot;-&quot;)" office:value-type="float" office:value="0" calcext:value-type="float">
            <text:p/>
          </table:table-cell>
          <table:table-cell table:style-name="ce132" table:formula="of:=IFERROR(VLOOKUP([$Masterlist.$P22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AL</text:p>
          </table:table-cell>
          <table:table-cell table:style-name="ce50" table:number-columns-repeated="4"/>
          <table:table-cell table:style-name="ce50" office:value-type="string" calcext:value-type="string">
            <text:p>Yes</text:p>
          </table:table-cell>
          <table:table-cell table:style-name="ce50" table:number-columns-repeated="7"/>
          <table:table-cell table:style-name="ce92" office:value-type="string" calcext:value-type="string">
            <text:p>Director</text:p>
          </table:table-cell>
          <table:table-cell table:style-name="ce8" office:value-type="string" calcext:value-type="string">
            <text:p>Andy Urquhart</text:p>
          </table:table-cell>
          <table:table-cell table:style-name="ce13" table:formula="of:=IF(ISNUMBER(MATCH([.P23];[$Datasheet.$B$1:.$B$9809];0));&quot;✓&quot;;&quot;x&quot;)" office:value-type="string" office:string-value="✓" calcext:value-type="string">
            <text:p>✓</text:p>
          </table:table-cell>
          <table:table-cell table:style-name="ce132" table:formula="of:=IFERROR(VLOOKUP([$Masterlist.$P23];[$Datasheet.$B$1:.$AV$9809];2;FALSE());&quot;-&quot;)" office:value-type="float" office:value="0" calcext:value-type="float">
            <text:p>0</text:p>
          </table:table-cell>
          <table:table-cell table:style-name="ce132" table:formula="of:=IFERROR(VLOOKUP([$Masterlist.$P23];[$Datasheet.$B$1:.$AV$9809];3;FALSE());&quot;-&quot;)" office:value-type="float" office:value="0" calcext:value-type="float">
            <text:p>0</text:p>
          </table:table-cell>
          <table:table-cell table:style-name="ce132" table:formula="of:=IFERROR(VLOOKUP([$Masterlist.$P23];[$Datasheet.$B$1:.$AV$9809];4;FALSE());&quot;-&quot;)" office:value-type="float" office:value="1" calcext:value-type="float">
            <text:p>1</text:p>
          </table:table-cell>
          <table:table-cell table:style-name="ce132" table:formula="of:=IFERROR(VLOOKUP([$Masterlist.$P23];[$Datasheet.$B$1:.$AV$9809];5;FALSE());&quot;-&quot;)" office:value-type="float" office:value="1" calcext:value-type="float">
            <text:p>1</text:p>
          </table:table-cell>
          <table:table-cell table:style-name="ce132" table:formula="of:=IFERROR(VLOOKUP([$Masterlist.$P23];[$Datasheet.$B$1:.$AV$9809];6;FALSE());&quot;-&quot;)" office:value-type="float" office:value="0" calcext:value-type="float">
            <text:p>0</text:p>
          </table:table-cell>
          <table:table-cell table:style-name="ce132" table:formula="of:=IFERROR(VLOOKUP([$Masterlist.$P23];[$Datasheet.$B$1:.$AV$9809];7;FALSE());&quot;-&quot;)" office:value-type="float" office:value="0" calcext:value-type="float">
            <text:p>0</text:p>
          </table:table-cell>
          <table:table-cell table:style-name="ce132" table:formula="of:=IFERROR(VLOOKUP([$Masterlist.$P23];[$Datasheet.$B$1:.$AV$9809];8;FALSE());&quot;-&quot;)" office:value-type="float" office:value="1" calcext:value-type="float">
            <text:p>1</text:p>
          </table:table-cell>
          <table:table-cell table:style-name="ce132" table:formula="of:=IFERROR(VLOOKUP([$Masterlist.$P23];[$Datasheet.$B$1:.$AV$9809];9;FALSE());&quot;-&quot;)" office:value-type="float" office:value="1" calcext:value-type="float">
            <text:p>1</text:p>
          </table:table-cell>
          <table:table-cell table:style-name="ce132" table:formula="of:=IFERROR(VLOOKUP([$Masterlist.$P23];[$Datasheet.$B$1:.$AV$9809];10;FALSE());&quot;-&quot;)" office:value-type="float" office:value="1" calcext:value-type="float">
            <text:p>1</text:p>
          </table:table-cell>
          <table:table-cell table:style-name="ce132" table:formula="of:=IFERROR(VLOOKUP([$Masterlist.$P23];[$Datasheet.$B$1:.$AV$9809];11;FALSE());&quot;-&quot;)" office:value-type="float" office:value="1" calcext:value-type="float">
            <text:p>1</text:p>
          </table:table-cell>
          <table:table-cell table:style-name="ce132" table:formula="of:=IFERROR(VLOOKUP([$Masterlist.$P23];[$Datasheet.$B$1:.$AV$9809];12;FALSE());&quot;-&quot;)" office:value-type="float" office:value="1" calcext:value-type="float">
            <text:p>1</text:p>
          </table:table-cell>
          <table:table-cell table:style-name="ce132" table:formula="of:=IFERROR(VLOOKUP([$Masterlist.$P23];[$Datasheet.$B$1:.$AV$9809];13;FALSE());&quot;-&quot;)" office:value-type="float" office:value="1" calcext:value-type="float">
            <text:p>1</text:p>
          </table:table-cell>
          <table:table-cell table:style-name="ce132" table:formula="of:=IFERROR(VLOOKUP([$Masterlist.$P23];[$Datasheet.$B$1:.$AV$9809];14;FALSE());&quot;-&quot;)" office:value-type="float" office:value="1" calcext:value-type="float">
            <text:p>1</text:p>
          </table:table-cell>
          <table:table-cell table:style-name="ce132" table:formula="of:=IFERROR(VLOOKUP([$Masterlist.$P23];[$Datasheet.$B$1:.$AV$9809];15;FALSE());&quot;-&quot;)" office:value-type="float" office:value="1" calcext:value-type="float">
            <text:p>1</text:p>
          </table:table-cell>
          <table:table-cell table:style-name="ce132" table:formula="of:=IFERROR(VLOOKUP([$Masterlist.$P23];[$Datasheet.$B$1:.$AV$9809];16;FALSE());&quot;-&quot;)" office:value-type="float" office:value="0" calcext:value-type="float">
            <text:p/>
          </table:table-cell>
          <table:table-cell table:style-name="ce132" table:formula="of:=IFERROR(VLOOKUP([$Masterlist.$P23];[$Datasheet.$B$1:.$AV$9809];17;FALSE());&quot;-&quot;)" office:value-type="float" office:value="0" calcext:value-type="float">
            <text:p/>
          </table:table-cell>
          <table:table-cell table:style-name="ce132" table:formula="of:=IFERROR(VLOOKUP([$Masterlist.$P23];[$Datasheet.$B$1:.$AV$9809];18;FALSE());&quot;-&quot;)" office:value-type="float" office:value="0" calcext:value-type="float">
            <text:p/>
          </table:table-cell>
          <table:table-cell table:style-name="ce132" table:formula="of:=IFERROR(VLOOKUP([$Masterlist.$P23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AL</text:p>
          </table:table-cell>
          <table:table-cell table:style-name="ce50" table:number-columns-repeated="5"/>
          <table:table-cell table:number-columns-repeated="3" table:style-name="ce50" office:value-type="string" calcext:value-type="string">
            <text:p>Yes</text:p>
          </table:table-cell>
          <table:table-cell table:style-name="ce50" table:number-columns-repeated="4"/>
          <table:table-cell table:style-name="ce92" office:value-type="string" calcext:value-type="string">
            <text:p>Director</text:p>
          </table:table-cell>
          <table:table-cell table:style-name="ce8" office:value-type="string" calcext:value-type="string">
            <text:p>JP Marais</text:p>
          </table:table-cell>
          <table:table-cell table:style-name="ce13" table:formula="of:=IF(ISNUMBER(MATCH([.P24];[$Datasheet.$B$1:.$B$9809];0));&quot;✓&quot;;&quot;x&quot;)" office:value-type="string" office:string-value="✓" calcext:value-type="string">
            <text:p>✓</text:p>
          </table:table-cell>
          <table:table-cell table:style-name="ce132" table:formula="of:=IFERROR(VLOOKUP([$Masterlist.$P24];[$Datasheet.$B$1:.$AV$9809];2;FALSE());&quot;-&quot;)" office:value-type="float" office:value="1" calcext:value-type="float">
            <text:p>1</text:p>
          </table:table-cell>
          <table:table-cell table:style-name="ce132" table:formula="of:=IFERROR(VLOOKUP([$Masterlist.$P24];[$Datasheet.$B$1:.$AV$9809];3;FALSE());&quot;-&quot;)" office:value-type="float" office:value="1" calcext:value-type="float">
            <text:p>1</text:p>
          </table:table-cell>
          <table:table-cell table:style-name="ce132" table:formula="of:=IFERROR(VLOOKUP([$Masterlist.$P24];[$Datasheet.$B$1:.$AV$9809];4;FALSE());&quot;-&quot;)" office:value-type="float" office:value="0" calcext:value-type="float">
            <text:p>0</text:p>
          </table:table-cell>
          <table:table-cell table:style-name="ce132" table:formula="of:=IFERROR(VLOOKUP([$Masterlist.$P24];[$Datasheet.$B$1:.$AV$9809];5;FALSE());&quot;-&quot;)" office:value-type="float" office:value="0" calcext:value-type="float">
            <text:p>0</text:p>
          </table:table-cell>
          <table:table-cell table:style-name="ce132" table:formula="of:=IFERROR(VLOOKUP([$Masterlist.$P24];[$Datasheet.$B$1:.$AV$9809];6;FALSE());&quot;-&quot;)" office:value-type="float" office:value="1" calcext:value-type="float">
            <text:p>1</text:p>
          </table:table-cell>
          <table:table-cell table:style-name="ce132" table:formula="of:=IFERROR(VLOOKUP([$Masterlist.$P24];[$Datasheet.$B$1:.$AV$9809];7;FALSE());&quot;-&quot;)" office:value-type="float" office:value="1" calcext:value-type="float">
            <text:p>1</text:p>
          </table:table-cell>
          <table:table-cell table:style-name="ce132" table:formula="of:=IFERROR(VLOOKUP([$Masterlist.$P24];[$Datasheet.$B$1:.$AV$9809];8;FALSE());&quot;-&quot;)" office:value-type="float" office:value="1" calcext:value-type="float">
            <text:p>1</text:p>
          </table:table-cell>
          <table:table-cell table:style-name="ce132" table:formula="of:=IFERROR(VLOOKUP([$Masterlist.$P24];[$Datasheet.$B$1:.$AV$9809];9;FALSE());&quot;-&quot;)" office:value-type="float" office:value="1" calcext:value-type="float">
            <text:p>1</text:p>
          </table:table-cell>
          <table:table-cell table:style-name="ce132" table:formula="of:=IFERROR(VLOOKUP([$Masterlist.$P24];[$Datasheet.$B$1:.$AV$9809];10;FALSE());&quot;-&quot;)" office:value-type="float" office:value="0" calcext:value-type="float">
            <text:p>0</text:p>
          </table:table-cell>
          <table:table-cell table:style-name="ce132" table:formula="of:=IFERROR(VLOOKUP([$Masterlist.$P24];[$Datasheet.$B$1:.$AV$9809];11;FALSE());&quot;-&quot;)" office:value-type="float" office:value="0" calcext:value-type="float">
            <text:p>0</text:p>
          </table:table-cell>
          <table:table-cell table:style-name="ce132" table:formula="of:=IFERROR(VLOOKUP([$Masterlist.$P24];[$Datasheet.$B$1:.$AV$9809];12;FALSE());&quot;-&quot;)" office:value-type="float" office:value="1" calcext:value-type="float">
            <text:p>1</text:p>
          </table:table-cell>
          <table:table-cell table:style-name="ce132" table:formula="of:=IFERROR(VLOOKUP([$Masterlist.$P24];[$Datasheet.$B$1:.$AV$9809];13;FALSE());&quot;-&quot;)" office:value-type="float" office:value="1" calcext:value-type="float">
            <text:p>1</text:p>
          </table:table-cell>
          <table:table-cell table:style-name="ce132" table:formula="of:=IFERROR(VLOOKUP([$Masterlist.$P24];[$Datasheet.$B$1:.$AV$9809];14;FALSE());&quot;-&quot;)" office:value-type="float" office:value="1" calcext:value-type="float">
            <text:p>1</text:p>
          </table:table-cell>
          <table:table-cell table:style-name="ce132" table:formula="of:=IFERROR(VLOOKUP([$Masterlist.$P24];[$Datasheet.$B$1:.$AV$9809];15;FALSE());&quot;-&quot;)" office:value-type="float" office:value="1" calcext:value-type="float">
            <text:p>1</text:p>
          </table:table-cell>
          <table:table-cell table:style-name="ce132" table:formula="of:=IFERROR(VLOOKUP([$Masterlist.$P24];[$Datasheet.$B$1:.$AV$9809];16;FALSE());&quot;-&quot;)" office:value-type="float" office:value="0" calcext:value-type="float">
            <text:p/>
          </table:table-cell>
          <table:table-cell table:style-name="ce132" table:formula="of:=IFERROR(VLOOKUP([$Masterlist.$P24];[$Datasheet.$B$1:.$AV$9809];17;FALSE());&quot;-&quot;)" office:value-type="float" office:value="0" calcext:value-type="float">
            <text:p/>
          </table:table-cell>
          <table:table-cell table:style-name="ce132" table:formula="of:=IFERROR(VLOOKUP([$Masterlist.$P24];[$Datasheet.$B$1:.$AV$9809];18;FALSE());&quot;-&quot;)" office:value-type="float" office:value="0" calcext:value-type="float">
            <text:p/>
          </table:table-cell>
          <table:table-cell table:style-name="ce132" table:formula="of:=IFERROR(VLOOKUP([$Masterlist.$P24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AL</text:p>
          </table:table-cell>
          <table:table-cell table:style-name="ce50" table:number-columns-repeated="5"/>
          <table:table-cell table:number-columns-repeated="3" table:style-name="ce50" office:value-type="string" calcext:value-type="string">
            <text:p>Yes</text:p>
          </table:table-cell>
          <table:table-cell table:style-name="ce50" table:number-columns-repeated="4"/>
          <table:table-cell table:style-name="ce92" office:value-type="string" calcext:value-type="string">
            <text:p>Director</text:p>
          </table:table-cell>
          <table:table-cell table:style-name="ce8" office:value-type="string" calcext:value-type="string">
            <text:p>Laenita De Jonge</text:p>
          </table:table-cell>
          <table:table-cell table:style-name="ce13" table:formula="of:=IF(ISNUMBER(MATCH([.P25];[$Datasheet.$B$1:.$B$9809];0));&quot;✓&quot;;&quot;x&quot;)" office:value-type="string" office:string-value="✓" calcext:value-type="string">
            <text:p>✓</text:p>
          </table:table-cell>
          <table:table-cell table:style-name="ce132" table:formula="of:=IFERROR(VLOOKUP([$Masterlist.$P25];[$Datasheet.$B$1:.$AV$9809];2;FALSE());&quot;-&quot;)" office:value-type="float" office:value="1" calcext:value-type="float">
            <text:p>1</text:p>
          </table:table-cell>
          <table:table-cell table:style-name="ce132" table:formula="of:=IFERROR(VLOOKUP([$Masterlist.$P25];[$Datasheet.$B$1:.$AV$9809];3;FALSE());&quot;-&quot;)" office:value-type="float" office:value="1" calcext:value-type="float">
            <text:p>1</text:p>
          </table:table-cell>
          <table:table-cell table:style-name="ce132" table:formula="of:=IFERROR(VLOOKUP([$Masterlist.$P25];[$Datasheet.$B$1:.$AV$9809];4;FALSE());&quot;-&quot;)" office:value-type="float" office:value="0" calcext:value-type="float">
            <text:p>0</text:p>
          </table:table-cell>
          <table:table-cell table:style-name="ce132" table:formula="of:=IFERROR(VLOOKUP([$Masterlist.$P25];[$Datasheet.$B$1:.$AV$9809];5;FALSE());&quot;-&quot;)" office:value-type="float" office:value="0" calcext:value-type="float">
            <text:p>0</text:p>
          </table:table-cell>
          <table:table-cell table:style-name="ce132" table:formula="of:=IFERROR(VLOOKUP([$Masterlist.$P25];[$Datasheet.$B$1:.$AV$9809];6;FALSE());&quot;-&quot;)" office:value-type="float" office:value="0" calcext:value-type="float">
            <text:p>0</text:p>
          </table:table-cell>
          <table:table-cell table:style-name="ce132" table:formula="of:=IFERROR(VLOOKUP([$Masterlist.$P25];[$Datasheet.$B$1:.$AV$9809];7;FALSE());&quot;-&quot;)" office:value-type="float" office:value="0" calcext:value-type="float">
            <text:p>0</text:p>
          </table:table-cell>
          <table:table-cell table:style-name="ce132" table:formula="of:=IFERROR(VLOOKUP([$Masterlist.$P25];[$Datasheet.$B$1:.$AV$9809];8;FALSE());&quot;-&quot;)" office:value-type="float" office:value="1" calcext:value-type="float">
            <text:p>1</text:p>
          </table:table-cell>
          <table:table-cell table:style-name="ce132" table:formula="of:=IFERROR(VLOOKUP([$Masterlist.$P25];[$Datasheet.$B$1:.$AV$9809];9;FALSE());&quot;-&quot;)" office:value-type="float" office:value="1" calcext:value-type="float">
            <text:p>1</text:p>
          </table:table-cell>
          <table:table-cell table:style-name="ce132" table:formula="of:=IFERROR(VLOOKUP([$Masterlist.$P25];[$Datasheet.$B$1:.$AV$9809];10;FALSE());&quot;-&quot;)" office:value-type="float" office:value="0" calcext:value-type="float">
            <text:p>0</text:p>
          </table:table-cell>
          <table:table-cell table:style-name="ce132" table:formula="of:=IFERROR(VLOOKUP([$Masterlist.$P25];[$Datasheet.$B$1:.$AV$9809];11;FALSE());&quot;-&quot;)" office:value-type="float" office:value="0" calcext:value-type="float">
            <text:p>0</text:p>
          </table:table-cell>
          <table:table-cell table:style-name="ce132" table:formula="of:=IFERROR(VLOOKUP([$Masterlist.$P25];[$Datasheet.$B$1:.$AV$9809];12;FALSE());&quot;-&quot;)" office:value-type="float" office:value="1" calcext:value-type="float">
            <text:p>1</text:p>
          </table:table-cell>
          <table:table-cell table:style-name="ce132" table:formula="of:=IFERROR(VLOOKUP([$Masterlist.$P25];[$Datasheet.$B$1:.$AV$9809];13;FALSE());&quot;-&quot;)" office:value-type="float" office:value="1" calcext:value-type="float">
            <text:p>1</text:p>
          </table:table-cell>
          <table:table-cell table:style-name="ce132" table:formula="of:=IFERROR(VLOOKUP([$Masterlist.$P25];[$Datasheet.$B$1:.$AV$9809];14;FALSE());&quot;-&quot;)" office:value-type="float" office:value="0" calcext:value-type="float">
            <text:p>0</text:p>
          </table:table-cell>
          <table:table-cell table:style-name="ce132" table:formula="of:=IFERROR(VLOOKUP([$Masterlist.$P25];[$Datasheet.$B$1:.$AV$9809];15;FALSE());&quot;-&quot;)" office:value-type="float" office:value="0" calcext:value-type="float">
            <text:p>0</text:p>
          </table:table-cell>
          <table:table-cell table:style-name="ce132" table:formula="of:=IFERROR(VLOOKUP([$Masterlist.$P25];[$Datasheet.$B$1:.$AV$9809];16;FALSE());&quot;-&quot;)" office:value-type="float" office:value="0" calcext:value-type="float">
            <text:p/>
          </table:table-cell>
          <table:table-cell table:style-name="ce132" table:formula="of:=IFERROR(VLOOKUP([$Masterlist.$P25];[$Datasheet.$B$1:.$AV$9809];17;FALSE());&quot;-&quot;)" office:value-type="float" office:value="0" calcext:value-type="float">
            <text:p/>
          </table:table-cell>
          <table:table-cell table:style-name="ce132" table:formula="of:=IFERROR(VLOOKUP([$Masterlist.$P25];[$Datasheet.$B$1:.$AV$9809];18;FALSE());&quot;-&quot;)" office:value-type="float" office:value="0" calcext:value-type="float">
            <text:p/>
          </table:table-cell>
          <table:table-cell table:style-name="ce132" table:formula="of:=IFERROR(VLOOKUP([$Masterlist.$P25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AL</text:p>
          </table:table-cell>
          <table:table-cell table:style-name="ce50" table:number-columns-repeated="6"/>
          <table:table-cell table:style-name="ce50" office:value-type="string" calcext:value-type="string">
            <text:p>Yes</text:p>
          </table:table-cell>
          <table:table-cell table:style-name="ce50" table:number-columns-repeated="5"/>
          <table:table-cell table:style-name="ce92" office:value-type="string" calcext:value-type="string">
            <text:p>Director</text:p>
          </table:table-cell>
          <table:table-cell table:style-name="ce101" office:value-type="string" calcext:value-type="string">
            <office:annotation draw:style-name="gr2" draw:text-style-name="P1" svg:width="8.388cm" svg:height="0.846cm" svg:x="37.038cm" svg:y="16.034cm" draw:caption-point-x="-0.407cm" draw:caption-point-y="-0.758cm">
              <dc:creator>Unknown Author</dc:creator>
              <dc:date>2026-05-18T20:20:00</dc:date>
              <text:p>Schedule only at Tygerberg</text:p>
            </office:annotation>
            <text:p>Christo Pretorius</text:p>
          </table:table-cell>
          <table:table-cell table:style-name="ce13" table:formula="of:=IF(ISNUMBER(MATCH([.P26];[$Datasheet.$B$1:.$B$9809];0));&quot;✓&quot;;&quot;x&quot;)" office:value-type="string" office:string-value="✓" calcext:value-type="string">
            <text:p>✓</text:p>
          </table:table-cell>
          <table:table-cell table:style-name="ce132" table:formula="of:=IFERROR(VLOOKUP([$Masterlist.$P26];[$Datasheet.$B$1:.$AV$9809];2;FALSE());&quot;-&quot;)" office:value-type="float" office:value="1" calcext:value-type="float">
            <text:p>1</text:p>
          </table:table-cell>
          <table:table-cell table:style-name="ce132" table:formula="of:=IFERROR(VLOOKUP([$Masterlist.$P26];[$Datasheet.$B$1:.$AV$9809];3;FALSE());&quot;-&quot;)" office:value-type="float" office:value="0" calcext:value-type="float">
            <text:p>0</text:p>
          </table:table-cell>
          <table:table-cell table:style-name="ce132" table:formula="of:=IFERROR(VLOOKUP([$Masterlist.$P26];[$Datasheet.$B$1:.$AV$9809];4;FALSE());&quot;-&quot;)" office:value-type="float" office:value="1" calcext:value-type="float">
            <text:p>1</text:p>
          </table:table-cell>
          <table:table-cell table:style-name="ce132" table:formula="of:=IFERROR(VLOOKUP([$Masterlist.$P26];[$Datasheet.$B$1:.$AV$9809];5;FALSE());&quot;-&quot;)" office:value-type="float" office:value="1" calcext:value-type="float">
            <text:p>1</text:p>
          </table:table-cell>
          <table:table-cell table:style-name="ce132" table:formula="of:=IFERROR(VLOOKUP([$Masterlist.$P26];[$Datasheet.$B$1:.$AV$9809];6;FALSE());&quot;-&quot;)" office:value-type="float" office:value="0" calcext:value-type="float">
            <text:p>0</text:p>
          </table:table-cell>
          <table:table-cell table:style-name="ce132" table:formula="of:=IFERROR(VLOOKUP([$Masterlist.$P26];[$Datasheet.$B$1:.$AV$9809];7;FALSE());&quot;-&quot;)" office:value-type="float" office:value="0" calcext:value-type="float">
            <text:p>0</text:p>
          </table:table-cell>
          <table:table-cell table:style-name="ce132" table:formula="of:=IFERROR(VLOOKUP([$Masterlist.$P26];[$Datasheet.$B$1:.$AV$9809];8;FALSE());&quot;-&quot;)" office:value-type="float" office:value="1" calcext:value-type="float">
            <text:p>1</text:p>
          </table:table-cell>
          <table:table-cell table:style-name="ce132" table:formula="of:=IFERROR(VLOOKUP([$Masterlist.$P26];[$Datasheet.$B$1:.$AV$9809];9;FALSE());&quot;-&quot;)" office:value-type="float" office:value="1" calcext:value-type="float">
            <text:p>1</text:p>
          </table:table-cell>
          <table:table-cell table:style-name="ce132" table:formula="of:=IFERROR(VLOOKUP([$Masterlist.$P26];[$Datasheet.$B$1:.$AV$9809];10;FALSE());&quot;-&quot;)" office:value-type="float" office:value="0" calcext:value-type="float">
            <text:p>0</text:p>
          </table:table-cell>
          <table:table-cell table:style-name="ce132" table:formula="of:=IFERROR(VLOOKUP([$Masterlist.$P26];[$Datasheet.$B$1:.$AV$9809];11;FALSE());&quot;-&quot;)" office:value-type="float" office:value="0" calcext:value-type="float">
            <text:p>0</text:p>
          </table:table-cell>
          <table:table-cell table:style-name="ce132" table:formula="of:=IFERROR(VLOOKUP([$Masterlist.$P26];[$Datasheet.$B$1:.$AV$9809];12;FALSE());&quot;-&quot;)" office:value-type="float" office:value="1" calcext:value-type="float">
            <text:p>1</text:p>
          </table:table-cell>
          <table:table-cell table:style-name="ce132" table:formula="of:=IFERROR(VLOOKUP([$Masterlist.$P26];[$Datasheet.$B$1:.$AV$9809];13;FALSE());&quot;-&quot;)" office:value-type="float" office:value="1" calcext:value-type="float">
            <text:p>1</text:p>
          </table:table-cell>
          <table:table-cell table:style-name="ce132" table:formula="of:=IFERROR(VLOOKUP([$Masterlist.$P26];[$Datasheet.$B$1:.$AV$9809];14;FALSE());&quot;-&quot;)" office:value-type="float" office:value="1" calcext:value-type="float">
            <text:p>1</text:p>
          </table:table-cell>
          <table:table-cell table:style-name="ce132" table:formula="of:=IFERROR(VLOOKUP([$Masterlist.$P26];[$Datasheet.$B$1:.$AV$9809];15;FALSE());&quot;-&quot;)" office:value-type="float" office:value="1" calcext:value-type="float">
            <text:p>1</text:p>
          </table:table-cell>
          <table:table-cell table:style-name="ce132" table:formula="of:=IFERROR(VLOOKUP([$Masterlist.$P26];[$Datasheet.$B$1:.$AV$9809];16;FALSE());&quot;-&quot;)" office:value-type="float" office:value="0" calcext:value-type="float">
            <text:p/>
          </table:table-cell>
          <table:table-cell table:style-name="ce132" table:formula="of:=IFERROR(VLOOKUP([$Masterlist.$P26];[$Datasheet.$B$1:.$AV$9809];17;FALSE());&quot;-&quot;)" office:value-type="float" office:value="0" calcext:value-type="float">
            <text:p/>
          </table:table-cell>
          <table:table-cell table:style-name="ce132" table:formula="of:=IFERROR(VLOOKUP([$Masterlist.$P26];[$Datasheet.$B$1:.$AV$9809];18;FALSE());&quot;-&quot;)" office:value-type="float" office:value="0" calcext:value-type="float">
            <text:p/>
          </table:table-cell>
          <table:table-cell table:style-name="ce132" table:formula="of:=IFERROR(VLOOKUP([$Masterlist.$P26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AL</text:p>
          </table:table-cell>
          <table:table-cell table:style-name="ce50" table:number-columns-repeated="5"/>
          <table:table-cell table:number-columns-repeated="3" table:style-name="ce50" office:value-type="string" calcext:value-type="string">
            <text:p>Yes</text:p>
          </table:table-cell>
          <table:table-cell table:style-name="ce50" table:number-columns-repeated="4"/>
          <table:table-cell table:style-name="ce92" office:value-type="string" calcext:value-type="string">
            <text:p>Director</text:p>
          </table:table-cell>
          <table:table-cell table:style-name="ce8" office:value-type="string" calcext:value-type="string">
            <text:p>Kevin Emslie</text:p>
          </table:table-cell>
          <table:table-cell table:style-name="ce13" table:formula="of:=IF(ISNUMBER(MATCH([.P27];[$Datasheet.$B$1:.$B$9809];0));&quot;✓&quot;;&quot;x&quot;)" office:value-type="string" office:string-value="✓" calcext:value-type="string">
            <text:p>✓</text:p>
          </table:table-cell>
          <table:table-cell table:style-name="ce132" table:formula="of:=IFERROR(VLOOKUP([$Masterlist.$P27];[$Datasheet.$B$1:.$AV$9809];2;FALSE());&quot;-&quot;)" office:value-type="float" office:value="0" calcext:value-type="float">
            <text:p>0</text:p>
          </table:table-cell>
          <table:table-cell table:style-name="ce132" table:formula="of:=IFERROR(VLOOKUP([$Masterlist.$P27];[$Datasheet.$B$1:.$AV$9809];3;FALSE());&quot;-&quot;)" office:value-type="float" office:value="0" calcext:value-type="float">
            <text:p>0</text:p>
          </table:table-cell>
          <table:table-cell table:style-name="ce132" table:formula="of:=IFERROR(VLOOKUP([$Masterlist.$P27];[$Datasheet.$B$1:.$AV$9809];4;FALSE());&quot;-&quot;)" office:value-type="float" office:value="1" calcext:value-type="float">
            <text:p>1</text:p>
          </table:table-cell>
          <table:table-cell table:style-name="ce132" table:formula="of:=IFERROR(VLOOKUP([$Masterlist.$P27];[$Datasheet.$B$1:.$AV$9809];5;FALSE());&quot;-&quot;)" office:value-type="float" office:value="1" calcext:value-type="float">
            <text:p>1</text:p>
          </table:table-cell>
          <table:table-cell table:style-name="ce132" table:formula="of:=IFERROR(VLOOKUP([$Masterlist.$P27];[$Datasheet.$B$1:.$AV$9809];6;FALSE());&quot;-&quot;)" office:value-type="float" office:value="1" calcext:value-type="float">
            <text:p>1</text:p>
          </table:table-cell>
          <table:table-cell table:style-name="ce132" table:formula="of:=IFERROR(VLOOKUP([$Masterlist.$P27];[$Datasheet.$B$1:.$AV$9809];7;FALSE());&quot;-&quot;)" office:value-type="float" office:value="1" calcext:value-type="float">
            <text:p>1</text:p>
          </table:table-cell>
          <table:table-cell table:style-name="ce132" table:formula="of:=IFERROR(VLOOKUP([$Masterlist.$P27];[$Datasheet.$B$1:.$AV$9809];8;FALSE());&quot;-&quot;)" office:value-type="float" office:value="1" calcext:value-type="float">
            <text:p>1</text:p>
          </table:table-cell>
          <table:table-cell table:style-name="ce132" table:formula="of:=IFERROR(VLOOKUP([$Masterlist.$P27];[$Datasheet.$B$1:.$AV$9809];9;FALSE());&quot;-&quot;)" office:value-type="float" office:value="1" calcext:value-type="float">
            <text:p>1</text:p>
          </table:table-cell>
          <table:table-cell table:style-name="ce132" table:formula="of:=IFERROR(VLOOKUP([$Masterlist.$P27];[$Datasheet.$B$1:.$AV$9809];10;FALSE());&quot;-&quot;)" office:value-type="float" office:value="1" calcext:value-type="float">
            <text:p>1</text:p>
          </table:table-cell>
          <table:table-cell table:style-name="ce132" table:formula="of:=IFERROR(VLOOKUP([$Masterlist.$P27];[$Datasheet.$B$1:.$AV$9809];11;FALSE());&quot;-&quot;)" office:value-type="float" office:value="1" calcext:value-type="float">
            <text:p>1</text:p>
          </table:table-cell>
          <table:table-cell table:style-name="ce132" table:formula="of:=IFERROR(VLOOKUP([$Masterlist.$P27];[$Datasheet.$B$1:.$AV$9809];12;FALSE());&quot;-&quot;)" office:value-type="float" office:value="1" calcext:value-type="float">
            <text:p>1</text:p>
          </table:table-cell>
          <table:table-cell table:style-name="ce132" table:formula="of:=IFERROR(VLOOKUP([$Masterlist.$P27];[$Datasheet.$B$1:.$AV$9809];13;FALSE());&quot;-&quot;)" office:value-type="float" office:value="1" calcext:value-type="float">
            <text:p>1</text:p>
          </table:table-cell>
          <table:table-cell table:style-name="ce132" table:formula="of:=IFERROR(VLOOKUP([$Masterlist.$P27];[$Datasheet.$B$1:.$AV$9809];14;FALSE());&quot;-&quot;)" office:value-type="float" office:value="1" calcext:value-type="float">
            <text:p>1</text:p>
          </table:table-cell>
          <table:table-cell table:style-name="ce132" table:formula="of:=IFERROR(VLOOKUP([$Masterlist.$P27];[$Datasheet.$B$1:.$AV$9809];15;FALSE());&quot;-&quot;)" office:value-type="float" office:value="1" calcext:value-type="float">
            <text:p>1</text:p>
          </table:table-cell>
          <table:table-cell table:style-name="ce132" table:formula="of:=IFERROR(VLOOKUP([$Masterlist.$P27];[$Datasheet.$B$1:.$AV$9809];16;FALSE());&quot;-&quot;)" office:value-type="float" office:value="0" calcext:value-type="float">
            <text:p/>
          </table:table-cell>
          <table:table-cell table:style-name="ce132" table:formula="of:=IFERROR(VLOOKUP([$Masterlist.$P27];[$Datasheet.$B$1:.$AV$9809];17;FALSE());&quot;-&quot;)" office:value-type="float" office:value="0" calcext:value-type="float">
            <text:p/>
          </table:table-cell>
          <table:table-cell table:style-name="ce132" table:formula="of:=IFERROR(VLOOKUP([$Masterlist.$P27];[$Datasheet.$B$1:.$AV$9809];18;FALSE());&quot;-&quot;)" office:value-type="float" office:value="0" calcext:value-type="float">
            <text:p/>
          </table:table-cell>
          <table:table-cell table:style-name="ce132" table:formula="of:=IFERROR(VLOOKUP([$Masterlist.$P27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AL</text:p>
          </table:table-cell>
          <table:table-cell table:style-name="ce50" table:number-columns-repeated="5"/>
          <table:table-cell table:number-columns-repeated="3" table:style-name="ce50" office:value-type="string" calcext:value-type="string">
            <text:p>Yes</text:p>
          </table:table-cell>
          <table:table-cell table:style-name="ce50" table:number-columns-repeated="4"/>
          <table:table-cell table:style-name="ce92" office:value-type="string" calcext:value-type="string">
            <text:p>Director</text:p>
          </table:table-cell>
          <table:table-cell table:style-name="ce8" office:value-type="string" calcext:value-type="string">
            <text:p>Christian Van Der Merwe</text:p>
          </table:table-cell>
          <table:table-cell table:style-name="ce13" table:formula="of:=IF(ISNUMBER(MATCH([.P28];[$Datasheet.$B$1:.$B$9809];0));&quot;✓&quot;;&quot;x&quot;)" office:value-type="string" office:string-value="✓" calcext:value-type="string">
            <text:p>✓</text:p>
          </table:table-cell>
          <table:table-cell table:style-name="ce132" table:formula="of:=IFERROR(VLOOKUP([$Masterlist.$P28];[$Datasheet.$B$1:.$AV$9809];2;FALSE());&quot;-&quot;)" office:value-type="float" office:value="1" calcext:value-type="float">
            <text:p>1</text:p>
          </table:table-cell>
          <table:table-cell table:style-name="ce132" table:formula="of:=IFERROR(VLOOKUP([$Masterlist.$P28];[$Datasheet.$B$1:.$AV$9809];3;FALSE());&quot;-&quot;)" office:value-type="float" office:value="1" calcext:value-type="float">
            <text:p>1</text:p>
          </table:table-cell>
          <table:table-cell table:style-name="ce132" table:formula="of:=IFERROR(VLOOKUP([$Masterlist.$P28];[$Datasheet.$B$1:.$AV$9809];4;FALSE());&quot;-&quot;)" office:value-type="float" office:value="1" calcext:value-type="float">
            <text:p>1</text:p>
          </table:table-cell>
          <table:table-cell table:style-name="ce132" table:formula="of:=IFERROR(VLOOKUP([$Masterlist.$P28];[$Datasheet.$B$1:.$AV$9809];5;FALSE());&quot;-&quot;)" office:value-type="float" office:value="1" calcext:value-type="float">
            <text:p>1</text:p>
          </table:table-cell>
          <table:table-cell table:style-name="ce132" table:formula="of:=IFERROR(VLOOKUP([$Masterlist.$P28];[$Datasheet.$B$1:.$AV$9809];6;FALSE());&quot;-&quot;)" office:value-type="float" office:value="1" calcext:value-type="float">
            <text:p>1</text:p>
          </table:table-cell>
          <table:table-cell table:style-name="ce132" table:formula="of:=IFERROR(VLOOKUP([$Masterlist.$P28];[$Datasheet.$B$1:.$AV$9809];7;FALSE());&quot;-&quot;)" office:value-type="float" office:value="1" calcext:value-type="float">
            <text:p>1</text:p>
          </table:table-cell>
          <table:table-cell table:style-name="ce132" table:formula="of:=IFERROR(VLOOKUP([$Masterlist.$P28];[$Datasheet.$B$1:.$AV$9809];8;FALSE());&quot;-&quot;)" office:value-type="float" office:value="1" calcext:value-type="float">
            <text:p>1</text:p>
          </table:table-cell>
          <table:table-cell table:style-name="ce132" table:formula="of:=IFERROR(VLOOKUP([$Masterlist.$P28];[$Datasheet.$B$1:.$AV$9809];9;FALSE());&quot;-&quot;)" office:value-type="float" office:value="1" calcext:value-type="float">
            <text:p>1</text:p>
          </table:table-cell>
          <table:table-cell table:style-name="ce132" table:formula="of:=IFERROR(VLOOKUP([$Masterlist.$P28];[$Datasheet.$B$1:.$AV$9809];10;FALSE());&quot;-&quot;)" office:value-type="float" office:value="1" calcext:value-type="float">
            <text:p>1</text:p>
          </table:table-cell>
          <table:table-cell table:style-name="ce132" table:formula="of:=IFERROR(VLOOKUP([$Masterlist.$P28];[$Datasheet.$B$1:.$AV$9809];11;FALSE());&quot;-&quot;)" office:value-type="float" office:value="1" calcext:value-type="float">
            <text:p>1</text:p>
          </table:table-cell>
          <table:table-cell table:style-name="ce132" table:formula="of:=IFERROR(VLOOKUP([$Masterlist.$P28];[$Datasheet.$B$1:.$AV$9809];12;FALSE());&quot;-&quot;)" office:value-type="float" office:value="1" calcext:value-type="float">
            <text:p>1</text:p>
          </table:table-cell>
          <table:table-cell table:style-name="ce132" table:formula="of:=IFERROR(VLOOKUP([$Masterlist.$P28];[$Datasheet.$B$1:.$AV$9809];13;FALSE());&quot;-&quot;)" office:value-type="float" office:value="1" calcext:value-type="float">
            <text:p>1</text:p>
          </table:table-cell>
          <table:table-cell table:style-name="ce132" table:formula="of:=IFERROR(VLOOKUP([$Masterlist.$P28];[$Datasheet.$B$1:.$AV$9809];14;FALSE());&quot;-&quot;)" office:value-type="float" office:value="1" calcext:value-type="float">
            <text:p>1</text:p>
          </table:table-cell>
          <table:table-cell table:style-name="ce132" table:formula="of:=IFERROR(VLOOKUP([$Masterlist.$P28];[$Datasheet.$B$1:.$AV$9809];15;FALSE());&quot;-&quot;)" office:value-type="float" office:value="1" calcext:value-type="float">
            <text:p>1</text:p>
          </table:table-cell>
          <table:table-cell table:style-name="ce132" table:formula="of:=IFERROR(VLOOKUP([$Masterlist.$P28];[$Datasheet.$B$1:.$AV$9809];16;FALSE());&quot;-&quot;)" office:value-type="float" office:value="0" calcext:value-type="float">
            <text:p/>
          </table:table-cell>
          <table:table-cell table:style-name="ce132" table:formula="of:=IFERROR(VLOOKUP([$Masterlist.$P28];[$Datasheet.$B$1:.$AV$9809];17;FALSE());&quot;-&quot;)" office:value-type="float" office:value="0" calcext:value-type="float">
            <text:p/>
          </table:table-cell>
          <table:table-cell table:style-name="ce132" table:formula="of:=IFERROR(VLOOKUP([$Masterlist.$P28];[$Datasheet.$B$1:.$AV$9809];18;FALSE());&quot;-&quot;)" office:value-type="float" office:value="0" calcext:value-type="float">
            <text:p/>
          </table:table-cell>
          <table:table-cell table:style-name="ce132" table:formula="of:=IFERROR(VLOOKUP([$Masterlist.$P28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table:number-columns-repeated="8"/>
          <table:table-cell table:style-name="ce50" office:value-type="string" calcext:value-type="string">
            <text:p>Yes</text:p>
          </table:table-cell>
          <table:table-cell table:style-name="ce50" table:number-columns-repeated="3"/>
          <table:table-cell table:style-name="ce92" office:value-type="string" calcext:value-type="string">
            <text:p>Director</text:p>
          </table:table-cell>
          <table:table-cell table:style-name="ce8" office:value-type="string" calcext:value-type="string">
            <text:p>Daniel Kloppers</text:p>
          </table:table-cell>
          <table:table-cell table:style-name="ce13" table:formula="of:=IF(ISNUMBER(MATCH([.P29];[$Datasheet.$B$1:.$B$9809];0));&quot;✓&quot;;&quot;x&quot;)" office:value-type="string" office:string-value="x" calcext:value-type="string">
            <text:p>x</text:p>
          </table:table-cell>
          <table:table-cell table:style-name="ce132" table:formula="of:=IFERROR(VLOOKUP([$Masterlist.$P29];[$Datasheet.$B$1:.$AV$9809];2;FALSE());&quot;-&quot;)" office:value-type="string" office:string-value="-" calcext:value-type="string">
            <text:p>-</text:p>
          </table:table-cell>
          <table:table-cell table:style-name="ce132" table:formula="of:=IFERROR(VLOOKUP([$Masterlist.$P29];[$Datasheet.$B$1:.$AV$9809];3;FALSE());&quot;-&quot;)" office:value-type="string" office:string-value="-" calcext:value-type="string">
            <text:p>-</text:p>
          </table:table-cell>
          <table:table-cell table:style-name="ce132" table:formula="of:=IFERROR(VLOOKUP([$Masterlist.$P29];[$Datasheet.$B$1:.$AV$9809];4;FALSE());&quot;-&quot;)" office:value-type="string" office:string-value="-" calcext:value-type="string">
            <text:p>-</text:p>
          </table:table-cell>
          <table:table-cell table:style-name="ce132" table:formula="of:=IFERROR(VLOOKUP([$Masterlist.$P29];[$Datasheet.$B$1:.$AV$9809];5;FALSE());&quot;-&quot;)" office:value-type="string" office:string-value="-" calcext:value-type="string">
            <text:p>-</text:p>
          </table:table-cell>
          <table:table-cell table:style-name="ce132" table:formula="of:=IFERROR(VLOOKUP([$Masterlist.$P29];[$Datasheet.$B$1:.$AV$9809];6;FALSE());&quot;-&quot;)" office:value-type="string" office:string-value="-" calcext:value-type="string">
            <text:p>-</text:p>
          </table:table-cell>
          <table:table-cell table:style-name="ce132" table:formula="of:=IFERROR(VLOOKUP([$Masterlist.$P29];[$Datasheet.$B$1:.$AV$9809];7;FALSE());&quot;-&quot;)" office:value-type="string" office:string-value="-" calcext:value-type="string">
            <text:p>-</text:p>
          </table:table-cell>
          <table:table-cell table:style-name="ce132" table:formula="of:=IFERROR(VLOOKUP([$Masterlist.$P29];[$Datasheet.$B$1:.$AV$9809];8;FALSE());&quot;-&quot;)" office:value-type="string" office:string-value="-" calcext:value-type="string">
            <text:p>-</text:p>
          </table:table-cell>
          <table:table-cell table:style-name="ce132" table:formula="of:=IFERROR(VLOOKUP([$Masterlist.$P29];[$Datasheet.$B$1:.$AV$9809];9;FALSE());&quot;-&quot;)" office:value-type="string" office:string-value="-" calcext:value-type="string">
            <text:p>-</text:p>
          </table:table-cell>
          <table:table-cell table:style-name="ce132" table:formula="of:=IFERROR(VLOOKUP([$Masterlist.$P29];[$Datasheet.$B$1:.$AV$9809];10;FALSE());&quot;-&quot;)" office:value-type="string" office:string-value="-" calcext:value-type="string">
            <text:p>-</text:p>
          </table:table-cell>
          <table:table-cell table:style-name="ce132" table:formula="of:=IFERROR(VLOOKUP([$Masterlist.$P29];[$Datasheet.$B$1:.$AV$9809];11;FALSE());&quot;-&quot;)" office:value-type="string" office:string-value="-" calcext:value-type="string">
            <text:p>-</text:p>
          </table:table-cell>
          <table:table-cell table:style-name="ce132" table:formula="of:=IFERROR(VLOOKUP([$Masterlist.$P29];[$Datasheet.$B$1:.$AV$9809];12;FALSE());&quot;-&quot;)" office:value-type="string" office:string-value="-" calcext:value-type="string">
            <text:p>-</text:p>
          </table:table-cell>
          <table:table-cell table:style-name="ce132" table:formula="of:=IFERROR(VLOOKUP([$Masterlist.$P29];[$Datasheet.$B$1:.$AV$9809];13;FALSE());&quot;-&quot;)" office:value-type="string" office:string-value="-" calcext:value-type="string">
            <text:p>-</text:p>
          </table:table-cell>
          <table:table-cell table:style-name="ce132" table:formula="of:=IFERROR(VLOOKUP([$Masterlist.$P29];[$Datasheet.$B$1:.$AV$9809];14;FALSE());&quot;-&quot;)" office:value-type="string" office:string-value="-" calcext:value-type="string">
            <text:p>-</text:p>
          </table:table-cell>
          <table:table-cell table:style-name="ce132" table:formula="of:=IFERROR(VLOOKUP([$Masterlist.$P29];[$Datasheet.$B$1:.$AV$9809];15;FALSE());&quot;-&quot;)" office:value-type="string" office:string-value="-" calcext:value-type="string">
            <text:p>-</text:p>
          </table:table-cell>
          <table:table-cell table:style-name="ce132" table:formula="of:=IFERROR(VLOOKUP([$Masterlist.$P29];[$Datasheet.$B$1:.$AV$9809];16;FALSE());&quot;-&quot;)" office:value-type="string" office:string-value="-" calcext:value-type="string">
            <text:p>-</text:p>
          </table:table-cell>
          <table:table-cell table:style-name="ce132" table:formula="of:=IFERROR(VLOOKUP([$Masterlist.$P29];[$Datasheet.$B$1:.$AV$9809];17;FALSE());&quot;-&quot;)" office:value-type="string" office:string-value="-" calcext:value-type="string">
            <text:p>-</text:p>
          </table:table-cell>
          <table:table-cell table:style-name="ce132" table:formula="of:=IFERROR(VLOOKUP([$Masterlist.$P29];[$Datasheet.$B$1:.$AV$9809];18;FALSE());&quot;-&quot;)" office:value-type="string" office:string-value="-" calcext:value-type="string">
            <text:p>-</text:p>
          </table:table-cell>
          <table:table-cell table:style-name="ce132" table:formula="of:=IFERROR(VLOOKUP([$Masterlist.$P29];[$Datasheet.$B$1:.$AV$9809];19;FALSE());&quot;-&quot;)" office:value-type="string" office:string-value="-" calcext:value-type="string">
            <text:p>-</text:p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AL</text:p>
          </table:table-cell>
          <table:table-cell table:style-name="ce50" table:number-columns-repeated="8"/>
          <table:table-cell table:style-name="ce50" office:value-type="string" calcext:value-type="string">
            <text:p>Yes</text:p>
          </table:table-cell>
          <table:table-cell table:style-name="ce50" table:number-columns-repeated="3"/>
          <table:table-cell table:style-name="ce92" office:value-type="string" calcext:value-type="string">
            <text:p>Director</text:p>
          </table:table-cell>
          <table:table-cell table:style-name="ce8" office:value-type="string" calcext:value-type="string">
            <text:p>Ian Rall</text:p>
          </table:table-cell>
          <table:table-cell table:style-name="ce13" table:formula="of:=IF(ISNUMBER(MATCH([.P30];[$Datasheet.$B$1:.$B$9809];0));&quot;✓&quot;;&quot;x&quot;)" office:value-type="string" office:string-value="x" calcext:value-type="string">
            <text:p>x</text:p>
          </table:table-cell>
          <table:table-cell table:style-name="ce132" table:formula="of:=IFERROR(VLOOKUP([$Masterlist.$P30];[$Datasheet.$B$1:.$AV$9809];2;FALSE());&quot;-&quot;)" office:value-type="string" office:string-value="-" calcext:value-type="string">
            <text:p>-</text:p>
          </table:table-cell>
          <table:table-cell table:style-name="ce132" table:formula="of:=IFERROR(VLOOKUP([$Masterlist.$P30];[$Datasheet.$B$1:.$AV$9809];3;FALSE());&quot;-&quot;)" office:value-type="string" office:string-value="-" calcext:value-type="string">
            <text:p>-</text:p>
          </table:table-cell>
          <table:table-cell table:style-name="ce132" table:formula="of:=IFERROR(VLOOKUP([$Masterlist.$P30];[$Datasheet.$B$1:.$AV$9809];4;FALSE());&quot;-&quot;)" office:value-type="string" office:string-value="-" calcext:value-type="string">
            <text:p>-</text:p>
          </table:table-cell>
          <table:table-cell table:style-name="ce132" table:formula="of:=IFERROR(VLOOKUP([$Masterlist.$P30];[$Datasheet.$B$1:.$AV$9809];5;FALSE());&quot;-&quot;)" office:value-type="string" office:string-value="-" calcext:value-type="string">
            <text:p>-</text:p>
          </table:table-cell>
          <table:table-cell table:style-name="ce132" table:formula="of:=IFERROR(VLOOKUP([$Masterlist.$P30];[$Datasheet.$B$1:.$AV$9809];6;FALSE());&quot;-&quot;)" office:value-type="string" office:string-value="-" calcext:value-type="string">
            <text:p>-</text:p>
          </table:table-cell>
          <table:table-cell table:style-name="ce132" table:formula="of:=IFERROR(VLOOKUP([$Masterlist.$P30];[$Datasheet.$B$1:.$AV$9809];7;FALSE());&quot;-&quot;)" office:value-type="string" office:string-value="-" calcext:value-type="string">
            <text:p>-</text:p>
          </table:table-cell>
          <table:table-cell table:style-name="ce132" table:formula="of:=IFERROR(VLOOKUP([$Masterlist.$P30];[$Datasheet.$B$1:.$AV$9809];8;FALSE());&quot;-&quot;)" office:value-type="string" office:string-value="-" calcext:value-type="string">
            <text:p>-</text:p>
          </table:table-cell>
          <table:table-cell table:style-name="ce132" table:formula="of:=IFERROR(VLOOKUP([$Masterlist.$P30];[$Datasheet.$B$1:.$AV$9809];9;FALSE());&quot;-&quot;)" office:value-type="string" office:string-value="-" calcext:value-type="string">
            <text:p>-</text:p>
          </table:table-cell>
          <table:table-cell table:style-name="ce132" table:formula="of:=IFERROR(VLOOKUP([$Masterlist.$P30];[$Datasheet.$B$1:.$AV$9809];10;FALSE());&quot;-&quot;)" office:value-type="string" office:string-value="-" calcext:value-type="string">
            <text:p>-</text:p>
          </table:table-cell>
          <table:table-cell table:style-name="ce132" table:formula="of:=IFERROR(VLOOKUP([$Masterlist.$P30];[$Datasheet.$B$1:.$AV$9809];11;FALSE());&quot;-&quot;)" office:value-type="string" office:string-value="-" calcext:value-type="string">
            <text:p>-</text:p>
          </table:table-cell>
          <table:table-cell table:style-name="ce132" table:formula="of:=IFERROR(VLOOKUP([$Masterlist.$P30];[$Datasheet.$B$1:.$AV$9809];12;FALSE());&quot;-&quot;)" office:value-type="string" office:string-value="-" calcext:value-type="string">
            <text:p>-</text:p>
          </table:table-cell>
          <table:table-cell table:style-name="ce132" table:formula="of:=IFERROR(VLOOKUP([$Masterlist.$P30];[$Datasheet.$B$1:.$AV$9809];13;FALSE());&quot;-&quot;)" office:value-type="string" office:string-value="-" calcext:value-type="string">
            <text:p>-</text:p>
          </table:table-cell>
          <table:table-cell table:style-name="ce132" table:formula="of:=IFERROR(VLOOKUP([$Masterlist.$P30];[$Datasheet.$B$1:.$AV$9809];14;FALSE());&quot;-&quot;)" office:value-type="string" office:string-value="-" calcext:value-type="string">
            <text:p>-</text:p>
          </table:table-cell>
          <table:table-cell table:style-name="ce132" table:formula="of:=IFERROR(VLOOKUP([$Masterlist.$P30];[$Datasheet.$B$1:.$AV$9809];15;FALSE());&quot;-&quot;)" office:value-type="string" office:string-value="-" calcext:value-type="string">
            <text:p>-</text:p>
          </table:table-cell>
          <table:table-cell table:style-name="ce132" table:formula="of:=IFERROR(VLOOKUP([$Masterlist.$P30];[$Datasheet.$B$1:.$AV$9809];16;FALSE());&quot;-&quot;)" office:value-type="string" office:string-value="-" calcext:value-type="string">
            <text:p>-</text:p>
          </table:table-cell>
          <table:table-cell table:style-name="ce132" table:formula="of:=IFERROR(VLOOKUP([$Masterlist.$P30];[$Datasheet.$B$1:.$AV$9809];17;FALSE());&quot;-&quot;)" office:value-type="string" office:string-value="-" calcext:value-type="string">
            <text:p>-</text:p>
          </table:table-cell>
          <table:table-cell table:style-name="ce132" table:formula="of:=IFERROR(VLOOKUP([$Masterlist.$P30];[$Datasheet.$B$1:.$AV$9809];18;FALSE());&quot;-&quot;)" office:value-type="string" office:string-value="-" calcext:value-type="string">
            <text:p>-</text:p>
          </table:table-cell>
          <table:table-cell table:style-name="ce132" table:formula="of:=IFERROR(VLOOKUP([$Masterlist.$P30];[$Datasheet.$B$1:.$AV$9809];19;FALSE());&quot;-&quot;)" office:value-type="string" office:string-value="-" calcext:value-type="string">
            <text:p>-</text:p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table:number-columns-repeated="9"/>
          <table:table-cell table:style-name="ce50" office:value-type="string" calcext:value-type="string">
            <text:p>Yes</text:p>
          </table:table-cell>
          <table:table-cell table:style-name="ce50" table:number-columns-repeated="2"/>
          <table:table-cell table:style-name="ce92" office:value-type="string" calcext:value-type="string">
            <text:p>Director</text:p>
          </table:table-cell>
          <table:table-cell table:style-name="ce8" office:value-type="string" calcext:value-type="string">
            <text:p>Martin Oosthuizen</text:p>
          </table:table-cell>
          <table:table-cell table:style-name="ce13" table:formula="of:=IF(ISNUMBER(MATCH([.P31];[$Datasheet.$B$1:.$B$9809];0));&quot;✓&quot;;&quot;x&quot;)" office:value-type="string" office:string-value="✓" calcext:value-type="string">
            <text:p>✓</text:p>
          </table:table-cell>
          <table:table-cell table:style-name="ce132" table:formula="of:=IFERROR(VLOOKUP([$Masterlist.$P31];[$Datasheet.$B$1:.$AV$9809];2;FALSE());&quot;-&quot;)" office:value-type="float" office:value="0" calcext:value-type="float">
            <text:p>0</text:p>
          </table:table-cell>
          <table:table-cell table:style-name="ce132" table:formula="of:=IFERROR(VLOOKUP([$Masterlist.$P31];[$Datasheet.$B$1:.$AV$9809];3;FALSE());&quot;-&quot;)" office:value-type="float" office:value="0" calcext:value-type="float">
            <text:p>0</text:p>
          </table:table-cell>
          <table:table-cell table:style-name="ce132" table:formula="of:=IFERROR(VLOOKUP([$Masterlist.$P31];[$Datasheet.$B$1:.$AV$9809];4;FALSE());&quot;-&quot;)" office:value-type="float" office:value="1" calcext:value-type="float">
            <text:p>1</text:p>
          </table:table-cell>
          <table:table-cell table:style-name="ce132" table:formula="of:=IFERROR(VLOOKUP([$Masterlist.$P31];[$Datasheet.$B$1:.$AV$9809];5;FALSE());&quot;-&quot;)" office:value-type="float" office:value="1" calcext:value-type="float">
            <text:p>1</text:p>
          </table:table-cell>
          <table:table-cell table:style-name="ce132" table:formula="of:=IFERROR(VLOOKUP([$Masterlist.$P31];[$Datasheet.$B$1:.$AV$9809];6;FALSE());&quot;-&quot;)" office:value-type="float" office:value="0" calcext:value-type="float">
            <text:p>0</text:p>
          </table:table-cell>
          <table:table-cell table:style-name="ce132" table:formula="of:=IFERROR(VLOOKUP([$Masterlist.$P31];[$Datasheet.$B$1:.$AV$9809];7;FALSE());&quot;-&quot;)" office:value-type="float" office:value="1" calcext:value-type="float">
            <text:p>1</text:p>
          </table:table-cell>
          <table:table-cell table:style-name="ce132" table:formula="of:=IFERROR(VLOOKUP([$Masterlist.$P31];[$Datasheet.$B$1:.$AV$9809];8;FALSE());&quot;-&quot;)" office:value-type="float" office:value="0" calcext:value-type="float">
            <text:p>0</text:p>
          </table:table-cell>
          <table:table-cell table:style-name="ce132" table:formula="of:=IFERROR(VLOOKUP([$Masterlist.$P31];[$Datasheet.$B$1:.$AV$9809];9;FALSE());&quot;-&quot;)" office:value-type="float" office:value="0" calcext:value-type="float">
            <text:p>0</text:p>
          </table:table-cell>
          <table:table-cell table:style-name="ce132" table:formula="of:=IFERROR(VLOOKUP([$Masterlist.$P31];[$Datasheet.$B$1:.$AV$9809];10;FALSE());&quot;-&quot;)" office:value-type="float" office:value="1" calcext:value-type="float">
            <text:p>1</text:p>
          </table:table-cell>
          <table:table-cell table:style-name="ce132" table:formula="of:=IFERROR(VLOOKUP([$Masterlist.$P31];[$Datasheet.$B$1:.$AV$9809];11;FALSE());&quot;-&quot;)" office:value-type="float" office:value="1" calcext:value-type="float">
            <text:p>1</text:p>
          </table:table-cell>
          <table:table-cell table:style-name="ce132" table:formula="of:=IFERROR(VLOOKUP([$Masterlist.$P31];[$Datasheet.$B$1:.$AV$9809];12;FALSE());&quot;-&quot;)" office:value-type="float" office:value="0" calcext:value-type="float">
            <text:p>0</text:p>
          </table:table-cell>
          <table:table-cell table:style-name="ce132" table:formula="of:=IFERROR(VLOOKUP([$Masterlist.$P31];[$Datasheet.$B$1:.$AV$9809];13;FALSE());&quot;-&quot;)" office:value-type="float" office:value="0" calcext:value-type="float">
            <text:p>0</text:p>
          </table:table-cell>
          <table:table-cell table:style-name="ce132" table:formula="of:=IFERROR(VLOOKUP([$Masterlist.$P31];[$Datasheet.$B$1:.$AV$9809];14;FALSE());&quot;-&quot;)" office:value-type="float" office:value="0" calcext:value-type="float">
            <text:p>0</text:p>
          </table:table-cell>
          <table:table-cell table:style-name="ce132" table:formula="of:=IFERROR(VLOOKUP([$Masterlist.$P31];[$Datasheet.$B$1:.$AV$9809];15;FALSE());&quot;-&quot;)" office:value-type="float" office:value="1" calcext:value-type="float">
            <text:p>1</text:p>
          </table:table-cell>
          <table:table-cell table:style-name="ce132" table:formula="of:=IFERROR(VLOOKUP([$Masterlist.$P31];[$Datasheet.$B$1:.$AV$9809];16;FALSE());&quot;-&quot;)" office:value-type="float" office:value="0" calcext:value-type="float">
            <text:p/>
          </table:table-cell>
          <table:table-cell table:style-name="ce132" table:formula="of:=IFERROR(VLOOKUP([$Masterlist.$P31];[$Datasheet.$B$1:.$AV$9809];17;FALSE());&quot;-&quot;)" office:value-type="float" office:value="0" calcext:value-type="float">
            <text:p/>
          </table:table-cell>
          <table:table-cell table:style-name="ce132" table:formula="of:=IFERROR(VLOOKUP([$Masterlist.$P31];[$Datasheet.$B$1:.$AV$9809];18;FALSE());&quot;-&quot;)" office:value-type="float" office:value="0" calcext:value-type="float">
            <text:p/>
          </table:table-cell>
          <table:table-cell table:style-name="ce132" table:formula="of:=IFERROR(VLOOKUP([$Masterlist.$P31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table:number-columns-repeated="9"/>
          <table:table-cell table:style-name="ce50" office:value-type="string" calcext:value-type="string">
            <text:p>Yes</text:p>
          </table:table-cell>
          <table:table-cell table:style-name="ce50" table:number-columns-repeated="2"/>
          <table:table-cell table:style-name="ce92" office:value-type="string" calcext:value-type="string">
            <text:p>Director</text:p>
          </table:table-cell>
          <table:table-cell table:style-name="ce8" office:value-type="string" calcext:value-type="string">
            <text:p>Rudolph Bezuidenhout</text:p>
          </table:table-cell>
          <table:table-cell table:style-name="ce13" table:formula="of:=IF(ISNUMBER(MATCH([.P32];[$Datasheet.$B$1:.$B$9809];0));&quot;✓&quot;;&quot;x&quot;)" office:value-type="string" office:string-value="✓" calcext:value-type="string">
            <text:p>✓</text:p>
          </table:table-cell>
          <table:table-cell table:style-name="ce132" table:formula="of:=IFERROR(VLOOKUP([$Masterlist.$P32];[$Datasheet.$B$1:.$AV$9809];2;FALSE());&quot;-&quot;)" office:value-type="float" office:value="0" calcext:value-type="float">
            <text:p>0</text:p>
          </table:table-cell>
          <table:table-cell table:style-name="ce132" table:formula="of:=IFERROR(VLOOKUP([$Masterlist.$P32];[$Datasheet.$B$1:.$AV$9809];3;FALSE());&quot;-&quot;)" office:value-type="float" office:value="0" calcext:value-type="float">
            <text:p>0</text:p>
          </table:table-cell>
          <table:table-cell table:style-name="ce132" table:formula="of:=IFERROR(VLOOKUP([$Masterlist.$P32];[$Datasheet.$B$1:.$AV$9809];4;FALSE());&quot;-&quot;)" office:value-type="float" office:value="1" calcext:value-type="float">
            <text:p>1</text:p>
          </table:table-cell>
          <table:table-cell table:style-name="ce132" table:formula="of:=IFERROR(VLOOKUP([$Masterlist.$P32];[$Datasheet.$B$1:.$AV$9809];5;FALSE());&quot;-&quot;)" office:value-type="float" office:value="1" calcext:value-type="float">
            <text:p>1</text:p>
          </table:table-cell>
          <table:table-cell table:style-name="ce132" table:formula="of:=IFERROR(VLOOKUP([$Masterlist.$P32];[$Datasheet.$B$1:.$AV$9809];6;FALSE());&quot;-&quot;)" office:value-type="float" office:value="0" calcext:value-type="float">
            <text:p>0</text:p>
          </table:table-cell>
          <table:table-cell table:style-name="ce132" table:formula="of:=IFERROR(VLOOKUP([$Masterlist.$P32];[$Datasheet.$B$1:.$AV$9809];7;FALSE());&quot;-&quot;)" office:value-type="float" office:value="0" calcext:value-type="float">
            <text:p>0</text:p>
          </table:table-cell>
          <table:table-cell table:style-name="ce132" table:formula="of:=IFERROR(VLOOKUP([$Masterlist.$P32];[$Datasheet.$B$1:.$AV$9809];8;FALSE());&quot;-&quot;)" office:value-type="float" office:value="1" calcext:value-type="float">
            <text:p>1</text:p>
          </table:table-cell>
          <table:table-cell table:style-name="ce132" table:formula="of:=IFERROR(VLOOKUP([$Masterlist.$P32];[$Datasheet.$B$1:.$AV$9809];9;FALSE());&quot;-&quot;)" office:value-type="float" office:value="1" calcext:value-type="float">
            <text:p>1</text:p>
          </table:table-cell>
          <table:table-cell table:style-name="ce132" table:formula="of:=IFERROR(VLOOKUP([$Masterlist.$P32];[$Datasheet.$B$1:.$AV$9809];10;FALSE());&quot;-&quot;)" office:value-type="float" office:value="1" calcext:value-type="float">
            <text:p>1</text:p>
          </table:table-cell>
          <table:table-cell table:style-name="ce132" table:formula="of:=IFERROR(VLOOKUP([$Masterlist.$P32];[$Datasheet.$B$1:.$AV$9809];11;FALSE());&quot;-&quot;)" office:value-type="float" office:value="1" calcext:value-type="float">
            <text:p>1</text:p>
          </table:table-cell>
          <table:table-cell table:style-name="ce132" table:formula="of:=IFERROR(VLOOKUP([$Masterlist.$P32];[$Datasheet.$B$1:.$AV$9809];12;FALSE());&quot;-&quot;)" office:value-type="float" office:value="1" calcext:value-type="float">
            <text:p>1</text:p>
          </table:table-cell>
          <table:table-cell table:style-name="ce132" table:formula="of:=IFERROR(VLOOKUP([$Masterlist.$P32];[$Datasheet.$B$1:.$AV$9809];13;FALSE());&quot;-&quot;)" office:value-type="float" office:value="1" calcext:value-type="float">
            <text:p>1</text:p>
          </table:table-cell>
          <table:table-cell table:style-name="ce132" table:formula="of:=IFERROR(VLOOKUP([$Masterlist.$P32];[$Datasheet.$B$1:.$AV$9809];14;FALSE());&quot;-&quot;)" office:value-type="float" office:value="0" calcext:value-type="float">
            <text:p>0</text:p>
          </table:table-cell>
          <table:table-cell table:style-name="ce132" table:formula="of:=IFERROR(VLOOKUP([$Masterlist.$P32];[$Datasheet.$B$1:.$AV$9809];15;FALSE());&quot;-&quot;)" office:value-type="float" office:value="0" calcext:value-type="float">
            <text:p>0</text:p>
          </table:table-cell>
          <table:table-cell table:style-name="ce132" table:formula="of:=IFERROR(VLOOKUP([$Masterlist.$P32];[$Datasheet.$B$1:.$AV$9809];16;FALSE());&quot;-&quot;)" office:value-type="float" office:value="0" calcext:value-type="float">
            <text:p/>
          </table:table-cell>
          <table:table-cell table:style-name="ce132" table:formula="of:=IFERROR(VLOOKUP([$Masterlist.$P32];[$Datasheet.$B$1:.$AV$9809];17;FALSE());&quot;-&quot;)" office:value-type="float" office:value="0" calcext:value-type="float">
            <text:p/>
          </table:table-cell>
          <table:table-cell table:style-name="ce132" table:formula="of:=IFERROR(VLOOKUP([$Masterlist.$P32];[$Datasheet.$B$1:.$AV$9809];18;FALSE());&quot;-&quot;)" office:value-type="float" office:value="0" calcext:value-type="float">
            <text:p/>
          </table:table-cell>
          <table:table-cell table:style-name="ce132" table:formula="of:=IFERROR(VLOOKUP([$Masterlist.$P32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table:number-columns-repeated="10"/>
          <table:table-cell table:style-name="ce50" office:value-type="string" calcext:value-type="string">
            <text:p>Yes</text:p>
          </table:table-cell>
          <table:table-cell table:style-name="ce50"/>
          <table:table-cell table:style-name="ce92" office:value-type="string" calcext:value-type="string">
            <text:p>Director</text:p>
          </table:table-cell>
          <table:table-cell table:style-name="ce8" office:value-type="string" calcext:value-type="string">
            <text:p>Wayne Ferreria</text:p>
          </table:table-cell>
          <table:table-cell table:style-name="ce13" table:formula="of:=IF(ISNUMBER(MATCH([.P33];[$Datasheet.$B$1:.$B$9809];0));&quot;✓&quot;;&quot;x&quot;)" office:value-type="string" office:string-value="x" calcext:value-type="string">
            <text:p>x</text:p>
          </table:table-cell>
          <table:table-cell table:style-name="ce132" table:formula="of:=IFERROR(VLOOKUP([$Masterlist.$P33];[$Datasheet.$B$1:.$AV$9809];2;FALSE());&quot;-&quot;)" office:value-type="string" office:string-value="-" calcext:value-type="string">
            <text:p>-</text:p>
          </table:table-cell>
          <table:table-cell table:style-name="ce132" table:formula="of:=IFERROR(VLOOKUP([$Masterlist.$P33];[$Datasheet.$B$1:.$AV$9809];3;FALSE());&quot;-&quot;)" office:value-type="string" office:string-value="-" calcext:value-type="string">
            <text:p>-</text:p>
          </table:table-cell>
          <table:table-cell table:style-name="ce132" table:formula="of:=IFERROR(VLOOKUP([$Masterlist.$P33];[$Datasheet.$B$1:.$AV$9809];4;FALSE());&quot;-&quot;)" office:value-type="string" office:string-value="-" calcext:value-type="string">
            <text:p>-</text:p>
          </table:table-cell>
          <table:table-cell table:style-name="ce132" table:formula="of:=IFERROR(VLOOKUP([$Masterlist.$P33];[$Datasheet.$B$1:.$AV$9809];5;FALSE());&quot;-&quot;)" office:value-type="string" office:string-value="-" calcext:value-type="string">
            <text:p>-</text:p>
          </table:table-cell>
          <table:table-cell table:style-name="ce132" table:formula="of:=IFERROR(VLOOKUP([$Masterlist.$P33];[$Datasheet.$B$1:.$AV$9809];6;FALSE());&quot;-&quot;)" office:value-type="string" office:string-value="-" calcext:value-type="string">
            <text:p>-</text:p>
          </table:table-cell>
          <table:table-cell table:style-name="ce132" table:formula="of:=IFERROR(VLOOKUP([$Masterlist.$P33];[$Datasheet.$B$1:.$AV$9809];7;FALSE());&quot;-&quot;)" office:value-type="string" office:string-value="-" calcext:value-type="string">
            <text:p>-</text:p>
          </table:table-cell>
          <table:table-cell table:style-name="ce132" table:formula="of:=IFERROR(VLOOKUP([$Masterlist.$P33];[$Datasheet.$B$1:.$AV$9809];8;FALSE());&quot;-&quot;)" office:value-type="string" office:string-value="-" calcext:value-type="string">
            <text:p>-</text:p>
          </table:table-cell>
          <table:table-cell table:style-name="ce132" table:formula="of:=IFERROR(VLOOKUP([$Masterlist.$P33];[$Datasheet.$B$1:.$AV$9809];9;FALSE());&quot;-&quot;)" office:value-type="string" office:string-value="-" calcext:value-type="string">
            <text:p>-</text:p>
          </table:table-cell>
          <table:table-cell table:style-name="ce132" table:formula="of:=IFERROR(VLOOKUP([$Masterlist.$P33];[$Datasheet.$B$1:.$AV$9809];10;FALSE());&quot;-&quot;)" office:value-type="string" office:string-value="-" calcext:value-type="string">
            <text:p>-</text:p>
          </table:table-cell>
          <table:table-cell table:style-name="ce132" table:formula="of:=IFERROR(VLOOKUP([$Masterlist.$P33];[$Datasheet.$B$1:.$AV$9809];11;FALSE());&quot;-&quot;)" office:value-type="string" office:string-value="-" calcext:value-type="string">
            <text:p>-</text:p>
          </table:table-cell>
          <table:table-cell table:style-name="ce132" table:formula="of:=IFERROR(VLOOKUP([$Masterlist.$P33];[$Datasheet.$B$1:.$AV$9809];12;FALSE());&quot;-&quot;)" office:value-type="string" office:string-value="-" calcext:value-type="string">
            <text:p>-</text:p>
          </table:table-cell>
          <table:table-cell table:style-name="ce132" table:formula="of:=IFERROR(VLOOKUP([$Masterlist.$P33];[$Datasheet.$B$1:.$AV$9809];13;FALSE());&quot;-&quot;)" office:value-type="string" office:string-value="-" calcext:value-type="string">
            <text:p>-</text:p>
          </table:table-cell>
          <table:table-cell table:style-name="ce132" table:formula="of:=IFERROR(VLOOKUP([$Masterlist.$P33];[$Datasheet.$B$1:.$AV$9809];14;FALSE());&quot;-&quot;)" office:value-type="string" office:string-value="-" calcext:value-type="string">
            <text:p>-</text:p>
          </table:table-cell>
          <table:table-cell table:style-name="ce132" table:formula="of:=IFERROR(VLOOKUP([$Masterlist.$P33];[$Datasheet.$B$1:.$AV$9809];15;FALSE());&quot;-&quot;)" office:value-type="string" office:string-value="-" calcext:value-type="string">
            <text:p>-</text:p>
          </table:table-cell>
          <table:table-cell table:style-name="ce132" table:formula="of:=IFERROR(VLOOKUP([$Masterlist.$P33];[$Datasheet.$B$1:.$AV$9809];16;FALSE());&quot;-&quot;)" office:value-type="string" office:string-value="-" calcext:value-type="string">
            <text:p>-</text:p>
          </table:table-cell>
          <table:table-cell table:style-name="ce132" table:formula="of:=IFERROR(VLOOKUP([$Masterlist.$P33];[$Datasheet.$B$1:.$AV$9809];17;FALSE());&quot;-&quot;)" office:value-type="string" office:string-value="-" calcext:value-type="string">
            <text:p>-</text:p>
          </table:table-cell>
          <table:table-cell table:style-name="ce132" table:formula="of:=IFERROR(VLOOKUP([$Masterlist.$P33];[$Datasheet.$B$1:.$AV$9809];18;FALSE());&quot;-&quot;)" office:value-type="string" office:string-value="-" calcext:value-type="string">
            <text:p>-</text:p>
          </table:table-cell>
          <table:table-cell table:style-name="ce135" table:formula="of:=IFERROR(VLOOKUP([$Masterlist.$P33];[$Datasheet.$B$1:.$AV$9809];19;FALSE());&quot;-&quot;)" office:value-type="string" office:string-value="-" calcext:value-type="string">
            <text:p>-</text:p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table:number-columns-repeated="10"/>
          <table:table-cell table:style-name="ce50" office:value-type="string" calcext:value-type="string">
            <text:p>Yes</text:p>
          </table:table-cell>
          <table:table-cell table:style-name="ce50"/>
          <table:table-cell table:style-name="ce92" office:value-type="string" calcext:value-type="string">
            <text:p>Director</text:p>
          </table:table-cell>
          <table:table-cell table:style-name="ce8" office:value-type="string" calcext:value-type="string">
            <text:p>Tiaan Pienaar</text:p>
          </table:table-cell>
          <table:table-cell table:style-name="ce13" table:formula="of:=IF(ISNUMBER(MATCH([.P34];[$Datasheet.$B$1:.$B$9809];0));&quot;✓&quot;;&quot;x&quot;)" office:value-type="string" office:string-value="x" calcext:value-type="string">
            <text:p>x</text:p>
          </table:table-cell>
          <table:table-cell table:style-name="ce132" table:formula="of:=IFERROR(VLOOKUP([$Masterlist.$P34];[$Datasheet.$B$1:.$AV$9809];2;FALSE());&quot;-&quot;)" office:value-type="string" office:string-value="-" calcext:value-type="string">
            <text:p>-</text:p>
          </table:table-cell>
          <table:table-cell table:style-name="ce132" table:formula="of:=IFERROR(VLOOKUP([$Masterlist.$P34];[$Datasheet.$B$1:.$AV$9809];3;FALSE());&quot;-&quot;)" office:value-type="string" office:string-value="-" calcext:value-type="string">
            <text:p>-</text:p>
          </table:table-cell>
          <table:table-cell table:style-name="ce132" table:formula="of:=IFERROR(VLOOKUP([$Masterlist.$P34];[$Datasheet.$B$1:.$AV$9809];4;FALSE());&quot;-&quot;)" office:value-type="string" office:string-value="-" calcext:value-type="string">
            <text:p>-</text:p>
          </table:table-cell>
          <table:table-cell table:style-name="ce132" table:formula="of:=IFERROR(VLOOKUP([$Masterlist.$P34];[$Datasheet.$B$1:.$AV$9809];5;FALSE());&quot;-&quot;)" office:value-type="string" office:string-value="-" calcext:value-type="string">
            <text:p>-</text:p>
          </table:table-cell>
          <table:table-cell table:style-name="ce132" table:formula="of:=IFERROR(VLOOKUP([$Masterlist.$P34];[$Datasheet.$B$1:.$AV$9809];6;FALSE());&quot;-&quot;)" office:value-type="string" office:string-value="-" calcext:value-type="string">
            <text:p>-</text:p>
          </table:table-cell>
          <table:table-cell table:style-name="ce132" table:formula="of:=IFERROR(VLOOKUP([$Masterlist.$P34];[$Datasheet.$B$1:.$AV$9809];7;FALSE());&quot;-&quot;)" office:value-type="string" office:string-value="-" calcext:value-type="string">
            <text:p>-</text:p>
          </table:table-cell>
          <table:table-cell table:style-name="ce132" table:formula="of:=IFERROR(VLOOKUP([$Masterlist.$P34];[$Datasheet.$B$1:.$AV$9809];8;FALSE());&quot;-&quot;)" office:value-type="string" office:string-value="-" calcext:value-type="string">
            <text:p>-</text:p>
          </table:table-cell>
          <table:table-cell table:style-name="ce132" table:formula="of:=IFERROR(VLOOKUP([$Masterlist.$P34];[$Datasheet.$B$1:.$AV$9809];9;FALSE());&quot;-&quot;)" office:value-type="string" office:string-value="-" calcext:value-type="string">
            <text:p>-</text:p>
          </table:table-cell>
          <table:table-cell table:style-name="ce132" table:formula="of:=IFERROR(VLOOKUP([$Masterlist.$P34];[$Datasheet.$B$1:.$AV$9809];10;FALSE());&quot;-&quot;)" office:value-type="string" office:string-value="-" calcext:value-type="string">
            <text:p>-</text:p>
          </table:table-cell>
          <table:table-cell table:style-name="ce132" table:formula="of:=IFERROR(VLOOKUP([$Masterlist.$P34];[$Datasheet.$B$1:.$AV$9809];11;FALSE());&quot;-&quot;)" office:value-type="string" office:string-value="-" calcext:value-type="string">
            <text:p>-</text:p>
          </table:table-cell>
          <table:table-cell table:style-name="ce132" table:formula="of:=IFERROR(VLOOKUP([$Masterlist.$P34];[$Datasheet.$B$1:.$AV$9809];12;FALSE());&quot;-&quot;)" office:value-type="string" office:string-value="-" calcext:value-type="string">
            <text:p>-</text:p>
          </table:table-cell>
          <table:table-cell table:style-name="ce132" table:formula="of:=IFERROR(VLOOKUP([$Masterlist.$P34];[$Datasheet.$B$1:.$AV$9809];13;FALSE());&quot;-&quot;)" office:value-type="string" office:string-value="-" calcext:value-type="string">
            <text:p>-</text:p>
          </table:table-cell>
          <table:table-cell table:style-name="ce132" table:formula="of:=IFERROR(VLOOKUP([$Masterlist.$P34];[$Datasheet.$B$1:.$AV$9809];14;FALSE());&quot;-&quot;)" office:value-type="string" office:string-value="-" calcext:value-type="string">
            <text:p>-</text:p>
          </table:table-cell>
          <table:table-cell table:style-name="ce132" table:formula="of:=IFERROR(VLOOKUP([$Masterlist.$P34];[$Datasheet.$B$1:.$AV$9809];15;FALSE());&quot;-&quot;)" office:value-type="string" office:string-value="-" calcext:value-type="string">
            <text:p>-</text:p>
          </table:table-cell>
          <table:table-cell table:style-name="ce132" table:formula="of:=IFERROR(VLOOKUP([$Masterlist.$P34];[$Datasheet.$B$1:.$AV$9809];16;FALSE());&quot;-&quot;)" office:value-type="string" office:string-value="-" calcext:value-type="string">
            <text:p>-</text:p>
          </table:table-cell>
          <table:table-cell table:style-name="ce132" table:formula="of:=IFERROR(VLOOKUP([$Masterlist.$P34];[$Datasheet.$B$1:.$AV$9809];17;FALSE());&quot;-&quot;)" office:value-type="string" office:string-value="-" calcext:value-type="string">
            <text:p>-</text:p>
          </table:table-cell>
          <table:table-cell table:style-name="ce234" table:formula="of:=IFERROR(VLOOKUP([$Masterlist.$P34];[$Datasheet.$B$1:.$AV$9809];18;FALSE());&quot;-&quot;)" office:value-type="string" office:string-value="-" calcext:value-type="string">
            <text:p>-</text:p>
          </table:table-cell>
          <table:table-cell table:style-name="ce240" table:formula="of:=IFERROR(VLOOKUP([$Masterlist.$P34];[$Datasheet.$B$1:.$AV$9809];19;FALSE());&quot;-&quot;)" office:value-type="string" office:string-value="-" calcext:value-type="string">
            <text:p>-</text:p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AL</text:p>
          </table:table-cell>
          <table:table-cell table:style-name="ce50" table:number-columns-repeated="9"/>
          <table:table-cell table:style-name="ce50" office:value-type="string" calcext:value-type="string">
            <text:p>Yes</text:p>
          </table:table-cell>
          <table:table-cell table:style-name="ce70"/>
          <table:table-cell table:style-name="ce50"/>
          <table:table-cell table:style-name="ce92" office:value-type="string" calcext:value-type="string">
            <text:p>Director</text:p>
          </table:table-cell>
          <table:table-cell table:style-name="ce8" office:value-type="string" calcext:value-type="string">
            <text:p>Mickey Van Den Berg</text:p>
          </table:table-cell>
          <table:table-cell table:style-name="ce13" table:formula="of:=IF(ISNUMBER(MATCH([.P35];[$Datasheet.$B$1:.$B$9809];0));&quot;✓&quot;;&quot;x&quot;)" office:value-type="string" office:string-value="x" calcext:value-type="string">
            <text:p>x</text:p>
          </table:table-cell>
          <table:table-cell table:style-name="ce132" table:formula="of:=IFERROR(VLOOKUP([$Masterlist.$P35];[$Datasheet.$B$1:.$AV$9809];2;FALSE());&quot;-&quot;)" office:value-type="string" office:string-value="-" calcext:value-type="string">
            <text:p>-</text:p>
          </table:table-cell>
          <table:table-cell table:style-name="ce132" table:formula="of:=IFERROR(VLOOKUP([$Masterlist.$P35];[$Datasheet.$B$1:.$AV$9809];3;FALSE());&quot;-&quot;)" office:value-type="string" office:string-value="-" calcext:value-type="string">
            <text:p>-</text:p>
          </table:table-cell>
          <table:table-cell table:style-name="ce132" table:formula="of:=IFERROR(VLOOKUP([$Masterlist.$P35];[$Datasheet.$B$1:.$AV$9809];4;FALSE());&quot;-&quot;)" office:value-type="string" office:string-value="-" calcext:value-type="string">
            <text:p>-</text:p>
          </table:table-cell>
          <table:table-cell table:style-name="ce132" table:formula="of:=IFERROR(VLOOKUP([$Masterlist.$P35];[$Datasheet.$B$1:.$AV$9809];5;FALSE());&quot;-&quot;)" office:value-type="string" office:string-value="-" calcext:value-type="string">
            <text:p>-</text:p>
          </table:table-cell>
          <table:table-cell table:style-name="ce132" table:formula="of:=IFERROR(VLOOKUP([$Masterlist.$P35];[$Datasheet.$B$1:.$AV$9809];6;FALSE());&quot;-&quot;)" office:value-type="string" office:string-value="-" calcext:value-type="string">
            <text:p>-</text:p>
          </table:table-cell>
          <table:table-cell table:style-name="ce132" table:formula="of:=IFERROR(VLOOKUP([$Masterlist.$P35];[$Datasheet.$B$1:.$AV$9809];7;FALSE());&quot;-&quot;)" office:value-type="string" office:string-value="-" calcext:value-type="string">
            <text:p>-</text:p>
          </table:table-cell>
          <table:table-cell table:style-name="ce132" table:formula="of:=IFERROR(VLOOKUP([$Masterlist.$P35];[$Datasheet.$B$1:.$AV$9809];8;FALSE());&quot;-&quot;)" office:value-type="string" office:string-value="-" calcext:value-type="string">
            <text:p>-</text:p>
          </table:table-cell>
          <table:table-cell table:style-name="ce132" table:formula="of:=IFERROR(VLOOKUP([$Masterlist.$P35];[$Datasheet.$B$1:.$AV$9809];9;FALSE());&quot;-&quot;)" office:value-type="string" office:string-value="-" calcext:value-type="string">
            <text:p>-</text:p>
          </table:table-cell>
          <table:table-cell table:style-name="ce132" table:formula="of:=IFERROR(VLOOKUP([$Masterlist.$P35];[$Datasheet.$B$1:.$AV$9809];10;FALSE());&quot;-&quot;)" office:value-type="string" office:string-value="-" calcext:value-type="string">
            <text:p>-</text:p>
          </table:table-cell>
          <table:table-cell table:style-name="ce132" table:formula="of:=IFERROR(VLOOKUP([$Masterlist.$P35];[$Datasheet.$B$1:.$AV$9809];11;FALSE());&quot;-&quot;)" office:value-type="string" office:string-value="-" calcext:value-type="string">
            <text:p>-</text:p>
          </table:table-cell>
          <table:table-cell table:style-name="ce132" table:formula="of:=IFERROR(VLOOKUP([$Masterlist.$P35];[$Datasheet.$B$1:.$AV$9809];12;FALSE());&quot;-&quot;)" office:value-type="string" office:string-value="-" calcext:value-type="string">
            <text:p>-</text:p>
          </table:table-cell>
          <table:table-cell table:style-name="ce132" table:formula="of:=IFERROR(VLOOKUP([$Masterlist.$P35];[$Datasheet.$B$1:.$AV$9809];13;FALSE());&quot;-&quot;)" office:value-type="string" office:string-value="-" calcext:value-type="string">
            <text:p>-</text:p>
          </table:table-cell>
          <table:table-cell table:style-name="ce132" table:formula="of:=IFERROR(VLOOKUP([$Masterlist.$P35];[$Datasheet.$B$1:.$AV$9809];14;FALSE());&quot;-&quot;)" office:value-type="string" office:string-value="-" calcext:value-type="string">
            <text:p>-</text:p>
          </table:table-cell>
          <table:table-cell table:style-name="ce132" table:formula="of:=IFERROR(VLOOKUP([$Masterlist.$P35];[$Datasheet.$B$1:.$AV$9809];15;FALSE());&quot;-&quot;)" office:value-type="string" office:string-value="-" calcext:value-type="string">
            <text:p>-</text:p>
          </table:table-cell>
          <table:table-cell table:style-name="ce132" table:formula="of:=IFERROR(VLOOKUP([$Masterlist.$P35];[$Datasheet.$B$1:.$AV$9809];16;FALSE());&quot;-&quot;)" office:value-type="string" office:string-value="-" calcext:value-type="string">
            <text:p>-</text:p>
          </table:table-cell>
          <table:table-cell table:style-name="ce132" table:formula="of:=IFERROR(VLOOKUP([$Masterlist.$P35];[$Datasheet.$B$1:.$AV$9809];17;FALSE());&quot;-&quot;)" office:value-type="string" office:string-value="-" calcext:value-type="string">
            <text:p>-</text:p>
          </table:table-cell>
          <table:table-cell table:style-name="ce234" table:formula="of:=IFERROR(VLOOKUP([$Masterlist.$P35];[$Datasheet.$B$1:.$AV$9809];18;FALSE());&quot;-&quot;)" office:value-type="string" office:string-value="-" calcext:value-type="string">
            <text:p>-</text:p>
          </table:table-cell>
          <table:table-cell table:style-name="ce240" table:formula="of:=IFERROR(VLOOKUP([$Masterlist.$P35];[$Datasheet.$B$1:.$AV$9809];19;FALSE());&quot;-&quot;)" office:value-type="string" office:string-value="-" calcext:value-type="string">
            <text:p>-</text:p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7" office:value-type="string" calcext:value-type="string">
            <text:p>AL</text:p>
          </table:table-cell>
          <table:table-cell table:style-name="ce51" table:number-columns-repeated="11"/>
          <table:table-cell table:style-name="ce51" office:value-type="string" calcext:value-type="string">
            <text:p>Yes</text:p>
          </table:table-cell>
          <table:table-cell table:style-name="ce93" office:value-type="string" calcext:value-type="string">
            <text:p>Director</text:p>
          </table:table-cell>
          <table:table-cell table:style-name="ce102" office:value-type="string" calcext:value-type="string">
            <text:p>Jason Pretorius</text:p>
          </table:table-cell>
          <table:table-cell table:style-name="ce116" table:formula="of:=IF(ISNUMBER(MATCH([.P36];[$Datasheet.$B$1:.$B$9809];0));&quot;✓&quot;;&quot;x&quot;)" office:value-type="string" office:string-value="x" calcext:value-type="string">
            <text:p>x</text:p>
          </table:table-cell>
          <table:table-cell table:style-name="ce135" table:formula="of:=IFERROR(VLOOKUP([$Masterlist.$P36];[$Datasheet.$B$1:.$AV$9809];2;FALSE());&quot;-&quot;)" office:value-type="string" office:string-value="-" calcext:value-type="string">
            <text:p>-</text:p>
          </table:table-cell>
          <table:table-cell table:style-name="ce135" table:formula="of:=IFERROR(VLOOKUP([$Masterlist.$P36];[$Datasheet.$B$1:.$AV$9809];3;FALSE());&quot;-&quot;)" office:value-type="string" office:string-value="-" calcext:value-type="string">
            <text:p>-</text:p>
          </table:table-cell>
          <table:table-cell table:style-name="ce135" table:formula="of:=IFERROR(VLOOKUP([$Masterlist.$P36];[$Datasheet.$B$1:.$AV$9809];4;FALSE());&quot;-&quot;)" office:value-type="string" office:string-value="-" calcext:value-type="string">
            <text:p>-</text:p>
          </table:table-cell>
          <table:table-cell table:style-name="ce135" table:formula="of:=IFERROR(VLOOKUP([$Masterlist.$P36];[$Datasheet.$B$1:.$AV$9809];5;FALSE());&quot;-&quot;)" office:value-type="string" office:string-value="-" calcext:value-type="string">
            <text:p>-</text:p>
          </table:table-cell>
          <table:table-cell table:style-name="ce135" table:formula="of:=IFERROR(VLOOKUP([$Masterlist.$P36];[$Datasheet.$B$1:.$AV$9809];6;FALSE());&quot;-&quot;)" office:value-type="string" office:string-value="-" calcext:value-type="string">
            <text:p>-</text:p>
          </table:table-cell>
          <table:table-cell table:style-name="ce135" table:formula="of:=IFERROR(VLOOKUP([$Masterlist.$P36];[$Datasheet.$B$1:.$AV$9809];7;FALSE());&quot;-&quot;)" office:value-type="string" office:string-value="-" calcext:value-type="string">
            <text:p>-</text:p>
          </table:table-cell>
          <table:table-cell table:style-name="ce135" table:formula="of:=IFERROR(VLOOKUP([$Masterlist.$P36];[$Datasheet.$B$1:.$AV$9809];8;FALSE());&quot;-&quot;)" office:value-type="string" office:string-value="-" calcext:value-type="string">
            <text:p>-</text:p>
          </table:table-cell>
          <table:table-cell table:style-name="ce135" table:formula="of:=IFERROR(VLOOKUP([$Masterlist.$P36];[$Datasheet.$B$1:.$AV$9809];9;FALSE());&quot;-&quot;)" office:value-type="string" office:string-value="-" calcext:value-type="string">
            <text:p>-</text:p>
          </table:table-cell>
          <table:table-cell table:style-name="ce135" table:formula="of:=IFERROR(VLOOKUP([$Masterlist.$P36];[$Datasheet.$B$1:.$AV$9809];10;FALSE());&quot;-&quot;)" office:value-type="string" office:string-value="-" calcext:value-type="string">
            <text:p>-</text:p>
          </table:table-cell>
          <table:table-cell table:style-name="ce135" table:formula="of:=IFERROR(VLOOKUP([$Masterlist.$P36];[$Datasheet.$B$1:.$AV$9809];11;FALSE());&quot;-&quot;)" office:value-type="string" office:string-value="-" calcext:value-type="string">
            <text:p>-</text:p>
          </table:table-cell>
          <table:table-cell table:style-name="ce135" table:formula="of:=IFERROR(VLOOKUP([$Masterlist.$P36];[$Datasheet.$B$1:.$AV$9809];12;FALSE());&quot;-&quot;)" office:value-type="string" office:string-value="-" calcext:value-type="string">
            <text:p>-</text:p>
          </table:table-cell>
          <table:table-cell table:style-name="ce135" table:formula="of:=IFERROR(VLOOKUP([$Masterlist.$P36];[$Datasheet.$B$1:.$AV$9809];13;FALSE());&quot;-&quot;)" office:value-type="string" office:string-value="-" calcext:value-type="string">
            <text:p>-</text:p>
          </table:table-cell>
          <table:table-cell table:style-name="ce135" table:formula="of:=IFERROR(VLOOKUP([$Masterlist.$P36];[$Datasheet.$B$1:.$AV$9809];14;FALSE());&quot;-&quot;)" office:value-type="string" office:string-value="-" calcext:value-type="string">
            <text:p>-</text:p>
          </table:table-cell>
          <table:table-cell table:style-name="ce135" table:formula="of:=IFERROR(VLOOKUP([$Masterlist.$P36];[$Datasheet.$B$1:.$AV$9809];15;FALSE());&quot;-&quot;)" office:value-type="string" office:string-value="-" calcext:value-type="string">
            <text:p>-</text:p>
          </table:table-cell>
          <table:table-cell table:style-name="ce135" table:formula="of:=IFERROR(VLOOKUP([$Masterlist.$P36];[$Datasheet.$B$1:.$AV$9809];16;FALSE());&quot;-&quot;)" office:value-type="string" office:string-value="-" calcext:value-type="string">
            <text:p>-</text:p>
          </table:table-cell>
          <table:table-cell table:style-name="ce135" table:formula="of:=IFERROR(VLOOKUP([$Masterlist.$P36];[$Datasheet.$B$1:.$AV$9809];17;FALSE());&quot;-&quot;)" office:value-type="string" office:string-value="-" calcext:value-type="string">
            <text:p>-</text:p>
          </table:table-cell>
          <table:table-cell table:style-name="ce235" table:formula="of:=IFERROR(VLOOKUP([$Masterlist.$P36];[$Datasheet.$B$1:.$AV$9809];18;FALSE());&quot;-&quot;)" office:value-type="string" office:string-value="-" calcext:value-type="string">
            <text:p>-</text:p>
          </table:table-cell>
          <table:table-cell table:style-name="ce241" table:formula="of:=IFERROR(VLOOKUP([$Masterlist.$P36];[$Datasheet.$B$1:.$AV$9809];19;FALSE());&quot;-&quot;)" office:value-type="string" office:string-value="-" calcext:value-type="string">
            <text:p>-</text:p>
          </table:table-cell>
          <table:table-cell table:style-name="ce15" table:number-columns-repeated="2"/>
          <table:table-cell table:number-columns-repeated="16347"/>
        </table:table-row>
        <table:table-row table:style-name="ro12">
          <table:table-cell table:style-name="ce15"/>
          <table:table-cell table:style-name="ce28" office:value-type="string" calcext:value-type="string" table:number-columns-spanned="15" table:number-rows-spanned="1">
            <text:p>SOUND - MORNE COETZEE</text:p>
          </table:table-cell>
          <table:covered-table-cell table:number-columns-repeated="13" table:style-name="ce45"/>
          <table:covered-table-cell table:style-name="ce99"/>
          <table:table-cell table:style-name="ce117"/>
          <table:table-cell table:style-name="ce136" office:value-type="string" calcext:value-type="string" table:number-columns-spanned="18" table:number-rows-spanned="1">
            <text:p>SOUND - MORNE COETZEE</text:p>
          </table:table-cell>
          <table:covered-table-cell table:number-columns-repeated="16" table:style-name="ce45"/>
          <table:covered-table-cell table:style-name="ce99"/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5" office:value-type="string" calcext:value-type="string">
            <text:p>M</text:p>
          </table:table-cell>
          <table:table-cell table:number-columns-repeated="2" table:style-name="ce49" office:value-type="string" calcext:value-type="string">
            <text:p>yes</text:p>
          </table:table-cell>
          <table:table-cell table:style-name="ce49" table:number-columns-repeated="10"/>
          <table:table-cell table:style-name="ce91" office:value-type="string" calcext:value-type="string">
            <text:p>FOH Sound Assistant / All round</text:p>
          </table:table-cell>
          <table:table-cell table:style-name="ce100" office:value-type="string" calcext:value-type="string">
            <text:p>Liezel Myburgh (BABY)</text:p>
          </table:table-cell>
          <table:table-cell table:style-name="ce13" table:formula="of:=IF(ISNUMBER(MATCH([.P38];[$Datasheet.$B$1:.$B$9809];0));&quot;✓&quot;;&quot;x&quot;)" office:value-type="string" office:string-value="x" calcext:value-type="string">
            <text:p>x</text:p>
          </table:table-cell>
          <table:table-cell table:style-name="ce133" table:formula="of:=IFERROR(VLOOKUP([$Masterlist.$P38];[$Datasheet.$B$1:.$AV$9809];2;FALSE());&quot;-&quot;)" office:value-type="string" office:string-value="-" calcext:value-type="string">
            <text:p>-</text:p>
          </table:table-cell>
          <table:table-cell table:style-name="ce133" table:formula="of:=IFERROR(VLOOKUP([$Masterlist.$P38];[$Datasheet.$B$1:.$AV$9809];3;FALSE());&quot;-&quot;)" office:value-type="string" office:string-value="-" calcext:value-type="string">
            <text:p>-</text:p>
          </table:table-cell>
          <table:table-cell table:style-name="ce133" table:formula="of:=IFERROR(VLOOKUP([$Masterlist.$P38];[$Datasheet.$B$1:.$AV$9809];4;FALSE());&quot;-&quot;)" office:value-type="string" office:string-value="-" calcext:value-type="string">
            <text:p>-</text:p>
          </table:table-cell>
          <table:table-cell table:style-name="ce133" table:formula="of:=IFERROR(VLOOKUP([$Masterlist.$P38];[$Datasheet.$B$1:.$AV$9809];5;FALSE());&quot;-&quot;)" office:value-type="string" office:string-value="-" calcext:value-type="string">
            <text:p>-</text:p>
          </table:table-cell>
          <table:table-cell table:style-name="ce185" table:formula="of:=IFERROR(VLOOKUP([$Masterlist.$P38];[$Datasheet.$B$1:.$AV$9809];6;FALSE());&quot;-&quot;)" office:value-type="string" office:string-value="-" calcext:value-type="string">
            <text:p>-</text:p>
          </table:table-cell>
          <table:table-cell table:style-name="ce133" table:formula="of:=IFERROR(VLOOKUP([$Masterlist.$P38];[$Datasheet.$B$1:.$AV$9809];7;FALSE());&quot;-&quot;)" office:value-type="string" office:string-value="-" calcext:value-type="string">
            <text:p>-</text:p>
          </table:table-cell>
          <table:table-cell table:style-name="ce133" table:formula="of:=IFERROR(VLOOKUP([$Masterlist.$P38];[$Datasheet.$B$1:.$AV$9809];8;FALSE());&quot;-&quot;)" office:value-type="string" office:string-value="-" calcext:value-type="string">
            <text:p>-</text:p>
          </table:table-cell>
          <table:table-cell table:style-name="ce133" table:formula="of:=IFERROR(VLOOKUP([$Masterlist.$P38];[$Datasheet.$B$1:.$AV$9809];9;FALSE());&quot;-&quot;)" office:value-type="string" office:string-value="-" calcext:value-type="string">
            <text:p>-</text:p>
          </table:table-cell>
          <table:table-cell table:style-name="ce133" table:formula="of:=IFERROR(VLOOKUP([$Masterlist.$P38];[$Datasheet.$B$1:.$AV$9809];10;FALSE());&quot;-&quot;)" office:value-type="string" office:string-value="-" calcext:value-type="string">
            <text:p>-</text:p>
          </table:table-cell>
          <table:table-cell table:style-name="ce133" table:formula="of:=IFERROR(VLOOKUP([$Masterlist.$P38];[$Datasheet.$B$1:.$AV$9809];11;FALSE());&quot;-&quot;)" office:value-type="string" office:string-value="-" calcext:value-type="string">
            <text:p>-</text:p>
          </table:table-cell>
          <table:table-cell table:style-name="ce133" table:formula="of:=IFERROR(VLOOKUP([$Masterlist.$P38];[$Datasheet.$B$1:.$AV$9809];12;FALSE());&quot;-&quot;)" office:value-type="string" office:string-value="-" calcext:value-type="string">
            <text:p>-</text:p>
          </table:table-cell>
          <table:table-cell table:style-name="ce133" table:formula="of:=IFERROR(VLOOKUP([$Masterlist.$P38];[$Datasheet.$B$1:.$AV$9809];13;FALSE());&quot;-&quot;)" office:value-type="string" office:string-value="-" calcext:value-type="string">
            <text:p>-</text:p>
          </table:table-cell>
          <table:table-cell table:style-name="ce133" table:formula="of:=IFERROR(VLOOKUP([$Masterlist.$P38];[$Datasheet.$B$1:.$AV$9809];14;FALSE());&quot;-&quot;)" office:value-type="string" office:string-value="-" calcext:value-type="string">
            <text:p>-</text:p>
          </table:table-cell>
          <table:table-cell table:style-name="ce133" table:formula="of:=IFERROR(VLOOKUP([$Masterlist.$P38];[$Datasheet.$B$1:.$AV$9809];15;FALSE());&quot;-&quot;)" office:value-type="string" office:string-value="-" calcext:value-type="string">
            <text:p>-</text:p>
          </table:table-cell>
          <table:table-cell table:style-name="ce133" table:formula="of:=IFERROR(VLOOKUP([$Masterlist.$P38];[$Datasheet.$B$1:.$AV$9809];16;FALSE());&quot;-&quot;)" office:value-type="string" office:string-value="-" calcext:value-type="string">
            <text:p>-</text:p>
          </table:table-cell>
          <table:table-cell table:style-name="ce133" table:formula="of:=IFERROR(VLOOKUP([$Masterlist.$P38];[$Datasheet.$B$1:.$AV$9809];17;FALSE());&quot;-&quot;)" office:value-type="string" office:string-value="-" calcext:value-type="string">
            <text:p>-</text:p>
          </table:table-cell>
          <table:table-cell table:style-name="ce236" table:formula="of:=IFERROR(VLOOKUP([$Masterlist.$P38];[$Datasheet.$B$1:.$AV$9809];18;FALSE());&quot;-&quot;)" office:value-type="string" office:string-value="-" calcext:value-type="string">
            <text:p>-</text:p>
          </table:table-cell>
          <table:table-cell table:style-name="ce133" table:formula="of:=IFERROR(VLOOKUP([$Masterlist.$P38];[$Datasheet.$B$1:.$AV$9809];19;FALSE());&quot;-&quot;)" office:value-type="string" office:string-value="-" calcext:value-type="string">
            <text:p>-</text:p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number-columns-repeated="4" table:style-name="ce49" office:value-type="string" calcext:value-type="string">
            <text:p>yes</text:p>
          </table:table-cell>
          <table:table-cell table:style-name="ce49" table:number-columns-repeated="8"/>
          <table:table-cell table:style-name="ce91" office:value-type="string" calcext:value-type="string">
            <text:p>FOH Sound / All round</text:p>
          </table:table-cell>
          <table:table-cell table:style-name="ce100" office:value-type="string" calcext:value-type="string">
            <text:p>Morne Coetzee</text:p>
          </table:table-cell>
          <table:table-cell table:style-name="ce13" table:formula="of:=IF(ISNUMBER(MATCH([.P39];[$Datasheet.$B$1:.$B$9809];0));&quot;✓&quot;;&quot;x&quot;)" office:value-type="string" office:string-value="✓" calcext:value-type="string">
            <text:p>✓</text:p>
          </table:table-cell>
          <table:table-cell table:style-name="ce133" table:formula="of:=IFERROR(VLOOKUP([$Masterlist.$P39];[$Datasheet.$B$1:.$AV$9809];2;FALSE());&quot;-&quot;)" office:value-type="float" office:value="1" calcext:value-type="float">
            <text:p>1</text:p>
          </table:table-cell>
          <table:table-cell table:style-name="ce133" table:formula="of:=IFERROR(VLOOKUP([$Masterlist.$P39];[$Datasheet.$B$1:.$AV$9809];3;FALSE());&quot;-&quot;)" office:value-type="float" office:value="1" calcext:value-type="float">
            <text:p>1</text:p>
          </table:table-cell>
          <table:table-cell table:style-name="ce133" table:formula="of:=IFERROR(VLOOKUP([$Masterlist.$P39];[$Datasheet.$B$1:.$AV$9809];4;FALSE());&quot;-&quot;)" office:value-type="float" office:value="1" calcext:value-type="float">
            <text:p>1</text:p>
          </table:table-cell>
          <table:table-cell table:style-name="ce133" table:formula="of:=IFERROR(VLOOKUP([$Masterlist.$P39];[$Datasheet.$B$1:.$AV$9809];5;FALSE());&quot;-&quot;)" office:value-type="float" office:value="0" calcext:value-type="float">
            <text:p>0</text:p>
          </table:table-cell>
          <table:table-cell table:style-name="ce185" table:formula="of:=IFERROR(VLOOKUP([$Masterlist.$P39];[$Datasheet.$B$1:.$AV$9809];6;FALSE());&quot;-&quot;)" office:value-type="float" office:value="1" calcext:value-type="float">
            <text:p>1</text:p>
          </table:table-cell>
          <table:table-cell table:style-name="ce133" table:formula="of:=IFERROR(VLOOKUP([$Masterlist.$P39];[$Datasheet.$B$1:.$AV$9809];7;FALSE());&quot;-&quot;)" office:value-type="float" office:value="1" calcext:value-type="float">
            <text:p>1</text:p>
          </table:table-cell>
          <table:table-cell table:style-name="ce133" table:formula="of:=IFERROR(VLOOKUP([$Masterlist.$P39];[$Datasheet.$B$1:.$AV$9809];8;FALSE());&quot;-&quot;)" office:value-type="float" office:value="1" calcext:value-type="float">
            <text:p>1</text:p>
          </table:table-cell>
          <table:table-cell table:style-name="ce133" table:formula="of:=IFERROR(VLOOKUP([$Masterlist.$P39];[$Datasheet.$B$1:.$AV$9809];9;FALSE());&quot;-&quot;)" office:value-type="float" office:value="1" calcext:value-type="float">
            <text:p>1</text:p>
          </table:table-cell>
          <table:table-cell table:style-name="ce133" table:formula="of:=IFERROR(VLOOKUP([$Masterlist.$P39];[$Datasheet.$B$1:.$AV$9809];10;FALSE());&quot;-&quot;)" office:value-type="float" office:value="0" calcext:value-type="float">
            <text:p>0</text:p>
          </table:table-cell>
          <table:table-cell table:style-name="ce133" table:formula="of:=IFERROR(VLOOKUP([$Masterlist.$P39];[$Datasheet.$B$1:.$AV$9809];11;FALSE());&quot;-&quot;)" office:value-type="float" office:value="1" calcext:value-type="float">
            <text:p>1</text:p>
          </table:table-cell>
          <table:table-cell table:style-name="ce133" table:formula="of:=IFERROR(VLOOKUP([$Masterlist.$P39];[$Datasheet.$B$1:.$AV$9809];12;FALSE());&quot;-&quot;)" office:value-type="float" office:value="1" calcext:value-type="float">
            <text:p>1</text:p>
          </table:table-cell>
          <table:table-cell table:style-name="ce133" table:formula="of:=IFERROR(VLOOKUP([$Masterlist.$P39];[$Datasheet.$B$1:.$AV$9809];13;FALSE());&quot;-&quot;)" office:value-type="float" office:value="0" calcext:value-type="float">
            <text:p>0</text:p>
          </table:table-cell>
          <table:table-cell table:style-name="ce133" table:formula="of:=IFERROR(VLOOKUP([$Masterlist.$P39];[$Datasheet.$B$1:.$AV$9809];14;FALSE());&quot;-&quot;)" office:value-type="float" office:value="1" calcext:value-type="float">
            <text:p>1</text:p>
          </table:table-cell>
          <table:table-cell table:style-name="ce133" table:formula="of:=IFERROR(VLOOKUP([$Masterlist.$P39];[$Datasheet.$B$1:.$AV$9809];15;FALSE());&quot;-&quot;)" office:value-type="float" office:value="1" calcext:value-type="float">
            <text:p>1</text:p>
          </table:table-cell>
          <table:table-cell table:style-name="ce133" table:formula="of:=IFERROR(VLOOKUP([$Masterlist.$P39];[$Datasheet.$B$1:.$AV$9809];16;FALSE());&quot;-&quot;)" office:value-type="float" office:value="0" calcext:value-type="float">
            <text:p/>
          </table:table-cell>
          <table:table-cell table:style-name="ce133" table:formula="of:=IFERROR(VLOOKUP([$Masterlist.$P39];[$Datasheet.$B$1:.$AV$9809];17;FALSE());&quot;-&quot;)" office:value-type="float" office:value="0" calcext:value-type="float">
            <text:p/>
          </table:table-cell>
          <table:table-cell table:style-name="ce236" table:formula="of:=IFERROR(VLOOKUP([$Masterlist.$P39];[$Datasheet.$B$1:.$AV$9809];18;FALSE());&quot;-&quot;)" office:value-type="float" office:value="0" calcext:value-type="float">
            <text:p/>
          </table:table-cell>
          <table:table-cell table:style-name="ce242" table:formula="of:=IFERROR(VLOOKUP([$Masterlist.$P39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AL</text:p>
          </table:table-cell>
          <table:table-cell table:style-name="ce50" office:value-type="string" calcext:value-type="string">
            <text:p>yes</text:p>
          </table:table-cell>
          <table:table-cell table:style-name="ce50" table:number-columns-repeated="11"/>
          <table:table-cell table:style-name="ce92" office:value-type="string" calcext:value-type="string">
            <text:p>Broadcast Sound / FOH Sound</text:p>
          </table:table-cell>
          <table:table-cell table:style-name="ce8" office:value-type="string" calcext:value-type="string">
            <text:p>Anton Bezuidenhout</text:p>
          </table:table-cell>
          <table:table-cell table:style-name="ce13" table:formula="of:=IF(ISNUMBER(MATCH([.P40];[$Datasheet.$B$1:.$B$9809];0));&quot;✓&quot;;&quot;x&quot;)" office:value-type="string" office:string-value="x" calcext:value-type="string">
            <text:p>x</text:p>
          </table:table-cell>
          <table:table-cell table:style-name="ce133" table:formula="of:=IFERROR(VLOOKUP([$Masterlist.$P40];[$Datasheet.$B$1:.$AV$9809];2;FALSE());&quot;-&quot;)" office:value-type="string" office:string-value="-" calcext:value-type="string">
            <text:p>-</text:p>
          </table:table-cell>
          <table:table-cell table:style-name="ce133" table:formula="of:=IFERROR(VLOOKUP([$Masterlist.$P40];[$Datasheet.$B$1:.$AV$9809];3;FALSE());&quot;-&quot;)" office:value-type="string" office:string-value="-" calcext:value-type="string">
            <text:p>-</text:p>
          </table:table-cell>
          <table:table-cell table:style-name="ce133" table:formula="of:=IFERROR(VLOOKUP([$Masterlist.$P40];[$Datasheet.$B$1:.$AV$9809];4;FALSE());&quot;-&quot;)" office:value-type="string" office:string-value="-" calcext:value-type="string">
            <text:p>-</text:p>
          </table:table-cell>
          <table:table-cell table:style-name="ce133" table:formula="of:=IFERROR(VLOOKUP([$Masterlist.$P40];[$Datasheet.$B$1:.$AV$9809];5;FALSE());&quot;-&quot;)" office:value-type="string" office:string-value="-" calcext:value-type="string">
            <text:p>-</text:p>
          </table:table-cell>
          <table:table-cell table:style-name="ce185" table:formula="of:=IFERROR(VLOOKUP([$Masterlist.$P40];[$Datasheet.$B$1:.$AV$9809];6;FALSE());&quot;-&quot;)" office:value-type="string" office:string-value="-" calcext:value-type="string">
            <text:p>-</text:p>
          </table:table-cell>
          <table:table-cell table:style-name="ce133" table:formula="of:=IFERROR(VLOOKUP([$Masterlist.$P40];[$Datasheet.$B$1:.$AV$9809];7;FALSE());&quot;-&quot;)" office:value-type="string" office:string-value="-" calcext:value-type="string">
            <text:p>-</text:p>
          </table:table-cell>
          <table:table-cell table:style-name="ce133" table:formula="of:=IFERROR(VLOOKUP([$Masterlist.$P40];[$Datasheet.$B$1:.$AV$9809];8;FALSE());&quot;-&quot;)" office:value-type="string" office:string-value="-" calcext:value-type="string">
            <text:p>-</text:p>
          </table:table-cell>
          <table:table-cell table:style-name="ce133" table:formula="of:=IFERROR(VLOOKUP([$Masterlist.$P40];[$Datasheet.$B$1:.$AV$9809];9;FALSE());&quot;-&quot;)" office:value-type="string" office:string-value="-" calcext:value-type="string">
            <text:p>-</text:p>
          </table:table-cell>
          <table:table-cell table:style-name="ce133" table:formula="of:=IFERROR(VLOOKUP([$Masterlist.$P40];[$Datasheet.$B$1:.$AV$9809];10;FALSE());&quot;-&quot;)" office:value-type="string" office:string-value="-" calcext:value-type="string">
            <text:p>-</text:p>
          </table:table-cell>
          <table:table-cell table:style-name="ce133" table:formula="of:=IFERROR(VLOOKUP([$Masterlist.$P40];[$Datasheet.$B$1:.$AV$9809];11;FALSE());&quot;-&quot;)" office:value-type="string" office:string-value="-" calcext:value-type="string">
            <text:p>-</text:p>
          </table:table-cell>
          <table:table-cell table:style-name="ce133" table:formula="of:=IFERROR(VLOOKUP([$Masterlist.$P40];[$Datasheet.$B$1:.$AV$9809];12;FALSE());&quot;-&quot;)" office:value-type="string" office:string-value="-" calcext:value-type="string">
            <text:p>-</text:p>
          </table:table-cell>
          <table:table-cell table:style-name="ce133" table:formula="of:=IFERROR(VLOOKUP([$Masterlist.$P40];[$Datasheet.$B$1:.$AV$9809];13;FALSE());&quot;-&quot;)" office:value-type="string" office:string-value="-" calcext:value-type="string">
            <text:p>-</text:p>
          </table:table-cell>
          <table:table-cell table:style-name="ce133" table:formula="of:=IFERROR(VLOOKUP([$Masterlist.$P40];[$Datasheet.$B$1:.$AV$9809];14;FALSE());&quot;-&quot;)" office:value-type="string" office:string-value="-" calcext:value-type="string">
            <text:p>-</text:p>
          </table:table-cell>
          <table:table-cell table:style-name="ce133" table:formula="of:=IFERROR(VLOOKUP([$Masterlist.$P40];[$Datasheet.$B$1:.$AV$9809];15;FALSE());&quot;-&quot;)" office:value-type="string" office:string-value="-" calcext:value-type="string">
            <text:p>-</text:p>
          </table:table-cell>
          <table:table-cell table:style-name="ce133" table:formula="of:=IFERROR(VLOOKUP([$Masterlist.$P40];[$Datasheet.$B$1:.$AV$9809];16;FALSE());&quot;-&quot;)" office:value-type="string" office:string-value="-" calcext:value-type="string">
            <text:p>-</text:p>
          </table:table-cell>
          <table:table-cell table:style-name="ce133" table:formula="of:=IFERROR(VLOOKUP([$Masterlist.$P40];[$Datasheet.$B$1:.$AV$9809];17;FALSE());&quot;-&quot;)" office:value-type="string" office:string-value="-" calcext:value-type="string">
            <text:p>-</text:p>
          </table:table-cell>
          <table:table-cell table:style-name="ce236" table:formula="of:=IFERROR(VLOOKUP([$Masterlist.$P40];[$Datasheet.$B$1:.$AV$9809];18;FALSE());&quot;-&quot;)" office:value-type="string" office:string-value="-" calcext:value-type="string">
            <text:p>-</text:p>
          </table:table-cell>
          <table:table-cell table:style-name="ce242" table:formula="of:=IFERROR(VLOOKUP([$Masterlist.$P40];[$Datasheet.$B$1:.$AV$9809];19;FALSE());&quot;-&quot;)" office:value-type="string" office:string-value="-" calcext:value-type="string">
            <text:p>-</text:p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AL</text:p>
          </table:table-cell>
          <table:table-cell table:style-name="ce50" office:value-type="string" calcext:value-type="string">
            <text:p>yes</text:p>
          </table:table-cell>
          <table:table-cell table:style-name="ce50" table:number-columns-repeated="11"/>
          <table:table-cell table:style-name="ce92" office:value-type="string" calcext:value-type="string">
            <text:p>Broadcast Sound</text:p>
          </table:table-cell>
          <table:table-cell table:style-name="ce8" office:value-type="string" calcext:value-type="string">
            <text:p>Jonker Koorts</text:p>
          </table:table-cell>
          <table:table-cell table:style-name="ce13" table:formula="of:=IF(ISNUMBER(MATCH([.P41];[$Datasheet.$B$1:.$B$9809];0));&quot;✓&quot;;&quot;x&quot;)" office:value-type="string" office:string-value="✓" calcext:value-type="string">
            <text:p>✓</text:p>
          </table:table-cell>
          <table:table-cell table:style-name="ce133" table:formula="of:=IFERROR(VLOOKUP([$Masterlist.$P41];[$Datasheet.$B$1:.$AV$9809];2;FALSE());&quot;-&quot;)" office:value-type="float" office:value="1" calcext:value-type="float">
            <text:p>1</text:p>
          </table:table-cell>
          <table:table-cell table:style-name="ce133" table:formula="of:=IFERROR(VLOOKUP([$Masterlist.$P41];[$Datasheet.$B$1:.$AV$9809];3;FALSE());&quot;-&quot;)" office:value-type="float" office:value="1" calcext:value-type="float">
            <text:p>1</text:p>
          </table:table-cell>
          <table:table-cell table:style-name="ce133" table:formula="of:=IFERROR(VLOOKUP([$Masterlist.$P41];[$Datasheet.$B$1:.$AV$9809];4;FALSE());&quot;-&quot;)" office:value-type="float" office:value="1" calcext:value-type="float">
            <text:p>1</text:p>
          </table:table-cell>
          <table:table-cell table:style-name="ce133" table:formula="of:=IFERROR(VLOOKUP([$Masterlist.$P41];[$Datasheet.$B$1:.$AV$9809];5;FALSE());&quot;-&quot;)" office:value-type="float" office:value="1" calcext:value-type="float">
            <text:p>1</text:p>
          </table:table-cell>
          <table:table-cell table:style-name="ce185" table:formula="of:=IFERROR(VLOOKUP([$Masterlist.$P41];[$Datasheet.$B$1:.$AV$9809];6;FALSE());&quot;-&quot;)" office:value-type="float" office:value="0" calcext:value-type="float">
            <text:p>0</text:p>
          </table:table-cell>
          <table:table-cell table:style-name="ce133" table:formula="of:=IFERROR(VLOOKUP([$Masterlist.$P41];[$Datasheet.$B$1:.$AV$9809];7;FALSE());&quot;-&quot;)" office:value-type="float" office:value="0" calcext:value-type="float">
            <text:p>0</text:p>
          </table:table-cell>
          <table:table-cell table:style-name="ce133" table:formula="of:=IFERROR(VLOOKUP([$Masterlist.$P41];[$Datasheet.$B$1:.$AV$9809];8;FALSE());&quot;-&quot;)" office:value-type="float" office:value="0" calcext:value-type="float">
            <text:p>0</text:p>
          </table:table-cell>
          <table:table-cell table:style-name="ce133" table:formula="of:=IFERROR(VLOOKUP([$Masterlist.$P41];[$Datasheet.$B$1:.$AV$9809];9;FALSE());&quot;-&quot;)" office:value-type="float" office:value="0" calcext:value-type="float">
            <text:p>0</text:p>
          </table:table-cell>
          <table:table-cell table:style-name="ce133" table:formula="of:=IFERROR(VLOOKUP([$Masterlist.$P41];[$Datasheet.$B$1:.$AV$9809];10;FALSE());&quot;-&quot;)" office:value-type="float" office:value="1" calcext:value-type="float">
            <text:p>1</text:p>
          </table:table-cell>
          <table:table-cell table:style-name="ce133" table:formula="of:=IFERROR(VLOOKUP([$Masterlist.$P41];[$Datasheet.$B$1:.$AV$9809];11;FALSE());&quot;-&quot;)" office:value-type="float" office:value="1" calcext:value-type="float">
            <text:p>1</text:p>
          </table:table-cell>
          <table:table-cell table:style-name="ce133" table:formula="of:=IFERROR(VLOOKUP([$Masterlist.$P41];[$Datasheet.$B$1:.$AV$9809];12;FALSE());&quot;-&quot;)" office:value-type="float" office:value="0" calcext:value-type="float">
            <text:p>0</text:p>
          </table:table-cell>
          <table:table-cell table:style-name="ce133" table:formula="of:=IFERROR(VLOOKUP([$Masterlist.$P41];[$Datasheet.$B$1:.$AV$9809];13;FALSE());&quot;-&quot;)" office:value-type="float" office:value="0" calcext:value-type="float">
            <text:p>0</text:p>
          </table:table-cell>
          <table:table-cell table:style-name="ce133" table:formula="of:=IFERROR(VLOOKUP([$Masterlist.$P41];[$Datasheet.$B$1:.$AV$9809];14;FALSE());&quot;-&quot;)" office:value-type="float" office:value="0" calcext:value-type="float">
            <text:p>0</text:p>
          </table:table-cell>
          <table:table-cell table:style-name="ce133" table:formula="of:=IFERROR(VLOOKUP([$Masterlist.$P41];[$Datasheet.$B$1:.$AV$9809];15;FALSE());&quot;-&quot;)" office:value-type="float" office:value="0" calcext:value-type="float">
            <text:p>0</text:p>
          </table:table-cell>
          <table:table-cell table:style-name="ce133" table:formula="of:=IFERROR(VLOOKUP([$Masterlist.$P41];[$Datasheet.$B$1:.$AV$9809];16;FALSE());&quot;-&quot;)" office:value-type="float" office:value="0" calcext:value-type="float">
            <text:p/>
          </table:table-cell>
          <table:table-cell table:style-name="ce133" table:formula="of:=IFERROR(VLOOKUP([$Masterlist.$P41];[$Datasheet.$B$1:.$AV$9809];17;FALSE());&quot;-&quot;)" office:value-type="float" office:value="0" calcext:value-type="float">
            <text:p/>
          </table:table-cell>
          <table:table-cell table:style-name="ce236" table:formula="of:=IFERROR(VLOOKUP([$Masterlist.$P41];[$Datasheet.$B$1:.$AV$9809];18;FALSE());&quot;-&quot;)" office:value-type="float" office:value="0" calcext:value-type="float">
            <text:p/>
          </table:table-cell>
          <table:table-cell table:style-name="ce242" table:formula="of:=IFERROR(VLOOKUP([$Masterlist.$P41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A</text:p>
          </table:table-cell>
          <table:table-cell table:number-columns-repeated="3" table:style-name="ce50" office:value-type="string" calcext:value-type="string">
            <text:p>yes</text:p>
          </table:table-cell>
          <table:table-cell table:style-name="ce50" table:number-columns-repeated="9"/>
          <table:table-cell table:style-name="ce92" office:value-type="string" calcext:value-type="string">
            <text:p>FOH Sound Assistant / Sound Runner</text:p>
          </table:table-cell>
          <table:table-cell table:style-name="ce8" office:value-type="string" calcext:value-type="string">
            <text:p>Lize Heuer</text:p>
          </table:table-cell>
          <table:table-cell table:style-name="ce13" table:formula="of:=IF(ISNUMBER(MATCH([.P42];[$Datasheet.$B$1:.$B$9809];0));&quot;✓&quot;;&quot;x&quot;)" office:value-type="string" office:string-value="✓" calcext:value-type="string">
            <text:p>✓</text:p>
          </table:table-cell>
          <table:table-cell table:style-name="ce133" table:formula="of:=IFERROR(VLOOKUP([$Masterlist.$P42];[$Datasheet.$B$1:.$AV$9809];2;FALSE());&quot;-&quot;)" office:value-type="float" office:value="0" calcext:value-type="float">
            <text:p>0</text:p>
          </table:table-cell>
          <table:table-cell table:style-name="ce133" table:formula="of:=IFERROR(VLOOKUP([$Masterlist.$P42];[$Datasheet.$B$1:.$AV$9809];3;FALSE());&quot;-&quot;)" office:value-type="float" office:value="0" calcext:value-type="float">
            <text:p>0</text:p>
          </table:table-cell>
          <table:table-cell table:style-name="ce133" table:formula="of:=IFERROR(VLOOKUP([$Masterlist.$P42];[$Datasheet.$B$1:.$AV$9809];4;FALSE());&quot;-&quot;)" office:value-type="float" office:value="1" calcext:value-type="float">
            <text:p>1</text:p>
          </table:table-cell>
          <table:table-cell table:style-name="ce133" table:formula="of:=IFERROR(VLOOKUP([$Masterlist.$P42];[$Datasheet.$B$1:.$AV$9809];5;FALSE());&quot;-&quot;)" office:value-type="float" office:value="0" calcext:value-type="float">
            <text:p>0</text:p>
          </table:table-cell>
          <table:table-cell table:style-name="ce185" table:formula="of:=IFERROR(VLOOKUP([$Masterlist.$P42];[$Datasheet.$B$1:.$AV$9809];6;FALSE());&quot;-&quot;)" office:value-type="float" office:value="0" calcext:value-type="float">
            <text:p>0</text:p>
          </table:table-cell>
          <table:table-cell table:style-name="ce133" table:formula="of:=IFERROR(VLOOKUP([$Masterlist.$P42];[$Datasheet.$B$1:.$AV$9809];7;FALSE());&quot;-&quot;)" office:value-type="float" office:value="1" calcext:value-type="float">
            <text:p>1</text:p>
          </table:table-cell>
          <table:table-cell table:style-name="ce133" table:formula="of:=IFERROR(VLOOKUP([$Masterlist.$P42];[$Datasheet.$B$1:.$AV$9809];8;FALSE());&quot;-&quot;)" office:value-type="float" office:value="1" calcext:value-type="float">
            <text:p>1</text:p>
          </table:table-cell>
          <table:table-cell table:style-name="ce133" table:formula="of:=IFERROR(VLOOKUP([$Masterlist.$P42];[$Datasheet.$B$1:.$AV$9809];9;FALSE());&quot;-&quot;)" office:value-type="float" office:value="0" calcext:value-type="float">
            <text:p>0</text:p>
          </table:table-cell>
          <table:table-cell table:style-name="ce133" table:formula="of:=IFERROR(VLOOKUP([$Masterlist.$P42];[$Datasheet.$B$1:.$AV$9809];10;FALSE());&quot;-&quot;)" office:value-type="float" office:value="0" calcext:value-type="float">
            <text:p>0</text:p>
          </table:table-cell>
          <table:table-cell table:style-name="ce133" table:formula="of:=IFERROR(VLOOKUP([$Masterlist.$P42];[$Datasheet.$B$1:.$AV$9809];11;FALSE());&quot;-&quot;)" office:value-type="float" office:value="1" calcext:value-type="float">
            <text:p>1</text:p>
          </table:table-cell>
          <table:table-cell table:style-name="ce133" table:formula="of:=IFERROR(VLOOKUP([$Masterlist.$P42];[$Datasheet.$B$1:.$AV$9809];12;FALSE());&quot;-&quot;)" office:value-type="float" office:value="1" calcext:value-type="float">
            <text:p>1</text:p>
          </table:table-cell>
          <table:table-cell table:style-name="ce133" table:formula="of:=IFERROR(VLOOKUP([$Masterlist.$P42];[$Datasheet.$B$1:.$AV$9809];13;FALSE());&quot;-&quot;)" office:value-type="float" office:value="0" calcext:value-type="float">
            <text:p>0</text:p>
          </table:table-cell>
          <table:table-cell table:style-name="ce133" table:formula="of:=IFERROR(VLOOKUP([$Masterlist.$P42];[$Datasheet.$B$1:.$AV$9809];14;FALSE());&quot;-&quot;)" office:value-type="float" office:value="0" calcext:value-type="float">
            <text:p>0</text:p>
          </table:table-cell>
          <table:table-cell table:style-name="ce133" table:formula="of:=IFERROR(VLOOKUP([$Masterlist.$P42];[$Datasheet.$B$1:.$AV$9809];15;FALSE());&quot;-&quot;)" office:value-type="float" office:value="1" calcext:value-type="float">
            <text:p>1</text:p>
          </table:table-cell>
          <table:table-cell table:style-name="ce133" table:formula="of:=IFERROR(VLOOKUP([$Masterlist.$P42];[$Datasheet.$B$1:.$AV$9809];16;FALSE());&quot;-&quot;)" office:value-type="float" office:value="0" calcext:value-type="float">
            <text:p/>
          </table:table-cell>
          <table:table-cell table:style-name="ce133" table:formula="of:=IFERROR(VLOOKUP([$Masterlist.$P42];[$Datasheet.$B$1:.$AV$9809];17;FALSE());&quot;-&quot;)" office:value-type="float" office:value="0" calcext:value-type="float">
            <text:p/>
          </table:table-cell>
          <table:table-cell table:style-name="ce236" table:formula="of:=IFERROR(VLOOKUP([$Masterlist.$P42];[$Datasheet.$B$1:.$AV$9809];18;FALSE());&quot;-&quot;)" office:value-type="float" office:value="0" calcext:value-type="float">
            <text:p/>
          </table:table-cell>
          <table:table-cell table:style-name="ce242" table:formula="of:=IFERROR(VLOOKUP([$Masterlist.$P42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5" office:value-type="string" calcext:value-type="string">
            <text:p>L</text:p>
          </table:table-cell>
          <table:table-cell table:number-columns-repeated="2" table:style-name="ce50" office:value-type="string" calcext:value-type="string">
            <text:p>yes</text:p>
          </table:table-cell>
          <table:table-cell table:style-name="ce50"/>
          <table:table-cell table:style-name="ce50" office:value-type="string" calcext:value-type="string">
            <text:p>yes</text:p>
          </table:table-cell>
          <table:table-cell table:style-name="ce50" table:number-columns-repeated="8"/>
          <table:table-cell table:style-name="ce92" office:value-type="string" calcext:value-type="string">
            <text:p>FOH Sound Assistant / Sound Runner</text:p>
          </table:table-cell>
          <table:table-cell table:style-name="ce8" office:value-type="string" calcext:value-type="string">
            <text:p>Kalven De Oliveira</text:p>
          </table:table-cell>
          <table:table-cell table:style-name="ce13" table:formula="of:=IF(ISNUMBER(MATCH([.P43];[$Datasheet.$B$1:.$B$9809];0));&quot;✓&quot;;&quot;x&quot;)" office:value-type="string" office:string-value="✓" calcext:value-type="string">
            <text:p>✓</text:p>
          </table:table-cell>
          <table:table-cell table:style-name="ce133" table:formula="of:=IFERROR(VLOOKUP([$Masterlist.$P43];[$Datasheet.$B$1:.$AV$9809];2;FALSE());&quot;-&quot;)" office:value-type="float" office:value="0" calcext:value-type="float">
            <text:p>0</text:p>
          </table:table-cell>
          <table:table-cell table:style-name="ce133" table:formula="of:=IFERROR(VLOOKUP([$Masterlist.$P43];[$Datasheet.$B$1:.$AV$9809];3;FALSE());&quot;-&quot;)" office:value-type="float" office:value="0" calcext:value-type="float">
            <text:p>0</text:p>
          </table:table-cell>
          <table:table-cell table:style-name="ce133" table:formula="of:=IFERROR(VLOOKUP([$Masterlist.$P43];[$Datasheet.$B$1:.$AV$9809];4;FALSE());&quot;-&quot;)" office:value-type="float" office:value="0" calcext:value-type="float">
            <text:p>0</text:p>
          </table:table-cell>
          <table:table-cell table:style-name="ce133" table:formula="of:=IFERROR(VLOOKUP([$Masterlist.$P43];[$Datasheet.$B$1:.$AV$9809];5;FALSE());&quot;-&quot;)" office:value-type="float" office:value="0" calcext:value-type="float">
            <text:p>0</text:p>
          </table:table-cell>
          <table:table-cell table:style-name="ce185" table:formula="of:=IFERROR(VLOOKUP([$Masterlist.$P43];[$Datasheet.$B$1:.$AV$9809];6;FALSE());&quot;-&quot;)" office:value-type="float" office:value="0" calcext:value-type="float">
            <text:p>0</text:p>
          </table:table-cell>
          <table:table-cell table:style-name="ce133" table:formula="of:=IFERROR(VLOOKUP([$Masterlist.$P43];[$Datasheet.$B$1:.$AV$9809];7;FALSE());&quot;-&quot;)" office:value-type="float" office:value="0" calcext:value-type="float">
            <text:p>0</text:p>
          </table:table-cell>
          <table:table-cell table:style-name="ce133" table:formula="of:=IFERROR(VLOOKUP([$Masterlist.$P43];[$Datasheet.$B$1:.$AV$9809];8;FALSE());&quot;-&quot;)" office:value-type="float" office:value="0" calcext:value-type="float">
            <text:p>0</text:p>
          </table:table-cell>
          <table:table-cell table:style-name="ce133" table:formula="of:=IFERROR(VLOOKUP([$Masterlist.$P43];[$Datasheet.$B$1:.$AV$9809];9;FALSE());&quot;-&quot;)" office:value-type="float" office:value="0" calcext:value-type="float">
            <text:p>0</text:p>
          </table:table-cell>
          <table:table-cell table:style-name="ce133" table:formula="of:=IFERROR(VLOOKUP([$Masterlist.$P43];[$Datasheet.$B$1:.$AV$9809];10;FALSE());&quot;-&quot;)" office:value-type="float" office:value="0" calcext:value-type="float">
            <text:p>0</text:p>
          </table:table-cell>
          <table:table-cell table:style-name="ce133" table:formula="of:=IFERROR(VLOOKUP([$Masterlist.$P43];[$Datasheet.$B$1:.$AV$9809];11;FALSE());&quot;-&quot;)" office:value-type="float" office:value="1" calcext:value-type="float">
            <text:p>1</text:p>
          </table:table-cell>
          <table:table-cell table:style-name="ce133" table:formula="of:=IFERROR(VLOOKUP([$Masterlist.$P43];[$Datasheet.$B$1:.$AV$9809];12;FALSE());&quot;-&quot;)" office:value-type="float" office:value="0" calcext:value-type="float">
            <text:p>0</text:p>
          </table:table-cell>
          <table:table-cell table:style-name="ce133" table:formula="of:=IFERROR(VLOOKUP([$Masterlist.$P43];[$Datasheet.$B$1:.$AV$9809];13;FALSE());&quot;-&quot;)" office:value-type="float" office:value="0" calcext:value-type="float">
            <text:p>0</text:p>
          </table:table-cell>
          <table:table-cell table:style-name="ce133" table:formula="of:=IFERROR(VLOOKUP([$Masterlist.$P43];[$Datasheet.$B$1:.$AV$9809];14;FALSE());&quot;-&quot;)" office:value-type="float" office:value="0" calcext:value-type="float">
            <text:p>0</text:p>
          </table:table-cell>
          <table:table-cell table:style-name="ce133" table:formula="of:=IFERROR(VLOOKUP([$Masterlist.$P43];[$Datasheet.$B$1:.$AV$9809];15;FALSE());&quot;-&quot;)" office:value-type="float" office:value="1" calcext:value-type="float">
            <text:p>1</text:p>
          </table:table-cell>
          <table:table-cell table:style-name="ce133" table:formula="of:=IFERROR(VLOOKUP([$Masterlist.$P43];[$Datasheet.$B$1:.$AV$9809];16;FALSE());&quot;-&quot;)" office:value-type="float" office:value="0" calcext:value-type="float">
            <text:p/>
          </table:table-cell>
          <table:table-cell table:style-name="ce133" table:formula="of:=IFERROR(VLOOKUP([$Masterlist.$P43];[$Datasheet.$B$1:.$AV$9809];17;FALSE());&quot;-&quot;)" office:value-type="float" office:value="0" calcext:value-type="float">
            <text:p/>
          </table:table-cell>
          <table:table-cell table:style-name="ce236" table:formula="of:=IFERROR(VLOOKUP([$Masterlist.$P43];[$Datasheet.$B$1:.$AV$9809];18;FALSE());&quot;-&quot;)" office:value-type="float" office:value="0" calcext:value-type="float">
            <text:p/>
          </table:table-cell>
          <table:table-cell table:style-name="ce242" table:formula="of:=IFERROR(VLOOKUP([$Masterlist.$P43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AL</text:p>
          </table:table-cell>
          <table:table-cell table:number-columns-repeated="4" table:style-name="ce50" office:value-type="string" calcext:value-type="string">
            <text:p>yes</text:p>
          </table:table-cell>
          <table:table-cell table:style-name="ce50" table:number-columns-repeated="8"/>
          <table:table-cell table:style-name="ce92" office:value-type="string" calcext:value-type="string">
            <text:p>FOH Sound Assistant</text:p>
          </table:table-cell>
          <table:table-cell table:style-name="ce8" office:value-type="string" calcext:value-type="string">
            <text:p>Elrisa Kruger</text:p>
          </table:table-cell>
          <table:table-cell table:style-name="ce13" table:formula="of:=IF(ISNUMBER(MATCH([.P44];[$Datasheet.$B$1:.$B$9809];0));&quot;✓&quot;;&quot;x&quot;)" office:value-type="string" office:string-value="✓" calcext:value-type="string">
            <text:p>✓</text:p>
          </table:table-cell>
          <table:table-cell table:style-name="ce133" table:formula="of:=IFERROR(VLOOKUP([$Masterlist.$P44];[$Datasheet.$B$1:.$AV$9809];2;FALSE());&quot;-&quot;)" office:value-type="float" office:value="0" calcext:value-type="float">
            <text:p>0</text:p>
          </table:table-cell>
          <table:table-cell table:style-name="ce133" table:formula="of:=IFERROR(VLOOKUP([$Masterlist.$P44];[$Datasheet.$B$1:.$AV$9809];3;FALSE());&quot;-&quot;)" office:value-type="float" office:value="1" calcext:value-type="float">
            <text:p>1</text:p>
          </table:table-cell>
          <table:table-cell table:style-name="ce133" table:formula="of:=IFERROR(VLOOKUP([$Masterlist.$P44];[$Datasheet.$B$1:.$AV$9809];4;FALSE());&quot;-&quot;)" office:value-type="float" office:value="0" calcext:value-type="float">
            <text:p>0</text:p>
          </table:table-cell>
          <table:table-cell table:style-name="ce133" table:formula="of:=IFERROR(VLOOKUP([$Masterlist.$P44];[$Datasheet.$B$1:.$AV$9809];5;FALSE());&quot;-&quot;)" office:value-type="float" office:value="0" calcext:value-type="float">
            <text:p>0</text:p>
          </table:table-cell>
          <table:table-cell table:style-name="ce185" table:formula="of:=IFERROR(VLOOKUP([$Masterlist.$P44];[$Datasheet.$B$1:.$AV$9809];6;FALSE());&quot;-&quot;)" office:value-type="float" office:value="0" calcext:value-type="float">
            <text:p>0</text:p>
          </table:table-cell>
          <table:table-cell table:style-name="ce133" table:formula="of:=IFERROR(VLOOKUP([$Masterlist.$P44];[$Datasheet.$B$1:.$AV$9809];7;FALSE());&quot;-&quot;)" office:value-type="float" office:value="1" calcext:value-type="float">
            <text:p>1</text:p>
          </table:table-cell>
          <table:table-cell table:style-name="ce133" table:formula="of:=IFERROR(VLOOKUP([$Masterlist.$P44];[$Datasheet.$B$1:.$AV$9809];8;FALSE());&quot;-&quot;)" office:value-type="float" office:value="0" calcext:value-type="float">
            <text:p>0</text:p>
          </table:table-cell>
          <table:table-cell table:style-name="ce133" table:formula="of:=IFERROR(VLOOKUP([$Masterlist.$P44];[$Datasheet.$B$1:.$AV$9809];9;FALSE());&quot;-&quot;)" office:value-type="float" office:value="1" calcext:value-type="float">
            <text:p>1</text:p>
          </table:table-cell>
          <table:table-cell table:style-name="ce133" table:formula="of:=IFERROR(VLOOKUP([$Masterlist.$P44];[$Datasheet.$B$1:.$AV$9809];10;FALSE());&quot;-&quot;)" office:value-type="float" office:value="0" calcext:value-type="float">
            <text:p>0</text:p>
          </table:table-cell>
          <table:table-cell table:style-name="ce133" table:formula="of:=IFERROR(VLOOKUP([$Masterlist.$P44];[$Datasheet.$B$1:.$AV$9809];11;FALSE());&quot;-&quot;)" office:value-type="float" office:value="0" calcext:value-type="float">
            <text:p>0</text:p>
          </table:table-cell>
          <table:table-cell table:style-name="ce133" table:formula="of:=IFERROR(VLOOKUP([$Masterlist.$P44];[$Datasheet.$B$1:.$AV$9809];12;FALSE());&quot;-&quot;)" office:value-type="float" office:value="0" calcext:value-type="float">
            <text:p>0</text:p>
          </table:table-cell>
          <table:table-cell table:style-name="ce133" table:formula="of:=IFERROR(VLOOKUP([$Masterlist.$P44];[$Datasheet.$B$1:.$AV$9809];13;FALSE());&quot;-&quot;)" office:value-type="float" office:value="0" calcext:value-type="float">
            <text:p>0</text:p>
          </table:table-cell>
          <table:table-cell table:style-name="ce133" table:formula="of:=IFERROR(VLOOKUP([$Masterlist.$P44];[$Datasheet.$B$1:.$AV$9809];14;FALSE());&quot;-&quot;)" office:value-type="float" office:value="0" calcext:value-type="float">
            <text:p>0</text:p>
          </table:table-cell>
          <table:table-cell table:style-name="ce133" table:formula="of:=IFERROR(VLOOKUP([$Masterlist.$P44];[$Datasheet.$B$1:.$AV$9809];15;FALSE());&quot;-&quot;)" office:value-type="float" office:value="1" calcext:value-type="float">
            <text:p>1</text:p>
          </table:table-cell>
          <table:table-cell table:style-name="ce133" table:formula="of:=IFERROR(VLOOKUP([$Masterlist.$P44];[$Datasheet.$B$1:.$AV$9809];16;FALSE());&quot;-&quot;)" office:value-type="float" office:value="0" calcext:value-type="float">
            <text:p/>
          </table:table-cell>
          <table:table-cell table:style-name="ce133" table:formula="of:=IFERROR(VLOOKUP([$Masterlist.$P44];[$Datasheet.$B$1:.$AV$9809];17;FALSE());&quot;-&quot;)" office:value-type="float" office:value="0" calcext:value-type="float">
            <text:p/>
          </table:table-cell>
          <table:table-cell table:style-name="ce133" table:formula="of:=IFERROR(VLOOKUP([$Masterlist.$P44];[$Datasheet.$B$1:.$AV$9809];18;FALSE());&quot;-&quot;)" office:value-type="float" office:value="0" calcext:value-type="float">
            <text:p/>
          </table:table-cell>
          <table:table-cell table:style-name="ce133" table:formula="of:=IFERROR(VLOOKUP([$Masterlist.$P44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5" office:value-type="string" calcext:value-type="string">
            <text:p>L</text:p>
          </table:table-cell>
          <table:table-cell table:number-columns-repeated="3" table:style-name="ce50" office:value-type="string" calcext:value-type="string">
            <text:p>yes</text:p>
          </table:table-cell>
          <table:table-cell table:style-name="ce50" table:number-columns-repeated="9"/>
          <table:table-cell table:style-name="ce92" office:value-type="string" calcext:value-type="string">
            <text:p>FOH Sound Assistant / Sound Runner</text:p>
          </table:table-cell>
          <table:table-cell table:style-name="ce8" office:value-type="string" calcext:value-type="string">
            <text:p>Kyle Jali</text:p>
          </table:table-cell>
          <table:table-cell table:style-name="ce13" table:formula="of:=IF(ISNUMBER(MATCH([.P45];[$Datasheet.$B$1:.$B$9809];0));&quot;✓&quot;;&quot;x&quot;)" office:value-type="string" office:string-value="x" calcext:value-type="string">
            <text:p>x</text:p>
          </table:table-cell>
          <table:table-cell table:style-name="ce133" table:formula="of:=IFERROR(VLOOKUP([$Masterlist.$P45];[$Datasheet.$B$1:.$AV$9809];2;FALSE());&quot;-&quot;)" office:value-type="string" office:string-value="-" calcext:value-type="string">
            <text:p>-</text:p>
          </table:table-cell>
          <table:table-cell table:style-name="ce133" table:formula="of:=IFERROR(VLOOKUP([$Masterlist.$P45];[$Datasheet.$B$1:.$AV$9809];3;FALSE());&quot;-&quot;)" office:value-type="string" office:string-value="-" calcext:value-type="string">
            <text:p>-</text:p>
          </table:table-cell>
          <table:table-cell table:style-name="ce133" table:formula="of:=IFERROR(VLOOKUP([$Masterlist.$P45];[$Datasheet.$B$1:.$AV$9809];4;FALSE());&quot;-&quot;)" office:value-type="string" office:string-value="-" calcext:value-type="string">
            <text:p>-</text:p>
          </table:table-cell>
          <table:table-cell table:style-name="ce133" table:formula="of:=IFERROR(VLOOKUP([$Masterlist.$P45];[$Datasheet.$B$1:.$AV$9809];5;FALSE());&quot;-&quot;)" office:value-type="string" office:string-value="-" calcext:value-type="string">
            <text:p>-</text:p>
          </table:table-cell>
          <table:table-cell table:style-name="ce185" table:formula="of:=IFERROR(VLOOKUP([$Masterlist.$P45];[$Datasheet.$B$1:.$AV$9809];6;FALSE());&quot;-&quot;)" office:value-type="string" office:string-value="-" calcext:value-type="string">
            <text:p>-</text:p>
          </table:table-cell>
          <table:table-cell table:style-name="ce133" table:formula="of:=IFERROR(VLOOKUP([$Masterlist.$P45];[$Datasheet.$B$1:.$AV$9809];7;FALSE());&quot;-&quot;)" office:value-type="string" office:string-value="-" calcext:value-type="string">
            <text:p>-</text:p>
          </table:table-cell>
          <table:table-cell table:style-name="ce133" table:formula="of:=IFERROR(VLOOKUP([$Masterlist.$P45];[$Datasheet.$B$1:.$AV$9809];8;FALSE());&quot;-&quot;)" office:value-type="string" office:string-value="-" calcext:value-type="string">
            <text:p>-</text:p>
          </table:table-cell>
          <table:table-cell table:style-name="ce133" table:formula="of:=IFERROR(VLOOKUP([$Masterlist.$P45];[$Datasheet.$B$1:.$AV$9809];9;FALSE());&quot;-&quot;)" office:value-type="string" office:string-value="-" calcext:value-type="string">
            <text:p>-</text:p>
          </table:table-cell>
          <table:table-cell table:style-name="ce133" table:formula="of:=IFERROR(VLOOKUP([$Masterlist.$P45];[$Datasheet.$B$1:.$AV$9809];10;FALSE());&quot;-&quot;)" office:value-type="string" office:string-value="-" calcext:value-type="string">
            <text:p>-</text:p>
          </table:table-cell>
          <table:table-cell table:style-name="ce133" table:formula="of:=IFERROR(VLOOKUP([$Masterlist.$P45];[$Datasheet.$B$1:.$AV$9809];11;FALSE());&quot;-&quot;)" office:value-type="string" office:string-value="-" calcext:value-type="string">
            <text:p>-</text:p>
          </table:table-cell>
          <table:table-cell table:style-name="ce133" table:formula="of:=IFERROR(VLOOKUP([$Masterlist.$P45];[$Datasheet.$B$1:.$AV$9809];12;FALSE());&quot;-&quot;)" office:value-type="string" office:string-value="-" calcext:value-type="string">
            <text:p>-</text:p>
          </table:table-cell>
          <table:table-cell table:style-name="ce133" table:formula="of:=IFERROR(VLOOKUP([$Masterlist.$P45];[$Datasheet.$B$1:.$AV$9809];13;FALSE());&quot;-&quot;)" office:value-type="string" office:string-value="-" calcext:value-type="string">
            <text:p>-</text:p>
          </table:table-cell>
          <table:table-cell table:style-name="ce133" table:formula="of:=IFERROR(VLOOKUP([$Masterlist.$P45];[$Datasheet.$B$1:.$AV$9809];14;FALSE());&quot;-&quot;)" office:value-type="string" office:string-value="-" calcext:value-type="string">
            <text:p>-</text:p>
          </table:table-cell>
          <table:table-cell table:style-name="ce133" table:formula="of:=IFERROR(VLOOKUP([$Masterlist.$P45];[$Datasheet.$B$1:.$AV$9809];15;FALSE());&quot;-&quot;)" office:value-type="string" office:string-value="-" calcext:value-type="string">
            <text:p>-</text:p>
          </table:table-cell>
          <table:table-cell table:style-name="ce133" table:formula="of:=IFERROR(VLOOKUP([$Masterlist.$P45];[$Datasheet.$B$1:.$AV$9809];16;FALSE());&quot;-&quot;)" office:value-type="string" office:string-value="-" calcext:value-type="string">
            <text:p>-</text:p>
          </table:table-cell>
          <table:table-cell table:style-name="ce133" table:formula="of:=IFERROR(VLOOKUP([$Masterlist.$P45];[$Datasheet.$B$1:.$AV$9809];17;FALSE());&quot;-&quot;)" office:value-type="string" office:string-value="-" calcext:value-type="string">
            <text:p>-</text:p>
          </table:table-cell>
          <table:table-cell table:style-name="ce133" table:formula="of:=IFERROR(VLOOKUP([$Masterlist.$P45];[$Datasheet.$B$1:.$AV$9809];18;FALSE());&quot;-&quot;)" office:value-type="string" office:string-value="-" calcext:value-type="string">
            <text:p>-</text:p>
          </table:table-cell>
          <table:table-cell table:style-name="ce133" table:formula="of:=IFERROR(VLOOKUP([$Masterlist.$P45];[$Datasheet.$B$1:.$AV$9809];19;FALSE());&quot;-&quot;)" office:value-type="string" office:string-value="-" calcext:value-type="string">
            <text:p>-</text:p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5" office:value-type="string" calcext:value-type="string">
            <text:p>L</text:p>
          </table:table-cell>
          <table:table-cell table:number-columns-repeated="4" table:style-name="ce50" office:value-type="string" calcext:value-type="string">
            <text:p>yes</text:p>
          </table:table-cell>
          <table:table-cell table:style-name="ce50" table:number-columns-repeated="8"/>
          <table:table-cell table:style-name="ce92" office:value-type="string" calcext:value-type="string">
            <text:p>FOH Sound Assistant / Sound Runner</text:p>
          </table:table-cell>
          <table:table-cell table:style-name="ce8" office:value-type="string" calcext:value-type="string">
            <text:p>Brandon Roberts</text:p>
          </table:table-cell>
          <table:table-cell table:style-name="ce13" table:formula="of:=IF(ISNUMBER(MATCH([.P46];[$Datasheet.$B$1:.$B$9809];0));&quot;✓&quot;;&quot;x&quot;)" office:value-type="string" office:string-value="✓" calcext:value-type="string">
            <text:p>✓</text:p>
          </table:table-cell>
          <table:table-cell table:style-name="ce133" table:formula="of:=IFERROR(VLOOKUP([$Masterlist.$P46];[$Datasheet.$B$1:.$AV$9809];2;FALSE());&quot;-&quot;)" office:value-type="float" office:value="1" calcext:value-type="float">
            <text:p>1</text:p>
          </table:table-cell>
          <table:table-cell table:style-name="ce133" table:formula="of:=IFERROR(VLOOKUP([$Masterlist.$P46];[$Datasheet.$B$1:.$AV$9809];3;FALSE());&quot;-&quot;)" office:value-type="float" office:value="1" calcext:value-type="float">
            <text:p>1</text:p>
          </table:table-cell>
          <table:table-cell table:style-name="ce133" table:formula="of:=IFERROR(VLOOKUP([$Masterlist.$P46];[$Datasheet.$B$1:.$AV$9809];4;FALSE());&quot;-&quot;)" office:value-type="float" office:value="0" calcext:value-type="float">
            <text:p>0</text:p>
          </table:table-cell>
          <table:table-cell table:style-name="ce133" table:formula="of:=IFERROR(VLOOKUP([$Masterlist.$P46];[$Datasheet.$B$1:.$AV$9809];5;FALSE());&quot;-&quot;)" office:value-type="float" office:value="0" calcext:value-type="float">
            <text:p>0</text:p>
          </table:table-cell>
          <table:table-cell table:style-name="ce185" table:formula="of:=IFERROR(VLOOKUP([$Masterlist.$P46];[$Datasheet.$B$1:.$AV$9809];6;FALSE());&quot;-&quot;)" office:value-type="float" office:value="1" calcext:value-type="float">
            <text:p>1</text:p>
          </table:table-cell>
          <table:table-cell table:style-name="ce133" table:formula="of:=IFERROR(VLOOKUP([$Masterlist.$P46];[$Datasheet.$B$1:.$AV$9809];7;FALSE());&quot;-&quot;)" office:value-type="float" office:value="1" calcext:value-type="float">
            <text:p>1</text:p>
          </table:table-cell>
          <table:table-cell table:style-name="ce133" table:formula="of:=IFERROR(VLOOKUP([$Masterlist.$P46];[$Datasheet.$B$1:.$AV$9809];8;FALSE());&quot;-&quot;)" office:value-type="float" office:value="1" calcext:value-type="float">
            <text:p>1</text:p>
          </table:table-cell>
          <table:table-cell table:style-name="ce133" table:formula="of:=IFERROR(VLOOKUP([$Masterlist.$P46];[$Datasheet.$B$1:.$AV$9809];9;FALSE());&quot;-&quot;)" office:value-type="float" office:value="0" calcext:value-type="float">
            <text:p>0</text:p>
          </table:table-cell>
          <table:table-cell table:style-name="ce133" table:formula="of:=IFERROR(VLOOKUP([$Masterlist.$P46];[$Datasheet.$B$1:.$AV$9809];10;FALSE());&quot;-&quot;)" office:value-type="float" office:value="0" calcext:value-type="float">
            <text:p>0</text:p>
          </table:table-cell>
          <table:table-cell table:style-name="ce133" table:formula="of:=IFERROR(VLOOKUP([$Masterlist.$P46];[$Datasheet.$B$1:.$AV$9809];11;FALSE());&quot;-&quot;)" office:value-type="float" office:value="1" calcext:value-type="float">
            <text:p>1</text:p>
          </table:table-cell>
          <table:table-cell table:style-name="ce133" table:formula="of:=IFERROR(VLOOKUP([$Masterlist.$P46];[$Datasheet.$B$1:.$AV$9809];12;FALSE());&quot;-&quot;)" office:value-type="float" office:value="0" calcext:value-type="float">
            <text:p>0</text:p>
          </table:table-cell>
          <table:table-cell table:style-name="ce133" table:formula="of:=IFERROR(VLOOKUP([$Masterlist.$P46];[$Datasheet.$B$1:.$AV$9809];13;FALSE());&quot;-&quot;)" office:value-type="float" office:value="0" calcext:value-type="float">
            <text:p>0</text:p>
          </table:table-cell>
          <table:table-cell table:style-name="ce133" table:formula="of:=IFERROR(VLOOKUP([$Masterlist.$P46];[$Datasheet.$B$1:.$AV$9809];14;FALSE());&quot;-&quot;)" office:value-type="float" office:value="1" calcext:value-type="float">
            <text:p>1</text:p>
          </table:table-cell>
          <table:table-cell table:style-name="ce133" table:formula="of:=IFERROR(VLOOKUP([$Masterlist.$P46];[$Datasheet.$B$1:.$AV$9809];15;FALSE());&quot;-&quot;)" office:value-type="float" office:value="1" calcext:value-type="float">
            <text:p>1</text:p>
          </table:table-cell>
          <table:table-cell table:style-name="ce133" table:formula="of:=IFERROR(VLOOKUP([$Masterlist.$P46];[$Datasheet.$B$1:.$AV$9809];16;FALSE());&quot;-&quot;)" office:value-type="float" office:value="0" calcext:value-type="float">
            <text:p/>
          </table:table-cell>
          <table:table-cell table:style-name="ce133" table:formula="of:=IFERROR(VLOOKUP([$Masterlist.$P46];[$Datasheet.$B$1:.$AV$9809];17;FALSE());&quot;-&quot;)" office:value-type="float" office:value="0" calcext:value-type="float">
            <text:p/>
          </table:table-cell>
          <table:table-cell table:style-name="ce133" table:formula="of:=IFERROR(VLOOKUP([$Masterlist.$P46];[$Datasheet.$B$1:.$AV$9809];18;FALSE());&quot;-&quot;)" office:value-type="float" office:value="0" calcext:value-type="float">
            <text:p/>
          </table:table-cell>
          <table:table-cell table:style-name="ce133" table:formula="of:=IFERROR(VLOOKUP([$Masterlist.$P46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5" office:value-type="string" calcext:value-type="string">
            <text:p>L</text:p>
          </table:table-cell>
          <table:table-cell table:number-columns-repeated="2" table:style-name="ce50" office:value-type="string" calcext:value-type="string">
            <text:p>yes</text:p>
          </table:table-cell>
          <table:table-cell table:style-name="ce50" table:number-columns-repeated="10"/>
          <table:table-cell table:style-name="ce92" office:value-type="string" calcext:value-type="string">
            <text:p>FOH Sound Assistant / Sound Runner</text:p>
          </table:table-cell>
          <table:table-cell table:style-name="ce8" office:value-type="string" calcext:value-type="string">
            <text:p>Elbert Loubser</text:p>
          </table:table-cell>
          <table:table-cell table:style-name="ce13" table:formula="of:=IF(ISNUMBER(MATCH([.P47];[$Datasheet.$B$1:.$B$9809];0));&quot;✓&quot;;&quot;x&quot;)" office:value-type="string" office:string-value="✓" calcext:value-type="string">
            <text:p>✓</text:p>
          </table:table-cell>
          <table:table-cell table:style-name="ce133" table:formula="of:=IFERROR(VLOOKUP([$Masterlist.$P47];[$Datasheet.$B$1:.$AV$9809];2;FALSE());&quot;-&quot;)" office:value-type="float" office:value="1" calcext:value-type="float">
            <text:p>1</text:p>
          </table:table-cell>
          <table:table-cell table:style-name="ce133" table:formula="of:=IFERROR(VLOOKUP([$Masterlist.$P47];[$Datasheet.$B$1:.$AV$9809];3;FALSE());&quot;-&quot;)" office:value-type="float" office:value="1" calcext:value-type="float">
            <text:p>1</text:p>
          </table:table-cell>
          <table:table-cell table:style-name="ce133" table:formula="of:=IFERROR(VLOOKUP([$Masterlist.$P47];[$Datasheet.$B$1:.$AV$9809];4;FALSE());&quot;-&quot;)" office:value-type="float" office:value="1" calcext:value-type="float">
            <text:p>1</text:p>
          </table:table-cell>
          <table:table-cell table:style-name="ce133" table:formula="of:=IFERROR(VLOOKUP([$Masterlist.$P47];[$Datasheet.$B$1:.$AV$9809];5;FALSE());&quot;-&quot;)" office:value-type="float" office:value="1" calcext:value-type="float">
            <text:p>1</text:p>
          </table:table-cell>
          <table:table-cell table:style-name="ce185" table:formula="of:=IFERROR(VLOOKUP([$Masterlist.$P47];[$Datasheet.$B$1:.$AV$9809];6;FALSE());&quot;-&quot;)" office:value-type="float" office:value="1" calcext:value-type="float">
            <text:p>1</text:p>
          </table:table-cell>
          <table:table-cell table:style-name="ce133" table:formula="of:=IFERROR(VLOOKUP([$Masterlist.$P47];[$Datasheet.$B$1:.$AV$9809];7;FALSE());&quot;-&quot;)" office:value-type="float" office:value="1" calcext:value-type="float">
            <text:p>1</text:p>
          </table:table-cell>
          <table:table-cell table:style-name="ce133" table:formula="of:=IFERROR(VLOOKUP([$Masterlist.$P47];[$Datasheet.$B$1:.$AV$9809];8;FALSE());&quot;-&quot;)" office:value-type="float" office:value="1" calcext:value-type="float">
            <text:p>1</text:p>
          </table:table-cell>
          <table:table-cell table:style-name="ce133" table:formula="of:=IFERROR(VLOOKUP([$Masterlist.$P47];[$Datasheet.$B$1:.$AV$9809];9;FALSE());&quot;-&quot;)" office:value-type="float" office:value="1" calcext:value-type="float">
            <text:p>1</text:p>
          </table:table-cell>
          <table:table-cell table:style-name="ce133" table:formula="of:=IFERROR(VLOOKUP([$Masterlist.$P47];[$Datasheet.$B$1:.$AV$9809];10;FALSE());&quot;-&quot;)" office:value-type="float" office:value="1" calcext:value-type="float">
            <text:p>1</text:p>
          </table:table-cell>
          <table:table-cell table:style-name="ce133" table:formula="of:=IFERROR(VLOOKUP([$Masterlist.$P47];[$Datasheet.$B$1:.$AV$9809];11;FALSE());&quot;-&quot;)" office:value-type="float" office:value="0" calcext:value-type="float">
            <text:p>0</text:p>
          </table:table-cell>
          <table:table-cell table:style-name="ce133" table:formula="of:=IFERROR(VLOOKUP([$Masterlist.$P47];[$Datasheet.$B$1:.$AV$9809];12;FALSE());&quot;-&quot;)" office:value-type="float" office:value="1" calcext:value-type="float">
            <text:p>1</text:p>
          </table:table-cell>
          <table:table-cell table:style-name="ce133" table:formula="of:=IFERROR(VLOOKUP([$Masterlist.$P47];[$Datasheet.$B$1:.$AV$9809];13;FALSE());&quot;-&quot;)" office:value-type="float" office:value="1" calcext:value-type="float">
            <text:p>1</text:p>
          </table:table-cell>
          <table:table-cell table:style-name="ce133" table:formula="of:=IFERROR(VLOOKUP([$Masterlist.$P47];[$Datasheet.$B$1:.$AV$9809];14;FALSE());&quot;-&quot;)" office:value-type="float" office:value="1" calcext:value-type="float">
            <text:p>1</text:p>
          </table:table-cell>
          <table:table-cell table:style-name="ce133" table:formula="of:=IFERROR(VLOOKUP([$Masterlist.$P47];[$Datasheet.$B$1:.$AV$9809];15;FALSE());&quot;-&quot;)" office:value-type="float" office:value="1" calcext:value-type="float">
            <text:p>1</text:p>
          </table:table-cell>
          <table:table-cell table:style-name="ce133" table:formula="of:=IFERROR(VLOOKUP([$Masterlist.$P47];[$Datasheet.$B$1:.$AV$9809];16;FALSE());&quot;-&quot;)" office:value-type="float" office:value="0" calcext:value-type="float">
            <text:p/>
          </table:table-cell>
          <table:table-cell table:style-name="ce133" table:formula="of:=IFERROR(VLOOKUP([$Masterlist.$P47];[$Datasheet.$B$1:.$AV$9809];17;FALSE());&quot;-&quot;)" office:value-type="float" office:value="0" calcext:value-type="float">
            <text:p/>
          </table:table-cell>
          <table:table-cell table:style-name="ce133" table:formula="of:=IFERROR(VLOOKUP([$Masterlist.$P47];[$Datasheet.$B$1:.$AV$9809];18;FALSE());&quot;-&quot;)" office:value-type="float" office:value="0" calcext:value-type="float">
            <text:p/>
          </table:table-cell>
          <table:table-cell table:style-name="ce133" table:formula="of:=IFERROR(VLOOKUP([$Masterlist.$P47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number-columns-repeated="2" table:style-name="ce50" office:value-type="string" calcext:value-type="string">
            <text:p>yes</text:p>
          </table:table-cell>
          <table:table-cell table:style-name="ce50" table:number-columns-repeated="10"/>
          <table:table-cell table:style-name="ce92" office:value-type="string" calcext:value-type="string">
            <text:p>FOH Sound Assistant / Broadcast Sound / Sound Runner</text:p>
          </table:table-cell>
          <table:table-cell table:style-name="ce8" office:value-type="string" calcext:value-type="string">
            <text:p>Michael Cockcroft</text:p>
          </table:table-cell>
          <table:table-cell table:style-name="ce13" table:formula="of:=IF(ISNUMBER(MATCH([.P48];[$Datasheet.$B$1:.$B$9809];0));&quot;✓&quot;;&quot;x&quot;)" office:value-type="string" office:string-value="x" calcext:value-type="string">
            <text:p>x</text:p>
          </table:table-cell>
          <table:table-cell table:style-name="ce133" table:formula="of:=IFERROR(VLOOKUP([$Masterlist.$P48];[$Datasheet.$B$1:.$AV$9809];2;FALSE());&quot;-&quot;)" office:value-type="string" office:string-value="-" calcext:value-type="string">
            <text:p>-</text:p>
          </table:table-cell>
          <table:table-cell table:style-name="ce133" table:formula="of:=IFERROR(VLOOKUP([$Masterlist.$P48];[$Datasheet.$B$1:.$AV$9809];3;FALSE());&quot;-&quot;)" office:value-type="string" office:string-value="-" calcext:value-type="string">
            <text:p>-</text:p>
          </table:table-cell>
          <table:table-cell table:style-name="ce133" table:formula="of:=IFERROR(VLOOKUP([$Masterlist.$P48];[$Datasheet.$B$1:.$AV$9809];4;FALSE());&quot;-&quot;)" office:value-type="string" office:string-value="-" calcext:value-type="string">
            <text:p>-</text:p>
          </table:table-cell>
          <table:table-cell table:style-name="ce133" table:formula="of:=IFERROR(VLOOKUP([$Masterlist.$P48];[$Datasheet.$B$1:.$AV$9809];5;FALSE());&quot;-&quot;)" office:value-type="string" office:string-value="-" calcext:value-type="string">
            <text:p>-</text:p>
          </table:table-cell>
          <table:table-cell table:style-name="ce185" table:formula="of:=IFERROR(VLOOKUP([$Masterlist.$P48];[$Datasheet.$B$1:.$AV$9809];6;FALSE());&quot;-&quot;)" office:value-type="string" office:string-value="-" calcext:value-type="string">
            <text:p>-</text:p>
          </table:table-cell>
          <table:table-cell table:style-name="ce133" table:formula="of:=IFERROR(VLOOKUP([$Masterlist.$P48];[$Datasheet.$B$1:.$AV$9809];7;FALSE());&quot;-&quot;)" office:value-type="string" office:string-value="-" calcext:value-type="string">
            <text:p>-</text:p>
          </table:table-cell>
          <table:table-cell table:style-name="ce133" table:formula="of:=IFERROR(VLOOKUP([$Masterlist.$P48];[$Datasheet.$B$1:.$AV$9809];8;FALSE());&quot;-&quot;)" office:value-type="string" office:string-value="-" calcext:value-type="string">
            <text:p>-</text:p>
          </table:table-cell>
          <table:table-cell table:style-name="ce133" table:formula="of:=IFERROR(VLOOKUP([$Masterlist.$P48];[$Datasheet.$B$1:.$AV$9809];9;FALSE());&quot;-&quot;)" office:value-type="string" office:string-value="-" calcext:value-type="string">
            <text:p>-</text:p>
          </table:table-cell>
          <table:table-cell table:style-name="ce133" table:formula="of:=IFERROR(VLOOKUP([$Masterlist.$P48];[$Datasheet.$B$1:.$AV$9809];10;FALSE());&quot;-&quot;)" office:value-type="string" office:string-value="-" calcext:value-type="string">
            <text:p>-</text:p>
          </table:table-cell>
          <table:table-cell table:style-name="ce133" table:formula="of:=IFERROR(VLOOKUP([$Masterlist.$P48];[$Datasheet.$B$1:.$AV$9809];11;FALSE());&quot;-&quot;)" office:value-type="string" office:string-value="-" calcext:value-type="string">
            <text:p>-</text:p>
          </table:table-cell>
          <table:table-cell table:style-name="ce133" table:formula="of:=IFERROR(VLOOKUP([$Masterlist.$P48];[$Datasheet.$B$1:.$AV$9809];12;FALSE());&quot;-&quot;)" office:value-type="string" office:string-value="-" calcext:value-type="string">
            <text:p>-</text:p>
          </table:table-cell>
          <table:table-cell table:style-name="ce133" table:formula="of:=IFERROR(VLOOKUP([$Masterlist.$P48];[$Datasheet.$B$1:.$AV$9809];13;FALSE());&quot;-&quot;)" office:value-type="string" office:string-value="-" calcext:value-type="string">
            <text:p>-</text:p>
          </table:table-cell>
          <table:table-cell table:style-name="ce133" table:formula="of:=IFERROR(VLOOKUP([$Masterlist.$P48];[$Datasheet.$B$1:.$AV$9809];14;FALSE());&quot;-&quot;)" office:value-type="string" office:string-value="-" calcext:value-type="string">
            <text:p>-</text:p>
          </table:table-cell>
          <table:table-cell table:style-name="ce133" table:formula="of:=IFERROR(VLOOKUP([$Masterlist.$P48];[$Datasheet.$B$1:.$AV$9809];15;FALSE());&quot;-&quot;)" office:value-type="string" office:string-value="-" calcext:value-type="string">
            <text:p>-</text:p>
          </table:table-cell>
          <table:table-cell table:style-name="ce133" table:formula="of:=IFERROR(VLOOKUP([$Masterlist.$P48];[$Datasheet.$B$1:.$AV$9809];16;FALSE());&quot;-&quot;)" office:value-type="string" office:string-value="-" calcext:value-type="string">
            <text:p>-</text:p>
          </table:table-cell>
          <table:table-cell table:style-name="ce133" table:formula="of:=IFERROR(VLOOKUP([$Masterlist.$P48];[$Datasheet.$B$1:.$AV$9809];17;FALSE());&quot;-&quot;)" office:value-type="string" office:string-value="-" calcext:value-type="string">
            <text:p>-</text:p>
          </table:table-cell>
          <table:table-cell table:style-name="ce133" table:formula="of:=IFERROR(VLOOKUP([$Masterlist.$P48];[$Datasheet.$B$1:.$AV$9809];18;FALSE());&quot;-&quot;)" office:value-type="string" office:string-value="-" calcext:value-type="string">
            <text:p>-</text:p>
          </table:table-cell>
          <table:table-cell table:style-name="ce133" table:formula="of:=IFERROR(VLOOKUP([$Masterlist.$P48];[$Datasheet.$B$1:.$AV$9809];19;FALSE());&quot;-&quot;)" office:value-type="string" office:string-value="-" calcext:value-type="string">
            <text:p>-</text:p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number-columns-repeated="2" table:style-name="ce50" office:value-type="string" calcext:value-type="string">
            <text:p>yes</text:p>
          </table:table-cell>
          <table:table-cell table:style-name="ce50" table:number-columns-repeated="10"/>
          <table:table-cell table:style-name="ce92" office:value-type="string" calcext:value-type="string">
            <text:p>FOH Sound Assistant</text:p>
          </table:table-cell>
          <table:table-cell table:style-name="ce8" office:value-type="string" calcext:value-type="string">
            <office:annotation draw:style-name="gr3" draw:text-style-name="P1" svg:width="8.388cm" svg:height="1.386cm" svg:x="37.038cm" svg:y="27.623cm" draw:caption-point-x="-0.407cm" draw:caption-point-y="-0.758cm">
              <dc:creator>Unknown Author</dc:creator>
              <dc:date>2026-05-18T20:20:00</dc:date>
              <text:p>Dané Robertse:</text:p>
              <text:p>On site all the time. Ask him if he wants to schedule if need be</text:p>
            </office:annotation>
            <text:p>Jan Louis du Plessis</text:p>
          </table:table-cell>
          <table:table-cell table:style-name="ce13" table:formula="of:=IF(ISNUMBER(MATCH([.P49];[$Datasheet.$B$1:.$B$9809];0));&quot;✓&quot;;&quot;x&quot;)" office:value-type="string" office:string-value="x" calcext:value-type="string">
            <text:p>x</text:p>
          </table:table-cell>
          <table:table-cell table:style-name="ce133" table:formula="of:=IFERROR(VLOOKUP([$Masterlist.$P49];[$Datasheet.$B$1:.$AV$9809];2;FALSE());&quot;-&quot;)" office:value-type="string" office:string-value="-" calcext:value-type="string">
            <text:p>-</text:p>
          </table:table-cell>
          <table:table-cell table:style-name="ce133" table:formula="of:=IFERROR(VLOOKUP([$Masterlist.$P49];[$Datasheet.$B$1:.$AV$9809];3;FALSE());&quot;-&quot;)" office:value-type="string" office:string-value="-" calcext:value-type="string">
            <text:p>-</text:p>
          </table:table-cell>
          <table:table-cell table:style-name="ce133" table:formula="of:=IFERROR(VLOOKUP([$Masterlist.$P49];[$Datasheet.$B$1:.$AV$9809];4;FALSE());&quot;-&quot;)" office:value-type="string" office:string-value="-" calcext:value-type="string">
            <text:p>-</text:p>
          </table:table-cell>
          <table:table-cell table:style-name="ce133" table:formula="of:=IFERROR(VLOOKUP([$Masterlist.$P49];[$Datasheet.$B$1:.$AV$9809];5;FALSE());&quot;-&quot;)" office:value-type="string" office:string-value="-" calcext:value-type="string">
            <text:p>-</text:p>
          </table:table-cell>
          <table:table-cell table:style-name="ce185" table:formula="of:=IFERROR(VLOOKUP([$Masterlist.$P49];[$Datasheet.$B$1:.$AV$9809];6;FALSE());&quot;-&quot;)" office:value-type="string" office:string-value="-" calcext:value-type="string">
            <text:p>-</text:p>
          </table:table-cell>
          <table:table-cell table:style-name="ce133" table:formula="of:=IFERROR(VLOOKUP([$Masterlist.$P49];[$Datasheet.$B$1:.$AV$9809];7;FALSE());&quot;-&quot;)" office:value-type="string" office:string-value="-" calcext:value-type="string">
            <text:p>-</text:p>
          </table:table-cell>
          <table:table-cell table:style-name="ce133" table:formula="of:=IFERROR(VLOOKUP([$Masterlist.$P49];[$Datasheet.$B$1:.$AV$9809];8;FALSE());&quot;-&quot;)" office:value-type="string" office:string-value="-" calcext:value-type="string">
            <text:p>-</text:p>
          </table:table-cell>
          <table:table-cell table:style-name="ce133" table:formula="of:=IFERROR(VLOOKUP([$Masterlist.$P49];[$Datasheet.$B$1:.$AV$9809];9;FALSE());&quot;-&quot;)" office:value-type="string" office:string-value="-" calcext:value-type="string">
            <text:p>-</text:p>
          </table:table-cell>
          <table:table-cell table:style-name="ce133" table:formula="of:=IFERROR(VLOOKUP([$Masterlist.$P49];[$Datasheet.$B$1:.$AV$9809];10;FALSE());&quot;-&quot;)" office:value-type="string" office:string-value="-" calcext:value-type="string">
            <text:p>-</text:p>
          </table:table-cell>
          <table:table-cell table:style-name="ce133" table:formula="of:=IFERROR(VLOOKUP([$Masterlist.$P49];[$Datasheet.$B$1:.$AV$9809];11;FALSE());&quot;-&quot;)" office:value-type="string" office:string-value="-" calcext:value-type="string">
            <text:p>-</text:p>
          </table:table-cell>
          <table:table-cell table:style-name="ce133" table:formula="of:=IFERROR(VLOOKUP([$Masterlist.$P49];[$Datasheet.$B$1:.$AV$9809];12;FALSE());&quot;-&quot;)" office:value-type="string" office:string-value="-" calcext:value-type="string">
            <text:p>-</text:p>
          </table:table-cell>
          <table:table-cell table:style-name="ce133" table:formula="of:=IFERROR(VLOOKUP([$Masterlist.$P49];[$Datasheet.$B$1:.$AV$9809];13;FALSE());&quot;-&quot;)" office:value-type="string" office:string-value="-" calcext:value-type="string">
            <text:p>-</text:p>
          </table:table-cell>
          <table:table-cell table:style-name="ce133" table:formula="of:=IFERROR(VLOOKUP([$Masterlist.$P49];[$Datasheet.$B$1:.$AV$9809];14;FALSE());&quot;-&quot;)" office:value-type="string" office:string-value="-" calcext:value-type="string">
            <text:p>-</text:p>
          </table:table-cell>
          <table:table-cell table:style-name="ce133" table:formula="of:=IFERROR(VLOOKUP([$Masterlist.$P49];[$Datasheet.$B$1:.$AV$9809];15;FALSE());&quot;-&quot;)" office:value-type="string" office:string-value="-" calcext:value-type="string">
            <text:p>-</text:p>
          </table:table-cell>
          <table:table-cell table:style-name="ce133" table:formula="of:=IFERROR(VLOOKUP([$Masterlist.$P49];[$Datasheet.$B$1:.$AV$9809];16;FALSE());&quot;-&quot;)" office:value-type="string" office:string-value="-" calcext:value-type="string">
            <text:p>-</text:p>
          </table:table-cell>
          <table:table-cell table:style-name="ce133" table:formula="of:=IFERROR(VLOOKUP([$Masterlist.$P49];[$Datasheet.$B$1:.$AV$9809];17;FALSE());&quot;-&quot;)" office:value-type="string" office:string-value="-" calcext:value-type="string">
            <text:p>-</text:p>
          </table:table-cell>
          <table:table-cell table:style-name="ce133" table:formula="of:=IFERROR(VLOOKUP([$Masterlist.$P49];[$Datasheet.$B$1:.$AV$9809];18;FALSE());&quot;-&quot;)" office:value-type="string" office:string-value="-" calcext:value-type="string">
            <text:p>-</text:p>
          </table:table-cell>
          <table:table-cell table:style-name="ce133" table:formula="of:=IFERROR(VLOOKUP([$Masterlist.$P49];[$Datasheet.$B$1:.$AV$9809];19;FALSE());&quot;-&quot;)" office:value-type="string" office:string-value="-" calcext:value-type="string">
            <text:p>-</text:p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M</text:p>
          </table:table-cell>
          <table:table-cell table:number-columns-repeated="2" table:style-name="ce50" office:value-type="string" calcext:value-type="string">
            <text:p>yes</text:p>
          </table:table-cell>
          <table:table-cell table:style-name="ce50" table:number-columns-repeated="10"/>
          <table:table-cell table:style-name="ce92" office:value-type="string" calcext:value-type="string">
            <text:p>FOH Sound Assistant</text:p>
          </table:table-cell>
          <table:table-cell table:style-name="ce8" office:value-type="string" calcext:value-type="string">
            <office:annotation draw:style-name="gr4" draw:text-style-name="P1" svg:width="8.388cm" svg:height="1.348cm" svg:x="37.038cm" svg:y="28.126cm" draw:caption-point-x="-0.407cm" draw:caption-point-y="-0.758cm">
              <dc:creator>Unknown Author</dc:creator>
              <dc:date>2026-05-18T20:20:00</dc:date>
              <text:p>Dané Robertse:</text:p>
              <text:p>Want him to start mixing dry run again</text:p>
            </office:annotation>
            <text:p>Luke Nel</text:p>
          </table:table-cell>
          <table:table-cell table:style-name="ce13" table:formula="of:=IF(ISNUMBER(MATCH([.P50];[$Datasheet.$B$1:.$B$9809];0));&quot;✓&quot;;&quot;x&quot;)" office:value-type="string" office:string-value="✓" calcext:value-type="string">
            <text:p>✓</text:p>
          </table:table-cell>
          <table:table-cell table:style-name="ce133" table:formula="of:=IFERROR(VLOOKUP([$Masterlist.$P50];[$Datasheet.$B$1:.$AV$9809];2;FALSE());&quot;-&quot;)" office:value-type="float" office:value="0" calcext:value-type="float">
            <text:p>0</text:p>
          </table:table-cell>
          <table:table-cell table:style-name="ce133" table:formula="of:=IFERROR(VLOOKUP([$Masterlist.$P50];[$Datasheet.$B$1:.$AV$9809];3;FALSE());&quot;-&quot;)" office:value-type="float" office:value="0" calcext:value-type="float">
            <text:p>0</text:p>
          </table:table-cell>
          <table:table-cell table:style-name="ce133" table:formula="of:=IFERROR(VLOOKUP([$Masterlist.$P50];[$Datasheet.$B$1:.$AV$9809];4;FALSE());&quot;-&quot;)" office:value-type="float" office:value="1" calcext:value-type="float">
            <text:p>1</text:p>
          </table:table-cell>
          <table:table-cell table:style-name="ce133" table:formula="of:=IFERROR(VLOOKUP([$Masterlist.$P50];[$Datasheet.$B$1:.$AV$9809];5;FALSE());&quot;-&quot;)" office:value-type="float" office:value="1" calcext:value-type="float">
            <text:p>1</text:p>
          </table:table-cell>
          <table:table-cell table:style-name="ce185" table:formula="of:=IFERROR(VLOOKUP([$Masterlist.$P50];[$Datasheet.$B$1:.$AV$9809];6;FALSE());&quot;-&quot;)" office:value-type="float" office:value="0" calcext:value-type="float">
            <text:p>0</text:p>
          </table:table-cell>
          <table:table-cell table:style-name="ce133" table:formula="of:=IFERROR(VLOOKUP([$Masterlist.$P50];[$Datasheet.$B$1:.$AV$9809];7;FALSE());&quot;-&quot;)" office:value-type="float" office:value="1" calcext:value-type="float">
            <text:p>1</text:p>
          </table:table-cell>
          <table:table-cell table:style-name="ce133" table:formula="of:=IFERROR(VLOOKUP([$Masterlist.$P50];[$Datasheet.$B$1:.$AV$9809];8;FALSE());&quot;-&quot;)" office:value-type="float" office:value="1" calcext:value-type="float">
            <text:p>1</text:p>
          </table:table-cell>
          <table:table-cell table:style-name="ce133" table:formula="of:=IFERROR(VLOOKUP([$Masterlist.$P50];[$Datasheet.$B$1:.$AV$9809];9;FALSE());&quot;-&quot;)" office:value-type="float" office:value="1" calcext:value-type="float">
            <text:p>1</text:p>
          </table:table-cell>
          <table:table-cell table:style-name="ce133" table:formula="of:=IFERROR(VLOOKUP([$Masterlist.$P50];[$Datasheet.$B$1:.$AV$9809];10;FALSE());&quot;-&quot;)" office:value-type="float" office:value="0" calcext:value-type="float">
            <text:p>0</text:p>
          </table:table-cell>
          <table:table-cell table:style-name="ce133" table:formula="of:=IFERROR(VLOOKUP([$Masterlist.$P50];[$Datasheet.$B$1:.$AV$9809];11;FALSE());&quot;-&quot;)" office:value-type="float" office:value="1" calcext:value-type="float">
            <text:p>1</text:p>
          </table:table-cell>
          <table:table-cell table:style-name="ce133" table:formula="of:=IFERROR(VLOOKUP([$Masterlist.$P50];[$Datasheet.$B$1:.$AV$9809];12;FALSE());&quot;-&quot;)" office:value-type="float" office:value="1" calcext:value-type="float">
            <text:p>1</text:p>
          </table:table-cell>
          <table:table-cell table:style-name="ce133" table:formula="of:=IFERROR(VLOOKUP([$Masterlist.$P50];[$Datasheet.$B$1:.$AV$9809];13;FALSE());&quot;-&quot;)" office:value-type="float" office:value="1" calcext:value-type="float">
            <text:p>1</text:p>
          </table:table-cell>
          <table:table-cell table:style-name="ce133" table:formula="of:=IFERROR(VLOOKUP([$Masterlist.$P50];[$Datasheet.$B$1:.$AV$9809];14;FALSE());&quot;-&quot;)" office:value-type="float" office:value="0" calcext:value-type="float">
            <text:p>0</text:p>
          </table:table-cell>
          <table:table-cell table:style-name="ce133" table:formula="of:=IFERROR(VLOOKUP([$Masterlist.$P50];[$Datasheet.$B$1:.$AV$9809];15;FALSE());&quot;-&quot;)" office:value-type="float" office:value="1" calcext:value-type="float">
            <text:p>1</text:p>
          </table:table-cell>
          <table:table-cell table:style-name="ce133" table:formula="of:=IFERROR(VLOOKUP([$Masterlist.$P50];[$Datasheet.$B$1:.$AV$9809];16;FALSE());&quot;-&quot;)" office:value-type="float" office:value="0" calcext:value-type="float">
            <text:p/>
          </table:table-cell>
          <table:table-cell table:style-name="ce133" table:formula="of:=IFERROR(VLOOKUP([$Masterlist.$P50];[$Datasheet.$B$1:.$AV$9809];17;FALSE());&quot;-&quot;)" office:value-type="float" office:value="0" calcext:value-type="float">
            <text:p/>
          </table:table-cell>
          <table:table-cell table:style-name="ce133" table:formula="of:=IFERROR(VLOOKUP([$Masterlist.$P50];[$Datasheet.$B$1:.$AV$9809];18;FALSE());&quot;-&quot;)" office:value-type="float" office:value="0" calcext:value-type="float">
            <text:p/>
          </table:table-cell>
          <table:table-cell table:style-name="ce133" table:formula="of:=IFERROR(VLOOKUP([$Masterlist.$P50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number-columns-repeated="2" table:style-name="ce50" office:value-type="string" calcext:value-type="string">
            <text:p>yes</text:p>
          </table:table-cell>
          <table:table-cell table:style-name="ce50" table:number-columns-repeated="10"/>
          <table:table-cell table:style-name="ce92" office:value-type="string" calcext:value-type="string">
            <text:p>Sound Runner</text:p>
          </table:table-cell>
          <table:table-cell table:style-name="ce8" office:value-type="string" calcext:value-type="string">
            <text:p>Shevonne Dick</text:p>
          </table:table-cell>
          <table:table-cell table:style-name="ce13" table:formula="of:=IF(ISNUMBER(MATCH([.P51];[$Datasheet.$B$1:.$B$9809];0));&quot;✓&quot;;&quot;x&quot;)" office:value-type="string" office:string-value="✓" calcext:value-type="string">
            <text:p>✓</text:p>
          </table:table-cell>
          <table:table-cell table:style-name="ce133" table:formula="of:=IFERROR(VLOOKUP([$Masterlist.$P51];[$Datasheet.$B$1:.$AV$9809];2;FALSE());&quot;-&quot;)" office:value-type="float" office:value="0" calcext:value-type="float">
            <text:p>0</text:p>
          </table:table-cell>
          <table:table-cell table:style-name="ce133" table:formula="of:=IFERROR(VLOOKUP([$Masterlist.$P51];[$Datasheet.$B$1:.$AV$9809];3;FALSE());&quot;-&quot;)" office:value-type="float" office:value="0" calcext:value-type="float">
            <text:p>0</text:p>
          </table:table-cell>
          <table:table-cell table:style-name="ce133" table:formula="of:=IFERROR(VLOOKUP([$Masterlist.$P51];[$Datasheet.$B$1:.$AV$9809];4;FALSE());&quot;-&quot;)" office:value-type="float" office:value="1" calcext:value-type="float">
            <text:p>1</text:p>
          </table:table-cell>
          <table:table-cell table:style-name="ce133" table:formula="of:=IFERROR(VLOOKUP([$Masterlist.$P51];[$Datasheet.$B$1:.$AV$9809];5;FALSE());&quot;-&quot;)" office:value-type="float" office:value="1" calcext:value-type="float">
            <text:p>1</text:p>
          </table:table-cell>
          <table:table-cell table:style-name="ce185" table:formula="of:=IFERROR(VLOOKUP([$Masterlist.$P51];[$Datasheet.$B$1:.$AV$9809];6;FALSE());&quot;-&quot;)" office:value-type="float" office:value="1" calcext:value-type="float">
            <text:p>1</text:p>
          </table:table-cell>
          <table:table-cell table:style-name="ce133" table:formula="of:=IFERROR(VLOOKUP([$Masterlist.$P51];[$Datasheet.$B$1:.$AV$9809];7;FALSE());&quot;-&quot;)" office:value-type="float" office:value="1" calcext:value-type="float">
            <text:p>1</text:p>
          </table:table-cell>
          <table:table-cell table:style-name="ce133" table:formula="of:=IFERROR(VLOOKUP([$Masterlist.$P51];[$Datasheet.$B$1:.$AV$9809];8;FALSE());&quot;-&quot;)" office:value-type="float" office:value="0" calcext:value-type="float">
            <text:p>0</text:p>
          </table:table-cell>
          <table:table-cell table:style-name="ce133" table:formula="of:=IFERROR(VLOOKUP([$Masterlist.$P51];[$Datasheet.$B$1:.$AV$9809];9;FALSE());&quot;-&quot;)" office:value-type="float" office:value="0" calcext:value-type="float">
            <text:p>0</text:p>
          </table:table-cell>
          <table:table-cell table:style-name="ce133" table:formula="of:=IFERROR(VLOOKUP([$Masterlist.$P51];[$Datasheet.$B$1:.$AV$9809];10;FALSE());&quot;-&quot;)" office:value-type="float" office:value="0" calcext:value-type="float">
            <text:p>0</text:p>
          </table:table-cell>
          <table:table-cell table:style-name="ce133" table:formula="of:=IFERROR(VLOOKUP([$Masterlist.$P51];[$Datasheet.$B$1:.$AV$9809];11;FALSE());&quot;-&quot;)" office:value-type="float" office:value="0" calcext:value-type="float">
            <text:p>0</text:p>
          </table:table-cell>
          <table:table-cell table:style-name="ce133" table:formula="of:=IFERROR(VLOOKUP([$Masterlist.$P51];[$Datasheet.$B$1:.$AV$9809];12;FALSE());&quot;-&quot;)" office:value-type="float" office:value="0" calcext:value-type="float">
            <text:p>0</text:p>
          </table:table-cell>
          <table:table-cell table:style-name="ce133" table:formula="of:=IFERROR(VLOOKUP([$Masterlist.$P51];[$Datasheet.$B$1:.$AV$9809];13;FALSE());&quot;-&quot;)" office:value-type="float" office:value="0" calcext:value-type="float">
            <text:p>0</text:p>
          </table:table-cell>
          <table:table-cell table:style-name="ce133" table:formula="of:=IFERROR(VLOOKUP([$Masterlist.$P51];[$Datasheet.$B$1:.$AV$9809];14;FALSE());&quot;-&quot;)" office:value-type="float" office:value="0" calcext:value-type="float">
            <text:p>0</text:p>
          </table:table-cell>
          <table:table-cell table:style-name="ce133" table:formula="of:=IFERROR(VLOOKUP([$Masterlist.$P51];[$Datasheet.$B$1:.$AV$9809];15;FALSE());&quot;-&quot;)" office:value-type="float" office:value="0" calcext:value-type="float">
            <text:p>0</text:p>
          </table:table-cell>
          <table:table-cell table:style-name="ce133" table:formula="of:=IFERROR(VLOOKUP([$Masterlist.$P51];[$Datasheet.$B$1:.$AV$9809];16;FALSE());&quot;-&quot;)" office:value-type="float" office:value="0" calcext:value-type="float">
            <text:p/>
          </table:table-cell>
          <table:table-cell table:style-name="ce133" table:formula="of:=IFERROR(VLOOKUP([$Masterlist.$P51];[$Datasheet.$B$1:.$AV$9809];17;FALSE());&quot;-&quot;)" office:value-type="float" office:value="0" calcext:value-type="float">
            <text:p/>
          </table:table-cell>
          <table:table-cell table:style-name="ce133" table:formula="of:=IFERROR(VLOOKUP([$Masterlist.$P51];[$Datasheet.$B$1:.$AV$9809];18;FALSE());&quot;-&quot;)" office:value-type="float" office:value="0" calcext:value-type="float">
            <text:p/>
          </table:table-cell>
          <table:table-cell table:style-name="ce133" table:formula="of:=IFERROR(VLOOKUP([$Masterlist.$P51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number-columns-repeated="2" table:style-name="ce50" office:value-type="string" calcext:value-type="string">
            <text:p>yes</text:p>
          </table:table-cell>
          <table:table-cell table:style-name="ce50" table:number-columns-repeated="10"/>
          <table:table-cell table:style-name="ce92" office:value-type="string" calcext:value-type="string">
            <text:p>FOH Sound Assistant / Broadcast Sound</text:p>
          </table:table-cell>
          <table:table-cell table:style-name="ce8" office:value-type="string" calcext:value-type="string">
            <text:p>Kian Cronje</text:p>
          </table:table-cell>
          <table:table-cell table:style-name="ce13" table:formula="of:=IF(ISNUMBER(MATCH([.P52];[$Datasheet.$B$1:.$B$9809];0));&quot;✓&quot;;&quot;x&quot;)" office:value-type="string" office:string-value="✓" calcext:value-type="string">
            <text:p>✓</text:p>
          </table:table-cell>
          <table:table-cell table:style-name="ce133" table:formula="of:=IFERROR(VLOOKUP([$Masterlist.$P52];[$Datasheet.$B$1:.$AV$9809];2;FALSE());&quot;-&quot;)" office:value-type="float" office:value="0" calcext:value-type="float">
            <text:p>0</text:p>
          </table:table-cell>
          <table:table-cell table:style-name="ce133" table:formula="of:=IFERROR(VLOOKUP([$Masterlist.$P52];[$Datasheet.$B$1:.$AV$9809];3;FALSE());&quot;-&quot;)" office:value-type="float" office:value="0" calcext:value-type="float">
            <text:p>0</text:p>
          </table:table-cell>
          <table:table-cell table:style-name="ce133" table:formula="of:=IFERROR(VLOOKUP([$Masterlist.$P52];[$Datasheet.$B$1:.$AV$9809];4;FALSE());&quot;-&quot;)" office:value-type="float" office:value="1" calcext:value-type="float">
            <text:p>1</text:p>
          </table:table-cell>
          <table:table-cell table:style-name="ce133" table:formula="of:=IFERROR(VLOOKUP([$Masterlist.$P52];[$Datasheet.$B$1:.$AV$9809];5;FALSE());&quot;-&quot;)" office:value-type="float" office:value="1" calcext:value-type="float">
            <text:p>1</text:p>
          </table:table-cell>
          <table:table-cell table:style-name="ce185" table:formula="of:=IFERROR(VLOOKUP([$Masterlist.$P52];[$Datasheet.$B$1:.$AV$9809];6;FALSE());&quot;-&quot;)" office:value-type="float" office:value="1" calcext:value-type="float">
            <text:p>1</text:p>
          </table:table-cell>
          <table:table-cell table:style-name="ce133" table:formula="of:=IFERROR(VLOOKUP([$Masterlist.$P52];[$Datasheet.$B$1:.$AV$9809];7;FALSE());&quot;-&quot;)" office:value-type="float" office:value="1" calcext:value-type="float">
            <text:p>1</text:p>
          </table:table-cell>
          <table:table-cell table:style-name="ce133" table:formula="of:=IFERROR(VLOOKUP([$Masterlist.$P52];[$Datasheet.$B$1:.$AV$9809];8;FALSE());&quot;-&quot;)" office:value-type="float" office:value="0" calcext:value-type="float">
            <text:p>0</text:p>
          </table:table-cell>
          <table:table-cell table:style-name="ce133" table:formula="of:=IFERROR(VLOOKUP([$Masterlist.$P52];[$Datasheet.$B$1:.$AV$9809];9;FALSE());&quot;-&quot;)" office:value-type="float" office:value="0" calcext:value-type="float">
            <text:p>0</text:p>
          </table:table-cell>
          <table:table-cell table:style-name="ce133" table:formula="of:=IFERROR(VLOOKUP([$Masterlist.$P52];[$Datasheet.$B$1:.$AV$9809];10;FALSE());&quot;-&quot;)" office:value-type="float" office:value="1" calcext:value-type="float">
            <text:p>1</text:p>
          </table:table-cell>
          <table:table-cell table:style-name="ce133" table:formula="of:=IFERROR(VLOOKUP([$Masterlist.$P52];[$Datasheet.$B$1:.$AV$9809];11;FALSE());&quot;-&quot;)" office:value-type="float" office:value="1" calcext:value-type="float">
            <text:p>1</text:p>
          </table:table-cell>
          <table:table-cell table:style-name="ce133" table:formula="of:=IFERROR(VLOOKUP([$Masterlist.$P52];[$Datasheet.$B$1:.$AV$9809];12;FALSE());&quot;-&quot;)" office:value-type="float" office:value="1" calcext:value-type="float">
            <text:p>1</text:p>
          </table:table-cell>
          <table:table-cell table:style-name="ce133" table:formula="of:=IFERROR(VLOOKUP([$Masterlist.$P52];[$Datasheet.$B$1:.$AV$9809];13;FALSE());&quot;-&quot;)" office:value-type="float" office:value="1" calcext:value-type="float">
            <text:p>1</text:p>
          </table:table-cell>
          <table:table-cell table:style-name="ce133" table:formula="of:=IFERROR(VLOOKUP([$Masterlist.$P52];[$Datasheet.$B$1:.$AV$9809];14;FALSE());&quot;-&quot;)" office:value-type="float" office:value="1" calcext:value-type="float">
            <text:p>1</text:p>
          </table:table-cell>
          <table:table-cell table:style-name="ce133" table:formula="of:=IFERROR(VLOOKUP([$Masterlist.$P52];[$Datasheet.$B$1:.$AV$9809];15;FALSE());&quot;-&quot;)" office:value-type="float" office:value="1" calcext:value-type="float">
            <text:p>1</text:p>
          </table:table-cell>
          <table:table-cell table:style-name="ce133" table:formula="of:=IFERROR(VLOOKUP([$Masterlist.$P52];[$Datasheet.$B$1:.$AV$9809];16;FALSE());&quot;-&quot;)" office:value-type="float" office:value="0" calcext:value-type="float">
            <text:p/>
          </table:table-cell>
          <table:table-cell table:style-name="ce133" table:formula="of:=IFERROR(VLOOKUP([$Masterlist.$P52];[$Datasheet.$B$1:.$AV$9809];17;FALSE());&quot;-&quot;)" office:value-type="float" office:value="0" calcext:value-type="float">
            <text:p/>
          </table:table-cell>
          <table:table-cell table:style-name="ce133" table:formula="of:=IFERROR(VLOOKUP([$Masterlist.$P52];[$Datasheet.$B$1:.$AV$9809];18;FALSE());&quot;-&quot;)" office:value-type="float" office:value="0" calcext:value-type="float">
            <text:p/>
          </table:table-cell>
          <table:table-cell table:style-name="ce133" table:formula="of:=IFERROR(VLOOKUP([$Masterlist.$P52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9"/>
          <table:table-cell table:style-name="ce52" office:value-type="string" calcext:value-type="string">
            <text:p>yes</text:p>
          </table:table-cell>
          <table:table-cell table:number-columns-repeated="2" table:style-name="ce50" office:value-type="string" calcext:value-type="string">
            <text:p>yes</text:p>
          </table:table-cell>
          <table:table-cell table:style-name="ce50" table:number-columns-repeated="9"/>
          <table:table-cell table:style-name="ce92" office:value-type="string" calcext:value-type="string">
            <text:p>Sound Runner</text:p>
          </table:table-cell>
          <table:table-cell table:style-name="ce8" office:value-type="string" calcext:value-type="string">
            <text:p>Johan Koekemoer</text:p>
          </table:table-cell>
          <table:table-cell table:style-name="ce13" table:formula="of:=IF(ISNUMBER(MATCH([.P53];[$Datasheet.$B$1:.$B$9809];0));&quot;✓&quot;;&quot;x&quot;)" office:value-type="string" office:string-value="✓" calcext:value-type="string">
            <text:p>✓</text:p>
          </table:table-cell>
          <table:table-cell table:style-name="ce133" table:formula="of:=IFERROR(VLOOKUP([$Masterlist.$P53];[$Datasheet.$B$1:.$AV$9809];2;FALSE());&quot;-&quot;)" office:value-type="float" office:value="0" calcext:value-type="float">
            <text:p>0</text:p>
          </table:table-cell>
          <table:table-cell table:style-name="ce133" table:formula="of:=IFERROR(VLOOKUP([$Masterlist.$P53];[$Datasheet.$B$1:.$AV$9809];3;FALSE());&quot;-&quot;)" office:value-type="float" office:value="1" calcext:value-type="float">
            <text:p>1</text:p>
          </table:table-cell>
          <table:table-cell table:style-name="ce133" table:formula="of:=IFERROR(VLOOKUP([$Masterlist.$P53];[$Datasheet.$B$1:.$AV$9809];4;FALSE());&quot;-&quot;)" office:value-type="float" office:value="1" calcext:value-type="float">
            <text:p>1</text:p>
          </table:table-cell>
          <table:table-cell table:style-name="ce133" table:formula="of:=IFERROR(VLOOKUP([$Masterlist.$P53];[$Datasheet.$B$1:.$AV$9809];5;FALSE());&quot;-&quot;)" office:value-type="float" office:value="0" calcext:value-type="float">
            <text:p>0</text:p>
          </table:table-cell>
          <table:table-cell table:style-name="ce185" table:formula="of:=IFERROR(VLOOKUP([$Masterlist.$P53];[$Datasheet.$B$1:.$AV$9809];6;FALSE());&quot;-&quot;)" office:value-type="float" office:value="1" calcext:value-type="float">
            <text:p>1</text:p>
          </table:table-cell>
          <table:table-cell table:style-name="ce133" table:formula="of:=IFERROR(VLOOKUP([$Masterlist.$P53];[$Datasheet.$B$1:.$AV$9809];7;FALSE());&quot;-&quot;)" office:value-type="float" office:value="1" calcext:value-type="float">
            <text:p>1</text:p>
          </table:table-cell>
          <table:table-cell table:style-name="ce133" table:formula="of:=IFERROR(VLOOKUP([$Masterlist.$P53];[$Datasheet.$B$1:.$AV$9809];8;FALSE());&quot;-&quot;)" office:value-type="float" office:value="0" calcext:value-type="float">
            <text:p>0</text:p>
          </table:table-cell>
          <table:table-cell table:style-name="ce133" table:formula="of:=IFERROR(VLOOKUP([$Masterlist.$P53];[$Datasheet.$B$1:.$AV$9809];9;FALSE());&quot;-&quot;)" office:value-type="float" office:value="1" calcext:value-type="float">
            <text:p>1</text:p>
          </table:table-cell>
          <table:table-cell table:style-name="ce133" table:formula="of:=IFERROR(VLOOKUP([$Masterlist.$P53];[$Datasheet.$B$1:.$AV$9809];10;FALSE());&quot;-&quot;)" office:value-type="float" office:value="0" calcext:value-type="float">
            <text:p>0</text:p>
          </table:table-cell>
          <table:table-cell table:style-name="ce133" table:formula="of:=IFERROR(VLOOKUP([$Masterlist.$P53];[$Datasheet.$B$1:.$AV$9809];11;FALSE());&quot;-&quot;)" office:value-type="float" office:value="0" calcext:value-type="float">
            <text:p>0</text:p>
          </table:table-cell>
          <table:table-cell table:style-name="ce133" table:formula="of:=IFERROR(VLOOKUP([$Masterlist.$P53];[$Datasheet.$B$1:.$AV$9809];12;FALSE());&quot;-&quot;)" office:value-type="float" office:value="0" calcext:value-type="float">
            <text:p>0</text:p>
          </table:table-cell>
          <table:table-cell table:style-name="ce133" table:formula="of:=IFERROR(VLOOKUP([$Masterlist.$P53];[$Datasheet.$B$1:.$AV$9809];13;FALSE());&quot;-&quot;)" office:value-type="float" office:value="1" calcext:value-type="float">
            <text:p>1</text:p>
          </table:table-cell>
          <table:table-cell table:style-name="ce133" table:formula="of:=IFERROR(VLOOKUP([$Masterlist.$P53];[$Datasheet.$B$1:.$AV$9809];14;FALSE());&quot;-&quot;)" office:value-type="float" office:value="1" calcext:value-type="float">
            <text:p>1</text:p>
          </table:table-cell>
          <table:table-cell table:style-name="ce133" table:formula="of:=IFERROR(VLOOKUP([$Masterlist.$P53];[$Datasheet.$B$1:.$AV$9809];15;FALSE());&quot;-&quot;)" office:value-type="float" office:value="0" calcext:value-type="float">
            <text:p>0</text:p>
          </table:table-cell>
          <table:table-cell table:style-name="ce133" table:formula="of:=IFERROR(VLOOKUP([$Masterlist.$P53];[$Datasheet.$B$1:.$AV$9809];16;FALSE());&quot;-&quot;)" office:value-type="float" office:value="0" calcext:value-type="float">
            <text:p/>
          </table:table-cell>
          <table:table-cell table:style-name="ce133" table:formula="of:=IFERROR(VLOOKUP([$Masterlist.$P53];[$Datasheet.$B$1:.$AV$9809];17;FALSE());&quot;-&quot;)" office:value-type="float" office:value="0" calcext:value-type="float">
            <text:p/>
          </table:table-cell>
          <table:table-cell table:style-name="ce133" table:formula="of:=IFERROR(VLOOKUP([$Masterlist.$P53];[$Datasheet.$B$1:.$AV$9809];18;FALSE());&quot;-&quot;)" office:value-type="float" office:value="0" calcext:value-type="float">
            <text:p/>
          </table:table-cell>
          <table:table-cell table:style-name="ce133" table:formula="of:=IFERROR(VLOOKUP([$Masterlist.$P53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9" office:value-type="string" calcext:value-type="string">
            <text:p>L</text:p>
          </table:table-cell>
          <table:table-cell table:number-columns-repeated="3" table:style-name="ce50" office:value-type="string" calcext:value-type="string">
            <text:p>yes</text:p>
          </table:table-cell>
          <table:table-cell table:style-name="ce50" table:number-columns-repeated="9"/>
          <table:table-cell table:style-name="ce92" office:value-type="string" calcext:value-type="string">
            <text:p>Sound Runner</text:p>
          </table:table-cell>
          <table:table-cell table:style-name="ce8" office:value-type="string" calcext:value-type="string">
            <text:p>Jan Bakker</text:p>
          </table:table-cell>
          <table:table-cell table:style-name="ce13" table:formula="of:=IF(ISNUMBER(MATCH([.P54];[$Datasheet.$B$1:.$B$9809];0));&quot;✓&quot;;&quot;x&quot;)" office:value-type="string" office:string-value="✓" calcext:value-type="string">
            <text:p>✓</text:p>
          </table:table-cell>
          <table:table-cell table:style-name="ce133" table:formula="of:=IFERROR(VLOOKUP([$Masterlist.$P54];[$Datasheet.$B$1:.$AV$9809];2;FALSE());&quot;-&quot;)" office:value-type="float" office:value="0" calcext:value-type="float">
            <text:p>0</text:p>
          </table:table-cell>
          <table:table-cell table:style-name="ce133" table:formula="of:=IFERROR(VLOOKUP([$Masterlist.$P54];[$Datasheet.$B$1:.$AV$9809];3;FALSE());&quot;-&quot;)" office:value-type="float" office:value="1" calcext:value-type="float">
            <text:p>1</text:p>
          </table:table-cell>
          <table:table-cell table:style-name="ce133" table:formula="of:=IFERROR(VLOOKUP([$Masterlist.$P54];[$Datasheet.$B$1:.$AV$9809];4;FALSE());&quot;-&quot;)" office:value-type="float" office:value="1" calcext:value-type="float">
            <text:p>1</text:p>
          </table:table-cell>
          <table:table-cell table:style-name="ce133" table:formula="of:=IFERROR(VLOOKUP([$Masterlist.$P54];[$Datasheet.$B$1:.$AV$9809];5;FALSE());&quot;-&quot;)" office:value-type="float" office:value="0" calcext:value-type="float">
            <text:p>0</text:p>
          </table:table-cell>
          <table:table-cell table:style-name="ce185" table:formula="of:=IFERROR(VLOOKUP([$Masterlist.$P54];[$Datasheet.$B$1:.$AV$9809];6;FALSE());&quot;-&quot;)" office:value-type="float" office:value="0" calcext:value-type="float">
            <text:p>0</text:p>
          </table:table-cell>
          <table:table-cell table:style-name="ce133" table:formula="of:=IFERROR(VLOOKUP([$Masterlist.$P54];[$Datasheet.$B$1:.$AV$9809];7;FALSE());&quot;-&quot;)" office:value-type="float" office:value="1" calcext:value-type="float">
            <text:p>1</text:p>
          </table:table-cell>
          <table:table-cell table:style-name="ce133" table:formula="of:=IFERROR(VLOOKUP([$Masterlist.$P54];[$Datasheet.$B$1:.$AV$9809];8;FALSE());&quot;-&quot;)" office:value-type="float" office:value="1" calcext:value-type="float">
            <text:p>1</text:p>
          </table:table-cell>
          <table:table-cell table:style-name="ce133" table:formula="of:=IFERROR(VLOOKUP([$Masterlist.$P54];[$Datasheet.$B$1:.$AV$9809];9;FALSE());&quot;-&quot;)" office:value-type="float" office:value="0" calcext:value-type="float">
            <text:p>0</text:p>
          </table:table-cell>
          <table:table-cell table:style-name="ce133" table:formula="of:=IFERROR(VLOOKUP([$Masterlist.$P54];[$Datasheet.$B$1:.$AV$9809];10;FALSE());&quot;-&quot;)" office:value-type="float" office:value="0" calcext:value-type="float">
            <text:p>0</text:p>
          </table:table-cell>
          <table:table-cell table:style-name="ce133" table:formula="of:=IFERROR(VLOOKUP([$Masterlist.$P54];[$Datasheet.$B$1:.$AV$9809];11;FALSE());&quot;-&quot;)" office:value-type="float" office:value="1" calcext:value-type="float">
            <text:p>1</text:p>
          </table:table-cell>
          <table:table-cell table:style-name="ce133" table:formula="of:=IFERROR(VLOOKUP([$Masterlist.$P54];[$Datasheet.$B$1:.$AV$9809];12;FALSE());&quot;-&quot;)" office:value-type="float" office:value="0" calcext:value-type="float">
            <text:p>0</text:p>
          </table:table-cell>
          <table:table-cell table:style-name="ce133" table:formula="of:=IFERROR(VLOOKUP([$Masterlist.$P54];[$Datasheet.$B$1:.$AV$9809];13;FALSE());&quot;-&quot;)" office:value-type="float" office:value="1" calcext:value-type="float">
            <text:p>1</text:p>
          </table:table-cell>
          <table:table-cell table:style-name="ce133" table:formula="of:=IFERROR(VLOOKUP([$Masterlist.$P54];[$Datasheet.$B$1:.$AV$9809];14;FALSE());&quot;-&quot;)" office:value-type="float" office:value="0" calcext:value-type="float">
            <text:p>0</text:p>
          </table:table-cell>
          <table:table-cell table:style-name="ce133" table:formula="of:=IFERROR(VLOOKUP([$Masterlist.$P54];[$Datasheet.$B$1:.$AV$9809];15;FALSE());&quot;-&quot;)" office:value-type="float" office:value="0" calcext:value-type="float">
            <text:p>0</text:p>
          </table:table-cell>
          <table:table-cell table:style-name="ce133" table:formula="of:=IFERROR(VLOOKUP([$Masterlist.$P54];[$Datasheet.$B$1:.$AV$9809];16;FALSE());&quot;-&quot;)" office:value-type="float" office:value="0" calcext:value-type="float">
            <text:p/>
          </table:table-cell>
          <table:table-cell table:style-name="ce133" table:formula="of:=IFERROR(VLOOKUP([$Masterlist.$P54];[$Datasheet.$B$1:.$AV$9809];17;FALSE());&quot;-&quot;)" office:value-type="float" office:value="0" calcext:value-type="float">
            <text:p/>
          </table:table-cell>
          <table:table-cell table:style-name="ce133" table:formula="of:=IFERROR(VLOOKUP([$Masterlist.$P54];[$Datasheet.$B$1:.$AV$9809];18;FALSE());&quot;-&quot;)" office:value-type="float" office:value="0" calcext:value-type="float">
            <text:p/>
          </table:table-cell>
          <table:table-cell table:style-name="ce133" table:formula="of:=IFERROR(VLOOKUP([$Masterlist.$P54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9"/>
          <table:table-cell table:number-columns-repeated="3" table:style-name="ce50" office:value-type="string" calcext:value-type="string">
            <text:p>yes</text:p>
          </table:table-cell>
          <table:table-cell table:style-name="ce50" table:number-columns-repeated="9"/>
          <table:table-cell table:style-name="ce92" office:value-type="string" calcext:value-type="string">
            <text:p>Sound Runner</text:p>
          </table:table-cell>
          <table:table-cell table:style-name="ce8" office:value-type="string" calcext:value-type="string">
            <text:p>Rossouw Venter</text:p>
          </table:table-cell>
          <table:table-cell table:style-name="ce13" table:formula="of:=IF(ISNUMBER(MATCH([.P55];[$Datasheet.$B$1:.$B$9809];0));&quot;✓&quot;;&quot;x&quot;)" office:value-type="string" office:string-value="✓" calcext:value-type="string">
            <text:p>✓</text:p>
          </table:table-cell>
          <table:table-cell table:style-name="ce133" table:formula="of:=IFERROR(VLOOKUP([$Masterlist.$P55];[$Datasheet.$B$1:.$AV$9809];2;FALSE());&quot;-&quot;)" office:value-type="float" office:value="0" calcext:value-type="float">
            <text:p>0</text:p>
          </table:table-cell>
          <table:table-cell table:style-name="ce133" table:formula="of:=IFERROR(VLOOKUP([$Masterlist.$P55];[$Datasheet.$B$1:.$AV$9809];3;FALSE());&quot;-&quot;)" office:value-type="float" office:value="1" calcext:value-type="float">
            <text:p>1</text:p>
          </table:table-cell>
          <table:table-cell table:style-name="ce133" table:formula="of:=IFERROR(VLOOKUP([$Masterlist.$P55];[$Datasheet.$B$1:.$AV$9809];4;FALSE());&quot;-&quot;)" office:value-type="float" office:value="0" calcext:value-type="float">
            <text:p>0</text:p>
          </table:table-cell>
          <table:table-cell table:style-name="ce133" table:formula="of:=IFERROR(VLOOKUP([$Masterlist.$P55];[$Datasheet.$B$1:.$AV$9809];5;FALSE());&quot;-&quot;)" office:value-type="float" office:value="0" calcext:value-type="float">
            <text:p>0</text:p>
          </table:table-cell>
          <table:table-cell table:style-name="ce185" table:formula="of:=IFERROR(VLOOKUP([$Masterlist.$P55];[$Datasheet.$B$1:.$AV$9809];6;FALSE());&quot;-&quot;)" office:value-type="float" office:value="0" calcext:value-type="float">
            <text:p>0</text:p>
          </table:table-cell>
          <table:table-cell table:style-name="ce133" table:formula="of:=IFERROR(VLOOKUP([$Masterlist.$P55];[$Datasheet.$B$1:.$AV$9809];7;FALSE());&quot;-&quot;)" office:value-type="float" office:value="0" calcext:value-type="float">
            <text:p>0</text:p>
          </table:table-cell>
          <table:table-cell table:style-name="ce133" table:formula="of:=IFERROR(VLOOKUP([$Masterlist.$P55];[$Datasheet.$B$1:.$AV$9809];8;FALSE());&quot;-&quot;)" office:value-type="float" office:value="1" calcext:value-type="float">
            <text:p>1</text:p>
          </table:table-cell>
          <table:table-cell table:style-name="ce133" table:formula="of:=IFERROR(VLOOKUP([$Masterlist.$P55];[$Datasheet.$B$1:.$AV$9809];9;FALSE());&quot;-&quot;)" office:value-type="float" office:value="1" calcext:value-type="float">
            <text:p>1</text:p>
          </table:table-cell>
          <table:table-cell table:style-name="ce133" table:formula="of:=IFERROR(VLOOKUP([$Masterlist.$P55];[$Datasheet.$B$1:.$AV$9809];10;FALSE());&quot;-&quot;)" office:value-type="float" office:value="0" calcext:value-type="float">
            <text:p>0</text:p>
          </table:table-cell>
          <table:table-cell table:style-name="ce133" table:formula="of:=IFERROR(VLOOKUP([$Masterlist.$P55];[$Datasheet.$B$1:.$AV$9809];11;FALSE());&quot;-&quot;)" office:value-type="float" office:value="1" calcext:value-type="float">
            <text:p>1</text:p>
          </table:table-cell>
          <table:table-cell table:style-name="ce133" table:formula="of:=IFERROR(VLOOKUP([$Masterlist.$P55];[$Datasheet.$B$1:.$AV$9809];12;FALSE());&quot;-&quot;)" office:value-type="float" office:value="0" calcext:value-type="float">
            <text:p>0</text:p>
          </table:table-cell>
          <table:table-cell table:style-name="ce133" table:formula="of:=IFERROR(VLOOKUP([$Masterlist.$P55];[$Datasheet.$B$1:.$AV$9809];13;FALSE());&quot;-&quot;)" office:value-type="float" office:value="1" calcext:value-type="float">
            <text:p>1</text:p>
          </table:table-cell>
          <table:table-cell table:style-name="ce133" table:formula="of:=IFERROR(VLOOKUP([$Masterlist.$P55];[$Datasheet.$B$1:.$AV$9809];14;FALSE());&quot;-&quot;)" office:value-type="float" office:value="1" calcext:value-type="float">
            <text:p>1</text:p>
          </table:table-cell>
          <table:table-cell table:style-name="ce133" table:formula="of:=IFERROR(VLOOKUP([$Masterlist.$P55];[$Datasheet.$B$1:.$AV$9809];15;FALSE());&quot;-&quot;)" office:value-type="float" office:value="1" calcext:value-type="float">
            <text:p>1</text:p>
          </table:table-cell>
          <table:table-cell table:style-name="ce133" table:formula="of:=IFERROR(VLOOKUP([$Masterlist.$P55];[$Datasheet.$B$1:.$AV$9809];16;FALSE());&quot;-&quot;)" office:value-type="float" office:value="0" calcext:value-type="float">
            <text:p/>
          </table:table-cell>
          <table:table-cell table:style-name="ce133" table:formula="of:=IFERROR(VLOOKUP([$Masterlist.$P55];[$Datasheet.$B$1:.$AV$9809];17;FALSE());&quot;-&quot;)" office:value-type="float" office:value="0" calcext:value-type="float">
            <text:p/>
          </table:table-cell>
          <table:table-cell table:style-name="ce133" table:formula="of:=IFERROR(VLOOKUP([$Masterlist.$P55];[$Datasheet.$B$1:.$AV$9809];18;FALSE());&quot;-&quot;)" office:value-type="float" office:value="0" calcext:value-type="float">
            <text:p/>
          </table:table-cell>
          <table:table-cell table:style-name="ce133" table:formula="of:=IFERROR(VLOOKUP([$Masterlist.$P55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9"/>
          <table:table-cell table:number-columns-repeated="3" table:style-name="ce50" office:value-type="string" calcext:value-type="string">
            <text:p>yes</text:p>
          </table:table-cell>
          <table:table-cell table:style-name="ce50" table:number-columns-repeated="9"/>
          <table:table-cell table:style-name="ce92" office:value-type="string" calcext:value-type="string">
            <text:p>Sound Runner</text:p>
          </table:table-cell>
          <table:table-cell table:style-name="ce8" office:value-type="string" calcext:value-type="string">
            <text:p>Elbert Smith</text:p>
          </table:table-cell>
          <table:table-cell table:style-name="ce13" table:formula="of:=IF(ISNUMBER(MATCH([.P56];[$Datasheet.$B$1:.$B$9809];0));&quot;✓&quot;;&quot;x&quot;)" office:value-type="string" office:string-value="✓" calcext:value-type="string">
            <text:p>✓</text:p>
          </table:table-cell>
          <table:table-cell table:style-name="ce133" table:formula="of:=IFERROR(VLOOKUP([$Masterlist.$P56];[$Datasheet.$B$1:.$AV$9809];2;FALSE());&quot;-&quot;)" office:value-type="float" office:value="0" calcext:value-type="float">
            <text:p>0</text:p>
          </table:table-cell>
          <table:table-cell table:style-name="ce133" table:formula="of:=IFERROR(VLOOKUP([$Masterlist.$P56];[$Datasheet.$B$1:.$AV$9809];3;FALSE());&quot;-&quot;)" office:value-type="float" office:value="1" calcext:value-type="float">
            <text:p>1</text:p>
          </table:table-cell>
          <table:table-cell table:style-name="ce133" table:formula="of:=IFERROR(VLOOKUP([$Masterlist.$P56];[$Datasheet.$B$1:.$AV$9809];4;FALSE());&quot;-&quot;)" office:value-type="float" office:value="0" calcext:value-type="float">
            <text:p>0</text:p>
          </table:table-cell>
          <table:table-cell table:style-name="ce133" table:formula="of:=IFERROR(VLOOKUP([$Masterlist.$P56];[$Datasheet.$B$1:.$AV$9809];5;FALSE());&quot;-&quot;)" office:value-type="float" office:value="1" calcext:value-type="float">
            <text:p>1</text:p>
          </table:table-cell>
          <table:table-cell table:style-name="ce185" table:formula="of:=IFERROR(VLOOKUP([$Masterlist.$P56];[$Datasheet.$B$1:.$AV$9809];6;FALSE());&quot;-&quot;)" office:value-type="float" office:value="0" calcext:value-type="float">
            <text:p>0</text:p>
          </table:table-cell>
          <table:table-cell table:style-name="ce133" table:formula="of:=IFERROR(VLOOKUP([$Masterlist.$P56];[$Datasheet.$B$1:.$AV$9809];7;FALSE());&quot;-&quot;)" office:value-type="float" office:value="1" calcext:value-type="float">
            <text:p>1</text:p>
          </table:table-cell>
          <table:table-cell table:style-name="ce133" table:formula="of:=IFERROR(VLOOKUP([$Masterlist.$P56];[$Datasheet.$B$1:.$AV$9809];8;FALSE());&quot;-&quot;)" office:value-type="float" office:value="0" calcext:value-type="float">
            <text:p>0</text:p>
          </table:table-cell>
          <table:table-cell table:style-name="ce133" table:formula="of:=IFERROR(VLOOKUP([$Masterlist.$P56];[$Datasheet.$B$1:.$AV$9809];9;FALSE());&quot;-&quot;)" office:value-type="float" office:value="1" calcext:value-type="float">
            <text:p>1</text:p>
          </table:table-cell>
          <table:table-cell table:style-name="ce133" table:formula="of:=IFERROR(VLOOKUP([$Masterlist.$P56];[$Datasheet.$B$1:.$AV$9809];10;FALSE());&quot;-&quot;)" office:value-type="float" office:value="0" calcext:value-type="float">
            <text:p>0</text:p>
          </table:table-cell>
          <table:table-cell table:style-name="ce133" table:formula="of:=IFERROR(VLOOKUP([$Masterlist.$P56];[$Datasheet.$B$1:.$AV$9809];11;FALSE());&quot;-&quot;)" office:value-type="float" office:value="1" calcext:value-type="float">
            <text:p>1</text:p>
          </table:table-cell>
          <table:table-cell table:style-name="ce133" table:formula="of:=IFERROR(VLOOKUP([$Masterlist.$P56];[$Datasheet.$B$1:.$AV$9809];12;FALSE());&quot;-&quot;)" office:value-type="float" office:value="0" calcext:value-type="float">
            <text:p>0</text:p>
          </table:table-cell>
          <table:table-cell table:style-name="ce133" table:formula="of:=IFERROR(VLOOKUP([$Masterlist.$P56];[$Datasheet.$B$1:.$AV$9809];13;FALSE());&quot;-&quot;)" office:value-type="float" office:value="1" calcext:value-type="float">
            <text:p>1</text:p>
          </table:table-cell>
          <table:table-cell table:style-name="ce133" table:formula="of:=IFERROR(VLOOKUP([$Masterlist.$P56];[$Datasheet.$B$1:.$AV$9809];14;FALSE());&quot;-&quot;)" office:value-type="float" office:value="0" calcext:value-type="float">
            <text:p>0</text:p>
          </table:table-cell>
          <table:table-cell table:style-name="ce133" table:formula="of:=IFERROR(VLOOKUP([$Masterlist.$P56];[$Datasheet.$B$1:.$AV$9809];15;FALSE());&quot;-&quot;)" office:value-type="float" office:value="1" calcext:value-type="float">
            <text:p>1</text:p>
          </table:table-cell>
          <table:table-cell table:style-name="ce133" table:formula="of:=IFERROR(VLOOKUP([$Masterlist.$P56];[$Datasheet.$B$1:.$AV$9809];16;FALSE());&quot;-&quot;)" office:value-type="float" office:value="0" calcext:value-type="float">
            <text:p/>
          </table:table-cell>
          <table:table-cell table:style-name="ce133" table:formula="of:=IFERROR(VLOOKUP([$Masterlist.$P56];[$Datasheet.$B$1:.$AV$9809];17;FALSE());&quot;-&quot;)" office:value-type="float" office:value="0" calcext:value-type="float">
            <text:p/>
          </table:table-cell>
          <table:table-cell table:style-name="ce133" table:formula="of:=IFERROR(VLOOKUP([$Masterlist.$P56];[$Datasheet.$B$1:.$AV$9809];18;FALSE());&quot;-&quot;)" office:value-type="float" office:value="0" calcext:value-type="float">
            <text:p/>
          </table:table-cell>
          <table:table-cell table:style-name="ce133" table:formula="of:=IFERROR(VLOOKUP([$Masterlist.$P56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9"/>
          <table:table-cell table:number-columns-repeated="3" table:style-name="ce50" office:value-type="string" calcext:value-type="string">
            <text:p>yes</text:p>
          </table:table-cell>
          <table:table-cell table:style-name="ce50" table:number-columns-repeated="9"/>
          <table:table-cell table:style-name="ce92" office:value-type="string" calcext:value-type="string">
            <text:p>Sound Runner</text:p>
          </table:table-cell>
          <table:table-cell table:style-name="ce8" office:value-type="string" calcext:value-type="string">
            <text:p>Anrich kruger</text:p>
          </table:table-cell>
          <table:table-cell table:style-name="ce13" table:formula="of:=IF(ISNUMBER(MATCH([.P57];[$Datasheet.$B$1:.$B$9809];0));&quot;✓&quot;;&quot;x&quot;)" office:value-type="string" office:string-value="✓" calcext:value-type="string">
            <text:p>✓</text:p>
          </table:table-cell>
          <table:table-cell table:style-name="ce133" table:formula="of:=IFERROR(VLOOKUP([$Masterlist.$P57];[$Datasheet.$B$1:.$AV$9809];2;FALSE());&quot;-&quot;)" office:value-type="float" office:value="1" calcext:value-type="float">
            <text:p>1</text:p>
          </table:table-cell>
          <table:table-cell table:style-name="ce133" table:formula="of:=IFERROR(VLOOKUP([$Masterlist.$P57];[$Datasheet.$B$1:.$AV$9809];3;FALSE());&quot;-&quot;)" office:value-type="float" office:value="1" calcext:value-type="float">
            <text:p>1</text:p>
          </table:table-cell>
          <table:table-cell table:style-name="ce133" table:formula="of:=IFERROR(VLOOKUP([$Masterlist.$P57];[$Datasheet.$B$1:.$AV$9809];4;FALSE());&quot;-&quot;)" office:value-type="float" office:value="1" calcext:value-type="float">
            <text:p>1</text:p>
          </table:table-cell>
          <table:table-cell table:style-name="ce133" table:formula="of:=IFERROR(VLOOKUP([$Masterlist.$P57];[$Datasheet.$B$1:.$AV$9809];5;FALSE());&quot;-&quot;)" office:value-type="float" office:value="1" calcext:value-type="float">
            <text:p>1</text:p>
          </table:table-cell>
          <table:table-cell table:style-name="ce185" table:formula="of:=IFERROR(VLOOKUP([$Masterlist.$P57];[$Datasheet.$B$1:.$AV$9809];6;FALSE());&quot;-&quot;)" office:value-type="float" office:value="0" calcext:value-type="float">
            <text:p>0</text:p>
          </table:table-cell>
          <table:table-cell table:style-name="ce133" table:formula="of:=IFERROR(VLOOKUP([$Masterlist.$P57];[$Datasheet.$B$1:.$AV$9809];7;FALSE());&quot;-&quot;)" office:value-type="float" office:value="0" calcext:value-type="float">
            <text:p>0</text:p>
          </table:table-cell>
          <table:table-cell table:style-name="ce133" table:formula="of:=IFERROR(VLOOKUP([$Masterlist.$P57];[$Datasheet.$B$1:.$AV$9809];8;FALSE());&quot;-&quot;)" office:value-type="float" office:value="0" calcext:value-type="float">
            <text:p>0</text:p>
          </table:table-cell>
          <table:table-cell table:style-name="ce133" table:formula="of:=IFERROR(VLOOKUP([$Masterlist.$P57];[$Datasheet.$B$1:.$AV$9809];9;FALSE());&quot;-&quot;)" office:value-type="float" office:value="0" calcext:value-type="float">
            <text:p>0</text:p>
          </table:table-cell>
          <table:table-cell table:style-name="ce133" table:formula="of:=IFERROR(VLOOKUP([$Masterlist.$P57];[$Datasheet.$B$1:.$AV$9809];10;FALSE());&quot;-&quot;)" office:value-type="float" office:value="1" calcext:value-type="float">
            <text:p>1</text:p>
          </table:table-cell>
          <table:table-cell table:style-name="ce133" table:formula="of:=IFERROR(VLOOKUP([$Masterlist.$P57];[$Datasheet.$B$1:.$AV$9809];11;FALSE());&quot;-&quot;)" office:value-type="float" office:value="1" calcext:value-type="float">
            <text:p>1</text:p>
          </table:table-cell>
          <table:table-cell table:style-name="ce133" table:formula="of:=IFERROR(VLOOKUP([$Masterlist.$P57];[$Datasheet.$B$1:.$AV$9809];12;FALSE());&quot;-&quot;)" office:value-type="float" office:value="0" calcext:value-type="float">
            <text:p>0</text:p>
          </table:table-cell>
          <table:table-cell table:style-name="ce133" table:formula="of:=IFERROR(VLOOKUP([$Masterlist.$P57];[$Datasheet.$B$1:.$AV$9809];13;FALSE());&quot;-&quot;)" office:value-type="float" office:value="0" calcext:value-type="float">
            <text:p>0</text:p>
          </table:table-cell>
          <table:table-cell table:style-name="ce133" table:formula="of:=IFERROR(VLOOKUP([$Masterlist.$P57];[$Datasheet.$B$1:.$AV$9809];14;FALSE());&quot;-&quot;)" office:value-type="float" office:value="0" calcext:value-type="float">
            <text:p>0</text:p>
          </table:table-cell>
          <table:table-cell table:style-name="ce133" table:formula="of:=IFERROR(VLOOKUP([$Masterlist.$P57];[$Datasheet.$B$1:.$AV$9809];15;FALSE());&quot;-&quot;)" office:value-type="float" office:value="0" calcext:value-type="float">
            <text:p>0</text:p>
          </table:table-cell>
          <table:table-cell table:style-name="ce133" table:formula="of:=IFERROR(VLOOKUP([$Masterlist.$P57];[$Datasheet.$B$1:.$AV$9809];16;FALSE());&quot;-&quot;)" office:value-type="float" office:value="0" calcext:value-type="float">
            <text:p/>
          </table:table-cell>
          <table:table-cell table:style-name="ce133" table:formula="of:=IFERROR(VLOOKUP([$Masterlist.$P57];[$Datasheet.$B$1:.$AV$9809];17;FALSE());&quot;-&quot;)" office:value-type="float" office:value="0" calcext:value-type="float">
            <text:p/>
          </table:table-cell>
          <table:table-cell table:style-name="ce133" table:formula="of:=IFERROR(VLOOKUP([$Masterlist.$P57];[$Datasheet.$B$1:.$AV$9809];18;FALSE());&quot;-&quot;)" office:value-type="float" office:value="0" calcext:value-type="float">
            <text:p/>
          </table:table-cell>
          <table:table-cell table:style-name="ce133" table:formula="of:=IFERROR(VLOOKUP([$Masterlist.$P57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9"/>
          <table:table-cell table:number-columns-repeated="3" table:style-name="ce50" office:value-type="string" calcext:value-type="string">
            <text:p>yes</text:p>
          </table:table-cell>
          <table:table-cell table:style-name="ce50" table:number-columns-repeated="9"/>
          <table:table-cell table:style-name="ce92" office:value-type="string" calcext:value-type="string">
            <text:p>Sound Runner</text:p>
          </table:table-cell>
          <table:table-cell table:style-name="ce8" office:value-type="string" calcext:value-type="string">
            <text:p>Magnus Koola</text:p>
          </table:table-cell>
          <table:table-cell table:style-name="ce13" table:formula="of:=IF(ISNUMBER(MATCH([.P58];[$Datasheet.$B$1:.$B$9809];0));&quot;✓&quot;;&quot;x&quot;)" office:value-type="string" office:string-value="✓" calcext:value-type="string">
            <text:p>✓</text:p>
          </table:table-cell>
          <table:table-cell table:style-name="ce133" table:formula="of:=IFERROR(VLOOKUP([$Masterlist.$P58];[$Datasheet.$B$1:.$AV$9809];2;FALSE());&quot;-&quot;)" office:value-type="float" office:value="1" calcext:value-type="float">
            <text:p>1</text:p>
          </table:table-cell>
          <table:table-cell table:style-name="ce133" table:formula="of:=IFERROR(VLOOKUP([$Masterlist.$P58];[$Datasheet.$B$1:.$AV$9809];3;FALSE());&quot;-&quot;)" office:value-type="float" office:value="1" calcext:value-type="float">
            <text:p>1</text:p>
          </table:table-cell>
          <table:table-cell table:style-name="ce133" table:formula="of:=IFERROR(VLOOKUP([$Masterlist.$P58];[$Datasheet.$B$1:.$AV$9809];4;FALSE());&quot;-&quot;)" office:value-type="float" office:value="1" calcext:value-type="float">
            <text:p>1</text:p>
          </table:table-cell>
          <table:table-cell table:style-name="ce133" table:formula="of:=IFERROR(VLOOKUP([$Masterlist.$P58];[$Datasheet.$B$1:.$AV$9809];5;FALSE());&quot;-&quot;)" office:value-type="float" office:value="1" calcext:value-type="float">
            <text:p>1</text:p>
          </table:table-cell>
          <table:table-cell table:style-name="ce185" table:formula="of:=IFERROR(VLOOKUP([$Masterlist.$P58];[$Datasheet.$B$1:.$AV$9809];6;FALSE());&quot;-&quot;)" office:value-type="float" office:value="1" calcext:value-type="float">
            <text:p>1</text:p>
          </table:table-cell>
          <table:table-cell table:style-name="ce133" table:formula="of:=IFERROR(VLOOKUP([$Masterlist.$P58];[$Datasheet.$B$1:.$AV$9809];7;FALSE());&quot;-&quot;)" office:value-type="float" office:value="1" calcext:value-type="float">
            <text:p>1</text:p>
          </table:table-cell>
          <table:table-cell table:style-name="ce133" table:formula="of:=IFERROR(VLOOKUP([$Masterlist.$P58];[$Datasheet.$B$1:.$AV$9809];8;FALSE());&quot;-&quot;)" office:value-type="float" office:value="1" calcext:value-type="float">
            <text:p>1</text:p>
          </table:table-cell>
          <table:table-cell table:style-name="ce133" table:formula="of:=IFERROR(VLOOKUP([$Masterlist.$P58];[$Datasheet.$B$1:.$AV$9809];9;FALSE());&quot;-&quot;)" office:value-type="float" office:value="1" calcext:value-type="float">
            <text:p>1</text:p>
          </table:table-cell>
          <table:table-cell table:style-name="ce133" table:formula="of:=IFERROR(VLOOKUP([$Masterlist.$P58];[$Datasheet.$B$1:.$AV$9809];10;FALSE());&quot;-&quot;)" office:value-type="float" office:value="1" calcext:value-type="float">
            <text:p>1</text:p>
          </table:table-cell>
          <table:table-cell table:style-name="ce133" table:formula="of:=IFERROR(VLOOKUP([$Masterlist.$P58];[$Datasheet.$B$1:.$AV$9809];11;FALSE());&quot;-&quot;)" office:value-type="float" office:value="1" calcext:value-type="float">
            <text:p>1</text:p>
          </table:table-cell>
          <table:table-cell table:style-name="ce133" table:formula="of:=IFERROR(VLOOKUP([$Masterlist.$P58];[$Datasheet.$B$1:.$AV$9809];12;FALSE());&quot;-&quot;)" office:value-type="float" office:value="1" calcext:value-type="float">
            <text:p>1</text:p>
          </table:table-cell>
          <table:table-cell table:style-name="ce133" table:formula="of:=IFERROR(VLOOKUP([$Masterlist.$P58];[$Datasheet.$B$1:.$AV$9809];13;FALSE());&quot;-&quot;)" office:value-type="float" office:value="1" calcext:value-type="float">
            <text:p>1</text:p>
          </table:table-cell>
          <table:table-cell table:style-name="ce133" table:formula="of:=IFERROR(VLOOKUP([$Masterlist.$P58];[$Datasheet.$B$1:.$AV$9809];14;FALSE());&quot;-&quot;)" office:value-type="float" office:value="1" calcext:value-type="float">
            <text:p>1</text:p>
          </table:table-cell>
          <table:table-cell table:style-name="ce133" table:formula="of:=IFERROR(VLOOKUP([$Masterlist.$P58];[$Datasheet.$B$1:.$AV$9809];15;FALSE());&quot;-&quot;)" office:value-type="float" office:value="1" calcext:value-type="float">
            <text:p>1</text:p>
          </table:table-cell>
          <table:table-cell table:style-name="ce133" table:formula="of:=IFERROR(VLOOKUP([$Masterlist.$P58];[$Datasheet.$B$1:.$AV$9809];16;FALSE());&quot;-&quot;)" office:value-type="float" office:value="0" calcext:value-type="float">
            <text:p/>
          </table:table-cell>
          <table:table-cell table:style-name="ce133" table:formula="of:=IFERROR(VLOOKUP([$Masterlist.$P58];[$Datasheet.$B$1:.$AV$9809];17;FALSE());&quot;-&quot;)" office:value-type="float" office:value="0" calcext:value-type="float">
            <text:p/>
          </table:table-cell>
          <table:table-cell table:style-name="ce133" table:formula="of:=IFERROR(VLOOKUP([$Masterlist.$P58];[$Datasheet.$B$1:.$AV$9809];18;FALSE());&quot;-&quot;)" office:value-type="float" office:value="0" calcext:value-type="float">
            <text:p/>
          </table:table-cell>
          <table:table-cell table:style-name="ce133" table:formula="of:=IFERROR(VLOOKUP([$Masterlist.$P58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9" office:value-type="string" calcext:value-type="string">
            <text:p>M</text:p>
          </table:table-cell>
          <table:table-cell table:style-name="ce50" table:number-columns-repeated="4"/>
          <table:table-cell table:style-name="ce50" office:value-type="string" calcext:value-type="string">
            <text:p>yes</text:p>
          </table:table-cell>
          <table:table-cell table:style-name="ce50" table:number-columns-repeated="7"/>
          <table:table-cell table:style-name="ce92" office:value-type="string" calcext:value-type="string">
            <text:p>FOH Sound / Director</text:p>
          </table:table-cell>
          <table:table-cell table:style-name="ce8" office:value-type="string" calcext:value-type="string">
            <office:annotation draw:style-name="gr4" draw:text-style-name="P1" svg:width="8.388cm" svg:height="1.348cm" svg:x="37.038cm" svg:y="32.65cm" draw:caption-point-x="-0.407cm" draw:caption-point-y="-0.758cm">
              <dc:creator>Unknown Author</dc:creator>
              <dc:date>2026-05-18T20:20:00</dc:date>
              <text:p>Dané Robertse:</text:p>
              <text:p>Sound Engineer Potch</text:p>
            </office:annotation>
            <text:p>Janco Weyers</text:p>
          </table:table-cell>
          <table:table-cell table:style-name="ce13" table:formula="of:=IF(ISNUMBER(MATCH([.P59];[$Datasheet.$B$1:.$B$9809];0));&quot;✓&quot;;&quot;x&quot;)" office:value-type="string" office:string-value="✓" calcext:value-type="string">
            <text:p>✓</text:p>
          </table:table-cell>
          <table:table-cell table:style-name="ce133" table:formula="of:=IFERROR(VLOOKUP([$Masterlist.$P59];[$Datasheet.$B$1:.$AV$9809];2;FALSE());&quot;-&quot;)" office:value-type="float" office:value="1" calcext:value-type="float">
            <text:p>1</text:p>
          </table:table-cell>
          <table:table-cell table:style-name="ce133" table:formula="of:=IFERROR(VLOOKUP([$Masterlist.$P59];[$Datasheet.$B$1:.$AV$9809];3;FALSE());&quot;-&quot;)" office:value-type="float" office:value="1" calcext:value-type="float">
            <text:p>1</text:p>
          </table:table-cell>
          <table:table-cell table:style-name="ce133" table:formula="of:=IFERROR(VLOOKUP([$Masterlist.$P59];[$Datasheet.$B$1:.$AV$9809];4;FALSE());&quot;-&quot;)" office:value-type="float" office:value="1" calcext:value-type="float">
            <text:p>1</text:p>
          </table:table-cell>
          <table:table-cell table:style-name="ce133" table:formula="of:=IFERROR(VLOOKUP([$Masterlist.$P59];[$Datasheet.$B$1:.$AV$9809];5;FALSE());&quot;-&quot;)" office:value-type="float" office:value="1" calcext:value-type="float">
            <text:p>1</text:p>
          </table:table-cell>
          <table:table-cell table:style-name="ce185" table:formula="of:=IFERROR(VLOOKUP([$Masterlist.$P59];[$Datasheet.$B$1:.$AV$9809];6;FALSE());&quot;-&quot;)" office:value-type="float" office:value="1" calcext:value-type="float">
            <text:p>1</text:p>
          </table:table-cell>
          <table:table-cell table:style-name="ce133" table:formula="of:=IFERROR(VLOOKUP([$Masterlist.$P59];[$Datasheet.$B$1:.$AV$9809];7;FALSE());&quot;-&quot;)" office:value-type="float" office:value="1" calcext:value-type="float">
            <text:p>1</text:p>
          </table:table-cell>
          <table:table-cell table:style-name="ce133" table:formula="of:=IFERROR(VLOOKUP([$Masterlist.$P59];[$Datasheet.$B$1:.$AV$9809];8;FALSE());&quot;-&quot;)" office:value-type="float" office:value="1" calcext:value-type="float">
            <text:p>1</text:p>
          </table:table-cell>
          <table:table-cell table:style-name="ce133" table:formula="of:=IFERROR(VLOOKUP([$Masterlist.$P59];[$Datasheet.$B$1:.$AV$9809];9;FALSE());&quot;-&quot;)" office:value-type="float" office:value="1" calcext:value-type="float">
            <text:p>1</text:p>
          </table:table-cell>
          <table:table-cell table:style-name="ce133" table:formula="of:=IFERROR(VLOOKUP([$Masterlist.$P59];[$Datasheet.$B$1:.$AV$9809];10;FALSE());&quot;-&quot;)" office:value-type="float" office:value="1" calcext:value-type="float">
            <text:p>1</text:p>
          </table:table-cell>
          <table:table-cell table:style-name="ce133" table:formula="of:=IFERROR(VLOOKUP([$Masterlist.$P59];[$Datasheet.$B$1:.$AV$9809];11;FALSE());&quot;-&quot;)" office:value-type="float" office:value="1" calcext:value-type="float">
            <text:p>1</text:p>
          </table:table-cell>
          <table:table-cell table:style-name="ce133" table:formula="of:=IFERROR(VLOOKUP([$Masterlist.$P59];[$Datasheet.$B$1:.$AV$9809];12;FALSE());&quot;-&quot;)" office:value-type="float" office:value="1" calcext:value-type="float">
            <text:p>1</text:p>
          </table:table-cell>
          <table:table-cell table:style-name="ce133" table:formula="of:=IFERROR(VLOOKUP([$Masterlist.$P59];[$Datasheet.$B$1:.$AV$9809];13;FALSE());&quot;-&quot;)" office:value-type="float" office:value="1" calcext:value-type="float">
            <text:p>1</text:p>
          </table:table-cell>
          <table:table-cell table:style-name="ce133" table:formula="of:=IFERROR(VLOOKUP([$Masterlist.$P59];[$Datasheet.$B$1:.$AV$9809];14;FALSE());&quot;-&quot;)" office:value-type="float" office:value="1" calcext:value-type="float">
            <text:p>1</text:p>
          </table:table-cell>
          <table:table-cell table:style-name="ce133" table:formula="of:=IFERROR(VLOOKUP([$Masterlist.$P59];[$Datasheet.$B$1:.$AV$9809];15;FALSE());&quot;-&quot;)" office:value-type="float" office:value="1" calcext:value-type="float">
            <text:p>1</text:p>
          </table:table-cell>
          <table:table-cell table:style-name="ce133" table:formula="of:=IFERROR(VLOOKUP([$Masterlist.$P59];[$Datasheet.$B$1:.$AV$9809];16;FALSE());&quot;-&quot;)" office:value-type="float" office:value="0" calcext:value-type="float">
            <text:p>0</text:p>
          </table:table-cell>
          <table:table-cell table:style-name="ce133" table:formula="of:=IFERROR(VLOOKUP([$Masterlist.$P59];[$Datasheet.$B$1:.$AV$9809];17;FALSE());&quot;-&quot;)" office:value-type="float" office:value="0" calcext:value-type="float">
            <text:p>0</text:p>
          </table:table-cell>
          <table:table-cell table:style-name="ce133" table:formula="of:=IFERROR(VLOOKUP([$Masterlist.$P59];[$Datasheet.$B$1:.$AV$9809];18;FALSE());&quot;-&quot;)" office:value-type="float" office:value="0" calcext:value-type="float">
            <text:p/>
          </table:table-cell>
          <table:table-cell table:style-name="ce133" table:formula="of:=IFERROR(VLOOKUP([$Masterlist.$P59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9" office:value-type="string" calcext:value-type="string">
            <text:p>M</text:p>
          </table:table-cell>
          <table:table-cell table:style-name="ce50" table:number-columns-repeated="4"/>
          <table:table-cell table:style-name="ce50" office:value-type="string" calcext:value-type="string">
            <text:p>yes</text:p>
          </table:table-cell>
          <table:table-cell table:style-name="ce50" table:number-columns-repeated="7"/>
          <table:table-cell table:style-name="ce92" office:value-type="string" calcext:value-type="string">
            <text:p>FOH Sound Assistant</text:p>
          </table:table-cell>
          <table:table-cell table:style-name="ce8" office:value-type="string" calcext:value-type="string">
            <text:p>Jayden du Toit</text:p>
          </table:table-cell>
          <table:table-cell table:style-name="ce13" table:formula="of:=IF(ISNUMBER(MATCH([.P60];[$Datasheet.$B$1:.$B$9809];0));&quot;✓&quot;;&quot;x&quot;)" office:value-type="string" office:string-value="✓" calcext:value-type="string">
            <text:p>✓</text:p>
          </table:table-cell>
          <table:table-cell table:style-name="ce133" table:formula="of:=IFERROR(VLOOKUP([$Masterlist.$P60];[$Datasheet.$B$1:.$AV$9809];2;FALSE());&quot;-&quot;)" office:value-type="float" office:value="1" calcext:value-type="float">
            <text:p>1</text:p>
          </table:table-cell>
          <table:table-cell table:style-name="ce133" table:formula="of:=IFERROR(VLOOKUP([$Masterlist.$P60];[$Datasheet.$B$1:.$AV$9809];3;FALSE());&quot;-&quot;)" office:value-type="float" office:value="1" calcext:value-type="float">
            <text:p>1</text:p>
          </table:table-cell>
          <table:table-cell table:style-name="ce133" table:formula="of:=IFERROR(VLOOKUP([$Masterlist.$P60];[$Datasheet.$B$1:.$AV$9809];4;FALSE());&quot;-&quot;)" office:value-type="float" office:value="1" calcext:value-type="float">
            <text:p>1</text:p>
          </table:table-cell>
          <table:table-cell table:style-name="ce133" table:formula="of:=IFERROR(VLOOKUP([$Masterlist.$P60];[$Datasheet.$B$1:.$AV$9809];5;FALSE());&quot;-&quot;)" office:value-type="float" office:value="1" calcext:value-type="float">
            <text:p>1</text:p>
          </table:table-cell>
          <table:table-cell table:style-name="ce185" table:formula="of:=IFERROR(VLOOKUP([$Masterlist.$P60];[$Datasheet.$B$1:.$AV$9809];6;FALSE());&quot;-&quot;)" office:value-type="float" office:value="1" calcext:value-type="float">
            <text:p>1</text:p>
          </table:table-cell>
          <table:table-cell table:style-name="ce133" table:formula="of:=IFERROR(VLOOKUP([$Masterlist.$P60];[$Datasheet.$B$1:.$AV$9809];7;FALSE());&quot;-&quot;)" office:value-type="float" office:value="1" calcext:value-type="float">
            <text:p>1</text:p>
          </table:table-cell>
          <table:table-cell table:style-name="ce133" table:formula="of:=IFERROR(VLOOKUP([$Masterlist.$P60];[$Datasheet.$B$1:.$AV$9809];8;FALSE());&quot;-&quot;)" office:value-type="float" office:value="1" calcext:value-type="float">
            <text:p>1</text:p>
          </table:table-cell>
          <table:table-cell table:style-name="ce133" table:formula="of:=IFERROR(VLOOKUP([$Masterlist.$P60];[$Datasheet.$B$1:.$AV$9809];9;FALSE());&quot;-&quot;)" office:value-type="float" office:value="1" calcext:value-type="float">
            <text:p>1</text:p>
          </table:table-cell>
          <table:table-cell table:style-name="ce133" table:formula="of:=IFERROR(VLOOKUP([$Masterlist.$P60];[$Datasheet.$B$1:.$AV$9809];10;FALSE());&quot;-&quot;)" office:value-type="float" office:value="1" calcext:value-type="float">
            <text:p>1</text:p>
          </table:table-cell>
          <table:table-cell table:style-name="ce133" table:formula="of:=IFERROR(VLOOKUP([$Masterlist.$P60];[$Datasheet.$B$1:.$AV$9809];11;FALSE());&quot;-&quot;)" office:value-type="float" office:value="1" calcext:value-type="float">
            <text:p>1</text:p>
          </table:table-cell>
          <table:table-cell table:style-name="ce133" table:formula="of:=IFERROR(VLOOKUP([$Masterlist.$P60];[$Datasheet.$B$1:.$AV$9809];12;FALSE());&quot;-&quot;)" office:value-type="float" office:value="1" calcext:value-type="float">
            <text:p>1</text:p>
          </table:table-cell>
          <table:table-cell table:style-name="ce133" table:formula="of:=IFERROR(VLOOKUP([$Masterlist.$P60];[$Datasheet.$B$1:.$AV$9809];13;FALSE());&quot;-&quot;)" office:value-type="float" office:value="1" calcext:value-type="float">
            <text:p>1</text:p>
          </table:table-cell>
          <table:table-cell table:style-name="ce133" table:formula="of:=IFERROR(VLOOKUP([$Masterlist.$P60];[$Datasheet.$B$1:.$AV$9809];14;FALSE());&quot;-&quot;)" office:value-type="float" office:value="1" calcext:value-type="float">
            <text:p>1</text:p>
          </table:table-cell>
          <table:table-cell table:style-name="ce133" table:formula="of:=IFERROR(VLOOKUP([$Masterlist.$P60];[$Datasheet.$B$1:.$AV$9809];15;FALSE());&quot;-&quot;)" office:value-type="float" office:value="1" calcext:value-type="float">
            <text:p>1</text:p>
          </table:table-cell>
          <table:table-cell table:style-name="ce133" table:formula="of:=IFERROR(VLOOKUP([$Masterlist.$P60];[$Datasheet.$B$1:.$AV$9809];16;FALSE());&quot;-&quot;)" office:value-type="float" office:value="0" calcext:value-type="float">
            <text:p/>
          </table:table-cell>
          <table:table-cell table:style-name="ce133" table:formula="of:=IFERROR(VLOOKUP([$Masterlist.$P60];[$Datasheet.$B$1:.$AV$9809];17;FALSE());&quot;-&quot;)" office:value-type="float" office:value="0" calcext:value-type="float">
            <text:p/>
          </table:table-cell>
          <table:table-cell table:style-name="ce133" table:formula="of:=IFERROR(VLOOKUP([$Masterlist.$P60];[$Datasheet.$B$1:.$AV$9809];18;FALSE());&quot;-&quot;)" office:value-type="float" office:value="0" calcext:value-type="float">
            <text:p/>
          </table:table-cell>
          <table:table-cell table:style-name="ce133" table:formula="of:=IFERROR(VLOOKUP([$Masterlist.$P60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table:number-columns-repeated="4"/>
          <table:table-cell table:style-name="ce50" office:value-type="string" calcext:value-type="string">
            <text:p>yes</text:p>
          </table:table-cell>
          <table:table-cell table:style-name="ce50" table:number-columns-repeated="7"/>
          <table:table-cell table:style-name="ce92" office:value-type="string" calcext:value-type="string">
            <text:p>FOH Sound Assistant</text:p>
          </table:table-cell>
          <table:table-cell table:style-name="ce8" office:value-type="string" calcext:value-type="string">
            <text:p>Jonathan Solomon</text:p>
          </table:table-cell>
          <table:table-cell table:style-name="ce13" table:formula="of:=IF(ISNUMBER(MATCH([.P61];[$Datasheet.$B$1:.$B$9809];0));&quot;✓&quot;;&quot;x&quot;)" office:value-type="string" office:string-value="✓" calcext:value-type="string">
            <text:p>✓</text:p>
          </table:table-cell>
          <table:table-cell table:style-name="ce133" table:formula="of:=IFERROR(VLOOKUP([$Masterlist.$P61];[$Datasheet.$B$1:.$AV$9809];2;FALSE());&quot;-&quot;)" office:value-type="float" office:value="0" calcext:value-type="float">
            <text:p>0</text:p>
          </table:table-cell>
          <table:table-cell table:style-name="ce133" table:formula="of:=IFERROR(VLOOKUP([$Masterlist.$P61];[$Datasheet.$B$1:.$AV$9809];3;FALSE());&quot;-&quot;)" office:value-type="float" office:value="0" calcext:value-type="float">
            <text:p>0</text:p>
          </table:table-cell>
          <table:table-cell table:style-name="ce133" table:formula="of:=IFERROR(VLOOKUP([$Masterlist.$P61];[$Datasheet.$B$1:.$AV$9809];4;FALSE());&quot;-&quot;)" office:value-type="float" office:value="1" calcext:value-type="float">
            <text:p>1</text:p>
          </table:table-cell>
          <table:table-cell table:style-name="ce133" table:formula="of:=IFERROR(VLOOKUP([$Masterlist.$P61];[$Datasheet.$B$1:.$AV$9809];5;FALSE());&quot;-&quot;)" office:value-type="float" office:value="1" calcext:value-type="float">
            <text:p>1</text:p>
          </table:table-cell>
          <table:table-cell table:style-name="ce185" table:formula="of:=IFERROR(VLOOKUP([$Masterlist.$P61];[$Datasheet.$B$1:.$AV$9809];6;FALSE());&quot;-&quot;)" office:value-type="float" office:value="0" calcext:value-type="float">
            <text:p>0</text:p>
          </table:table-cell>
          <table:table-cell table:style-name="ce133" table:formula="of:=IFERROR(VLOOKUP([$Masterlist.$P61];[$Datasheet.$B$1:.$AV$9809];7;FALSE());&quot;-&quot;)" office:value-type="float" office:value="0" calcext:value-type="float">
            <text:p>0</text:p>
          </table:table-cell>
          <table:table-cell table:style-name="ce133" table:formula="of:=IFERROR(VLOOKUP([$Masterlist.$P61];[$Datasheet.$B$1:.$AV$9809];8;FALSE());&quot;-&quot;)" office:value-type="float" office:value="0" calcext:value-type="float">
            <text:p>0</text:p>
          </table:table-cell>
          <table:table-cell table:style-name="ce133" table:formula="of:=IFERROR(VLOOKUP([$Masterlist.$P61];[$Datasheet.$B$1:.$AV$9809];9;FALSE());&quot;-&quot;)" office:value-type="float" office:value="0" calcext:value-type="float">
            <text:p>0</text:p>
          </table:table-cell>
          <table:table-cell table:style-name="ce133" table:formula="of:=IFERROR(VLOOKUP([$Masterlist.$P61];[$Datasheet.$B$1:.$AV$9809];10;FALSE());&quot;-&quot;)" office:value-type="float" office:value="1" calcext:value-type="float">
            <text:p>1</text:p>
          </table:table-cell>
          <table:table-cell table:style-name="ce133" table:formula="of:=IFERROR(VLOOKUP([$Masterlist.$P61];[$Datasheet.$B$1:.$AV$9809];11;FALSE());&quot;-&quot;)" office:value-type="float" office:value="1" calcext:value-type="float">
            <text:p>1</text:p>
          </table:table-cell>
          <table:table-cell table:style-name="ce133" table:formula="of:=IFERROR(VLOOKUP([$Masterlist.$P61];[$Datasheet.$B$1:.$AV$9809];12;FALSE());&quot;-&quot;)" office:value-type="float" office:value="1" calcext:value-type="float">
            <text:p>1</text:p>
          </table:table-cell>
          <table:table-cell table:style-name="ce133" table:formula="of:=IFERROR(VLOOKUP([$Masterlist.$P61];[$Datasheet.$B$1:.$AV$9809];13;FALSE());&quot;-&quot;)" office:value-type="float" office:value="1" calcext:value-type="float">
            <text:p>1</text:p>
          </table:table-cell>
          <table:table-cell table:style-name="ce133" table:formula="of:=IFERROR(VLOOKUP([$Masterlist.$P61];[$Datasheet.$B$1:.$AV$9809];14;FALSE());&quot;-&quot;)" office:value-type="float" office:value="0" calcext:value-type="float">
            <text:p>0</text:p>
          </table:table-cell>
          <table:table-cell table:style-name="ce133" table:formula="of:=IFERROR(VLOOKUP([$Masterlist.$P61];[$Datasheet.$B$1:.$AV$9809];15;FALSE());&quot;-&quot;)" office:value-type="float" office:value="0" calcext:value-type="float">
            <text:p>0</text:p>
          </table:table-cell>
          <table:table-cell table:style-name="ce133" table:formula="of:=IFERROR(VLOOKUP([$Masterlist.$P61];[$Datasheet.$B$1:.$AV$9809];16;FALSE());&quot;-&quot;)" office:value-type="float" office:value="0" calcext:value-type="float">
            <text:p/>
          </table:table-cell>
          <table:table-cell table:style-name="ce133" table:formula="of:=IFERROR(VLOOKUP([$Masterlist.$P61];[$Datasheet.$B$1:.$AV$9809];17;FALSE());&quot;-&quot;)" office:value-type="float" office:value="0" calcext:value-type="float">
            <text:p/>
          </table:table-cell>
          <table:table-cell table:style-name="ce133" table:formula="of:=IFERROR(VLOOKUP([$Masterlist.$P61];[$Datasheet.$B$1:.$AV$9809];18;FALSE());&quot;-&quot;)" office:value-type="float" office:value="0" calcext:value-type="float">
            <text:p/>
          </table:table-cell>
          <table:table-cell table:style-name="ce133" table:formula="of:=IFERROR(VLOOKUP([$Masterlist.$P61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A</text:p>
          </table:table-cell>
          <table:table-cell table:style-name="ce50" table:number-columns-repeated="4"/>
          <table:table-cell table:style-name="ce50" office:value-type="string" calcext:value-type="string">
            <text:p>yes</text:p>
          </table:table-cell>
          <table:table-cell table:style-name="ce50" table:number-columns-repeated="7"/>
          <table:table-cell table:style-name="ce92" office:value-type="string" calcext:value-type="string">
            <text:p>FOH Sound Assistant / Sound Runner</text:p>
          </table:table-cell>
          <table:table-cell table:style-name="ce8" office:value-type="string" calcext:value-type="string">
            <text:p>Hennie van Jaarsveld</text:p>
          </table:table-cell>
          <table:table-cell table:style-name="ce13" table:formula="of:=IF(ISNUMBER(MATCH([.P62];[$Datasheet.$B$1:.$B$9809];0));&quot;✓&quot;;&quot;x&quot;)" office:value-type="string" office:string-value="✓" calcext:value-type="string">
            <text:p>✓</text:p>
          </table:table-cell>
          <table:table-cell table:style-name="ce133" table:formula="of:=IFERROR(VLOOKUP([$Masterlist.$P62];[$Datasheet.$B$1:.$AV$9809];2;FALSE());&quot;-&quot;)" office:value-type="float" office:value="0" calcext:value-type="float">
            <text:p>0</text:p>
          </table:table-cell>
          <table:table-cell table:style-name="ce133" table:formula="of:=IFERROR(VLOOKUP([$Masterlist.$P62];[$Datasheet.$B$1:.$AV$9809];3;FALSE());&quot;-&quot;)" office:value-type="float" office:value="0" calcext:value-type="float">
            <text:p>0</text:p>
          </table:table-cell>
          <table:table-cell table:style-name="ce133" table:formula="of:=IFERROR(VLOOKUP([$Masterlist.$P62];[$Datasheet.$B$1:.$AV$9809];4;FALSE());&quot;-&quot;)" office:value-type="float" office:value="1" calcext:value-type="float">
            <text:p>1</text:p>
          </table:table-cell>
          <table:table-cell table:style-name="ce133" table:formula="of:=IFERROR(VLOOKUP([$Masterlist.$P62];[$Datasheet.$B$1:.$AV$9809];5;FALSE());&quot;-&quot;)" office:value-type="float" office:value="1" calcext:value-type="float">
            <text:p>1</text:p>
          </table:table-cell>
          <table:table-cell table:style-name="ce185" table:formula="of:=IFERROR(VLOOKUP([$Masterlist.$P62];[$Datasheet.$B$1:.$AV$9809];6;FALSE());&quot;-&quot;)" office:value-type="float" office:value="1" calcext:value-type="float">
            <text:p>1</text:p>
          </table:table-cell>
          <table:table-cell table:style-name="ce133" table:formula="of:=IFERROR(VLOOKUP([$Masterlist.$P62];[$Datasheet.$B$1:.$AV$9809];7;FALSE());&quot;-&quot;)" office:value-type="float" office:value="1" calcext:value-type="float">
            <text:p>1</text:p>
          </table:table-cell>
          <table:table-cell table:style-name="ce133" table:formula="of:=IFERROR(VLOOKUP([$Masterlist.$P62];[$Datasheet.$B$1:.$AV$9809];8;FALSE());&quot;-&quot;)" office:value-type="float" office:value="1" calcext:value-type="float">
            <text:p>1</text:p>
          </table:table-cell>
          <table:table-cell table:style-name="ce133" table:formula="of:=IFERROR(VLOOKUP([$Masterlist.$P62];[$Datasheet.$B$1:.$AV$9809];9;FALSE());&quot;-&quot;)" office:value-type="float" office:value="1" calcext:value-type="float">
            <text:p>1</text:p>
          </table:table-cell>
          <table:table-cell table:style-name="ce133" table:formula="of:=IFERROR(VLOOKUP([$Masterlist.$P62];[$Datasheet.$B$1:.$AV$9809];10;FALSE());&quot;-&quot;)" office:value-type="float" office:value="1" calcext:value-type="float">
            <text:p>1</text:p>
          </table:table-cell>
          <table:table-cell table:style-name="ce133" table:formula="of:=IFERROR(VLOOKUP([$Masterlist.$P62];[$Datasheet.$B$1:.$AV$9809];11;FALSE());&quot;-&quot;)" office:value-type="float" office:value="1" calcext:value-type="float">
            <text:p>1</text:p>
          </table:table-cell>
          <table:table-cell table:style-name="ce133" table:formula="of:=IFERROR(VLOOKUP([$Masterlist.$P62];[$Datasheet.$B$1:.$AV$9809];12;FALSE());&quot;-&quot;)" office:value-type="float" office:value="1" calcext:value-type="float">
            <text:p>1</text:p>
          </table:table-cell>
          <table:table-cell table:style-name="ce133" table:formula="of:=IFERROR(VLOOKUP([$Masterlist.$P62];[$Datasheet.$B$1:.$AV$9809];13;FALSE());&quot;-&quot;)" office:value-type="float" office:value="1" calcext:value-type="float">
            <text:p>1</text:p>
          </table:table-cell>
          <table:table-cell table:style-name="ce133" table:formula="of:=IFERROR(VLOOKUP([$Masterlist.$P62];[$Datasheet.$B$1:.$AV$9809];14;FALSE());&quot;-&quot;)" office:value-type="float" office:value="1" calcext:value-type="float">
            <text:p>1</text:p>
          </table:table-cell>
          <table:table-cell table:style-name="ce133" table:formula="of:=IFERROR(VLOOKUP([$Masterlist.$P62];[$Datasheet.$B$1:.$AV$9809];15;FALSE());&quot;-&quot;)" office:value-type="float" office:value="1" calcext:value-type="float">
            <text:p>1</text:p>
          </table:table-cell>
          <table:table-cell table:style-name="ce133" table:formula="of:=IFERROR(VLOOKUP([$Masterlist.$P62];[$Datasheet.$B$1:.$AV$9809];16;FALSE());&quot;-&quot;)" office:value-type="float" office:value="0" calcext:value-type="float">
            <text:p/>
          </table:table-cell>
          <table:table-cell table:style-name="ce133" table:formula="of:=IFERROR(VLOOKUP([$Masterlist.$P62];[$Datasheet.$B$1:.$AV$9809];17;FALSE());&quot;-&quot;)" office:value-type="float" office:value="0" calcext:value-type="float">
            <text:p/>
          </table:table-cell>
          <table:table-cell table:style-name="ce133" table:formula="of:=IFERROR(VLOOKUP([$Masterlist.$P62];[$Datasheet.$B$1:.$AV$9809];18;FALSE());&quot;-&quot;)" office:value-type="float" office:value="0" calcext:value-type="float">
            <text:p/>
          </table:table-cell>
          <table:table-cell table:style-name="ce133" table:formula="of:=IFERROR(VLOOKUP([$Masterlist.$P62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AL</text:p>
          </table:table-cell>
          <table:table-cell table:style-name="ce50" table:number-columns-repeated="4"/>
          <table:table-cell table:style-name="ce50" office:value-type="string" calcext:value-type="string">
            <text:p>Yes</text:p>
          </table:table-cell>
          <table:table-cell table:style-name="ce50" table:number-columns-repeated="7"/>
          <table:table-cell table:style-name="ce92" office:value-type="string" calcext:value-type="string">
            <text:p>FOH Sound Assistant / Sound Runner</text:p>
          </table:table-cell>
          <table:table-cell table:style-name="ce8" office:value-type="string" calcext:value-type="string">
            <text:p>Andy Urquhart</text:p>
          </table:table-cell>
          <table:table-cell table:style-name="ce13" table:formula="of:=IF(ISNUMBER(MATCH([.P63];[$Datasheet.$B$1:.$B$9809];0));&quot;✓&quot;;&quot;x&quot;)" office:value-type="string" office:string-value="✓" calcext:value-type="string">
            <text:p>✓</text:p>
          </table:table-cell>
          <table:table-cell table:style-name="ce133" table:formula="of:=IFERROR(VLOOKUP([$Masterlist.$P63];[$Datasheet.$B$1:.$AV$9809];2;FALSE());&quot;-&quot;)" office:value-type="float" office:value="0" calcext:value-type="float">
            <text:p>0</text:p>
          </table:table-cell>
          <table:table-cell table:style-name="ce133" table:formula="of:=IFERROR(VLOOKUP([$Masterlist.$P63];[$Datasheet.$B$1:.$AV$9809];3;FALSE());&quot;-&quot;)" office:value-type="float" office:value="0" calcext:value-type="float">
            <text:p>0</text:p>
          </table:table-cell>
          <table:table-cell table:style-name="ce133" table:formula="of:=IFERROR(VLOOKUP([$Masterlist.$P63];[$Datasheet.$B$1:.$AV$9809];4;FALSE());&quot;-&quot;)" office:value-type="float" office:value="1" calcext:value-type="float">
            <text:p>1</text:p>
          </table:table-cell>
          <table:table-cell table:style-name="ce133" table:formula="of:=IFERROR(VLOOKUP([$Masterlist.$P63];[$Datasheet.$B$1:.$AV$9809];5;FALSE());&quot;-&quot;)" office:value-type="float" office:value="1" calcext:value-type="float">
            <text:p>1</text:p>
          </table:table-cell>
          <table:table-cell table:style-name="ce185" table:formula="of:=IFERROR(VLOOKUP([$Masterlist.$P63];[$Datasheet.$B$1:.$AV$9809];6;FALSE());&quot;-&quot;)" office:value-type="float" office:value="0" calcext:value-type="float">
            <text:p>0</text:p>
          </table:table-cell>
          <table:table-cell table:style-name="ce133" table:formula="of:=IFERROR(VLOOKUP([$Masterlist.$P63];[$Datasheet.$B$1:.$AV$9809];7;FALSE());&quot;-&quot;)" office:value-type="float" office:value="0" calcext:value-type="float">
            <text:p>0</text:p>
          </table:table-cell>
          <table:table-cell table:style-name="ce133" table:formula="of:=IFERROR(VLOOKUP([$Masterlist.$P63];[$Datasheet.$B$1:.$AV$9809];8;FALSE());&quot;-&quot;)" office:value-type="float" office:value="1" calcext:value-type="float">
            <text:p>1</text:p>
          </table:table-cell>
          <table:table-cell table:style-name="ce133" table:formula="of:=IFERROR(VLOOKUP([$Masterlist.$P63];[$Datasheet.$B$1:.$AV$9809];9;FALSE());&quot;-&quot;)" office:value-type="float" office:value="1" calcext:value-type="float">
            <text:p>1</text:p>
          </table:table-cell>
          <table:table-cell table:style-name="ce133" table:formula="of:=IFERROR(VLOOKUP([$Masterlist.$P63];[$Datasheet.$B$1:.$AV$9809];10;FALSE());&quot;-&quot;)" office:value-type="float" office:value="1" calcext:value-type="float">
            <text:p>1</text:p>
          </table:table-cell>
          <table:table-cell table:style-name="ce133" table:formula="of:=IFERROR(VLOOKUP([$Masterlist.$P63];[$Datasheet.$B$1:.$AV$9809];11;FALSE());&quot;-&quot;)" office:value-type="float" office:value="1" calcext:value-type="float">
            <text:p>1</text:p>
          </table:table-cell>
          <table:table-cell table:style-name="ce133" table:formula="of:=IFERROR(VLOOKUP([$Masterlist.$P63];[$Datasheet.$B$1:.$AV$9809];12;FALSE());&quot;-&quot;)" office:value-type="float" office:value="1" calcext:value-type="float">
            <text:p>1</text:p>
          </table:table-cell>
          <table:table-cell table:style-name="ce133" table:formula="of:=IFERROR(VLOOKUP([$Masterlist.$P63];[$Datasheet.$B$1:.$AV$9809];13;FALSE());&quot;-&quot;)" office:value-type="float" office:value="1" calcext:value-type="float">
            <text:p>1</text:p>
          </table:table-cell>
          <table:table-cell table:style-name="ce133" table:formula="of:=IFERROR(VLOOKUP([$Masterlist.$P63];[$Datasheet.$B$1:.$AV$9809];14;FALSE());&quot;-&quot;)" office:value-type="float" office:value="1" calcext:value-type="float">
            <text:p>1</text:p>
          </table:table-cell>
          <table:table-cell table:style-name="ce133" table:formula="of:=IFERROR(VLOOKUP([$Masterlist.$P63];[$Datasheet.$B$1:.$AV$9809];15;FALSE());&quot;-&quot;)" office:value-type="float" office:value="1" calcext:value-type="float">
            <text:p>1</text:p>
          </table:table-cell>
          <table:table-cell table:style-name="ce133" table:formula="of:=IFERROR(VLOOKUP([$Masterlist.$P63];[$Datasheet.$B$1:.$AV$9809];16;FALSE());&quot;-&quot;)" office:value-type="float" office:value="0" calcext:value-type="float">
            <text:p/>
          </table:table-cell>
          <table:table-cell table:style-name="ce133" table:formula="of:=IFERROR(VLOOKUP([$Masterlist.$P63];[$Datasheet.$B$1:.$AV$9809];17;FALSE());&quot;-&quot;)" office:value-type="float" office:value="0" calcext:value-type="float">
            <text:p/>
          </table:table-cell>
          <table:table-cell table:style-name="ce133" table:formula="of:=IFERROR(VLOOKUP([$Masterlist.$P63];[$Datasheet.$B$1:.$AV$9809];18;FALSE());&quot;-&quot;)" office:value-type="float" office:value="0" calcext:value-type="float">
            <text:p/>
          </table:table-cell>
          <table:table-cell table:style-name="ce133" table:formula="of:=IFERROR(VLOOKUP([$Masterlist.$P63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7" office:value-type="string" calcext:value-type="string">
            <text:p>L</text:p>
          </table:table-cell>
          <table:table-cell table:style-name="ce51" table:number-columns-repeated="4"/>
          <table:table-cell table:style-name="ce50" office:value-type="string" calcext:value-type="string">
            <text:p>Yes</text:p>
          </table:table-cell>
          <table:table-cell table:style-name="ce51" table:number-columns-repeated="7"/>
          <table:table-cell table:style-name="ce92" office:value-type="string" calcext:value-type="string">
            <text:p>FOH Sound Assistant</text:p>
          </table:table-cell>
          <table:table-cell table:style-name="ce102" office:value-type="string" calcext:value-type="string">
            <text:p>Refilwe Mohasi</text:p>
          </table:table-cell>
          <table:table-cell table:style-name="ce13" table:formula="of:=IF(ISNUMBER(MATCH([.P64];[$Datasheet.$B$1:.$B$9809];0));&quot;✓&quot;;&quot;x&quot;)" office:value-type="string" office:string-value="✓" calcext:value-type="string">
            <text:p>✓</text:p>
          </table:table-cell>
          <table:table-cell table:style-name="ce133" table:formula="of:=IFERROR(VLOOKUP([$Masterlist.$P64];[$Datasheet.$B$1:.$AV$9809];2;FALSE());&quot;-&quot;)" office:value-type="float" office:value="1" calcext:value-type="float">
            <text:p>1</text:p>
          </table:table-cell>
          <table:table-cell table:style-name="ce133" table:formula="of:=IFERROR(VLOOKUP([$Masterlist.$P64];[$Datasheet.$B$1:.$AV$9809];3;FALSE());&quot;-&quot;)" office:value-type="float" office:value="0" calcext:value-type="float">
            <text:p>0</text:p>
          </table:table-cell>
          <table:table-cell table:style-name="ce133" table:formula="of:=IFERROR(VLOOKUP([$Masterlist.$P64];[$Datasheet.$B$1:.$AV$9809];4;FALSE());&quot;-&quot;)" office:value-type="float" office:value="1" calcext:value-type="float">
            <text:p>1</text:p>
          </table:table-cell>
          <table:table-cell table:style-name="ce133" table:formula="of:=IFERROR(VLOOKUP([$Masterlist.$P64];[$Datasheet.$B$1:.$AV$9809];5;FALSE());&quot;-&quot;)" office:value-type="float" office:value="1" calcext:value-type="float">
            <text:p>1</text:p>
          </table:table-cell>
          <table:table-cell table:style-name="ce185" table:formula="of:=IFERROR(VLOOKUP([$Masterlist.$P64];[$Datasheet.$B$1:.$AV$9809];6;FALSE());&quot;-&quot;)" office:value-type="float" office:value="0" calcext:value-type="float">
            <text:p>0</text:p>
          </table:table-cell>
          <table:table-cell table:style-name="ce133" table:formula="of:=IFERROR(VLOOKUP([$Masterlist.$P64];[$Datasheet.$B$1:.$AV$9809];7;FALSE());&quot;-&quot;)" office:value-type="float" office:value="0" calcext:value-type="float">
            <text:p>0</text:p>
          </table:table-cell>
          <table:table-cell table:style-name="ce133" table:formula="of:=IFERROR(VLOOKUP([$Masterlist.$P64];[$Datasheet.$B$1:.$AV$9809];8;FALSE());&quot;-&quot;)" office:value-type="float" office:value="1" calcext:value-type="float">
            <text:p>1</text:p>
          </table:table-cell>
          <table:table-cell table:style-name="ce133" table:formula="of:=IFERROR(VLOOKUP([$Masterlist.$P64];[$Datasheet.$B$1:.$AV$9809];9;FALSE());&quot;-&quot;)" office:value-type="float" office:value="1" calcext:value-type="float">
            <text:p>1</text:p>
          </table:table-cell>
          <table:table-cell table:style-name="ce133" table:formula="of:=IFERROR(VLOOKUP([$Masterlist.$P64];[$Datasheet.$B$1:.$AV$9809];10;FALSE());&quot;-&quot;)" office:value-type="float" office:value="0" calcext:value-type="float">
            <text:p>0</text:p>
          </table:table-cell>
          <table:table-cell table:style-name="ce133" table:formula="of:=IFERROR(VLOOKUP([$Masterlist.$P64];[$Datasheet.$B$1:.$AV$9809];11;FALSE());&quot;-&quot;)" office:value-type="float" office:value="0" calcext:value-type="float">
            <text:p>0</text:p>
          </table:table-cell>
          <table:table-cell table:style-name="ce133" table:formula="of:=IFERROR(VLOOKUP([$Masterlist.$P64];[$Datasheet.$B$1:.$AV$9809];12;FALSE());&quot;-&quot;)" office:value-type="float" office:value="1" calcext:value-type="float">
            <text:p>1</text:p>
          </table:table-cell>
          <table:table-cell table:style-name="ce133" table:formula="of:=IFERROR(VLOOKUP([$Masterlist.$P64];[$Datasheet.$B$1:.$AV$9809];13;FALSE());&quot;-&quot;)" office:value-type="float" office:value="1" calcext:value-type="float">
            <text:p>1</text:p>
          </table:table-cell>
          <table:table-cell table:style-name="ce133" table:formula="of:=IFERROR(VLOOKUP([$Masterlist.$P64];[$Datasheet.$B$1:.$AV$9809];14;FALSE());&quot;-&quot;)" office:value-type="float" office:value="1" calcext:value-type="float">
            <text:p>1</text:p>
          </table:table-cell>
          <table:table-cell table:style-name="ce133" table:formula="of:=IFERROR(VLOOKUP([$Masterlist.$P64];[$Datasheet.$B$1:.$AV$9809];15;FALSE());&quot;-&quot;)" office:value-type="float" office:value="1" calcext:value-type="float">
            <text:p>1</text:p>
          </table:table-cell>
          <table:table-cell table:style-name="ce133" table:formula="of:=IFERROR(VLOOKUP([$Masterlist.$P64];[$Datasheet.$B$1:.$AV$9809];16;FALSE());&quot;-&quot;)" office:value-type="float" office:value="0" calcext:value-type="float">
            <text:p/>
          </table:table-cell>
          <table:table-cell table:style-name="ce133" table:formula="of:=IFERROR(VLOOKUP([$Masterlist.$P64];[$Datasheet.$B$1:.$AV$9809];17;FALSE());&quot;-&quot;)" office:value-type="float" office:value="0" calcext:value-type="float">
            <text:p/>
          </table:table-cell>
          <table:table-cell table:style-name="ce133" table:formula="of:=IFERROR(VLOOKUP([$Masterlist.$P64];[$Datasheet.$B$1:.$AV$9809];18;FALSE());&quot;-&quot;)" office:value-type="float" office:value="0" calcext:value-type="float">
            <text:p/>
          </table:table-cell>
          <table:table-cell table:style-name="ce133" table:formula="of:=IFERROR(VLOOKUP([$Masterlist.$P64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7" office:value-type="string" calcext:value-type="string">
            <text:p>L</text:p>
          </table:table-cell>
          <table:table-cell table:style-name="ce51" table:number-columns-repeated="4"/>
          <table:table-cell table:style-name="ce51" office:value-type="string" calcext:value-type="string">
            <text:p>Yes</text:p>
          </table:table-cell>
          <table:table-cell table:style-name="ce51" table:number-columns-repeated="7"/>
          <table:table-cell table:style-name="ce92" office:value-type="string" calcext:value-type="string">
            <text:p>FOH Sound Assistant / Sound Runner</text:p>
          </table:table-cell>
          <table:table-cell table:style-name="ce102" office:value-type="string" calcext:value-type="string">
            <text:p>Morne Pretorius</text:p>
          </table:table-cell>
          <table:table-cell table:style-name="ce13" table:formula="of:=IF(ISNUMBER(MATCH([.P65];[$Datasheet.$B$1:.$B$9809];0));&quot;✓&quot;;&quot;x&quot;)" office:value-type="string" office:string-value="✓" calcext:value-type="string">
            <text:p>✓</text:p>
          </table:table-cell>
          <table:table-cell table:style-name="ce133" table:formula="of:=IFERROR(VLOOKUP([$Masterlist.$P65];[$Datasheet.$B$1:.$AV$9809];2;FALSE());&quot;-&quot;)" office:value-type="float" office:value="1" calcext:value-type="float">
            <text:p>1</text:p>
          </table:table-cell>
          <table:table-cell table:style-name="ce133" table:formula="of:=IFERROR(VLOOKUP([$Masterlist.$P65];[$Datasheet.$B$1:.$AV$9809];3;FALSE());&quot;-&quot;)" office:value-type="float" office:value="1" calcext:value-type="float">
            <text:p>1</text:p>
          </table:table-cell>
          <table:table-cell table:style-name="ce133" table:formula="of:=IFERROR(VLOOKUP([$Masterlist.$P65];[$Datasheet.$B$1:.$AV$9809];4;FALSE());&quot;-&quot;)" office:value-type="float" office:value="1" calcext:value-type="float">
            <text:p>1</text:p>
          </table:table-cell>
          <table:table-cell table:style-name="ce133" table:formula="of:=IFERROR(VLOOKUP([$Masterlist.$P65];[$Datasheet.$B$1:.$AV$9809];5;FALSE());&quot;-&quot;)" office:value-type="float" office:value="0" calcext:value-type="float">
            <text:p>0</text:p>
          </table:table-cell>
          <table:table-cell table:style-name="ce185" table:formula="of:=IFERROR(VLOOKUP([$Masterlist.$P65];[$Datasheet.$B$1:.$AV$9809];6;FALSE());&quot;-&quot;)" office:value-type="float" office:value="1" calcext:value-type="float">
            <text:p>1</text:p>
          </table:table-cell>
          <table:table-cell table:style-name="ce133" table:formula="of:=IFERROR(VLOOKUP([$Masterlist.$P65];[$Datasheet.$B$1:.$AV$9809];7;FALSE());&quot;-&quot;)" office:value-type="float" office:value="1" calcext:value-type="float">
            <text:p>1</text:p>
          </table:table-cell>
          <table:table-cell table:style-name="ce133" table:formula="of:=IFERROR(VLOOKUP([$Masterlist.$P65];[$Datasheet.$B$1:.$AV$9809];8;FALSE());&quot;-&quot;)" office:value-type="float" office:value="1" calcext:value-type="float">
            <text:p>1</text:p>
          </table:table-cell>
          <table:table-cell table:style-name="ce133" table:formula="of:=IFERROR(VLOOKUP([$Masterlist.$P65];[$Datasheet.$B$1:.$AV$9809];9;FALSE());&quot;-&quot;)" office:value-type="float" office:value="1" calcext:value-type="float">
            <text:p>1</text:p>
          </table:table-cell>
          <table:table-cell table:style-name="ce133" table:formula="of:=IFERROR(VLOOKUP([$Masterlist.$P65];[$Datasheet.$B$1:.$AV$9809];10;FALSE());&quot;-&quot;)" office:value-type="float" office:value="1" calcext:value-type="float">
            <text:p>1</text:p>
          </table:table-cell>
          <table:table-cell table:style-name="ce133" table:formula="of:=IFERROR(VLOOKUP([$Masterlist.$P65];[$Datasheet.$B$1:.$AV$9809];11;FALSE());&quot;-&quot;)" office:value-type="float" office:value="0" calcext:value-type="float">
            <text:p>0</text:p>
          </table:table-cell>
          <table:table-cell table:style-name="ce133" table:formula="of:=IFERROR(VLOOKUP([$Masterlist.$P65];[$Datasheet.$B$1:.$AV$9809];12;FALSE());&quot;-&quot;)" office:value-type="float" office:value="1" calcext:value-type="float">
            <text:p>1</text:p>
          </table:table-cell>
          <table:table-cell table:style-name="ce133" table:formula="of:=IFERROR(VLOOKUP([$Masterlist.$P65];[$Datasheet.$B$1:.$AV$9809];13;FALSE());&quot;-&quot;)" office:value-type="float" office:value="1" calcext:value-type="float">
            <text:p>1</text:p>
          </table:table-cell>
          <table:table-cell table:style-name="ce133" table:formula="of:=IFERROR(VLOOKUP([$Masterlist.$P65];[$Datasheet.$B$1:.$AV$9809];14;FALSE());&quot;-&quot;)" office:value-type="float" office:value="0" calcext:value-type="float">
            <text:p>0</text:p>
          </table:table-cell>
          <table:table-cell table:style-name="ce133" table:formula="of:=IFERROR(VLOOKUP([$Masterlist.$P65];[$Datasheet.$B$1:.$AV$9809];15;FALSE());&quot;-&quot;)" office:value-type="float" office:value="0" calcext:value-type="float">
            <text:p>0</text:p>
          </table:table-cell>
          <table:table-cell table:style-name="ce133" table:formula="of:=IFERROR(VLOOKUP([$Masterlist.$P65];[$Datasheet.$B$1:.$AV$9809];16;FALSE());&quot;-&quot;)" office:value-type="float" office:value="0" calcext:value-type="float">
            <text:p/>
          </table:table-cell>
          <table:table-cell table:style-name="ce133" table:formula="of:=IFERROR(VLOOKUP([$Masterlist.$P65];[$Datasheet.$B$1:.$AV$9809];17;FALSE());&quot;-&quot;)" office:value-type="float" office:value="0" calcext:value-type="float">
            <text:p/>
          </table:table-cell>
          <table:table-cell table:style-name="ce133" table:formula="of:=IFERROR(VLOOKUP([$Masterlist.$P65];[$Datasheet.$B$1:.$AV$9809];18;FALSE());&quot;-&quot;)" office:value-type="float" office:value="0" calcext:value-type="float">
            <text:p/>
          </table:table-cell>
          <table:table-cell table:style-name="ce133" table:formula="of:=IFERROR(VLOOKUP([$Masterlist.$P65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6"/>
          <table:table-cell table:style-name="ce26" office:value-type="string" calcext:value-type="string">
            <text:p>AL</text:p>
          </table:table-cell>
          <table:table-cell table:style-name="ce50" table:number-columns-repeated="5"/>
          <table:table-cell table:number-columns-repeated="3" table:style-name="ce50" office:value-type="string" calcext:value-type="string">
            <text:p>yes</text:p>
          </table:table-cell>
          <table:table-cell table:style-name="ce50" table:number-columns-repeated="4"/>
          <table:table-cell table:style-name="ce92" office:value-type="string" calcext:value-type="string">
            <text:p>FOH Sound / FOH Sound Assistant</text:p>
          </table:table-cell>
          <table:table-cell table:style-name="ce8" office:value-type="string" calcext:value-type="string">
            <text:p>André Lesch</text:p>
          </table:table-cell>
          <table:table-cell table:style-name="ce13" table:formula="of:=IF(ISNUMBER(MATCH([.P66];[$Datasheet.$B$1:.$B$9809];0));&quot;✓&quot;;&quot;x&quot;)" office:value-type="string" office:string-value="✓" calcext:value-type="string">
            <text:p>✓</text:p>
          </table:table-cell>
          <table:table-cell table:style-name="ce133" table:formula="of:=IFERROR(VLOOKUP([$Masterlist.$P66];[$Datasheet.$B$1:.$AV$9809];2;FALSE());&quot;-&quot;)" office:value-type="float" office:value="0" calcext:value-type="float">
            <text:p>0</text:p>
          </table:table-cell>
          <table:table-cell table:style-name="ce133" table:formula="of:=IFERROR(VLOOKUP([$Masterlist.$P66];[$Datasheet.$B$1:.$AV$9809];3;FALSE());&quot;-&quot;)" office:value-type="float" office:value="1" calcext:value-type="float">
            <text:p>1</text:p>
          </table:table-cell>
          <table:table-cell table:style-name="ce133" table:formula="of:=IFERROR(VLOOKUP([$Masterlist.$P66];[$Datasheet.$B$1:.$AV$9809];4;FALSE());&quot;-&quot;)" office:value-type="float" office:value="1" calcext:value-type="float">
            <text:p>1</text:p>
          </table:table-cell>
          <table:table-cell table:style-name="ce133" table:formula="of:=IFERROR(VLOOKUP([$Masterlist.$P66];[$Datasheet.$B$1:.$AV$9809];5;FALSE());&quot;-&quot;)" office:value-type="float" office:value="1" calcext:value-type="float">
            <text:p>1</text:p>
          </table:table-cell>
          <table:table-cell table:style-name="ce185" table:formula="of:=IFERROR(VLOOKUP([$Masterlist.$P66];[$Datasheet.$B$1:.$AV$9809];6;FALSE());&quot;-&quot;)" office:value-type="float" office:value="1" calcext:value-type="float">
            <text:p>1</text:p>
          </table:table-cell>
          <table:table-cell table:style-name="ce133" table:formula="of:=IFERROR(VLOOKUP([$Masterlist.$P66];[$Datasheet.$B$1:.$AV$9809];7;FALSE());&quot;-&quot;)" office:value-type="float" office:value="1" calcext:value-type="float">
            <text:p>1</text:p>
          </table:table-cell>
          <table:table-cell table:style-name="ce133" table:formula="of:=IFERROR(VLOOKUP([$Masterlist.$P66];[$Datasheet.$B$1:.$AV$9809];8;FALSE());&quot;-&quot;)" office:value-type="float" office:value="1" calcext:value-type="float">
            <text:p>1</text:p>
          </table:table-cell>
          <table:table-cell table:style-name="ce133" table:formula="of:=IFERROR(VLOOKUP([$Masterlist.$P66];[$Datasheet.$B$1:.$AV$9809];9;FALSE());&quot;-&quot;)" office:value-type="float" office:value="1" calcext:value-type="float">
            <text:p>1</text:p>
          </table:table-cell>
          <table:table-cell table:style-name="ce133" table:formula="of:=IFERROR(VLOOKUP([$Masterlist.$P66];[$Datasheet.$B$1:.$AV$9809];10;FALSE());&quot;-&quot;)" office:value-type="float" office:value="1" calcext:value-type="float">
            <text:p>1</text:p>
          </table:table-cell>
          <table:table-cell table:style-name="ce133" table:formula="of:=IFERROR(VLOOKUP([$Masterlist.$P66];[$Datasheet.$B$1:.$AV$9809];11;FALSE());&quot;-&quot;)" office:value-type="float" office:value="1" calcext:value-type="float">
            <text:p>1</text:p>
          </table:table-cell>
          <table:table-cell table:style-name="ce133" table:formula="of:=IFERROR(VLOOKUP([$Masterlist.$P66];[$Datasheet.$B$1:.$AV$9809];12;FALSE());&quot;-&quot;)" office:value-type="float" office:value="0" calcext:value-type="float">
            <text:p>0</text:p>
          </table:table-cell>
          <table:table-cell table:style-name="ce133" table:formula="of:=IFERROR(VLOOKUP([$Masterlist.$P66];[$Datasheet.$B$1:.$AV$9809];13;FALSE());&quot;-&quot;)" office:value-type="float" office:value="0" calcext:value-type="float">
            <text:p>0</text:p>
          </table:table-cell>
          <table:table-cell table:style-name="ce133" table:formula="of:=IFERROR(VLOOKUP([$Masterlist.$P66];[$Datasheet.$B$1:.$AV$9809];14;FALSE());&quot;-&quot;)" office:value-type="float" office:value="1" calcext:value-type="float">
            <text:p>1</text:p>
          </table:table-cell>
          <table:table-cell table:style-name="ce133" table:formula="of:=IFERROR(VLOOKUP([$Masterlist.$P66];[$Datasheet.$B$1:.$AV$9809];15;FALSE());&quot;-&quot;)" office:value-type="float" office:value="1" calcext:value-type="float">
            <text:p>1</text:p>
          </table:table-cell>
          <table:table-cell table:style-name="ce133" table:formula="of:=IFERROR(VLOOKUP([$Masterlist.$P66];[$Datasheet.$B$1:.$AV$9809];16;FALSE());&quot;-&quot;)" office:value-type="float" office:value="0" calcext:value-type="float">
            <text:p/>
          </table:table-cell>
          <table:table-cell table:style-name="ce133" table:formula="of:=IFERROR(VLOOKUP([$Masterlist.$P66];[$Datasheet.$B$1:.$AV$9809];17;FALSE());&quot;-&quot;)" office:value-type="float" office:value="0" calcext:value-type="float">
            <text:p/>
          </table:table-cell>
          <table:table-cell table:style-name="ce133" table:formula="of:=IFERROR(VLOOKUP([$Masterlist.$P66];[$Datasheet.$B$1:.$AV$9809];18;FALSE());&quot;-&quot;)" office:value-type="float" office:value="0" calcext:value-type="float">
            <text:p/>
          </table:table-cell>
          <table:table-cell table:style-name="ce133" table:formula="of:=IFERROR(VLOOKUP([$Masterlist.$P66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6"/>
          <table:table-cell table:style-name="ce27" office:value-type="string" calcext:value-type="string">
            <text:p>L</text:p>
          </table:table-cell>
          <table:table-cell table:style-name="ce50" table:number-columns-repeated="5"/>
          <table:table-cell table:number-columns-repeated="3" table:style-name="ce50" office:value-type="string" calcext:value-type="string">
            <text:p>yes</text:p>
          </table:table-cell>
          <table:table-cell table:style-name="ce50" table:number-columns-repeated="4"/>
          <table:table-cell table:style-name="ce92" office:value-type="string" calcext:value-type="string">
            <text:p>FOH Sound Assistant</text:p>
          </table:table-cell>
          <table:table-cell table:style-name="ce8" office:value-type="string" calcext:value-type="string">
            <text:p>Jestus Fouche</text:p>
          </table:table-cell>
          <table:table-cell table:style-name="ce13" table:formula="of:=IF(ISNUMBER(MATCH([.P67];[$Datasheet.$B$1:.$B$9809];0));&quot;✓&quot;;&quot;x&quot;)" office:value-type="string" office:string-value="✓" calcext:value-type="string">
            <text:p>✓</text:p>
          </table:table-cell>
          <table:table-cell table:style-name="ce133" table:formula="of:=IFERROR(VLOOKUP([$Masterlist.$P67];[$Datasheet.$B$1:.$AV$9809];2;FALSE());&quot;-&quot;)" office:value-type="float" office:value="1" calcext:value-type="float">
            <text:p>1</text:p>
          </table:table-cell>
          <table:table-cell table:style-name="ce133" table:formula="of:=IFERROR(VLOOKUP([$Masterlist.$P67];[$Datasheet.$B$1:.$AV$9809];3;FALSE());&quot;-&quot;)" office:value-type="float" office:value="0" calcext:value-type="float">
            <text:p>0</text:p>
          </table:table-cell>
          <table:table-cell table:style-name="ce133" table:formula="of:=IFERROR(VLOOKUP([$Masterlist.$P67];[$Datasheet.$B$1:.$AV$9809];4;FALSE());&quot;-&quot;)" office:value-type="float" office:value="1" calcext:value-type="float">
            <text:p>1</text:p>
          </table:table-cell>
          <table:table-cell table:style-name="ce133" table:formula="of:=IFERROR(VLOOKUP([$Masterlist.$P67];[$Datasheet.$B$1:.$AV$9809];5;FALSE());&quot;-&quot;)" office:value-type="float" office:value="1" calcext:value-type="float">
            <text:p>1</text:p>
          </table:table-cell>
          <table:table-cell table:style-name="ce185" table:formula="of:=IFERROR(VLOOKUP([$Masterlist.$P67];[$Datasheet.$B$1:.$AV$9809];6;FALSE());&quot;-&quot;)" office:value-type="float" office:value="1" calcext:value-type="float">
            <text:p>1</text:p>
          </table:table-cell>
          <table:table-cell table:style-name="ce133" table:formula="of:=IFERROR(VLOOKUP([$Masterlist.$P67];[$Datasheet.$B$1:.$AV$9809];7;FALSE());&quot;-&quot;)" office:value-type="float" office:value="1" calcext:value-type="float">
            <text:p>1</text:p>
          </table:table-cell>
          <table:table-cell table:style-name="ce133" table:formula="of:=IFERROR(VLOOKUP([$Masterlist.$P67];[$Datasheet.$B$1:.$AV$9809];8;FALSE());&quot;-&quot;)" office:value-type="float" office:value="0" calcext:value-type="float">
            <text:p>0</text:p>
          </table:table-cell>
          <table:table-cell table:style-name="ce133" table:formula="of:=IFERROR(VLOOKUP([$Masterlist.$P67];[$Datasheet.$B$1:.$AV$9809];9;FALSE());&quot;-&quot;)" office:value-type="float" office:value="0" calcext:value-type="float">
            <text:p>0</text:p>
          </table:table-cell>
          <table:table-cell table:style-name="ce133" table:formula="of:=IFERROR(VLOOKUP([$Masterlist.$P67];[$Datasheet.$B$1:.$AV$9809];10;FALSE());&quot;-&quot;)" office:value-type="float" office:value="0" calcext:value-type="float">
            <text:p>0</text:p>
          </table:table-cell>
          <table:table-cell table:style-name="ce133" table:formula="of:=IFERROR(VLOOKUP([$Masterlist.$P67];[$Datasheet.$B$1:.$AV$9809];11;FALSE());&quot;-&quot;)" office:value-type="float" office:value="0" calcext:value-type="float">
            <text:p>0</text:p>
          </table:table-cell>
          <table:table-cell table:style-name="ce133" table:formula="of:=IFERROR(VLOOKUP([$Masterlist.$P67];[$Datasheet.$B$1:.$AV$9809];12;FALSE());&quot;-&quot;)" office:value-type="float" office:value="1" calcext:value-type="float">
            <text:p>1</text:p>
          </table:table-cell>
          <table:table-cell table:style-name="ce133" table:formula="of:=IFERROR(VLOOKUP([$Masterlist.$P67];[$Datasheet.$B$1:.$AV$9809];13;FALSE());&quot;-&quot;)" office:value-type="float" office:value="1" calcext:value-type="float">
            <text:p>1</text:p>
          </table:table-cell>
          <table:table-cell table:style-name="ce133" table:formula="of:=IFERROR(VLOOKUP([$Masterlist.$P67];[$Datasheet.$B$1:.$AV$9809];14;FALSE());&quot;-&quot;)" office:value-type="float" office:value="1" calcext:value-type="float">
            <text:p>1</text:p>
          </table:table-cell>
          <table:table-cell table:style-name="ce133" table:formula="of:=IFERROR(VLOOKUP([$Masterlist.$P67];[$Datasheet.$B$1:.$AV$9809];15;FALSE());&quot;-&quot;)" office:value-type="float" office:value="1" calcext:value-type="float">
            <text:p>1</text:p>
          </table:table-cell>
          <table:table-cell table:style-name="ce133" table:formula="of:=IFERROR(VLOOKUP([$Masterlist.$P67];[$Datasheet.$B$1:.$AV$9809];16;FALSE());&quot;-&quot;)" office:value-type="float" office:value="0" calcext:value-type="float">
            <text:p/>
          </table:table-cell>
          <table:table-cell table:style-name="ce133" table:formula="of:=IFERROR(VLOOKUP([$Masterlist.$P67];[$Datasheet.$B$1:.$AV$9809];17;FALSE());&quot;-&quot;)" office:value-type="float" office:value="0" calcext:value-type="float">
            <text:p/>
          </table:table-cell>
          <table:table-cell table:style-name="ce133" table:formula="of:=IFERROR(VLOOKUP([$Masterlist.$P67];[$Datasheet.$B$1:.$AV$9809];18;FALSE());&quot;-&quot;)" office:value-type="float" office:value="0" calcext:value-type="float">
            <text:p/>
          </table:table-cell>
          <table:table-cell table:style-name="ce133" table:formula="of:=IFERROR(VLOOKUP([$Masterlist.$P67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6"/>
          <table:table-cell table:style-name="ce26" office:value-type="string" calcext:value-type="string">
            <text:p>L</text:p>
          </table:table-cell>
          <table:table-cell table:style-name="ce50" table:number-columns-repeated="5"/>
          <table:table-cell table:number-columns-repeated="3" table:style-name="ce50" office:value-type="string" calcext:value-type="string">
            <text:p>yes</text:p>
          </table:table-cell>
          <table:table-cell table:style-name="ce50" table:number-columns-repeated="4"/>
          <table:table-cell table:style-name="ce92" office:value-type="string" calcext:value-type="string">
            <text:p>FOH Sound / FOH Sound Assistant</text:p>
          </table:table-cell>
          <table:table-cell table:style-name="ce8" office:value-type="string" calcext:value-type="string">
            <text:p>JP Marais</text:p>
          </table:table-cell>
          <table:table-cell table:style-name="ce13" table:formula="of:=IF(ISNUMBER(MATCH([.P68];[$Datasheet.$B$1:.$B$9809];0));&quot;✓&quot;;&quot;x&quot;)" office:value-type="string" office:string-value="✓" calcext:value-type="string">
            <text:p>✓</text:p>
          </table:table-cell>
          <table:table-cell table:style-name="ce133" table:formula="of:=IFERROR(VLOOKUP([$Masterlist.$P68];[$Datasheet.$B$1:.$AV$9809];2;FALSE());&quot;-&quot;)" office:value-type="float" office:value="1" calcext:value-type="float">
            <text:p>1</text:p>
          </table:table-cell>
          <table:table-cell table:style-name="ce133" table:formula="of:=IFERROR(VLOOKUP([$Masterlist.$P68];[$Datasheet.$B$1:.$AV$9809];3;FALSE());&quot;-&quot;)" office:value-type="float" office:value="1" calcext:value-type="float">
            <text:p>1</text:p>
          </table:table-cell>
          <table:table-cell table:style-name="ce133" table:formula="of:=IFERROR(VLOOKUP([$Masterlist.$P68];[$Datasheet.$B$1:.$AV$9809];4;FALSE());&quot;-&quot;)" office:value-type="float" office:value="0" calcext:value-type="float">
            <text:p>0</text:p>
          </table:table-cell>
          <table:table-cell table:style-name="ce133" table:formula="of:=IFERROR(VLOOKUP([$Masterlist.$P68];[$Datasheet.$B$1:.$AV$9809];5;FALSE());&quot;-&quot;)" office:value-type="float" office:value="0" calcext:value-type="float">
            <text:p>0</text:p>
          </table:table-cell>
          <table:table-cell table:style-name="ce185" table:formula="of:=IFERROR(VLOOKUP([$Masterlist.$P68];[$Datasheet.$B$1:.$AV$9809];6;FALSE());&quot;-&quot;)" office:value-type="float" office:value="1" calcext:value-type="float">
            <text:p>1</text:p>
          </table:table-cell>
          <table:table-cell table:style-name="ce133" table:formula="of:=IFERROR(VLOOKUP([$Masterlist.$P68];[$Datasheet.$B$1:.$AV$9809];7;FALSE());&quot;-&quot;)" office:value-type="float" office:value="1" calcext:value-type="float">
            <text:p>1</text:p>
          </table:table-cell>
          <table:table-cell table:style-name="ce133" table:formula="of:=IFERROR(VLOOKUP([$Masterlist.$P68];[$Datasheet.$B$1:.$AV$9809];8;FALSE());&quot;-&quot;)" office:value-type="float" office:value="1" calcext:value-type="float">
            <text:p>1</text:p>
          </table:table-cell>
          <table:table-cell table:style-name="ce133" table:formula="of:=IFERROR(VLOOKUP([$Masterlist.$P68];[$Datasheet.$B$1:.$AV$9809];9;FALSE());&quot;-&quot;)" office:value-type="float" office:value="1" calcext:value-type="float">
            <text:p>1</text:p>
          </table:table-cell>
          <table:table-cell table:style-name="ce133" table:formula="of:=IFERROR(VLOOKUP([$Masterlist.$P68];[$Datasheet.$B$1:.$AV$9809];10;FALSE());&quot;-&quot;)" office:value-type="float" office:value="0" calcext:value-type="float">
            <text:p>0</text:p>
          </table:table-cell>
          <table:table-cell table:style-name="ce133" table:formula="of:=IFERROR(VLOOKUP([$Masterlist.$P68];[$Datasheet.$B$1:.$AV$9809];11;FALSE());&quot;-&quot;)" office:value-type="float" office:value="0" calcext:value-type="float">
            <text:p>0</text:p>
          </table:table-cell>
          <table:table-cell table:style-name="ce133" table:formula="of:=IFERROR(VLOOKUP([$Masterlist.$P68];[$Datasheet.$B$1:.$AV$9809];12;FALSE());&quot;-&quot;)" office:value-type="float" office:value="1" calcext:value-type="float">
            <text:p>1</text:p>
          </table:table-cell>
          <table:table-cell table:style-name="ce133" table:formula="of:=IFERROR(VLOOKUP([$Masterlist.$P68];[$Datasheet.$B$1:.$AV$9809];13;FALSE());&quot;-&quot;)" office:value-type="float" office:value="1" calcext:value-type="float">
            <text:p>1</text:p>
          </table:table-cell>
          <table:table-cell table:style-name="ce133" table:formula="of:=IFERROR(VLOOKUP([$Masterlist.$P68];[$Datasheet.$B$1:.$AV$9809];14;FALSE());&quot;-&quot;)" office:value-type="float" office:value="1" calcext:value-type="float">
            <text:p>1</text:p>
          </table:table-cell>
          <table:table-cell table:style-name="ce133" table:formula="of:=IFERROR(VLOOKUP([$Masterlist.$P68];[$Datasheet.$B$1:.$AV$9809];15;FALSE());&quot;-&quot;)" office:value-type="float" office:value="1" calcext:value-type="float">
            <text:p>1</text:p>
          </table:table-cell>
          <table:table-cell table:style-name="ce133" table:formula="of:=IFERROR(VLOOKUP([$Masterlist.$P68];[$Datasheet.$B$1:.$AV$9809];16;FALSE());&quot;-&quot;)" office:value-type="float" office:value="0" calcext:value-type="float">
            <text:p/>
          </table:table-cell>
          <table:table-cell table:style-name="ce133" table:formula="of:=IFERROR(VLOOKUP([$Masterlist.$P68];[$Datasheet.$B$1:.$AV$9809];17;FALSE());&quot;-&quot;)" office:value-type="float" office:value="0" calcext:value-type="float">
            <text:p/>
          </table:table-cell>
          <table:table-cell table:style-name="ce133" table:formula="of:=IFERROR(VLOOKUP([$Masterlist.$P68];[$Datasheet.$B$1:.$AV$9809];18;FALSE());&quot;-&quot;)" office:value-type="float" office:value="0" calcext:value-type="float">
            <text:p/>
          </table:table-cell>
          <table:table-cell table:style-name="ce133" table:formula="of:=IFERROR(VLOOKUP([$Masterlist.$P68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6"/>
          <table:table-cell table:style-name="ce26" office:value-type="string" calcext:value-type="string">
            <text:p>AL</text:p>
          </table:table-cell>
          <table:table-cell table:style-name="ce50" table:number-columns-repeated="5"/>
          <table:table-cell table:number-columns-repeated="3" table:style-name="ce50" office:value-type="string" calcext:value-type="string">
            <text:p>yes</text:p>
          </table:table-cell>
          <table:table-cell table:style-name="ce50" table:number-columns-repeated="4"/>
          <table:table-cell table:style-name="ce92" office:value-type="string" calcext:value-type="string">
            <text:p>FOH Sound / FOH Sound Assistant</text:p>
          </table:table-cell>
          <table:table-cell table:style-name="ce8" office:value-type="string" calcext:value-type="string">
            <text:p>Christian Van Der Merwe</text:p>
          </table:table-cell>
          <table:table-cell table:style-name="ce13" table:formula="of:=IF(ISNUMBER(MATCH([.P69];[$Datasheet.$B$1:.$B$9809];0));&quot;✓&quot;;&quot;x&quot;)" office:value-type="string" office:string-value="✓" calcext:value-type="string">
            <text:p>✓</text:p>
          </table:table-cell>
          <table:table-cell table:style-name="ce133" table:formula="of:=IFERROR(VLOOKUP([$Masterlist.$P69];[$Datasheet.$B$1:.$AV$9809];2;FALSE());&quot;-&quot;)" office:value-type="float" office:value="1" calcext:value-type="float">
            <text:p>1</text:p>
          </table:table-cell>
          <table:table-cell table:style-name="ce133" table:formula="of:=IFERROR(VLOOKUP([$Masterlist.$P69];[$Datasheet.$B$1:.$AV$9809];3;FALSE());&quot;-&quot;)" office:value-type="float" office:value="1" calcext:value-type="float">
            <text:p>1</text:p>
          </table:table-cell>
          <table:table-cell table:style-name="ce133" table:formula="of:=IFERROR(VLOOKUP([$Masterlist.$P69];[$Datasheet.$B$1:.$AV$9809];4;FALSE());&quot;-&quot;)" office:value-type="float" office:value="1" calcext:value-type="float">
            <text:p>1</text:p>
          </table:table-cell>
          <table:table-cell table:style-name="ce133" table:formula="of:=IFERROR(VLOOKUP([$Masterlist.$P69];[$Datasheet.$B$1:.$AV$9809];5;FALSE());&quot;-&quot;)" office:value-type="float" office:value="1" calcext:value-type="float">
            <text:p>1</text:p>
          </table:table-cell>
          <table:table-cell table:style-name="ce185" table:formula="of:=IFERROR(VLOOKUP([$Masterlist.$P69];[$Datasheet.$B$1:.$AV$9809];6;FALSE());&quot;-&quot;)" office:value-type="float" office:value="1" calcext:value-type="float">
            <text:p>1</text:p>
          </table:table-cell>
          <table:table-cell table:style-name="ce133" table:formula="of:=IFERROR(VLOOKUP([$Masterlist.$P69];[$Datasheet.$B$1:.$AV$9809];7;FALSE());&quot;-&quot;)" office:value-type="float" office:value="1" calcext:value-type="float">
            <text:p>1</text:p>
          </table:table-cell>
          <table:table-cell table:style-name="ce133" table:formula="of:=IFERROR(VLOOKUP([$Masterlist.$P69];[$Datasheet.$B$1:.$AV$9809];8;FALSE());&quot;-&quot;)" office:value-type="float" office:value="1" calcext:value-type="float">
            <text:p>1</text:p>
          </table:table-cell>
          <table:table-cell table:style-name="ce133" table:formula="of:=IFERROR(VLOOKUP([$Masterlist.$P69];[$Datasheet.$B$1:.$AV$9809];9;FALSE());&quot;-&quot;)" office:value-type="float" office:value="1" calcext:value-type="float">
            <text:p>1</text:p>
          </table:table-cell>
          <table:table-cell table:style-name="ce133" table:formula="of:=IFERROR(VLOOKUP([$Masterlist.$P69];[$Datasheet.$B$1:.$AV$9809];10;FALSE());&quot;-&quot;)" office:value-type="float" office:value="1" calcext:value-type="float">
            <text:p>1</text:p>
          </table:table-cell>
          <table:table-cell table:style-name="ce133" table:formula="of:=IFERROR(VLOOKUP([$Masterlist.$P69];[$Datasheet.$B$1:.$AV$9809];11;FALSE());&quot;-&quot;)" office:value-type="float" office:value="1" calcext:value-type="float">
            <text:p>1</text:p>
          </table:table-cell>
          <table:table-cell table:style-name="ce133" table:formula="of:=IFERROR(VLOOKUP([$Masterlist.$P69];[$Datasheet.$B$1:.$AV$9809];12;FALSE());&quot;-&quot;)" office:value-type="float" office:value="1" calcext:value-type="float">
            <text:p>1</text:p>
          </table:table-cell>
          <table:table-cell table:style-name="ce133" table:formula="of:=IFERROR(VLOOKUP([$Masterlist.$P69];[$Datasheet.$B$1:.$AV$9809];13;FALSE());&quot;-&quot;)" office:value-type="float" office:value="1" calcext:value-type="float">
            <text:p>1</text:p>
          </table:table-cell>
          <table:table-cell table:style-name="ce133" table:formula="of:=IFERROR(VLOOKUP([$Masterlist.$P69];[$Datasheet.$B$1:.$AV$9809];14;FALSE());&quot;-&quot;)" office:value-type="float" office:value="1" calcext:value-type="float">
            <text:p>1</text:p>
          </table:table-cell>
          <table:table-cell table:style-name="ce133" table:formula="of:=IFERROR(VLOOKUP([$Masterlist.$P69];[$Datasheet.$B$1:.$AV$9809];15;FALSE());&quot;-&quot;)" office:value-type="float" office:value="1" calcext:value-type="float">
            <text:p>1</text:p>
          </table:table-cell>
          <table:table-cell table:style-name="ce133" table:formula="of:=IFERROR(VLOOKUP([$Masterlist.$P69];[$Datasheet.$B$1:.$AV$9809];16;FALSE());&quot;-&quot;)" office:value-type="float" office:value="0" calcext:value-type="float">
            <text:p/>
          </table:table-cell>
          <table:table-cell table:style-name="ce133" table:formula="of:=IFERROR(VLOOKUP([$Masterlist.$P69];[$Datasheet.$B$1:.$AV$9809];17;FALSE());&quot;-&quot;)" office:value-type="float" office:value="0" calcext:value-type="float">
            <text:p/>
          </table:table-cell>
          <table:table-cell table:style-name="ce133" table:formula="of:=IFERROR(VLOOKUP([$Masterlist.$P69];[$Datasheet.$B$1:.$AV$9809];18;FALSE());&quot;-&quot;)" office:value-type="float" office:value="0" calcext:value-type="float">
            <text:p/>
          </table:table-cell>
          <table:table-cell table:style-name="ce133" table:formula="of:=IFERROR(VLOOKUP([$Masterlist.$P69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7"/>
          <table:table-cell table:style-name="ce30" office:value-type="string" calcext:value-type="string">
            <text:p>L</text:p>
          </table:table-cell>
          <table:table-cell table:style-name="ce53" table:number-columns-repeated="5"/>
          <table:table-cell table:style-name="ce74" office:value-type="string" calcext:value-type="string">
            <text:p>yes</text:p>
          </table:table-cell>
          <table:table-cell table:number-columns-repeated="2" table:style-name="ce50" office:value-type="string" calcext:value-type="string">
            <text:p>yes</text:p>
          </table:table-cell>
          <table:table-cell table:style-name="ce53" table:number-columns-repeated="4"/>
          <table:table-cell table:style-name="ce17" office:value-type="string" calcext:value-type="string">
            <text:p>FOH Sound Assistant</text:p>
          </table:table-cell>
          <table:table-cell table:style-name="ce17" office:value-type="string" calcext:value-type="string">
            <text:p>Mikael Pretorius</text:p>
          </table:table-cell>
          <table:table-cell table:style-name="ce118" table:formula="of:=IF(ISNUMBER(MATCH([.P70];[$Datasheet.$B$1:.$B$9809];0));&quot;✓&quot;;&quot;x&quot;)" office:value-type="string" office:string-value="✓" calcext:value-type="string">
            <text:p>✓</text:p>
          </table:table-cell>
          <table:table-cell table:style-name="ce137" table:formula="of:=IFERROR(VLOOKUP([$Masterlist.$P70];[$Datasheet.$B$1:.$AV$9809];2;FALSE());&quot;-&quot;)" office:value-type="float" office:value="0" calcext:value-type="float">
            <text:p>0</text:p>
          </table:table-cell>
          <table:table-cell table:style-name="ce172" table:formula="of:=IFERROR(VLOOKUP([$Masterlist.$P70];[$Datasheet.$B$1:.$AV$9809];3;FALSE());&quot;-&quot;)" office:value-type="float" office:value="1" calcext:value-type="float">
            <text:p>1</text:p>
          </table:table-cell>
          <table:table-cell table:style-name="ce137" table:formula="of:=IFERROR(VLOOKUP([$Masterlist.$P70];[$Datasheet.$B$1:.$AV$9809];4;FALSE());&quot;-&quot;)" office:value-type="float" office:value="1" calcext:value-type="float">
            <text:p>1</text:p>
          </table:table-cell>
          <table:table-cell table:style-name="ce172" table:formula="of:=IFERROR(VLOOKUP([$Masterlist.$P70];[$Datasheet.$B$1:.$AV$9809];5;FALSE());&quot;-&quot;)" office:value-type="float" office:value="0" calcext:value-type="float">
            <text:p>0</text:p>
          </table:table-cell>
          <table:table-cell table:style-name="ce187" table:formula="of:=IFERROR(VLOOKUP([$Masterlist.$P70];[$Datasheet.$B$1:.$AV$9809];6;FALSE());&quot;-&quot;)" office:value-type="float" office:value="0" calcext:value-type="float">
            <text:p>0</text:p>
          </table:table-cell>
          <table:table-cell table:style-name="ce172" table:formula="of:=IFERROR(VLOOKUP([$Masterlist.$P70];[$Datasheet.$B$1:.$AV$9809];7;FALSE());&quot;-&quot;)" office:value-type="float" office:value="1" calcext:value-type="float">
            <text:p>1</text:p>
          </table:table-cell>
          <table:table-cell table:style-name="ce137" table:formula="of:=IFERROR(VLOOKUP([$Masterlist.$P70];[$Datasheet.$B$1:.$AV$9809];8;FALSE());&quot;-&quot;)" office:value-type="float" office:value="1" calcext:value-type="float">
            <text:p>1</text:p>
          </table:table-cell>
          <table:table-cell table:style-name="ce137" table:formula="of:=IFERROR(VLOOKUP([$Masterlist.$P70];[$Datasheet.$B$1:.$AV$9809];9;FALSE());&quot;-&quot;)" office:value-type="float" office:value="1" calcext:value-type="float">
            <text:p>1</text:p>
          </table:table-cell>
          <table:table-cell table:style-name="ce137" table:formula="of:=IFERROR(VLOOKUP([$Masterlist.$P70];[$Datasheet.$B$1:.$AV$9809];10;FALSE());&quot;-&quot;)" office:value-type="float" office:value="0" calcext:value-type="float">
            <text:p>0</text:p>
          </table:table-cell>
          <table:table-cell table:style-name="ce172" table:formula="of:=IFERROR(VLOOKUP([$Masterlist.$P70];[$Datasheet.$B$1:.$AV$9809];11;FALSE());&quot;-&quot;)" office:value-type="float" office:value="1" calcext:value-type="float">
            <text:p>1</text:p>
          </table:table-cell>
          <table:table-cell table:style-name="ce172" table:formula="of:=IFERROR(VLOOKUP([$Masterlist.$P70];[$Datasheet.$B$1:.$AV$9809];12;FALSE());&quot;-&quot;)" office:value-type="float" office:value="0" calcext:value-type="float">
            <text:p>0</text:p>
          </table:table-cell>
          <table:table-cell table:style-name="ce172" table:formula="of:=IFERROR(VLOOKUP([$Masterlist.$P70];[$Datasheet.$B$1:.$AV$9809];13;FALSE());&quot;-&quot;)" office:value-type="float" office:value="1" calcext:value-type="float">
            <text:p>1</text:p>
          </table:table-cell>
          <table:table-cell table:style-name="ce137" table:formula="of:=IFERROR(VLOOKUP([$Masterlist.$P70];[$Datasheet.$B$1:.$AV$9809];14;FALSE());&quot;-&quot;)" office:value-type="float" office:value="1" calcext:value-type="float">
            <text:p>1</text:p>
          </table:table-cell>
          <table:table-cell table:style-name="ce137" table:formula="of:=IFERROR(VLOOKUP([$Masterlist.$P70];[$Datasheet.$B$1:.$AV$9809];15;FALSE());&quot;-&quot;)" office:value-type="float" office:value="0" calcext:value-type="float">
            <text:p>0</text:p>
          </table:table-cell>
          <table:table-cell table:style-name="ce172" table:formula="of:=IFERROR(VLOOKUP([$Masterlist.$P70];[$Datasheet.$B$1:.$AV$9809];16;FALSE());&quot;-&quot;)" office:value-type="float" office:value="0" calcext:value-type="float">
            <text:p/>
          </table:table-cell>
          <table:table-cell table:style-name="ce137" table:formula="of:=IFERROR(VLOOKUP([$Masterlist.$P70];[$Datasheet.$B$1:.$AV$9809];17;FALSE());&quot;-&quot;)" office:value-type="float" office:value="0" calcext:value-type="float">
            <text:p/>
          </table:table-cell>
          <table:table-cell table:style-name="ce172" table:formula="of:=IFERROR(VLOOKUP([$Masterlist.$P70];[$Datasheet.$B$1:.$AV$9809];18;FALSE());&quot;-&quot;)" office:value-type="float" office:value="0" calcext:value-type="float">
            <text:p/>
          </table:table-cell>
          <table:table-cell table:style-name="ce137" table:formula="of:=IFERROR(VLOOKUP([$Masterlist.$P70];[$Datasheet.$B$1:.$AV$9809];19;FALSE());&quot;-&quot;)" office:value-type="float" office:value="0" calcext:value-type="float">
            <text:p/>
          </table:table-cell>
          <table:table-cell table:style-name="ce18" table:number-columns-repeated="2"/>
          <table:table-cell table:number-columns-repeated="16347"/>
        </table:table-row>
        <table:table-row table:style-name="ro1">
          <table:table-cell table:style-name="ce17"/>
          <table:table-cell table:style-name="ce30" office:value-type="string" calcext:value-type="string">
            <text:p>L</text:p>
          </table:table-cell>
          <table:table-cell table:style-name="ce53" table:number-columns-repeated="5"/>
          <table:table-cell table:style-name="ce74" office:value-type="string" calcext:value-type="string">
            <text:p>yes</text:p>
          </table:table-cell>
          <table:table-cell table:number-columns-repeated="2" table:style-name="ce50" office:value-type="string" calcext:value-type="string">
            <text:p>yes</text:p>
          </table:table-cell>
          <table:table-cell table:style-name="ce53" table:number-columns-repeated="4"/>
          <table:table-cell table:style-name="ce17" office:value-type="string" calcext:value-type="string">
            <text:p>FOH Sound Assistant</text:p>
          </table:table-cell>
          <table:table-cell table:style-name="ce103" office:value-type="string" calcext:value-type="string">
            <text:p>Eugene Snyders</text:p>
          </table:table-cell>
          <table:table-cell table:style-name="ce118" table:formula="of:=IF(ISNUMBER(MATCH([.P71];[$Datasheet.$B$1:.$B$9809];0));&quot;✓&quot;;&quot;x&quot;)" office:value-type="string" office:string-value="✓" calcext:value-type="string">
            <text:p>✓</text:p>
          </table:table-cell>
          <table:table-cell table:style-name="ce138" table:formula="of:=IFERROR(VLOOKUP([$Masterlist.$P71];[$Datasheet.$B$1:.$AV$9809];2;FALSE());&quot;-&quot;)" office:value-type="float" office:value="1" calcext:value-type="float">
            <text:p>1</text:p>
          </table:table-cell>
          <table:table-cell table:style-name="ce138" table:formula="of:=IFERROR(VLOOKUP([$Masterlist.$P71];[$Datasheet.$B$1:.$AV$9809];3;FALSE());&quot;-&quot;)" office:value-type="float" office:value="1" calcext:value-type="float">
            <text:p>1</text:p>
          </table:table-cell>
          <table:table-cell table:style-name="ce138" table:formula="of:=IFERROR(VLOOKUP([$Masterlist.$P71];[$Datasheet.$B$1:.$AV$9809];4;FALSE());&quot;-&quot;)" office:value-type="float" office:value="0" calcext:value-type="float">
            <text:p>0</text:p>
          </table:table-cell>
          <table:table-cell table:style-name="ce138" table:formula="of:=IFERROR(VLOOKUP([$Masterlist.$P71];[$Datasheet.$B$1:.$AV$9809];5;FALSE());&quot;-&quot;)" office:value-type="float" office:value="0" calcext:value-type="float">
            <text:p>0</text:p>
          </table:table-cell>
          <table:table-cell table:style-name="ce188" table:formula="of:=IFERROR(VLOOKUP([$Masterlist.$P71];[$Datasheet.$B$1:.$AV$9809];6;FALSE());&quot;-&quot;)" office:value-type="float" office:value="1" calcext:value-type="float">
            <text:p>1</text:p>
          </table:table-cell>
          <table:table-cell table:style-name="ce138" table:formula="of:=IFERROR(VLOOKUP([$Masterlist.$P71];[$Datasheet.$B$1:.$AV$9809];7;FALSE());&quot;-&quot;)" office:value-type="float" office:value="1" calcext:value-type="float">
            <text:p>1</text:p>
          </table:table-cell>
          <table:table-cell table:style-name="ce138" table:formula="of:=IFERROR(VLOOKUP([$Masterlist.$P71];[$Datasheet.$B$1:.$AV$9809];8;FALSE());&quot;-&quot;)" office:value-type="float" office:value="1" calcext:value-type="float">
            <text:p>1</text:p>
          </table:table-cell>
          <table:table-cell table:style-name="ce138" table:formula="of:=IFERROR(VLOOKUP([$Masterlist.$P71];[$Datasheet.$B$1:.$AV$9809];9;FALSE());&quot;-&quot;)" office:value-type="float" office:value="1" calcext:value-type="float">
            <text:p>1</text:p>
          </table:table-cell>
          <table:table-cell table:style-name="ce138" table:formula="of:=IFERROR(VLOOKUP([$Masterlist.$P71];[$Datasheet.$B$1:.$AV$9809];10;FALSE());&quot;-&quot;)" office:value-type="float" office:value="1" calcext:value-type="float">
            <text:p>1</text:p>
          </table:table-cell>
          <table:table-cell table:style-name="ce138" table:formula="of:=IFERROR(VLOOKUP([$Masterlist.$P71];[$Datasheet.$B$1:.$AV$9809];11;FALSE());&quot;-&quot;)" office:value-type="float" office:value="1" calcext:value-type="float">
            <text:p>1</text:p>
          </table:table-cell>
          <table:table-cell table:style-name="ce138" table:formula="of:=IFERROR(VLOOKUP([$Masterlist.$P71];[$Datasheet.$B$1:.$AV$9809];12;FALSE());&quot;-&quot;)" office:value-type="float" office:value="1" calcext:value-type="float">
            <text:p>1</text:p>
          </table:table-cell>
          <table:table-cell table:style-name="ce138" table:formula="of:=IFERROR(VLOOKUP([$Masterlist.$P71];[$Datasheet.$B$1:.$AV$9809];13;FALSE());&quot;-&quot;)" office:value-type="float" office:value="1" calcext:value-type="float">
            <text:p>1</text:p>
          </table:table-cell>
          <table:table-cell table:style-name="ce138" table:formula="of:=IFERROR(VLOOKUP([$Masterlist.$P71];[$Datasheet.$B$1:.$AV$9809];14;FALSE());&quot;-&quot;)" office:value-type="float" office:value="1" calcext:value-type="float">
            <text:p>1</text:p>
          </table:table-cell>
          <table:table-cell table:style-name="ce138" table:formula="of:=IFERROR(VLOOKUP([$Masterlist.$P71];[$Datasheet.$B$1:.$AV$9809];15;FALSE());&quot;-&quot;)" office:value-type="float" office:value="1" calcext:value-type="float">
            <text:p>1</text:p>
          </table:table-cell>
          <table:table-cell table:style-name="ce138" table:formula="of:=IFERROR(VLOOKUP([$Masterlist.$P71];[$Datasheet.$B$1:.$AV$9809];16;FALSE());&quot;-&quot;)" office:value-type="float" office:value="0" calcext:value-type="float">
            <text:p/>
          </table:table-cell>
          <table:table-cell table:style-name="ce138" table:formula="of:=IFERROR(VLOOKUP([$Masterlist.$P71];[$Datasheet.$B$1:.$AV$9809];17;FALSE());&quot;-&quot;)" office:value-type="float" office:value="0" calcext:value-type="float">
            <text:p/>
          </table:table-cell>
          <table:table-cell table:style-name="ce138" table:formula="of:=IFERROR(VLOOKUP([$Masterlist.$P71];[$Datasheet.$B$1:.$AV$9809];18;FALSE());&quot;-&quot;)" office:value-type="float" office:value="0" calcext:value-type="float">
            <text:p/>
          </table:table-cell>
          <table:table-cell table:style-name="ce138" table:formula="of:=IFERROR(VLOOKUP([$Masterlist.$P71];[$Datasheet.$B$1:.$AV$9809];19;FALSE());&quot;-&quot;)" office:value-type="float" office:value="0" calcext:value-type="float">
            <text:p/>
          </table:table-cell>
          <table:table-cell table:style-name="ce18" table:number-columns-repeated="2"/>
          <table:table-cell table:number-columns-repeated="16347"/>
        </table:table-row>
        <table:table-row table:style-name="ro1">
          <table:table-cell table:style-name="ce16"/>
          <table:table-cell table:style-name="ce26" office:value-type="string" calcext:value-type="string">
            <text:p>L</text:p>
          </table:table-cell>
          <table:table-cell table:style-name="ce50" table:number-columns-repeated="5"/>
          <table:table-cell table:number-columns-repeated="3" table:style-name="ce50" office:value-type="string" calcext:value-type="string">
            <text:p>yes</text:p>
          </table:table-cell>
          <table:table-cell table:style-name="ce50" table:number-columns-repeated="4"/>
          <table:table-cell table:style-name="ce92" office:value-type="string" calcext:value-type="string">
            <text:p>FOH Sound Assistant</text:p>
          </table:table-cell>
          <table:table-cell table:style-name="ce8" office:value-type="string" calcext:value-type="string">
            <text:p>Rupert Bothma</text:p>
          </table:table-cell>
          <table:table-cell table:style-name="ce13" table:formula="of:=IF(ISNUMBER(MATCH([.P72];[$Datasheet.$B$1:.$B$9809];0));&quot;✓&quot;;&quot;x&quot;)" office:value-type="string" office:string-value="x" calcext:value-type="string">
            <text:p>x</text:p>
          </table:table-cell>
          <table:table-cell table:style-name="ce133" table:formula="of:=IFERROR(VLOOKUP([$Masterlist.$P72];[$Datasheet.$B$1:.$AV$9809];2;FALSE());&quot;-&quot;)" office:value-type="string" office:string-value="-" calcext:value-type="string">
            <text:p>-</text:p>
          </table:table-cell>
          <table:table-cell table:style-name="ce133" table:formula="of:=IFERROR(VLOOKUP([$Masterlist.$P72];[$Datasheet.$B$1:.$AV$9809];3;FALSE());&quot;-&quot;)" office:value-type="string" office:string-value="-" calcext:value-type="string">
            <text:p>-</text:p>
          </table:table-cell>
          <table:table-cell table:style-name="ce133" table:formula="of:=IFERROR(VLOOKUP([$Masterlist.$P72];[$Datasheet.$B$1:.$AV$9809];4;FALSE());&quot;-&quot;)" office:value-type="string" office:string-value="-" calcext:value-type="string">
            <text:p>-</text:p>
          </table:table-cell>
          <table:table-cell table:style-name="ce133" table:formula="of:=IFERROR(VLOOKUP([$Masterlist.$P72];[$Datasheet.$B$1:.$AV$9809];5;FALSE());&quot;-&quot;)" office:value-type="string" office:string-value="-" calcext:value-type="string">
            <text:p>-</text:p>
          </table:table-cell>
          <table:table-cell table:style-name="ce185" table:formula="of:=IFERROR(VLOOKUP([$Masterlist.$P72];[$Datasheet.$B$1:.$AV$9809];6;FALSE());&quot;-&quot;)" office:value-type="string" office:string-value="-" calcext:value-type="string">
            <text:p>-</text:p>
          </table:table-cell>
          <table:table-cell table:style-name="ce133" table:formula="of:=IFERROR(VLOOKUP([$Masterlist.$P72];[$Datasheet.$B$1:.$AV$9809];7;FALSE());&quot;-&quot;)" office:value-type="string" office:string-value="-" calcext:value-type="string">
            <text:p>-</text:p>
          </table:table-cell>
          <table:table-cell table:style-name="ce133" table:formula="of:=IFERROR(VLOOKUP([$Masterlist.$P72];[$Datasheet.$B$1:.$AV$9809];8;FALSE());&quot;-&quot;)" office:value-type="string" office:string-value="-" calcext:value-type="string">
            <text:p>-</text:p>
          </table:table-cell>
          <table:table-cell table:style-name="ce133" table:formula="of:=IFERROR(VLOOKUP([$Masterlist.$P72];[$Datasheet.$B$1:.$AV$9809];9;FALSE());&quot;-&quot;)" office:value-type="string" office:string-value="-" calcext:value-type="string">
            <text:p>-</text:p>
          </table:table-cell>
          <table:table-cell table:style-name="ce133" table:formula="of:=IFERROR(VLOOKUP([$Masterlist.$P72];[$Datasheet.$B$1:.$AV$9809];10;FALSE());&quot;-&quot;)" office:value-type="string" office:string-value="-" calcext:value-type="string">
            <text:p>-</text:p>
          </table:table-cell>
          <table:table-cell table:style-name="ce133" table:formula="of:=IFERROR(VLOOKUP([$Masterlist.$P72];[$Datasheet.$B$1:.$AV$9809];11;FALSE());&quot;-&quot;)" office:value-type="string" office:string-value="-" calcext:value-type="string">
            <text:p>-</text:p>
          </table:table-cell>
          <table:table-cell table:style-name="ce133" table:formula="of:=IFERROR(VLOOKUP([$Masterlist.$P72];[$Datasheet.$B$1:.$AV$9809];12;FALSE());&quot;-&quot;)" office:value-type="string" office:string-value="-" calcext:value-type="string">
            <text:p>-</text:p>
          </table:table-cell>
          <table:table-cell table:style-name="ce133" table:formula="of:=IFERROR(VLOOKUP([$Masterlist.$P72];[$Datasheet.$B$1:.$AV$9809];13;FALSE());&quot;-&quot;)" office:value-type="string" office:string-value="-" calcext:value-type="string">
            <text:p>-</text:p>
          </table:table-cell>
          <table:table-cell table:style-name="ce133" table:formula="of:=IFERROR(VLOOKUP([$Masterlist.$P72];[$Datasheet.$B$1:.$AV$9809];14;FALSE());&quot;-&quot;)" office:value-type="string" office:string-value="-" calcext:value-type="string">
            <text:p>-</text:p>
          </table:table-cell>
          <table:table-cell table:style-name="ce133" table:formula="of:=IFERROR(VLOOKUP([$Masterlist.$P72];[$Datasheet.$B$1:.$AV$9809];15;FALSE());&quot;-&quot;)" office:value-type="string" office:string-value="-" calcext:value-type="string">
            <text:p>-</text:p>
          </table:table-cell>
          <table:table-cell table:style-name="ce133" table:formula="of:=IFERROR(VLOOKUP([$Masterlist.$P72];[$Datasheet.$B$1:.$AV$9809];16;FALSE());&quot;-&quot;)" office:value-type="string" office:string-value="-" calcext:value-type="string">
            <text:p>-</text:p>
          </table:table-cell>
          <table:table-cell table:style-name="ce133" table:formula="of:=IFERROR(VLOOKUP([$Masterlist.$P72];[$Datasheet.$B$1:.$AV$9809];17;FALSE());&quot;-&quot;)" office:value-type="string" office:string-value="-" calcext:value-type="string">
            <text:p>-</text:p>
          </table:table-cell>
          <table:table-cell table:style-name="ce133" table:formula="of:=IFERROR(VLOOKUP([$Masterlist.$P72];[$Datasheet.$B$1:.$AV$9809];18;FALSE());&quot;-&quot;)" office:value-type="string" office:string-value="-" calcext:value-type="string">
            <text:p>-</text:p>
          </table:table-cell>
          <table:table-cell table:style-name="ce133" table:formula="of:=IFERROR(VLOOKUP([$Masterlist.$P72];[$Datasheet.$B$1:.$AV$9809];19;FALSE());&quot;-&quot;)" office:value-type="string" office:string-value="-" calcext:value-type="string">
            <text:p>-</text:p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6"/>
          <table:table-cell table:style-name="ce29" office:value-type="string" calcext:value-type="string">
            <text:p>M</text:p>
          </table:table-cell>
          <table:table-cell table:style-name="ce50" table:number-columns-repeated="5"/>
          <table:table-cell table:number-columns-repeated="3" table:style-name="ce50" office:value-type="string" calcext:value-type="string">
            <text:p>yes</text:p>
          </table:table-cell>
          <table:table-cell table:style-name="ce50" table:number-columns-repeated="4"/>
          <table:table-cell table:style-name="ce92" office:value-type="string" calcext:value-type="string">
            <text:p>FOH Sound Assistant</text:p>
          </table:table-cell>
          <table:table-cell table:style-name="ce8" office:value-type="string" calcext:value-type="string">
            <text:p>Roxanne Emslie</text:p>
          </table:table-cell>
          <table:table-cell table:style-name="ce13" table:formula="of:=IF(ISNUMBER(MATCH([.P73];[$Datasheet.$B$1:.$B$9809];0));&quot;✓&quot;;&quot;x&quot;)" office:value-type="string" office:string-value="x" calcext:value-type="string">
            <text:p>x</text:p>
          </table:table-cell>
          <table:table-cell table:style-name="ce133" table:formula="of:=IFERROR(VLOOKUP([$Masterlist.$P73];[$Datasheet.$B$1:.$AV$9809];2;FALSE());&quot;-&quot;)" office:value-type="string" office:string-value="-" calcext:value-type="string">
            <text:p>-</text:p>
          </table:table-cell>
          <table:table-cell table:style-name="ce133" table:formula="of:=IFERROR(VLOOKUP([$Masterlist.$P73];[$Datasheet.$B$1:.$AV$9809];3;FALSE());&quot;-&quot;)" office:value-type="string" office:string-value="-" calcext:value-type="string">
            <text:p>-</text:p>
          </table:table-cell>
          <table:table-cell table:style-name="ce133" table:formula="of:=IFERROR(VLOOKUP([$Masterlist.$P73];[$Datasheet.$B$1:.$AV$9809];4;FALSE());&quot;-&quot;)" office:value-type="string" office:string-value="-" calcext:value-type="string">
            <text:p>-</text:p>
          </table:table-cell>
          <table:table-cell table:style-name="ce133" table:formula="of:=IFERROR(VLOOKUP([$Masterlist.$P73];[$Datasheet.$B$1:.$AV$9809];5;FALSE());&quot;-&quot;)" office:value-type="string" office:string-value="-" calcext:value-type="string">
            <text:p>-</text:p>
          </table:table-cell>
          <table:table-cell table:style-name="ce185" table:formula="of:=IFERROR(VLOOKUP([$Masterlist.$P73];[$Datasheet.$B$1:.$AV$9809];6;FALSE());&quot;-&quot;)" office:value-type="string" office:string-value="-" calcext:value-type="string">
            <text:p>-</text:p>
          </table:table-cell>
          <table:table-cell table:style-name="ce133" table:formula="of:=IFERROR(VLOOKUP([$Masterlist.$P73];[$Datasheet.$B$1:.$AV$9809];7;FALSE());&quot;-&quot;)" office:value-type="string" office:string-value="-" calcext:value-type="string">
            <text:p>-</text:p>
          </table:table-cell>
          <table:table-cell table:style-name="ce133" table:formula="of:=IFERROR(VLOOKUP([$Masterlist.$P73];[$Datasheet.$B$1:.$AV$9809];8;FALSE());&quot;-&quot;)" office:value-type="string" office:string-value="-" calcext:value-type="string">
            <text:p>-</text:p>
          </table:table-cell>
          <table:table-cell table:style-name="ce133" table:formula="of:=IFERROR(VLOOKUP([$Masterlist.$P73];[$Datasheet.$B$1:.$AV$9809];9;FALSE());&quot;-&quot;)" office:value-type="string" office:string-value="-" calcext:value-type="string">
            <text:p>-</text:p>
          </table:table-cell>
          <table:table-cell table:style-name="ce133" table:formula="of:=IFERROR(VLOOKUP([$Masterlist.$P73];[$Datasheet.$B$1:.$AV$9809];10;FALSE());&quot;-&quot;)" office:value-type="string" office:string-value="-" calcext:value-type="string">
            <text:p>-</text:p>
          </table:table-cell>
          <table:table-cell table:style-name="ce133" table:formula="of:=IFERROR(VLOOKUP([$Masterlist.$P73];[$Datasheet.$B$1:.$AV$9809];11;FALSE());&quot;-&quot;)" office:value-type="string" office:string-value="-" calcext:value-type="string">
            <text:p>-</text:p>
          </table:table-cell>
          <table:table-cell table:style-name="ce133" table:formula="of:=IFERROR(VLOOKUP([$Masterlist.$P73];[$Datasheet.$B$1:.$AV$9809];12;FALSE());&quot;-&quot;)" office:value-type="string" office:string-value="-" calcext:value-type="string">
            <text:p>-</text:p>
          </table:table-cell>
          <table:table-cell table:style-name="ce133" table:formula="of:=IFERROR(VLOOKUP([$Masterlist.$P73];[$Datasheet.$B$1:.$AV$9809];13;FALSE());&quot;-&quot;)" office:value-type="string" office:string-value="-" calcext:value-type="string">
            <text:p>-</text:p>
          </table:table-cell>
          <table:table-cell table:style-name="ce133" table:formula="of:=IFERROR(VLOOKUP([$Masterlist.$P73];[$Datasheet.$B$1:.$AV$9809];14;FALSE());&quot;-&quot;)" office:value-type="string" office:string-value="-" calcext:value-type="string">
            <text:p>-</text:p>
          </table:table-cell>
          <table:table-cell table:style-name="ce133" table:formula="of:=IFERROR(VLOOKUP([$Masterlist.$P73];[$Datasheet.$B$1:.$AV$9809];15;FALSE());&quot;-&quot;)" office:value-type="string" office:string-value="-" calcext:value-type="string">
            <text:p>-</text:p>
          </table:table-cell>
          <table:table-cell table:style-name="ce133" table:formula="of:=IFERROR(VLOOKUP([$Masterlist.$P73];[$Datasheet.$B$1:.$AV$9809];16;FALSE());&quot;-&quot;)" office:value-type="string" office:string-value="-" calcext:value-type="string">
            <text:p>-</text:p>
          </table:table-cell>
          <table:table-cell table:style-name="ce133" table:formula="of:=IFERROR(VLOOKUP([$Masterlist.$P73];[$Datasheet.$B$1:.$AV$9809];17;FALSE());&quot;-&quot;)" office:value-type="string" office:string-value="-" calcext:value-type="string">
            <text:p>-</text:p>
          </table:table-cell>
          <table:table-cell table:style-name="ce133" table:formula="of:=IFERROR(VLOOKUP([$Masterlist.$P73];[$Datasheet.$B$1:.$AV$9809];18;FALSE());&quot;-&quot;)" office:value-type="string" office:string-value="-" calcext:value-type="string">
            <text:p>-</text:p>
          </table:table-cell>
          <table:table-cell table:style-name="ce133" table:formula="of:=IFERROR(VLOOKUP([$Masterlist.$P73];[$Datasheet.$B$1:.$AV$9809];19;FALSE());&quot;-&quot;)" office:value-type="string" office:string-value="-" calcext:value-type="string">
            <text:p>-</text:p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6"/>
          <table:table-cell table:style-name="ce26" office:value-type="string" calcext:value-type="string">
            <text:p>L</text:p>
          </table:table-cell>
          <table:table-cell table:style-name="ce50" table:number-columns-repeated="5"/>
          <table:table-cell table:number-columns-repeated="3" table:style-name="ce50" office:value-type="string" calcext:value-type="string">
            <text:p>yes</text:p>
          </table:table-cell>
          <table:table-cell table:style-name="ce50" table:number-columns-repeated="4"/>
          <table:table-cell table:style-name="ce92" office:value-type="string" calcext:value-type="string">
            <text:p>FOH Sound / FOH Sound Assistant</text:p>
          </table:table-cell>
          <table:table-cell table:style-name="ce8" office:value-type="string" calcext:value-type="string">
            <text:p>Brian Mvukwe</text:p>
          </table:table-cell>
          <table:table-cell table:style-name="ce13" table:formula="of:=IF(ISNUMBER(MATCH([.P74];[$Datasheet.$B$1:.$B$9809];0));&quot;✓&quot;;&quot;x&quot;)" office:value-type="string" office:string-value="✓" calcext:value-type="string">
            <text:p>✓</text:p>
          </table:table-cell>
          <table:table-cell table:style-name="ce133" table:formula="of:=IFERROR(VLOOKUP([$Masterlist.$P74];[$Datasheet.$B$1:.$AV$9809];2;FALSE());&quot;-&quot;)" office:value-type="float" office:value="1" calcext:value-type="float">
            <text:p>1</text:p>
          </table:table-cell>
          <table:table-cell table:style-name="ce133" table:formula="of:=IFERROR(VLOOKUP([$Masterlist.$P74];[$Datasheet.$B$1:.$AV$9809];3;FALSE());&quot;-&quot;)" office:value-type="float" office:value="1" calcext:value-type="float">
            <text:p>1</text:p>
          </table:table-cell>
          <table:table-cell table:style-name="ce133" table:formula="of:=IFERROR(VLOOKUP([$Masterlist.$P74];[$Datasheet.$B$1:.$AV$9809];4;FALSE());&quot;-&quot;)" office:value-type="float" office:value="1" calcext:value-type="float">
            <text:p>1</text:p>
          </table:table-cell>
          <table:table-cell table:style-name="ce133" table:formula="of:=IFERROR(VLOOKUP([$Masterlist.$P74];[$Datasheet.$B$1:.$AV$9809];5;FALSE());&quot;-&quot;)" office:value-type="float" office:value="1" calcext:value-type="float">
            <text:p>1</text:p>
          </table:table-cell>
          <table:table-cell table:style-name="ce185" table:formula="of:=IFERROR(VLOOKUP([$Masterlist.$P74];[$Datasheet.$B$1:.$AV$9809];6;FALSE());&quot;-&quot;)" office:value-type="float" office:value="1" calcext:value-type="float">
            <text:p>1</text:p>
          </table:table-cell>
          <table:table-cell table:style-name="ce133" table:formula="of:=IFERROR(VLOOKUP([$Masterlist.$P74];[$Datasheet.$B$1:.$AV$9809];7;FALSE());&quot;-&quot;)" office:value-type="float" office:value="1" calcext:value-type="float">
            <text:p>1</text:p>
          </table:table-cell>
          <table:table-cell table:style-name="ce133" table:formula="of:=IFERROR(VLOOKUP([$Masterlist.$P74];[$Datasheet.$B$1:.$AV$9809];8;FALSE());&quot;-&quot;)" office:value-type="float" office:value="1" calcext:value-type="float">
            <text:p>1</text:p>
          </table:table-cell>
          <table:table-cell table:style-name="ce133" table:formula="of:=IFERROR(VLOOKUP([$Masterlist.$P74];[$Datasheet.$B$1:.$AV$9809];9;FALSE());&quot;-&quot;)" office:value-type="float" office:value="1" calcext:value-type="float">
            <text:p>1</text:p>
          </table:table-cell>
          <table:table-cell table:style-name="ce133" table:formula="of:=IFERROR(VLOOKUP([$Masterlist.$P74];[$Datasheet.$B$1:.$AV$9809];10;FALSE());&quot;-&quot;)" office:value-type="float" office:value="1" calcext:value-type="float">
            <text:p>1</text:p>
          </table:table-cell>
          <table:table-cell table:style-name="ce133" table:formula="of:=IFERROR(VLOOKUP([$Masterlist.$P74];[$Datasheet.$B$1:.$AV$9809];11;FALSE());&quot;-&quot;)" office:value-type="float" office:value="1" calcext:value-type="float">
            <text:p>1</text:p>
          </table:table-cell>
          <table:table-cell table:style-name="ce133" table:formula="of:=IFERROR(VLOOKUP([$Masterlist.$P74];[$Datasheet.$B$1:.$AV$9809];12;FALSE());&quot;-&quot;)" office:value-type="float" office:value="1" calcext:value-type="float">
            <text:p>1</text:p>
          </table:table-cell>
          <table:table-cell table:style-name="ce133" table:formula="of:=IFERROR(VLOOKUP([$Masterlist.$P74];[$Datasheet.$B$1:.$AV$9809];13;FALSE());&quot;-&quot;)" office:value-type="float" office:value="1" calcext:value-type="float">
            <text:p>1</text:p>
          </table:table-cell>
          <table:table-cell table:style-name="ce133" table:formula="of:=IFERROR(VLOOKUP([$Masterlist.$P74];[$Datasheet.$B$1:.$AV$9809];14;FALSE());&quot;-&quot;)" office:value-type="float" office:value="1" calcext:value-type="float">
            <text:p>1</text:p>
          </table:table-cell>
          <table:table-cell table:style-name="ce133" table:formula="of:=IFERROR(VLOOKUP([$Masterlist.$P74];[$Datasheet.$B$1:.$AV$9809];15;FALSE());&quot;-&quot;)" office:value-type="float" office:value="1" calcext:value-type="float">
            <text:p>1</text:p>
          </table:table-cell>
          <table:table-cell table:style-name="ce133" table:formula="of:=IFERROR(VLOOKUP([$Masterlist.$P74];[$Datasheet.$B$1:.$AV$9809];16;FALSE());&quot;-&quot;)" office:value-type="float" office:value="0" calcext:value-type="float">
            <text:p/>
          </table:table-cell>
          <table:table-cell table:style-name="ce133" table:formula="of:=IFERROR(VLOOKUP([$Masterlist.$P74];[$Datasheet.$B$1:.$AV$9809];17;FALSE());&quot;-&quot;)" office:value-type="float" office:value="0" calcext:value-type="float">
            <text:p/>
          </table:table-cell>
          <table:table-cell table:style-name="ce133" table:formula="of:=IFERROR(VLOOKUP([$Masterlist.$P74];[$Datasheet.$B$1:.$AV$9809];18;FALSE());&quot;-&quot;)" office:value-type="float" office:value="0" calcext:value-type="float">
            <text:p/>
          </table:table-cell>
          <table:table-cell table:style-name="ce133" table:formula="of:=IFERROR(VLOOKUP([$Masterlist.$P74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1" table:number-columns-repeated="9"/>
          <table:table-cell table:style-name="ce51" office:value-type="string" calcext:value-type="string">
            <text:p>yes</text:p>
          </table:table-cell>
          <table:table-cell table:style-name="ce51" table:number-columns-repeated="2"/>
          <table:table-cell table:style-name="ce93" office:value-type="string" calcext:value-type="string">
            <text:p>FOH Sound</text:p>
          </table:table-cell>
          <table:table-cell table:style-name="ce102" office:value-type="string" calcext:value-type="string">
            <text:p>Martin Oosthuizen</text:p>
          </table:table-cell>
          <table:table-cell table:style-name="ce13" table:formula="of:=IF(ISNUMBER(MATCH([.P75];[$Datasheet.$B$1:.$B$9809];0));&quot;✓&quot;;&quot;x&quot;)" office:value-type="string" office:string-value="✓" calcext:value-type="string">
            <text:p>✓</text:p>
          </table:table-cell>
          <table:table-cell table:style-name="ce133" table:formula="of:=IFERROR(VLOOKUP([$Masterlist.$P75];[$Datasheet.$B$1:.$AV$9809];2;FALSE());&quot;-&quot;)" office:value-type="float" office:value="0" calcext:value-type="float">
            <text:p>0</text:p>
          </table:table-cell>
          <table:table-cell table:style-name="ce133" table:formula="of:=IFERROR(VLOOKUP([$Masterlist.$P75];[$Datasheet.$B$1:.$AV$9809];3;FALSE());&quot;-&quot;)" office:value-type="float" office:value="0" calcext:value-type="float">
            <text:p>0</text:p>
          </table:table-cell>
          <table:table-cell table:style-name="ce133" table:formula="of:=IFERROR(VLOOKUP([$Masterlist.$P75];[$Datasheet.$B$1:.$AV$9809];4;FALSE());&quot;-&quot;)" office:value-type="float" office:value="1" calcext:value-type="float">
            <text:p>1</text:p>
          </table:table-cell>
          <table:table-cell table:style-name="ce133" table:formula="of:=IFERROR(VLOOKUP([$Masterlist.$P75];[$Datasheet.$B$1:.$AV$9809];5;FALSE());&quot;-&quot;)" office:value-type="float" office:value="1" calcext:value-type="float">
            <text:p>1</text:p>
          </table:table-cell>
          <table:table-cell table:style-name="ce185" table:formula="of:=IFERROR(VLOOKUP([$Masterlist.$P75];[$Datasheet.$B$1:.$AV$9809];6;FALSE());&quot;-&quot;)" office:value-type="float" office:value="0" calcext:value-type="float">
            <text:p>0</text:p>
          </table:table-cell>
          <table:table-cell table:style-name="ce133" table:formula="of:=IFERROR(VLOOKUP([$Masterlist.$P75];[$Datasheet.$B$1:.$AV$9809];7;FALSE());&quot;-&quot;)" office:value-type="float" office:value="1" calcext:value-type="float">
            <text:p>1</text:p>
          </table:table-cell>
          <table:table-cell table:style-name="ce133" table:formula="of:=IFERROR(VLOOKUP([$Masterlist.$P75];[$Datasheet.$B$1:.$AV$9809];8;FALSE());&quot;-&quot;)" office:value-type="float" office:value="0" calcext:value-type="float">
            <text:p>0</text:p>
          </table:table-cell>
          <table:table-cell table:style-name="ce133" table:formula="of:=IFERROR(VLOOKUP([$Masterlist.$P75];[$Datasheet.$B$1:.$AV$9809];9;FALSE());&quot;-&quot;)" office:value-type="float" office:value="0" calcext:value-type="float">
            <text:p>0</text:p>
          </table:table-cell>
          <table:table-cell table:style-name="ce133" table:formula="of:=IFERROR(VLOOKUP([$Masterlist.$P75];[$Datasheet.$B$1:.$AV$9809];10;FALSE());&quot;-&quot;)" office:value-type="float" office:value="1" calcext:value-type="float">
            <text:p>1</text:p>
          </table:table-cell>
          <table:table-cell table:style-name="ce133" table:formula="of:=IFERROR(VLOOKUP([$Masterlist.$P75];[$Datasheet.$B$1:.$AV$9809];11;FALSE());&quot;-&quot;)" office:value-type="float" office:value="1" calcext:value-type="float">
            <text:p>1</text:p>
          </table:table-cell>
          <table:table-cell table:style-name="ce133" table:formula="of:=IFERROR(VLOOKUP([$Masterlist.$P75];[$Datasheet.$B$1:.$AV$9809];12;FALSE());&quot;-&quot;)" office:value-type="float" office:value="0" calcext:value-type="float">
            <text:p>0</text:p>
          </table:table-cell>
          <table:table-cell table:style-name="ce133" table:formula="of:=IFERROR(VLOOKUP([$Masterlist.$P75];[$Datasheet.$B$1:.$AV$9809];13;FALSE());&quot;-&quot;)" office:value-type="float" office:value="0" calcext:value-type="float">
            <text:p>0</text:p>
          </table:table-cell>
          <table:table-cell table:style-name="ce133" table:formula="of:=IFERROR(VLOOKUP([$Masterlist.$P75];[$Datasheet.$B$1:.$AV$9809];14;FALSE());&quot;-&quot;)" office:value-type="float" office:value="0" calcext:value-type="float">
            <text:p>0</text:p>
          </table:table-cell>
          <table:table-cell table:style-name="ce133" table:formula="of:=IFERROR(VLOOKUP([$Masterlist.$P75];[$Datasheet.$B$1:.$AV$9809];15;FALSE());&quot;-&quot;)" office:value-type="float" office:value="1" calcext:value-type="float">
            <text:p>1</text:p>
          </table:table-cell>
          <table:table-cell table:style-name="ce133" table:formula="of:=IFERROR(VLOOKUP([$Masterlist.$P75];[$Datasheet.$B$1:.$AV$9809];16;FALSE());&quot;-&quot;)" office:value-type="float" office:value="0" calcext:value-type="float">
            <text:p/>
          </table:table-cell>
          <table:table-cell table:style-name="ce133" table:formula="of:=IFERROR(VLOOKUP([$Masterlist.$P75];[$Datasheet.$B$1:.$AV$9809];17;FALSE());&quot;-&quot;)" office:value-type="float" office:value="0" calcext:value-type="float">
            <text:p/>
          </table:table-cell>
          <table:table-cell table:style-name="ce133" table:formula="of:=IFERROR(VLOOKUP([$Masterlist.$P75];[$Datasheet.$B$1:.$AV$9809];18;FALSE());&quot;-&quot;)" office:value-type="float" office:value="0" calcext:value-type="float">
            <text:p/>
          </table:table-cell>
          <table:table-cell table:style-name="ce133" table:formula="of:=IFERROR(VLOOKUP([$Masterlist.$P75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A</text:p>
          </table:table-cell>
          <table:table-cell table:style-name="ce54" table:number-columns-repeated="9"/>
          <table:table-cell table:style-name="ce51" office:value-type="string" calcext:value-type="string">
            <text:p>yes</text:p>
          </table:table-cell>
          <table:table-cell table:style-name="ce54" table:number-columns-repeated="2"/>
          <table:table-cell table:style-name="ce93" office:value-type="string" calcext:value-type="string">
            <text:p>FOH Sound</text:p>
          </table:table-cell>
          <table:table-cell table:style-name="ce104" office:value-type="string" calcext:value-type="string">
            <text:p>Greg Moore</text:p>
          </table:table-cell>
          <table:table-cell table:style-name="ce13" table:formula="of:=IF(ISNUMBER(MATCH([.P76];[$Datasheet.$B$1:.$B$9809];0));&quot;✓&quot;;&quot;x&quot;)" office:value-type="string" office:string-value="x" calcext:value-type="string">
            <text:p>x</text:p>
          </table:table-cell>
          <table:table-cell table:style-name="ce133" table:formula="of:=IFERROR(VLOOKUP([$Masterlist.$P76];[$Datasheet.$B$1:.$AV$9809];2;FALSE());&quot;-&quot;)" office:value-type="string" office:string-value="-" calcext:value-type="string">
            <text:p>-</text:p>
          </table:table-cell>
          <table:table-cell table:style-name="ce133" table:formula="of:=IFERROR(VLOOKUP([$Masterlist.$P76];[$Datasheet.$B$1:.$AV$9809];3;FALSE());&quot;-&quot;)" office:value-type="string" office:string-value="-" calcext:value-type="string">
            <text:p>-</text:p>
          </table:table-cell>
          <table:table-cell table:style-name="ce133" table:formula="of:=IFERROR(VLOOKUP([$Masterlist.$P76];[$Datasheet.$B$1:.$AV$9809];4;FALSE());&quot;-&quot;)" office:value-type="string" office:string-value="-" calcext:value-type="string">
            <text:p>-</text:p>
          </table:table-cell>
          <table:table-cell table:style-name="ce133" table:formula="of:=IFERROR(VLOOKUP([$Masterlist.$P76];[$Datasheet.$B$1:.$AV$9809];5;FALSE());&quot;-&quot;)" office:value-type="string" office:string-value="-" calcext:value-type="string">
            <text:p>-</text:p>
          </table:table-cell>
          <table:table-cell table:style-name="ce185" table:formula="of:=IFERROR(VLOOKUP([$Masterlist.$P76];[$Datasheet.$B$1:.$AV$9809];6;FALSE());&quot;-&quot;)" office:value-type="string" office:string-value="-" calcext:value-type="string">
            <text:p>-</text:p>
          </table:table-cell>
          <table:table-cell table:style-name="ce133" table:formula="of:=IFERROR(VLOOKUP([$Masterlist.$P76];[$Datasheet.$B$1:.$AV$9809];7;FALSE());&quot;-&quot;)" office:value-type="string" office:string-value="-" calcext:value-type="string">
            <text:p>-</text:p>
          </table:table-cell>
          <table:table-cell table:style-name="ce133" table:formula="of:=IFERROR(VLOOKUP([$Masterlist.$P76];[$Datasheet.$B$1:.$AV$9809];8;FALSE());&quot;-&quot;)" office:value-type="string" office:string-value="-" calcext:value-type="string">
            <text:p>-</text:p>
          </table:table-cell>
          <table:table-cell table:style-name="ce133" table:formula="of:=IFERROR(VLOOKUP([$Masterlist.$P76];[$Datasheet.$B$1:.$AV$9809];9;FALSE());&quot;-&quot;)" office:value-type="string" office:string-value="-" calcext:value-type="string">
            <text:p>-</text:p>
          </table:table-cell>
          <table:table-cell table:style-name="ce133" table:formula="of:=IFERROR(VLOOKUP([$Masterlist.$P76];[$Datasheet.$B$1:.$AV$9809];10;FALSE());&quot;-&quot;)" office:value-type="string" office:string-value="-" calcext:value-type="string">
            <text:p>-</text:p>
          </table:table-cell>
          <table:table-cell table:style-name="ce133" table:formula="of:=IFERROR(VLOOKUP([$Masterlist.$P76];[$Datasheet.$B$1:.$AV$9809];11;FALSE());&quot;-&quot;)" office:value-type="string" office:string-value="-" calcext:value-type="string">
            <text:p>-</text:p>
          </table:table-cell>
          <table:table-cell table:style-name="ce133" table:formula="of:=IFERROR(VLOOKUP([$Masterlist.$P76];[$Datasheet.$B$1:.$AV$9809];12;FALSE());&quot;-&quot;)" office:value-type="string" office:string-value="-" calcext:value-type="string">
            <text:p>-</text:p>
          </table:table-cell>
          <table:table-cell table:style-name="ce133" table:formula="of:=IFERROR(VLOOKUP([$Masterlist.$P76];[$Datasheet.$B$1:.$AV$9809];13;FALSE());&quot;-&quot;)" office:value-type="string" office:string-value="-" calcext:value-type="string">
            <text:p>-</text:p>
          </table:table-cell>
          <table:table-cell table:style-name="ce133" table:formula="of:=IFERROR(VLOOKUP([$Masterlist.$P76];[$Datasheet.$B$1:.$AV$9809];14;FALSE());&quot;-&quot;)" office:value-type="string" office:string-value="-" calcext:value-type="string">
            <text:p>-</text:p>
          </table:table-cell>
          <table:table-cell table:style-name="ce133" table:formula="of:=IFERROR(VLOOKUP([$Masterlist.$P76];[$Datasheet.$B$1:.$AV$9809];15;FALSE());&quot;-&quot;)" office:value-type="string" office:string-value="-" calcext:value-type="string">
            <text:p>-</text:p>
          </table:table-cell>
          <table:table-cell table:style-name="ce133" table:formula="of:=IFERROR(VLOOKUP([$Masterlist.$P76];[$Datasheet.$B$1:.$AV$9809];16;FALSE());&quot;-&quot;)" office:value-type="string" office:string-value="-" calcext:value-type="string">
            <text:p>-</text:p>
          </table:table-cell>
          <table:table-cell table:style-name="ce133" table:formula="of:=IFERROR(VLOOKUP([$Masterlist.$P76];[$Datasheet.$B$1:.$AV$9809];17;FALSE());&quot;-&quot;)" office:value-type="string" office:string-value="-" calcext:value-type="string">
            <text:p>-</text:p>
          </table:table-cell>
          <table:table-cell table:style-name="ce133" table:formula="of:=IFERROR(VLOOKUP([$Masterlist.$P76];[$Datasheet.$B$1:.$AV$9809];18;FALSE());&quot;-&quot;)" office:value-type="string" office:string-value="-" calcext:value-type="string">
            <text:p>-</text:p>
          </table:table-cell>
          <table:table-cell table:style-name="ce133" table:formula="of:=IFERROR(VLOOKUP([$Masterlist.$P76];[$Datasheet.$B$1:.$AV$9809];19;FALSE());&quot;-&quot;)" office:value-type="string" office:string-value="-" calcext:value-type="string">
            <text:p>-</text:p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5" table:number-columns-repeated="9"/>
          <table:table-cell table:style-name="ce80" office:value-type="string" calcext:value-type="string">
            <text:p>yes</text:p>
          </table:table-cell>
          <table:table-cell table:style-name="ce55" table:number-columns-repeated="2"/>
          <table:table-cell table:style-name="ce93" office:value-type="string" calcext:value-type="string">
            <text:p>FOH Sound</text:p>
          </table:table-cell>
          <table:table-cell table:style-name="ce105" office:value-type="string" calcext:value-type="string">
            <text:p>Rudolph Bezuidenhout</text:p>
          </table:table-cell>
          <table:table-cell table:style-name="ce13" table:formula="of:=IF(ISNUMBER(MATCH([.P77];[$Datasheet.$B$1:.$B$9809];0));&quot;✓&quot;;&quot;x&quot;)" office:value-type="string" office:string-value="✓" calcext:value-type="string">
            <text:p>✓</text:p>
          </table:table-cell>
          <table:table-cell table:style-name="ce133" table:formula="of:=IFERROR(VLOOKUP([$Masterlist.$P77];[$Datasheet.$B$1:.$AV$9809];2;FALSE());&quot;-&quot;)" office:value-type="float" office:value="0" calcext:value-type="float">
            <text:p>0</text:p>
          </table:table-cell>
          <table:table-cell table:style-name="ce133" table:formula="of:=IFERROR(VLOOKUP([$Masterlist.$P77];[$Datasheet.$B$1:.$AV$9809];3;FALSE());&quot;-&quot;)" office:value-type="float" office:value="0" calcext:value-type="float">
            <text:p>0</text:p>
          </table:table-cell>
          <table:table-cell table:style-name="ce133" table:formula="of:=IFERROR(VLOOKUP([$Masterlist.$P77];[$Datasheet.$B$1:.$AV$9809];4;FALSE());&quot;-&quot;)" office:value-type="float" office:value="1" calcext:value-type="float">
            <text:p>1</text:p>
          </table:table-cell>
          <table:table-cell table:style-name="ce133" table:formula="of:=IFERROR(VLOOKUP([$Masterlist.$P77];[$Datasheet.$B$1:.$AV$9809];5;FALSE());&quot;-&quot;)" office:value-type="float" office:value="1" calcext:value-type="float">
            <text:p>1</text:p>
          </table:table-cell>
          <table:table-cell table:style-name="ce185" table:formula="of:=IFERROR(VLOOKUP([$Masterlist.$P77];[$Datasheet.$B$1:.$AV$9809];6;FALSE());&quot;-&quot;)" office:value-type="float" office:value="0" calcext:value-type="float">
            <text:p>0</text:p>
          </table:table-cell>
          <table:table-cell table:style-name="ce133" table:formula="of:=IFERROR(VLOOKUP([$Masterlist.$P77];[$Datasheet.$B$1:.$AV$9809];7;FALSE());&quot;-&quot;)" office:value-type="float" office:value="0" calcext:value-type="float">
            <text:p>0</text:p>
          </table:table-cell>
          <table:table-cell table:style-name="ce133" table:formula="of:=IFERROR(VLOOKUP([$Masterlist.$P77];[$Datasheet.$B$1:.$AV$9809];8;FALSE());&quot;-&quot;)" office:value-type="float" office:value="1" calcext:value-type="float">
            <text:p>1</text:p>
          </table:table-cell>
          <table:table-cell table:style-name="ce133" table:formula="of:=IFERROR(VLOOKUP([$Masterlist.$P77];[$Datasheet.$B$1:.$AV$9809];9;FALSE());&quot;-&quot;)" office:value-type="float" office:value="1" calcext:value-type="float">
            <text:p>1</text:p>
          </table:table-cell>
          <table:table-cell table:style-name="ce133" table:formula="of:=IFERROR(VLOOKUP([$Masterlist.$P77];[$Datasheet.$B$1:.$AV$9809];10;FALSE());&quot;-&quot;)" office:value-type="float" office:value="1" calcext:value-type="float">
            <text:p>1</text:p>
          </table:table-cell>
          <table:table-cell table:style-name="ce133" table:formula="of:=IFERROR(VLOOKUP([$Masterlist.$P77];[$Datasheet.$B$1:.$AV$9809];11;FALSE());&quot;-&quot;)" office:value-type="float" office:value="1" calcext:value-type="float">
            <text:p>1</text:p>
          </table:table-cell>
          <table:table-cell table:style-name="ce133" table:formula="of:=IFERROR(VLOOKUP([$Masterlist.$P77];[$Datasheet.$B$1:.$AV$9809];12;FALSE());&quot;-&quot;)" office:value-type="float" office:value="1" calcext:value-type="float">
            <text:p>1</text:p>
          </table:table-cell>
          <table:table-cell table:style-name="ce133" table:formula="of:=IFERROR(VLOOKUP([$Masterlist.$P77];[$Datasheet.$B$1:.$AV$9809];13;FALSE());&quot;-&quot;)" office:value-type="float" office:value="1" calcext:value-type="float">
            <text:p>1</text:p>
          </table:table-cell>
          <table:table-cell table:style-name="ce133" table:formula="of:=IFERROR(VLOOKUP([$Masterlist.$P77];[$Datasheet.$B$1:.$AV$9809];14;FALSE());&quot;-&quot;)" office:value-type="float" office:value="0" calcext:value-type="float">
            <text:p>0</text:p>
          </table:table-cell>
          <table:table-cell table:style-name="ce133" table:formula="of:=IFERROR(VLOOKUP([$Masterlist.$P77];[$Datasheet.$B$1:.$AV$9809];15;FALSE());&quot;-&quot;)" office:value-type="float" office:value="0" calcext:value-type="float">
            <text:p>0</text:p>
          </table:table-cell>
          <table:table-cell table:style-name="ce133" table:formula="of:=IFERROR(VLOOKUP([$Masterlist.$P77];[$Datasheet.$B$1:.$AV$9809];16;FALSE());&quot;-&quot;)" office:value-type="float" office:value="0" calcext:value-type="float">
            <text:p/>
          </table:table-cell>
          <table:table-cell table:style-name="ce133" table:formula="of:=IFERROR(VLOOKUP([$Masterlist.$P77];[$Datasheet.$B$1:.$AV$9809];17;FALSE());&quot;-&quot;)" office:value-type="float" office:value="0" calcext:value-type="float">
            <text:p/>
          </table:table-cell>
          <table:table-cell table:style-name="ce133" table:formula="of:=IFERROR(VLOOKUP([$Masterlist.$P77];[$Datasheet.$B$1:.$AV$9809];18;FALSE());&quot;-&quot;)" office:value-type="float" office:value="0" calcext:value-type="float">
            <text:p/>
          </table:table-cell>
          <table:table-cell table:style-name="ce133" table:formula="of:=IFERROR(VLOOKUP([$Masterlist.$P77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/>
          <table:table-cell table:style-name="ce56" table:number-columns-repeated="9"/>
          <table:table-cell table:style-name="ce80" office:value-type="string" calcext:value-type="string">
            <text:p>yes</text:p>
          </table:table-cell>
          <table:table-cell table:style-name="ce56" table:number-columns-repeated="2"/>
          <table:table-cell table:style-name="ce92" office:value-type="string" calcext:value-type="string">
            <text:p>FOH Sound Assistant</text:p>
          </table:table-cell>
          <table:table-cell table:style-name="ce106" office:value-type="string" calcext:value-type="string">
            <text:p>Mandre Smit</text:p>
          </table:table-cell>
          <table:table-cell table:style-name="ce13" table:formula="of:=IF(ISNUMBER(MATCH([.P78];[$Datasheet.$B$1:.$B$9809];0));&quot;✓&quot;;&quot;x&quot;)" office:value-type="string" office:string-value="✓" calcext:value-type="string">
            <text:p>✓</text:p>
          </table:table-cell>
          <table:table-cell table:style-name="ce133" table:formula="of:=IFERROR(VLOOKUP([$Masterlist.$P78];[$Datasheet.$B$1:.$AV$9809];2;FALSE());&quot;-&quot;)" office:value-type="float" office:value="1" calcext:value-type="float">
            <text:p>1</text:p>
          </table:table-cell>
          <table:table-cell table:style-name="ce133" table:formula="of:=IFERROR(VLOOKUP([$Masterlist.$P78];[$Datasheet.$B$1:.$AV$9809];3;FALSE());&quot;-&quot;)" office:value-type="float" office:value="1" calcext:value-type="float">
            <text:p>1</text:p>
          </table:table-cell>
          <table:table-cell table:style-name="ce133" table:formula="of:=IFERROR(VLOOKUP([$Masterlist.$P78];[$Datasheet.$B$1:.$AV$9809];4;FALSE());&quot;-&quot;)" office:value-type="float" office:value="1" calcext:value-type="float">
            <text:p>1</text:p>
          </table:table-cell>
          <table:table-cell table:style-name="ce133" table:formula="of:=IFERROR(VLOOKUP([$Masterlist.$P78];[$Datasheet.$B$1:.$AV$9809];5;FALSE());&quot;-&quot;)" office:value-type="float" office:value="1" calcext:value-type="float">
            <text:p>1</text:p>
          </table:table-cell>
          <table:table-cell table:style-name="ce185" table:formula="of:=IFERROR(VLOOKUP([$Masterlist.$P78];[$Datasheet.$B$1:.$AV$9809];6;FALSE());&quot;-&quot;)" office:value-type="float" office:value="1" calcext:value-type="float">
            <text:p>1</text:p>
          </table:table-cell>
          <table:table-cell table:style-name="ce133" table:formula="of:=IFERROR(VLOOKUP([$Masterlist.$P78];[$Datasheet.$B$1:.$AV$9809];7;FALSE());&quot;-&quot;)" office:value-type="float" office:value="1" calcext:value-type="float">
            <text:p>1</text:p>
          </table:table-cell>
          <table:table-cell table:style-name="ce133" table:formula="of:=IFERROR(VLOOKUP([$Masterlist.$P78];[$Datasheet.$B$1:.$AV$9809];8;FALSE());&quot;-&quot;)" office:value-type="float" office:value="1" calcext:value-type="float">
            <text:p>1</text:p>
          </table:table-cell>
          <table:table-cell table:style-name="ce133" table:formula="of:=IFERROR(VLOOKUP([$Masterlist.$P78];[$Datasheet.$B$1:.$AV$9809];9;FALSE());&quot;-&quot;)" office:value-type="float" office:value="1" calcext:value-type="float">
            <text:p>1</text:p>
          </table:table-cell>
          <table:table-cell table:style-name="ce133" table:formula="of:=IFERROR(VLOOKUP([$Masterlist.$P78];[$Datasheet.$B$1:.$AV$9809];10;FALSE());&quot;-&quot;)" office:value-type="float" office:value="1" calcext:value-type="float">
            <text:p>1</text:p>
          </table:table-cell>
          <table:table-cell table:style-name="ce133" table:formula="of:=IFERROR(VLOOKUP([$Masterlist.$P78];[$Datasheet.$B$1:.$AV$9809];11;FALSE());&quot;-&quot;)" office:value-type="float" office:value="1" calcext:value-type="float">
            <text:p>1</text:p>
          </table:table-cell>
          <table:table-cell table:style-name="ce133" table:formula="of:=IFERROR(VLOOKUP([$Masterlist.$P78];[$Datasheet.$B$1:.$AV$9809];12;FALSE());&quot;-&quot;)" office:value-type="float" office:value="1" calcext:value-type="float">
            <text:p>1</text:p>
          </table:table-cell>
          <table:table-cell table:style-name="ce133" table:formula="of:=IFERROR(VLOOKUP([$Masterlist.$P78];[$Datasheet.$B$1:.$AV$9809];13;FALSE());&quot;-&quot;)" office:value-type="float" office:value="1" calcext:value-type="float">
            <text:p>1</text:p>
          </table:table-cell>
          <table:table-cell table:style-name="ce133" table:formula="of:=IFERROR(VLOOKUP([$Masterlist.$P78];[$Datasheet.$B$1:.$AV$9809];14;FALSE());&quot;-&quot;)" office:value-type="float" office:value="1" calcext:value-type="float">
            <text:p>1</text:p>
          </table:table-cell>
          <table:table-cell table:style-name="ce133" table:formula="of:=IFERROR(VLOOKUP([$Masterlist.$P78];[$Datasheet.$B$1:.$AV$9809];15;FALSE());&quot;-&quot;)" office:value-type="float" office:value="1" calcext:value-type="float">
            <text:p>1</text:p>
          </table:table-cell>
          <table:table-cell table:style-name="ce133" table:formula="of:=IFERROR(VLOOKUP([$Masterlist.$P78];[$Datasheet.$B$1:.$AV$9809];16;FALSE());&quot;-&quot;)" office:value-type="float" office:value="0" calcext:value-type="float">
            <text:p/>
          </table:table-cell>
          <table:table-cell table:style-name="ce133" table:formula="of:=IFERROR(VLOOKUP([$Masterlist.$P78];[$Datasheet.$B$1:.$AV$9809];17;FALSE());&quot;-&quot;)" office:value-type="float" office:value="0" calcext:value-type="float">
            <text:p/>
          </table:table-cell>
          <table:table-cell table:style-name="ce133" table:formula="of:=IFERROR(VLOOKUP([$Masterlist.$P78];[$Datasheet.$B$1:.$AV$9809];18;FALSE());&quot;-&quot;)" office:value-type="float" office:value="0" calcext:value-type="float">
            <text:p/>
          </table:table-cell>
          <table:table-cell table:style-name="ce133" table:formula="of:=IFERROR(VLOOKUP([$Masterlist.$P78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1" table:number-columns-repeated="11"/>
          <table:table-cell table:style-name="ce51" office:value-type="string" calcext:value-type="string">
            <text:p>yes</text:p>
          </table:table-cell>
          <table:table-cell table:style-name="ce93" office:value-type="string" calcext:value-type="string">
            <text:p>FOH Sound</text:p>
          </table:table-cell>
          <table:table-cell table:style-name="ce8" office:value-type="string" calcext:value-type="string">
            <text:p>Christo Swanepoel</text:p>
          </table:table-cell>
          <table:table-cell table:style-name="ce13" table:formula="of:=IF(ISNUMBER(MATCH([.P79];[$Datasheet.$B$1:.$B$9809];0));&quot;✓&quot;;&quot;x&quot;)" office:value-type="string" office:string-value="✓" calcext:value-type="string">
            <text:p>✓</text:p>
          </table:table-cell>
          <table:table-cell table:style-name="ce133" table:formula="of:=IFERROR(VLOOKUP([$Masterlist.$P79];[$Datasheet.$B$1:.$AV$9809];2;FALSE());&quot;-&quot;)" office:value-type="float" office:value="1" calcext:value-type="float">
            <text:p>1</text:p>
          </table:table-cell>
          <table:table-cell table:style-name="ce133" table:formula="of:=IFERROR(VLOOKUP([$Masterlist.$P79];[$Datasheet.$B$1:.$AV$9809];3;FALSE());&quot;-&quot;)" office:value-type="float" office:value="1" calcext:value-type="float">
            <text:p>1</text:p>
          </table:table-cell>
          <table:table-cell table:style-name="ce133" table:formula="of:=IFERROR(VLOOKUP([$Masterlist.$P79];[$Datasheet.$B$1:.$AV$9809];4;FALSE());&quot;-&quot;)" office:value-type="float" office:value="1" calcext:value-type="float">
            <text:p>1</text:p>
          </table:table-cell>
          <table:table-cell table:style-name="ce133" table:formula="of:=IFERROR(VLOOKUP([$Masterlist.$P79];[$Datasheet.$B$1:.$AV$9809];5;FALSE());&quot;-&quot;)" office:value-type="float" office:value="1" calcext:value-type="float">
            <text:p>1</text:p>
          </table:table-cell>
          <table:table-cell table:style-name="ce185" table:formula="of:=IFERROR(VLOOKUP([$Masterlist.$P79];[$Datasheet.$B$1:.$AV$9809];6;FALSE());&quot;-&quot;)" office:value-type="float" office:value="1" calcext:value-type="float">
            <text:p>1</text:p>
          </table:table-cell>
          <table:table-cell table:style-name="ce133" table:formula="of:=IFERROR(VLOOKUP([$Masterlist.$P79];[$Datasheet.$B$1:.$AV$9809];7;FALSE());&quot;-&quot;)" office:value-type="float" office:value="1" calcext:value-type="float">
            <text:p>1</text:p>
          </table:table-cell>
          <table:table-cell table:style-name="ce133" table:formula="of:=IFERROR(VLOOKUP([$Masterlist.$P79];[$Datasheet.$B$1:.$AV$9809];8;FALSE());&quot;-&quot;)" office:value-type="float" office:value="1" calcext:value-type="float">
            <text:p>1</text:p>
          </table:table-cell>
          <table:table-cell table:style-name="ce133" table:formula="of:=IFERROR(VLOOKUP([$Masterlist.$P79];[$Datasheet.$B$1:.$AV$9809];9;FALSE());&quot;-&quot;)" office:value-type="float" office:value="1" calcext:value-type="float">
            <text:p>1</text:p>
          </table:table-cell>
          <table:table-cell table:style-name="ce133" table:formula="of:=IFERROR(VLOOKUP([$Masterlist.$P79];[$Datasheet.$B$1:.$AV$9809];10;FALSE());&quot;-&quot;)" office:value-type="float" office:value="1" calcext:value-type="float">
            <text:p>1</text:p>
          </table:table-cell>
          <table:table-cell table:style-name="ce133" table:formula="of:=IFERROR(VLOOKUP([$Masterlist.$P79];[$Datasheet.$B$1:.$AV$9809];11;FALSE());&quot;-&quot;)" office:value-type="float" office:value="1" calcext:value-type="float">
            <text:p>1</text:p>
          </table:table-cell>
          <table:table-cell table:style-name="ce133" table:formula="of:=IFERROR(VLOOKUP([$Masterlist.$P79];[$Datasheet.$B$1:.$AV$9809];12;FALSE());&quot;-&quot;)" office:value-type="float" office:value="1" calcext:value-type="float">
            <text:p>1</text:p>
          </table:table-cell>
          <table:table-cell table:style-name="ce133" table:formula="of:=IFERROR(VLOOKUP([$Masterlist.$P79];[$Datasheet.$B$1:.$AV$9809];13;FALSE());&quot;-&quot;)" office:value-type="float" office:value="1" calcext:value-type="float">
            <text:p>1</text:p>
          </table:table-cell>
          <table:table-cell table:style-name="ce133" table:formula="of:=IFERROR(VLOOKUP([$Masterlist.$P79];[$Datasheet.$B$1:.$AV$9809];14;FALSE());&quot;-&quot;)" office:value-type="float" office:value="1" calcext:value-type="float">
            <text:p>1</text:p>
          </table:table-cell>
          <table:table-cell table:style-name="ce133" table:formula="of:=IFERROR(VLOOKUP([$Masterlist.$P79];[$Datasheet.$B$1:.$AV$9809];15;FALSE());&quot;-&quot;)" office:value-type="float" office:value="1" calcext:value-type="float">
            <text:p>1</text:p>
          </table:table-cell>
          <table:table-cell table:style-name="ce133" table:formula="of:=IFERROR(VLOOKUP([$Masterlist.$P79];[$Datasheet.$B$1:.$AV$9809];16;FALSE());&quot;-&quot;)" office:value-type="float" office:value="0" calcext:value-type="float">
            <text:p/>
          </table:table-cell>
          <table:table-cell table:style-name="ce133" table:formula="of:=IFERROR(VLOOKUP([$Masterlist.$P79];[$Datasheet.$B$1:.$AV$9809];17;FALSE());&quot;-&quot;)" office:value-type="float" office:value="0" calcext:value-type="float">
            <text:p/>
          </table:table-cell>
          <table:table-cell table:style-name="ce133" table:formula="of:=IFERROR(VLOOKUP([$Masterlist.$P79];[$Datasheet.$B$1:.$AV$9809];18;FALSE());&quot;-&quot;)" office:value-type="float" office:value="0" calcext:value-type="float">
            <text:p/>
          </table:table-cell>
          <table:table-cell table:style-name="ce133" table:formula="of:=IFERROR(VLOOKUP([$Masterlist.$P79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1" table:number-columns-repeated="11"/>
          <table:table-cell table:style-name="ce51" office:value-type="string" calcext:value-type="string">
            <text:p>yes</text:p>
          </table:table-cell>
          <table:table-cell table:style-name="ce92" office:value-type="string" calcext:value-type="string">
            <text:p>FOH Sound Assistant</text:p>
          </table:table-cell>
          <table:table-cell table:style-name="ce12" office:value-type="string" calcext:value-type="string">
            <text:p>Chané Swanepoel</text:p>
          </table:table-cell>
          <table:table-cell table:style-name="ce13" table:formula="of:=IF(ISNUMBER(MATCH([.P80];[$Datasheet.$B$1:.$B$9809];0));&quot;✓&quot;;&quot;x&quot;)" office:value-type="string" office:string-value="✓" calcext:value-type="string">
            <text:p>✓</text:p>
          </table:table-cell>
          <table:table-cell table:style-name="ce133" table:formula="of:=IFERROR(VLOOKUP([$Masterlist.$P80];[$Datasheet.$B$1:.$AV$9809];2;FALSE());&quot;-&quot;)" office:value-type="float" office:value="0" calcext:value-type="float">
            <text:p>0</text:p>
          </table:table-cell>
          <table:table-cell table:style-name="ce133" table:formula="of:=IFERROR(VLOOKUP([$Masterlist.$P80];[$Datasheet.$B$1:.$AV$9809];3;FALSE());&quot;-&quot;)" office:value-type="float" office:value="1" calcext:value-type="float">
            <text:p>1</text:p>
          </table:table-cell>
          <table:table-cell table:style-name="ce133" table:formula="of:=IFERROR(VLOOKUP([$Masterlist.$P80];[$Datasheet.$B$1:.$AV$9809];4;FALSE());&quot;-&quot;)" office:value-type="float" office:value="0" calcext:value-type="float">
            <text:p>0</text:p>
          </table:table-cell>
          <table:table-cell table:style-name="ce133" table:formula="of:=IFERROR(VLOOKUP([$Masterlist.$P80];[$Datasheet.$B$1:.$AV$9809];5;FALSE());&quot;-&quot;)" office:value-type="float" office:value="1" calcext:value-type="float">
            <text:p>1</text:p>
          </table:table-cell>
          <table:table-cell table:style-name="ce185" table:formula="of:=IFERROR(VLOOKUP([$Masterlist.$P80];[$Datasheet.$B$1:.$AV$9809];6;FALSE());&quot;-&quot;)" office:value-type="float" office:value="0" calcext:value-type="float">
            <text:p>0</text:p>
          </table:table-cell>
          <table:table-cell table:style-name="ce133" table:formula="of:=IFERROR(VLOOKUP([$Masterlist.$P80];[$Datasheet.$B$1:.$AV$9809];7;FALSE());&quot;-&quot;)" office:value-type="float" office:value="1" calcext:value-type="float">
            <text:p>1</text:p>
          </table:table-cell>
          <table:table-cell table:style-name="ce133" table:formula="of:=IFERROR(VLOOKUP([$Masterlist.$P80];[$Datasheet.$B$1:.$AV$9809];8;FALSE());&quot;-&quot;)" office:value-type="float" office:value="0" calcext:value-type="float">
            <text:p>0</text:p>
          </table:table-cell>
          <table:table-cell table:style-name="ce133" table:formula="of:=IFERROR(VLOOKUP([$Masterlist.$P80];[$Datasheet.$B$1:.$AV$9809];9;FALSE());&quot;-&quot;)" office:value-type="float" office:value="0" calcext:value-type="float">
            <text:p>0</text:p>
          </table:table-cell>
          <table:table-cell table:style-name="ce133" table:formula="of:=IFERROR(VLOOKUP([$Masterlist.$P80];[$Datasheet.$B$1:.$AV$9809];10;FALSE());&quot;-&quot;)" office:value-type="float" office:value="1" calcext:value-type="float">
            <text:p>1</text:p>
          </table:table-cell>
          <table:table-cell table:style-name="ce133" table:formula="of:=IFERROR(VLOOKUP([$Masterlist.$P80];[$Datasheet.$B$1:.$AV$9809];11;FALSE());&quot;-&quot;)" office:value-type="float" office:value="1" calcext:value-type="float">
            <text:p>1</text:p>
          </table:table-cell>
          <table:table-cell table:style-name="ce133" table:formula="of:=IFERROR(VLOOKUP([$Masterlist.$P80];[$Datasheet.$B$1:.$AV$9809];12;FALSE());&quot;-&quot;)" office:value-type="float" office:value="1" calcext:value-type="float">
            <text:p>1</text:p>
          </table:table-cell>
          <table:table-cell table:style-name="ce133" table:formula="of:=IFERROR(VLOOKUP([$Masterlist.$P80];[$Datasheet.$B$1:.$AV$9809];13;FALSE());&quot;-&quot;)" office:value-type="float" office:value="1" calcext:value-type="float">
            <text:p>1</text:p>
          </table:table-cell>
          <table:table-cell table:style-name="ce133" table:formula="of:=IFERROR(VLOOKUP([$Masterlist.$P80];[$Datasheet.$B$1:.$AV$9809];14;FALSE());&quot;-&quot;)" office:value-type="float" office:value="0" calcext:value-type="float">
            <text:p>0</text:p>
          </table:table-cell>
          <table:table-cell table:style-name="ce133" table:formula="of:=IFERROR(VLOOKUP([$Masterlist.$P80];[$Datasheet.$B$1:.$AV$9809];15;FALSE());&quot;-&quot;)" office:value-type="float" office:value="1" calcext:value-type="float">
            <text:p>1</text:p>
          </table:table-cell>
          <table:table-cell table:style-name="ce133" table:formula="of:=IFERROR(VLOOKUP([$Masterlist.$P80];[$Datasheet.$B$1:.$AV$9809];16;FALSE());&quot;-&quot;)" office:value-type="float" office:value="0" calcext:value-type="float">
            <text:p/>
          </table:table-cell>
          <table:table-cell table:style-name="ce133" table:formula="of:=IFERROR(VLOOKUP([$Masterlist.$P80];[$Datasheet.$B$1:.$AV$9809];17;FALSE());&quot;-&quot;)" office:value-type="float" office:value="0" calcext:value-type="float">
            <text:p/>
          </table:table-cell>
          <table:table-cell table:style-name="ce133" table:formula="of:=IFERROR(VLOOKUP([$Masterlist.$P80];[$Datasheet.$B$1:.$AV$9809];18;FALSE());&quot;-&quot;)" office:value-type="float" office:value="0" calcext:value-type="float">
            <text:p/>
          </table:table-cell>
          <table:table-cell table:style-name="ce133" table:formula="of:=IFERROR(VLOOKUP([$Masterlist.$P80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1" table:number-columns-repeated="11"/>
          <table:table-cell table:style-name="ce51" office:value-type="string" calcext:value-type="string">
            <text:p>yes</text:p>
          </table:table-cell>
          <table:table-cell table:style-name="ce92" office:value-type="string" calcext:value-type="string">
            <text:p>FOH Sound Assistant</text:p>
          </table:table-cell>
          <table:table-cell table:style-name="ce102" office:value-type="string" calcext:value-type="string">
            <text:p>Kayla Mouton</text:p>
          </table:table-cell>
          <table:table-cell table:style-name="ce13" table:formula="of:=IF(ISNUMBER(MATCH([.P81];[$Datasheet.$B$1:.$B$9809];0));&quot;✓&quot;;&quot;x&quot;)" office:value-type="string" office:string-value="✓" calcext:value-type="string">
            <text:p>✓</text:p>
          </table:table-cell>
          <table:table-cell table:style-name="ce133" table:formula="of:=IFERROR(VLOOKUP([$Masterlist.$P81];[$Datasheet.$B$1:.$AV$9809];2;FALSE());&quot;-&quot;)" office:value-type="float" office:value="1" calcext:value-type="float">
            <text:p>1</text:p>
          </table:table-cell>
          <table:table-cell table:style-name="ce133" table:formula="of:=IFERROR(VLOOKUP([$Masterlist.$P81];[$Datasheet.$B$1:.$AV$9809];3;FALSE());&quot;-&quot;)" office:value-type="float" office:value="1" calcext:value-type="float">
            <text:p>1</text:p>
          </table:table-cell>
          <table:table-cell table:style-name="ce133" table:formula="of:=IFERROR(VLOOKUP([$Masterlist.$P81];[$Datasheet.$B$1:.$AV$9809];4;FALSE());&quot;-&quot;)" office:value-type="float" office:value="0" calcext:value-type="float">
            <text:p>0</text:p>
          </table:table-cell>
          <table:table-cell table:style-name="ce133" table:formula="of:=IFERROR(VLOOKUP([$Masterlist.$P81];[$Datasheet.$B$1:.$AV$9809];5;FALSE());&quot;-&quot;)" office:value-type="float" office:value="0" calcext:value-type="float">
            <text:p>0</text:p>
          </table:table-cell>
          <table:table-cell table:style-name="ce185" table:formula="of:=IFERROR(VLOOKUP([$Masterlist.$P81];[$Datasheet.$B$1:.$AV$9809];6;FALSE());&quot;-&quot;)" office:value-type="float" office:value="1" calcext:value-type="float">
            <text:p>1</text:p>
          </table:table-cell>
          <table:table-cell table:style-name="ce133" table:formula="of:=IFERROR(VLOOKUP([$Masterlist.$P81];[$Datasheet.$B$1:.$AV$9809];7;FALSE());&quot;-&quot;)" office:value-type="float" office:value="1" calcext:value-type="float">
            <text:p>1</text:p>
          </table:table-cell>
          <table:table-cell table:style-name="ce133" table:formula="of:=IFERROR(VLOOKUP([$Masterlist.$P81];[$Datasheet.$B$1:.$AV$9809];8;FALSE());&quot;-&quot;)" office:value-type="float" office:value="0" calcext:value-type="float">
            <text:p>0</text:p>
          </table:table-cell>
          <table:table-cell table:style-name="ce133" table:formula="of:=IFERROR(VLOOKUP([$Masterlist.$P81];[$Datasheet.$B$1:.$AV$9809];9;FALSE());&quot;-&quot;)" office:value-type="float" office:value="0" calcext:value-type="float">
            <text:p>0</text:p>
          </table:table-cell>
          <table:table-cell table:style-name="ce133" table:formula="of:=IFERROR(VLOOKUP([$Masterlist.$P81];[$Datasheet.$B$1:.$AV$9809];10;FALSE());&quot;-&quot;)" office:value-type="float" office:value="1" calcext:value-type="float">
            <text:p>1</text:p>
          </table:table-cell>
          <table:table-cell table:style-name="ce133" table:formula="of:=IFERROR(VLOOKUP([$Masterlist.$P81];[$Datasheet.$B$1:.$AV$9809];11;FALSE());&quot;-&quot;)" office:value-type="float" office:value="1" calcext:value-type="float">
            <text:p>1</text:p>
          </table:table-cell>
          <table:table-cell table:style-name="ce133" table:formula="of:=IFERROR(VLOOKUP([$Masterlist.$P81];[$Datasheet.$B$1:.$AV$9809];12;FALSE());&quot;-&quot;)" office:value-type="float" office:value="0" calcext:value-type="float">
            <text:p>0</text:p>
          </table:table-cell>
          <table:table-cell table:style-name="ce133" table:formula="of:=IFERROR(VLOOKUP([$Masterlist.$P81];[$Datasheet.$B$1:.$AV$9809];13;FALSE());&quot;-&quot;)" office:value-type="float" office:value="0" calcext:value-type="float">
            <text:p>0</text:p>
          </table:table-cell>
          <table:table-cell table:style-name="ce133" table:formula="of:=IFERROR(VLOOKUP([$Masterlist.$P81];[$Datasheet.$B$1:.$AV$9809];14;FALSE());&quot;-&quot;)" office:value-type="float" office:value="1" calcext:value-type="float">
            <text:p>1</text:p>
          </table:table-cell>
          <table:table-cell table:style-name="ce133" table:formula="of:=IFERROR(VLOOKUP([$Masterlist.$P81];[$Datasheet.$B$1:.$AV$9809];15;FALSE());&quot;-&quot;)" office:value-type="float" office:value="1" calcext:value-type="float">
            <text:p>1</text:p>
          </table:table-cell>
          <table:table-cell table:style-name="ce133" table:formula="of:=IFERROR(VLOOKUP([$Masterlist.$P81];[$Datasheet.$B$1:.$AV$9809];16;FALSE());&quot;-&quot;)" office:value-type="float" office:value="0" calcext:value-type="float">
            <text:p/>
          </table:table-cell>
          <table:table-cell table:style-name="ce133" table:formula="of:=IFERROR(VLOOKUP([$Masterlist.$P81];[$Datasheet.$B$1:.$AV$9809];17;FALSE());&quot;-&quot;)" office:value-type="float" office:value="0" calcext:value-type="float">
            <text:p/>
          </table:table-cell>
          <table:table-cell table:style-name="ce133" table:formula="of:=IFERROR(VLOOKUP([$Masterlist.$P81];[$Datasheet.$B$1:.$AV$9809];18;FALSE());&quot;-&quot;)" office:value-type="float" office:value="0" calcext:value-type="float">
            <text:p/>
          </table:table-cell>
          <table:table-cell table:style-name="ce133" table:formula="of:=IFERROR(VLOOKUP([$Masterlist.$P81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7">
          <table:table-cell table:style-name="ce15"/>
          <table:table-cell table:style-name="ce26" office:value-type="string" calcext:value-type="string">
            <text:p>L</text:p>
          </table:table-cell>
          <table:table-cell table:style-name="ce51" table:number-columns-repeated="11"/>
          <table:table-cell table:style-name="ce51" office:value-type="string" calcext:value-type="string">
            <text:p>yes</text:p>
          </table:table-cell>
          <table:table-cell table:style-name="ce92" office:value-type="string" calcext:value-type="string">
            <text:p>FOH Sound Assistant</text:p>
          </table:table-cell>
          <table:table-cell table:style-name="ce102" office:value-type="string" calcext:value-type="string">
            <text:p>Kira Kriessbach</text:p>
          </table:table-cell>
          <table:table-cell table:style-name="ce13" table:formula="of:=IF(ISNUMBER(MATCH([.P82];[$Datasheet.$B$1:.$B$9809];0));&quot;✓&quot;;&quot;x&quot;)" office:value-type="string" office:string-value="✓" calcext:value-type="string">
            <text:p>✓</text:p>
          </table:table-cell>
          <table:table-cell table:style-name="ce133" table:formula="of:=IFERROR(VLOOKUP([$Masterlist.$P82];[$Datasheet.$B$1:.$AV$9809];2;FALSE());&quot;-&quot;)" office:value-type="float" office:value="0" calcext:value-type="float">
            <text:p>0</text:p>
          </table:table-cell>
          <table:table-cell table:style-name="ce133" table:formula="of:=IFERROR(VLOOKUP([$Masterlist.$P82];[$Datasheet.$B$1:.$AV$9809];3;FALSE());&quot;-&quot;)" office:value-type="float" office:value="0" calcext:value-type="float">
            <text:p>0</text:p>
          </table:table-cell>
          <table:table-cell table:style-name="ce133" table:formula="of:=IFERROR(VLOOKUP([$Masterlist.$P82];[$Datasheet.$B$1:.$AV$9809];4;FALSE());&quot;-&quot;)" office:value-type="float" office:value="1" calcext:value-type="float">
            <text:p>1</text:p>
          </table:table-cell>
          <table:table-cell table:style-name="ce133" table:formula="of:=IFERROR(VLOOKUP([$Masterlist.$P82];[$Datasheet.$B$1:.$AV$9809];5;FALSE());&quot;-&quot;)" office:value-type="float" office:value="1" calcext:value-type="float">
            <text:p>1</text:p>
          </table:table-cell>
          <table:table-cell table:style-name="ce185" table:formula="of:=IFERROR(VLOOKUP([$Masterlist.$P82];[$Datasheet.$B$1:.$AV$9809];6;FALSE());&quot;-&quot;)" office:value-type="float" office:value="0" calcext:value-type="float">
            <text:p>0</text:p>
          </table:table-cell>
          <table:table-cell table:style-name="ce133" table:formula="of:=IFERROR(VLOOKUP([$Masterlist.$P82];[$Datasheet.$B$1:.$AV$9809];7;FALSE());&quot;-&quot;)" office:value-type="float" office:value="1" calcext:value-type="float">
            <text:p>1</text:p>
          </table:table-cell>
          <table:table-cell table:style-name="ce133" table:formula="of:=IFERROR(VLOOKUP([$Masterlist.$P82];[$Datasheet.$B$1:.$AV$9809];8;FALSE());&quot;-&quot;)" office:value-type="float" office:value="1" calcext:value-type="float">
            <text:p>1</text:p>
          </table:table-cell>
          <table:table-cell table:style-name="ce133" table:formula="of:=IFERROR(VLOOKUP([$Masterlist.$P82];[$Datasheet.$B$1:.$AV$9809];9;FALSE());&quot;-&quot;)" office:value-type="float" office:value="1" calcext:value-type="float">
            <text:p>1</text:p>
          </table:table-cell>
          <table:table-cell table:style-name="ce133" table:formula="of:=IFERROR(VLOOKUP([$Masterlist.$P82];[$Datasheet.$B$1:.$AV$9809];10;FALSE());&quot;-&quot;)" office:value-type="float" office:value="0" calcext:value-type="float">
            <text:p>0</text:p>
          </table:table-cell>
          <table:table-cell table:style-name="ce133" table:formula="of:=IFERROR(VLOOKUP([$Masterlist.$P82];[$Datasheet.$B$1:.$AV$9809];11;FALSE());&quot;-&quot;)" office:value-type="float" office:value="1" calcext:value-type="float">
            <text:p>1</text:p>
          </table:table-cell>
          <table:table-cell table:style-name="ce133" table:formula="of:=IFERROR(VLOOKUP([$Masterlist.$P82];[$Datasheet.$B$1:.$AV$9809];12;FALSE());&quot;-&quot;)" office:value-type="float" office:value="1" calcext:value-type="float">
            <text:p>1</text:p>
          </table:table-cell>
          <table:table-cell table:style-name="ce133" table:formula="of:=IFERROR(VLOOKUP([$Masterlist.$P82];[$Datasheet.$B$1:.$AV$9809];13;FALSE());&quot;-&quot;)" office:value-type="float" office:value="1" calcext:value-type="float">
            <text:p>1</text:p>
          </table:table-cell>
          <table:table-cell table:style-name="ce133" table:formula="of:=IFERROR(VLOOKUP([$Masterlist.$P82];[$Datasheet.$B$1:.$AV$9809];14;FALSE());&quot;-&quot;)" office:value-type="float" office:value="0" calcext:value-type="float">
            <text:p>0</text:p>
          </table:table-cell>
          <table:table-cell table:style-name="ce133" table:formula="of:=IFERROR(VLOOKUP([$Masterlist.$P82];[$Datasheet.$B$1:.$AV$9809];15;FALSE());&quot;-&quot;)" office:value-type="float" office:value="1" calcext:value-type="float">
            <text:p>1</text:p>
          </table:table-cell>
          <table:table-cell table:style-name="ce133" table:formula="of:=IFERROR(VLOOKUP([$Masterlist.$P82];[$Datasheet.$B$1:.$AV$9809];16;FALSE());&quot;-&quot;)" office:value-type="float" office:value="0" calcext:value-type="float">
            <text:p/>
          </table:table-cell>
          <table:table-cell table:style-name="ce133" table:formula="of:=IFERROR(VLOOKUP([$Masterlist.$P82];[$Datasheet.$B$1:.$AV$9809];17;FALSE());&quot;-&quot;)" office:value-type="float" office:value="0" calcext:value-type="float">
            <text:p/>
          </table:table-cell>
          <table:table-cell table:style-name="ce133" table:formula="of:=IFERROR(VLOOKUP([$Masterlist.$P82];[$Datasheet.$B$1:.$AV$9809];18;FALSE());&quot;-&quot;)" office:value-type="float" office:value="0" calcext:value-type="float">
            <text:p/>
          </table:table-cell>
          <table:table-cell table:style-name="ce133" table:formula="of:=IFERROR(VLOOKUP([$Masterlist.$P82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7">
          <table:table-cell table:style-name="ce15"/>
          <table:table-cell table:style-name="ce26" office:value-type="string" calcext:value-type="string">
            <text:p>L</text:p>
          </table:table-cell>
          <table:table-cell table:style-name="ce51" table:number-columns-repeated="11"/>
          <table:table-cell table:style-name="ce51" office:value-type="string" calcext:value-type="string">
            <text:p>yes</text:p>
          </table:table-cell>
          <table:table-cell table:style-name="ce92" office:value-type="string" calcext:value-type="string">
            <text:p>FOH Sound Assistant</text:p>
          </table:table-cell>
          <table:table-cell table:style-name="ce102" office:value-type="string" calcext:value-type="string">
            <text:p>Bernice Pretorius</text:p>
          </table:table-cell>
          <table:table-cell table:style-name="ce13" table:formula="of:=IF(ISNUMBER(MATCH([.P83];[$Datasheet.$B$1:.$B$9809];0));&quot;✓&quot;;&quot;x&quot;)" office:value-type="string" office:string-value="x" calcext:value-type="string">
            <text:p>x</text:p>
          </table:table-cell>
          <table:table-cell table:style-name="ce133" table:formula="of:=IFERROR(VLOOKUP([$Masterlist.$P83];[$Datasheet.$B$1:.$AV$9809];2;FALSE());&quot;-&quot;)" office:value-type="string" office:string-value="-" calcext:value-type="string">
            <text:p>-</text:p>
          </table:table-cell>
          <table:table-cell table:style-name="ce133" table:formula="of:=IFERROR(VLOOKUP([$Masterlist.$P83];[$Datasheet.$B$1:.$AV$9809];3;FALSE());&quot;-&quot;)" office:value-type="string" office:string-value="-" calcext:value-type="string">
            <text:p>-</text:p>
          </table:table-cell>
          <table:table-cell table:style-name="ce133" table:formula="of:=IFERROR(VLOOKUP([$Masterlist.$P83];[$Datasheet.$B$1:.$AV$9809];4;FALSE());&quot;-&quot;)" office:value-type="string" office:string-value="-" calcext:value-type="string">
            <text:p>-</text:p>
          </table:table-cell>
          <table:table-cell table:style-name="ce133" table:formula="of:=IFERROR(VLOOKUP([$Masterlist.$P83];[$Datasheet.$B$1:.$AV$9809];5;FALSE());&quot;-&quot;)" office:value-type="string" office:string-value="-" calcext:value-type="string">
            <text:p>-</text:p>
          </table:table-cell>
          <table:table-cell table:style-name="ce185" table:formula="of:=IFERROR(VLOOKUP([$Masterlist.$P83];[$Datasheet.$B$1:.$AV$9809];6;FALSE());&quot;-&quot;)" office:value-type="string" office:string-value="-" calcext:value-type="string">
            <text:p>-</text:p>
          </table:table-cell>
          <table:table-cell table:style-name="ce133" table:formula="of:=IFERROR(VLOOKUP([$Masterlist.$P83];[$Datasheet.$B$1:.$AV$9809];7;FALSE());&quot;-&quot;)" office:value-type="string" office:string-value="-" calcext:value-type="string">
            <text:p>-</text:p>
          </table:table-cell>
          <table:table-cell table:style-name="ce133" table:formula="of:=IFERROR(VLOOKUP([$Masterlist.$P83];[$Datasheet.$B$1:.$AV$9809];8;FALSE());&quot;-&quot;)" office:value-type="string" office:string-value="-" calcext:value-type="string">
            <text:p>-</text:p>
          </table:table-cell>
          <table:table-cell table:style-name="ce133" table:formula="of:=IFERROR(VLOOKUP([$Masterlist.$P83];[$Datasheet.$B$1:.$AV$9809];9;FALSE());&quot;-&quot;)" office:value-type="string" office:string-value="-" calcext:value-type="string">
            <text:p>-</text:p>
          </table:table-cell>
          <table:table-cell table:style-name="ce133" table:formula="of:=IFERROR(VLOOKUP([$Masterlist.$P83];[$Datasheet.$B$1:.$AV$9809];10;FALSE());&quot;-&quot;)" office:value-type="string" office:string-value="-" calcext:value-type="string">
            <text:p>-</text:p>
          </table:table-cell>
          <table:table-cell table:style-name="ce133" table:formula="of:=IFERROR(VLOOKUP([$Masterlist.$P83];[$Datasheet.$B$1:.$AV$9809];11;FALSE());&quot;-&quot;)" office:value-type="string" office:string-value="-" calcext:value-type="string">
            <text:p>-</text:p>
          </table:table-cell>
          <table:table-cell table:style-name="ce133" table:formula="of:=IFERROR(VLOOKUP([$Masterlist.$P83];[$Datasheet.$B$1:.$AV$9809];12;FALSE());&quot;-&quot;)" office:value-type="string" office:string-value="-" calcext:value-type="string">
            <text:p>-</text:p>
          </table:table-cell>
          <table:table-cell table:style-name="ce133" table:formula="of:=IFERROR(VLOOKUP([$Masterlist.$P83];[$Datasheet.$B$1:.$AV$9809];13;FALSE());&quot;-&quot;)" office:value-type="string" office:string-value="-" calcext:value-type="string">
            <text:p>-</text:p>
          </table:table-cell>
          <table:table-cell table:style-name="ce133" table:formula="of:=IFERROR(VLOOKUP([$Masterlist.$P83];[$Datasheet.$B$1:.$AV$9809];14;FALSE());&quot;-&quot;)" office:value-type="string" office:string-value="-" calcext:value-type="string">
            <text:p>-</text:p>
          </table:table-cell>
          <table:table-cell table:style-name="ce133" table:formula="of:=IFERROR(VLOOKUP([$Masterlist.$P83];[$Datasheet.$B$1:.$AV$9809];15;FALSE());&quot;-&quot;)" office:value-type="string" office:string-value="-" calcext:value-type="string">
            <text:p>-</text:p>
          </table:table-cell>
          <table:table-cell table:style-name="ce133" table:formula="of:=IFERROR(VLOOKUP([$Masterlist.$P83];[$Datasheet.$B$1:.$AV$9809];16;FALSE());&quot;-&quot;)" office:value-type="string" office:string-value="-" calcext:value-type="string">
            <text:p>-</text:p>
          </table:table-cell>
          <table:table-cell table:style-name="ce133" table:formula="of:=IFERROR(VLOOKUP([$Masterlist.$P83];[$Datasheet.$B$1:.$AV$9809];17;FALSE());&quot;-&quot;)" office:value-type="string" office:string-value="-" calcext:value-type="string">
            <text:p>-</text:p>
          </table:table-cell>
          <table:table-cell table:style-name="ce133" table:formula="of:=IFERROR(VLOOKUP([$Masterlist.$P83];[$Datasheet.$B$1:.$AV$9809];18;FALSE());&quot;-&quot;)" office:value-type="string" office:string-value="-" calcext:value-type="string">
            <text:p>-</text:p>
          </table:table-cell>
          <table:table-cell table:style-name="ce133" table:formula="of:=IFERROR(VLOOKUP([$Masterlist.$P83];[$Datasheet.$B$1:.$AV$9809];19;FALSE());&quot;-&quot;)" office:value-type="string" office:string-value="-" calcext:value-type="string">
            <text:p>-</text:p>
          </table:table-cell>
          <table:table-cell table:style-name="ce15" table:number-columns-repeated="2"/>
          <table:table-cell table:number-columns-repeated="16347"/>
        </table:table-row>
        <table:table-row table:style-name="ro7">
          <table:table-cell table:style-name="ce15"/>
          <table:table-cell table:style-name="ce26" office:value-type="string" calcext:value-type="string">
            <text:p>L</text:p>
          </table:table-cell>
          <table:table-cell table:style-name="ce51" table:number-columns-repeated="11"/>
          <table:table-cell table:style-name="ce51" office:value-type="string" calcext:value-type="string">
            <text:p>yes</text:p>
          </table:table-cell>
          <table:table-cell table:style-name="ce92" office:value-type="string" calcext:value-type="string">
            <text:p>FOH Sound Assistant</text:p>
          </table:table-cell>
          <table:table-cell table:style-name="ce102" office:value-type="string" calcext:value-type="string">
            <text:p>Lida-marie Huysamen</text:p>
          </table:table-cell>
          <table:table-cell table:style-name="ce13" table:formula="of:=IF(ISNUMBER(MATCH([.P84];[$Datasheet.$B$1:.$B$9809];0));&quot;✓&quot;;&quot;x&quot;)" office:value-type="string" office:string-value="✓" calcext:value-type="string">
            <text:p>✓</text:p>
          </table:table-cell>
          <table:table-cell table:style-name="ce133" table:formula="of:=IFERROR(VLOOKUP([$Masterlist.$P84];[$Datasheet.$B$1:.$AV$9809];2;FALSE());&quot;-&quot;)" office:value-type="float" office:value="0" calcext:value-type="float">
            <text:p>0</text:p>
          </table:table-cell>
          <table:table-cell table:style-name="ce133" table:formula="of:=IFERROR(VLOOKUP([$Masterlist.$P84];[$Datasheet.$B$1:.$AV$9809];3;FALSE());&quot;-&quot;)" office:value-type="float" office:value="0" calcext:value-type="float">
            <text:p>0</text:p>
          </table:table-cell>
          <table:table-cell table:style-name="ce133" table:formula="of:=IFERROR(VLOOKUP([$Masterlist.$P84];[$Datasheet.$B$1:.$AV$9809];4;FALSE());&quot;-&quot;)" office:value-type="float" office:value="0" calcext:value-type="float">
            <text:p>0</text:p>
          </table:table-cell>
          <table:table-cell table:style-name="ce133" table:formula="of:=IFERROR(VLOOKUP([$Masterlist.$P84];[$Datasheet.$B$1:.$AV$9809];5;FALSE());&quot;-&quot;)" office:value-type="float" office:value="0" calcext:value-type="float">
            <text:p>0</text:p>
          </table:table-cell>
          <table:table-cell table:style-name="ce185" table:formula="of:=IFERROR(VLOOKUP([$Masterlist.$P84];[$Datasheet.$B$1:.$AV$9809];6;FALSE());&quot;-&quot;)" office:value-type="float" office:value="0" calcext:value-type="float">
            <text:p>0</text:p>
          </table:table-cell>
          <table:table-cell table:style-name="ce133" table:formula="of:=IFERROR(VLOOKUP([$Masterlist.$P84];[$Datasheet.$B$1:.$AV$9809];7;FALSE());&quot;-&quot;)" office:value-type="float" office:value="0" calcext:value-type="float">
            <text:p>0</text:p>
          </table:table-cell>
          <table:table-cell table:style-name="ce133" table:formula="of:=IFERROR(VLOOKUP([$Masterlist.$P84];[$Datasheet.$B$1:.$AV$9809];8;FALSE());&quot;-&quot;)" office:value-type="float" office:value="0" calcext:value-type="float">
            <text:p>0</text:p>
          </table:table-cell>
          <table:table-cell table:style-name="ce133" table:formula="of:=IFERROR(VLOOKUP([$Masterlist.$P84];[$Datasheet.$B$1:.$AV$9809];9;FALSE());&quot;-&quot;)" office:value-type="float" office:value="1" calcext:value-type="float">
            <text:p>1</text:p>
          </table:table-cell>
          <table:table-cell table:style-name="ce133" table:formula="of:=IFERROR(VLOOKUP([$Masterlist.$P84];[$Datasheet.$B$1:.$AV$9809];10;FALSE());&quot;-&quot;)" office:value-type="float" office:value="1" calcext:value-type="float">
            <text:p>1</text:p>
          </table:table-cell>
          <table:table-cell table:style-name="ce133" table:formula="of:=IFERROR(VLOOKUP([$Masterlist.$P84];[$Datasheet.$B$1:.$AV$9809];11;FALSE());&quot;-&quot;)" office:value-type="float" office:value="0" calcext:value-type="float">
            <text:p>0</text:p>
          </table:table-cell>
          <table:table-cell table:style-name="ce133" table:formula="of:=IFERROR(VLOOKUP([$Masterlist.$P84];[$Datasheet.$B$1:.$AV$9809];12;FALSE());&quot;-&quot;)" office:value-type="float" office:value="0" calcext:value-type="float">
            <text:p>0</text:p>
          </table:table-cell>
          <table:table-cell table:style-name="ce133" table:formula="of:=IFERROR(VLOOKUP([$Masterlist.$P84];[$Datasheet.$B$1:.$AV$9809];13;FALSE());&quot;-&quot;)" office:value-type="float" office:value="0" calcext:value-type="float">
            <text:p>0</text:p>
          </table:table-cell>
          <table:table-cell table:style-name="ce133" table:formula="of:=IFERROR(VLOOKUP([$Masterlist.$P84];[$Datasheet.$B$1:.$AV$9809];14;FALSE());&quot;-&quot;)" office:value-type="float" office:value="1" calcext:value-type="float">
            <text:p>1</text:p>
          </table:table-cell>
          <table:table-cell table:style-name="ce133" table:formula="of:=IFERROR(VLOOKUP([$Masterlist.$P84];[$Datasheet.$B$1:.$AV$9809];15;FALSE());&quot;-&quot;)" office:value-type="float" office:value="1" calcext:value-type="float">
            <text:p>1</text:p>
          </table:table-cell>
          <table:table-cell table:style-name="ce133" table:formula="of:=IFERROR(VLOOKUP([$Masterlist.$P84];[$Datasheet.$B$1:.$AV$9809];16;FALSE());&quot;-&quot;)" office:value-type="float" office:value="0" calcext:value-type="float">
            <text:p/>
          </table:table-cell>
          <table:table-cell table:style-name="ce133" table:formula="of:=IFERROR(VLOOKUP([$Masterlist.$P84];[$Datasheet.$B$1:.$AV$9809];17;FALSE());&quot;-&quot;)" office:value-type="float" office:value="0" calcext:value-type="float">
            <text:p/>
          </table:table-cell>
          <table:table-cell table:style-name="ce133" table:formula="of:=IFERROR(VLOOKUP([$Masterlist.$P84];[$Datasheet.$B$1:.$AV$9809];18;FALSE());&quot;-&quot;)" office:value-type="float" office:value="0" calcext:value-type="float">
            <text:p/>
          </table:table-cell>
          <table:table-cell table:style-name="ce133" table:formula="of:=IFERROR(VLOOKUP([$Masterlist.$P84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7" office:value-type="string" calcext:value-type="string">
            <text:p>A</text:p>
          </table:table-cell>
          <table:table-cell table:style-name="ce51" table:number-columns-repeated="11"/>
          <table:table-cell table:style-name="ce51" office:value-type="string" calcext:value-type="string">
            <text:p>yes</text:p>
          </table:table-cell>
          <table:table-cell table:style-name="ce93" office:value-type="string" calcext:value-type="string">
            <text:p>FOH Sound Assistant</text:p>
          </table:table-cell>
          <table:table-cell table:style-name="ce102" office:value-type="string" calcext:value-type="string">
            <text:p>Isabel Robberts</text:p>
          </table:table-cell>
          <table:table-cell table:style-name="ce116" table:formula="of:=IF(ISNUMBER(MATCH([.P85];[$Datasheet.$B$1:.$B$9809];0));&quot;✓&quot;;&quot;x&quot;)" office:value-type="string" office:string-value="✓" calcext:value-type="string">
            <text:p>✓</text:p>
          </table:table-cell>
          <table:table-cell table:style-name="ce139" table:formula="of:=IFERROR(VLOOKUP([$Masterlist.$P85];[$Datasheet.$B$1:.$AV$9809];2;FALSE());&quot;-&quot;)" office:value-type="float" office:value="1" calcext:value-type="float">
            <text:p>1</text:p>
          </table:table-cell>
          <table:table-cell table:style-name="ce139" table:formula="of:=IFERROR(VLOOKUP([$Masterlist.$P85];[$Datasheet.$B$1:.$AV$9809];3;FALSE());&quot;-&quot;)" office:value-type="float" office:value="1" calcext:value-type="float">
            <text:p>1</text:p>
          </table:table-cell>
          <table:table-cell table:style-name="ce139" table:formula="of:=IFERROR(VLOOKUP([$Masterlist.$P85];[$Datasheet.$B$1:.$AV$9809];4;FALSE());&quot;-&quot;)" office:value-type="float" office:value="0" calcext:value-type="float">
            <text:p>0</text:p>
          </table:table-cell>
          <table:table-cell table:style-name="ce139" table:formula="of:=IFERROR(VLOOKUP([$Masterlist.$P85];[$Datasheet.$B$1:.$AV$9809];5;FALSE());&quot;-&quot;)" office:value-type="float" office:value="1" calcext:value-type="float">
            <text:p>1</text:p>
          </table:table-cell>
          <table:table-cell table:style-name="ce189" table:formula="of:=IFERROR(VLOOKUP([$Masterlist.$P85];[$Datasheet.$B$1:.$AV$9809];6;FALSE());&quot;-&quot;)" office:value-type="float" office:value="1" calcext:value-type="float">
            <text:p>1</text:p>
          </table:table-cell>
          <table:table-cell table:style-name="ce139" table:formula="of:=IFERROR(VLOOKUP([$Masterlist.$P85];[$Datasheet.$B$1:.$AV$9809];7;FALSE());&quot;-&quot;)" office:value-type="float" office:value="1" calcext:value-type="float">
            <text:p>1</text:p>
          </table:table-cell>
          <table:table-cell table:style-name="ce139" table:formula="of:=IFERROR(VLOOKUP([$Masterlist.$P85];[$Datasheet.$B$1:.$AV$9809];8;FALSE());&quot;-&quot;)" office:value-type="float" office:value="0" calcext:value-type="float">
            <text:p>0</text:p>
          </table:table-cell>
          <table:table-cell table:style-name="ce139" table:formula="of:=IFERROR(VLOOKUP([$Masterlist.$P85];[$Datasheet.$B$1:.$AV$9809];9;FALSE());&quot;-&quot;)" office:value-type="float" office:value="1" calcext:value-type="float">
            <text:p>1</text:p>
          </table:table-cell>
          <table:table-cell table:style-name="ce139" table:formula="of:=IFERROR(VLOOKUP([$Masterlist.$P85];[$Datasheet.$B$1:.$AV$9809];10;FALSE());&quot;-&quot;)" office:value-type="float" office:value="0" calcext:value-type="float">
            <text:p>0</text:p>
          </table:table-cell>
          <table:table-cell table:style-name="ce139" table:formula="of:=IFERROR(VLOOKUP([$Masterlist.$P85];[$Datasheet.$B$1:.$AV$9809];11;FALSE());&quot;-&quot;)" office:value-type="float" office:value="0" calcext:value-type="float">
            <text:p>0</text:p>
          </table:table-cell>
          <table:table-cell table:style-name="ce139" table:formula="of:=IFERROR(VLOOKUP([$Masterlist.$P85];[$Datasheet.$B$1:.$AV$9809];12;FALSE());&quot;-&quot;)" office:value-type="float" office:value="0" calcext:value-type="float">
            <text:p>0</text:p>
          </table:table-cell>
          <table:table-cell table:style-name="ce139" table:formula="of:=IFERROR(VLOOKUP([$Masterlist.$P85];[$Datasheet.$B$1:.$AV$9809];13;FALSE());&quot;-&quot;)" office:value-type="float" office:value="0" calcext:value-type="float">
            <text:p>0</text:p>
          </table:table-cell>
          <table:table-cell table:style-name="ce139" table:formula="of:=IFERROR(VLOOKUP([$Masterlist.$P85];[$Datasheet.$B$1:.$AV$9809];14;FALSE());&quot;-&quot;)" office:value-type="float" office:value="0" calcext:value-type="float">
            <text:p>0</text:p>
          </table:table-cell>
          <table:table-cell table:style-name="ce139" table:formula="of:=IFERROR(VLOOKUP([$Masterlist.$P85];[$Datasheet.$B$1:.$AV$9809];15;FALSE());&quot;-&quot;)" office:value-type="float" office:value="0" calcext:value-type="float">
            <text:p>0</text:p>
          </table:table-cell>
          <table:table-cell table:style-name="ce139" table:formula="of:=IFERROR(VLOOKUP([$Masterlist.$P85];[$Datasheet.$B$1:.$AV$9809];16;FALSE());&quot;-&quot;)" office:value-type="float" office:value="0" calcext:value-type="float">
            <text:p/>
          </table:table-cell>
          <table:table-cell table:style-name="ce139" table:formula="of:=IFERROR(VLOOKUP([$Masterlist.$P85];[$Datasheet.$B$1:.$AV$9809];17;FALSE());&quot;-&quot;)" office:value-type="float" office:value="0" calcext:value-type="float">
            <text:p/>
          </table:table-cell>
          <table:table-cell table:style-name="ce139" table:formula="of:=IFERROR(VLOOKUP([$Masterlist.$P85];[$Datasheet.$B$1:.$AV$9809];18;FALSE());&quot;-&quot;)" office:value-type="float" office:value="0" calcext:value-type="float">
            <text:p/>
          </table:table-cell>
          <table:table-cell table:style-name="ce139" table:formula="of:=IFERROR(VLOOKUP([$Masterlist.$P85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31" office:value-type="string" calcext:value-type="string" table:number-columns-spanned="15" table:number-rows-spanned="1">
            <text:p>LIGHTING TECHNICIANS - ANRO CONRADIE</text:p>
          </table:table-cell>
          <table:covered-table-cell table:number-columns-repeated="13" table:style-name="ce45"/>
          <table:covered-table-cell table:style-name="ce99"/>
          <table:table-cell table:style-name="ce119"/>
          <table:table-cell table:style-name="ce140" office:value-type="string" calcext:value-type="string" table:number-columns-spanned="18" table:number-rows-spanned="1">
            <text:p>LIGHTS - ANRO CONRADIE</text:p>
          </table:table-cell>
          <table:covered-table-cell table:number-columns-repeated="16" table:style-name="ce45"/>
          <table:covered-table-cell table:style-name="ce99"/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32" office:value-type="string" calcext:value-type="string">
            <text:p>L</text:p>
          </table:table-cell>
          <table:table-cell table:style-name="ce57" office:value-type="string" calcext:value-type="string">
            <text:p>Yes</text:p>
          </table:table-cell>
          <table:table-cell table:number-columns-repeated="4" table:style-name="ce64" office:value-type="string" calcext:value-type="string">
            <text:p>Yes</text:p>
          </table:table-cell>
          <table:table-cell table:style-name="ce64" table:number-columns-repeated="6"/>
          <table:table-cell table:style-name="ce83"/>
          <table:table-cell table:style-name="ce94" office:value-type="string" calcext:value-type="string">
            <text:p>Lighting Technician</text:p>
          </table:table-cell>
          <table:table-cell table:style-name="ce107" office:value-type="string" calcext:value-type="string">
            <text:p>Anro Conradie</text:p>
          </table:table-cell>
          <table:table-cell table:style-name="ce120" table:formula="of:=IF(ISNUMBER(MATCH([.P87];[$Datasheet.$B$1:.$B$9809];0));&quot;✓&quot;;&quot;x&quot;)" office:value-type="string" office:string-value="✓" calcext:value-type="string">
            <text:p>✓</text:p>
          </table:table-cell>
          <table:table-cell table:style-name="ce141" table:formula="of:=IFERROR(VLOOKUP([$Masterlist.$P87];[$Datasheet.$B$1:.$AV$9809];2;FALSE());&quot;-&quot;)" office:value-type="float" office:value="1" calcext:value-type="float">
            <text:p>1</text:p>
          </table:table-cell>
          <table:table-cell table:style-name="ce173" table:formula="of:=IFERROR(VLOOKUP([$Masterlist.$P87];[$Datasheet.$B$1:.$AV$9809];3;FALSE());&quot;-&quot;)" office:value-type="float" office:value="1" calcext:value-type="float">
            <text:p>1</text:p>
          </table:table-cell>
          <table:table-cell table:style-name="ce173" table:formula="of:=IFERROR(VLOOKUP([$Masterlist.$P87];[$Datasheet.$B$1:.$AV$9809];4;FALSE());&quot;-&quot;)" office:value-type="float" office:value="1" calcext:value-type="float">
            <text:p>1</text:p>
          </table:table-cell>
          <table:table-cell table:style-name="ce173" table:formula="of:=IFERROR(VLOOKUP([$Masterlist.$P87];[$Datasheet.$B$1:.$AV$9809];5;FALSE());&quot;-&quot;)" office:value-type="float" office:value="1" calcext:value-type="float">
            <text:p>1</text:p>
          </table:table-cell>
          <table:table-cell table:style-name="ce190" table:formula="of:=IFERROR(VLOOKUP([$Masterlist.$P87];[$Datasheet.$B$1:.$AV$9809];6;FALSE());&quot;-&quot;)" office:value-type="float" office:value="1" calcext:value-type="float">
            <text:p>1</text:p>
          </table:table-cell>
          <table:table-cell table:style-name="ce173" table:formula="of:=IFERROR(VLOOKUP([$Masterlist.$P87];[$Datasheet.$B$1:.$AV$9809];7;FALSE());&quot;-&quot;)" office:value-type="float" office:value="1" calcext:value-type="float">
            <text:p>1</text:p>
          </table:table-cell>
          <table:table-cell table:style-name="ce173" table:formula="of:=IFERROR(VLOOKUP([$Masterlist.$P87];[$Datasheet.$B$1:.$AV$9809];8;FALSE());&quot;-&quot;)" office:value-type="float" office:value="1" calcext:value-type="float">
            <text:p>1</text:p>
          </table:table-cell>
          <table:table-cell table:style-name="ce173" table:formula="of:=IFERROR(VLOOKUP([$Masterlist.$P87];[$Datasheet.$B$1:.$AV$9809];9;FALSE());&quot;-&quot;)" office:value-type="float" office:value="1" calcext:value-type="float">
            <text:p>1</text:p>
          </table:table-cell>
          <table:table-cell table:style-name="ce173" table:formula="of:=IFERROR(VLOOKUP([$Masterlist.$P87];[$Datasheet.$B$1:.$AV$9809];10;FALSE());&quot;-&quot;)" office:value-type="float" office:value="1" calcext:value-type="float">
            <text:p>1</text:p>
          </table:table-cell>
          <table:table-cell table:style-name="ce173" table:formula="of:=IFERROR(VLOOKUP([$Masterlist.$P87];[$Datasheet.$B$1:.$AV$9809];11;FALSE());&quot;-&quot;)" office:value-type="float" office:value="1" calcext:value-type="float">
            <text:p>1</text:p>
          </table:table-cell>
          <table:table-cell table:style-name="ce173" table:formula="of:=IFERROR(VLOOKUP([$Masterlist.$P87];[$Datasheet.$B$1:.$AV$9809];12;FALSE());&quot;-&quot;)" office:value-type="float" office:value="1" calcext:value-type="float">
            <text:p>1</text:p>
          </table:table-cell>
          <table:table-cell table:style-name="ce173" table:formula="of:=IFERROR(VLOOKUP([$Masterlist.$P87];[$Datasheet.$B$1:.$AV$9809];13;FALSE());&quot;-&quot;)" office:value-type="float" office:value="1" calcext:value-type="float">
            <text:p>1</text:p>
          </table:table-cell>
          <table:table-cell table:style-name="ce173" table:formula="of:=IFERROR(VLOOKUP([$Masterlist.$P87];[$Datasheet.$B$1:.$AV$9809];14;FALSE());&quot;-&quot;)" office:value-type="float" office:value="1" calcext:value-type="float">
            <text:p>1</text:p>
          </table:table-cell>
          <table:table-cell table:style-name="ce173" table:formula="of:=IFERROR(VLOOKUP([$Masterlist.$P87];[$Datasheet.$B$1:.$AV$9809];15;FALSE());&quot;-&quot;)" office:value-type="float" office:value="1" calcext:value-type="float">
            <text:p>1</text:p>
          </table:table-cell>
          <table:table-cell table:style-name="ce173" table:formula="of:=IFERROR(VLOOKUP([$Masterlist.$P87];[$Datasheet.$B$1:.$AV$9809];16;FALSE());&quot;-&quot;)" office:value-type="float" office:value="0" calcext:value-type="float">
            <text:p/>
          </table:table-cell>
          <table:table-cell table:style-name="ce173" table:formula="of:=IFERROR(VLOOKUP([$Masterlist.$P87];[$Datasheet.$B$1:.$AV$9809];17;FALSE());&quot;-&quot;)" office:value-type="float" office:value="0" calcext:value-type="float">
            <text:p/>
          </table:table-cell>
          <table:table-cell table:style-name="ce173" table:formula="of:=IFERROR(VLOOKUP([$Masterlist.$P87];[$Datasheet.$B$1:.$AV$9809];18;FALSE());&quot;-&quot;)" office:value-type="float" office:value="0" calcext:value-type="float">
            <text:p/>
          </table:table-cell>
          <table:table-cell table:style-name="ce243" table:formula="of:=IFERROR(VLOOKUP([$Masterlist.$P87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33" office:value-type="string" calcext:value-type="string">
            <text:p>A</text:p>
          </table:table-cell>
          <table:table-cell table:style-name="ce58" office:value-type="string" calcext:value-type="string">
            <text:p>Yes</text:p>
          </table:table-cell>
          <table:table-cell table:number-columns-repeated="2" table:style-name="ce49" office:value-type="string" calcext:value-type="string">
            <text:p>Yes</text:p>
          </table:table-cell>
          <table:table-cell table:style-name="ce49"/>
          <table:table-cell table:style-name="ce50" table:number-columns-repeated="7"/>
          <table:table-cell table:style-name="ce84"/>
          <table:table-cell table:style-name="ce95" office:value-type="string" calcext:value-type="string">
            <text:p>Lighting Technician</text:p>
          </table:table-cell>
          <table:table-cell table:style-name="ce108" office:value-type="string" calcext:value-type="string">
            <text:p>Anke Amsenga</text:p>
          </table:table-cell>
          <table:table-cell table:style-name="ce121" table:formula="of:=IF(ISNUMBER(MATCH([.P88];[$Datasheet.$B$1:.$B$9809];0));&quot;✓&quot;;&quot;x&quot;)" office:value-type="string" office:string-value="✓" calcext:value-type="string">
            <text:p>✓</text:p>
          </table:table-cell>
          <table:table-cell table:style-name="ce142" table:formula="of:=IFERROR(VLOOKUP([$Masterlist.$P88];[$Datasheet.$B$1:.$AV$9809];2;FALSE());&quot;-&quot;)" office:value-type="float" office:value="0" calcext:value-type="float">
            <text:p>0</text:p>
          </table:table-cell>
          <table:table-cell table:style-name="ce168" table:formula="of:=IFERROR(VLOOKUP([$Masterlist.$P88];[$Datasheet.$B$1:.$AV$9809];3;FALSE());&quot;-&quot;)" office:value-type="float" office:value="1" calcext:value-type="float">
            <text:p>1</text:p>
          </table:table-cell>
          <table:table-cell table:style-name="ce168" table:formula="of:=IFERROR(VLOOKUP([$Masterlist.$P88];[$Datasheet.$B$1:.$AV$9809];4;FALSE());&quot;-&quot;)" office:value-type="float" office:value="1" calcext:value-type="float">
            <text:p>1</text:p>
          </table:table-cell>
          <table:table-cell table:style-name="ce168" table:formula="of:=IFERROR(VLOOKUP([$Masterlist.$P88];[$Datasheet.$B$1:.$AV$9809];5;FALSE());&quot;-&quot;)" office:value-type="float" office:value="1" calcext:value-type="float">
            <text:p>1</text:p>
          </table:table-cell>
          <table:table-cell table:style-name="ce191" table:formula="of:=IFERROR(VLOOKUP([$Masterlist.$P88];[$Datasheet.$B$1:.$AV$9809];6;FALSE());&quot;-&quot;)" office:value-type="float" office:value="0" calcext:value-type="float">
            <text:p>0</text:p>
          </table:table-cell>
          <table:table-cell table:style-name="ce168" table:formula="of:=IFERROR(VLOOKUP([$Masterlist.$P88];[$Datasheet.$B$1:.$AV$9809];7;FALSE());&quot;-&quot;)" office:value-type="float" office:value="1" calcext:value-type="float">
            <text:p>1</text:p>
          </table:table-cell>
          <table:table-cell table:style-name="ce168" table:formula="of:=IFERROR(VLOOKUP([$Masterlist.$P88];[$Datasheet.$B$1:.$AV$9809];8;FALSE());&quot;-&quot;)" office:value-type="float" office:value="1" calcext:value-type="float">
            <text:p>1</text:p>
          </table:table-cell>
          <table:table-cell table:style-name="ce168" table:formula="of:=IFERROR(VLOOKUP([$Masterlist.$P88];[$Datasheet.$B$1:.$AV$9809];9;FALSE());&quot;-&quot;)" office:value-type="float" office:value="1" calcext:value-type="float">
            <text:p>1</text:p>
          </table:table-cell>
          <table:table-cell table:style-name="ce168" table:formula="of:=IFERROR(VLOOKUP([$Masterlist.$P88];[$Datasheet.$B$1:.$AV$9809];10;FALSE());&quot;-&quot;)" office:value-type="float" office:value="0" calcext:value-type="float">
            <text:p>0</text:p>
          </table:table-cell>
          <table:table-cell table:style-name="ce168" table:formula="of:=IFERROR(VLOOKUP([$Masterlist.$P88];[$Datasheet.$B$1:.$AV$9809];11;FALSE());&quot;-&quot;)" office:value-type="float" office:value="1" calcext:value-type="float">
            <text:p>1</text:p>
          </table:table-cell>
          <table:table-cell table:style-name="ce168" table:formula="of:=IFERROR(VLOOKUP([$Masterlist.$P88];[$Datasheet.$B$1:.$AV$9809];12;FALSE());&quot;-&quot;)" office:value-type="float" office:value="1" calcext:value-type="float">
            <text:p>1</text:p>
          </table:table-cell>
          <table:table-cell table:style-name="ce168" table:formula="of:=IFERROR(VLOOKUP([$Masterlist.$P88];[$Datasheet.$B$1:.$AV$9809];13;FALSE());&quot;-&quot;)" office:value-type="float" office:value="1" calcext:value-type="float">
            <text:p>1</text:p>
          </table:table-cell>
          <table:table-cell table:style-name="ce168" table:formula="of:=IFERROR(VLOOKUP([$Masterlist.$P88];[$Datasheet.$B$1:.$AV$9809];14;FALSE());&quot;-&quot;)" office:value-type="float" office:value="0" calcext:value-type="float">
            <text:p>0</text:p>
          </table:table-cell>
          <table:table-cell table:style-name="ce168" table:formula="of:=IFERROR(VLOOKUP([$Masterlist.$P88];[$Datasheet.$B$1:.$AV$9809];15;FALSE());&quot;-&quot;)" office:value-type="float" office:value="1" calcext:value-type="float">
            <text:p>1</text:p>
          </table:table-cell>
          <table:table-cell table:style-name="ce168" table:formula="of:=IFERROR(VLOOKUP([$Masterlist.$P88];[$Datasheet.$B$1:.$AV$9809];16;FALSE());&quot;-&quot;)" office:value-type="float" office:value="0" calcext:value-type="float">
            <text:p/>
          </table:table-cell>
          <table:table-cell table:style-name="ce168" table:formula="of:=IFERROR(VLOOKUP([$Masterlist.$P88];[$Datasheet.$B$1:.$AV$9809];17;FALSE());&quot;-&quot;)" office:value-type="float" office:value="0" calcext:value-type="float">
            <text:p/>
          </table:table-cell>
          <table:table-cell table:style-name="ce168" table:formula="of:=IFERROR(VLOOKUP([$Masterlist.$P88];[$Datasheet.$B$1:.$AV$9809];18;FALSE());&quot;-&quot;)" office:value-type="float" office:value="0" calcext:value-type="float">
            <text:p/>
          </table:table-cell>
          <table:table-cell table:style-name="ce244" table:formula="of:=IFERROR(VLOOKUP([$Masterlist.$P88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33" office:value-type="string" calcext:value-type="string">
            <text:p>L</text:p>
          </table:table-cell>
          <table:table-cell table:style-name="ce58" office:value-type="string" calcext:value-type="string">
            <text:p>Yes</text:p>
          </table:table-cell>
          <table:table-cell table:number-columns-repeated="2" table:style-name="ce49" office:value-type="string" calcext:value-type="string">
            <text:p>Yes</text:p>
          </table:table-cell>
          <table:table-cell table:style-name="ce50" table:number-columns-repeated="8"/>
          <table:table-cell table:style-name="ce84"/>
          <table:table-cell table:style-name="ce95" office:value-type="string" calcext:value-type="string">
            <text:p>Lighting Technician</text:p>
          </table:table-cell>
          <table:table-cell table:style-name="ce108" office:value-type="string" calcext:value-type="string">
            <text:p>Chanie Erasmus</text:p>
          </table:table-cell>
          <table:table-cell table:style-name="ce121" table:formula="of:=IF(ISNUMBER(MATCH([.P89];[$Datasheet.$B$1:.$B$9809];0));&quot;✓&quot;;&quot;x&quot;)" office:value-type="string" office:string-value="✓" calcext:value-type="string">
            <text:p>✓</text:p>
          </table:table-cell>
          <table:table-cell table:style-name="ce142" table:formula="of:=IFERROR(VLOOKUP([$Masterlist.$P89];[$Datasheet.$B$1:.$AV$9809];2;FALSE());&quot;-&quot;)" office:value-type="float" office:value="0" calcext:value-type="float">
            <text:p>0</text:p>
          </table:table-cell>
          <table:table-cell table:style-name="ce168" table:formula="of:=IFERROR(VLOOKUP([$Masterlist.$P89];[$Datasheet.$B$1:.$AV$9809];3;FALSE());&quot;-&quot;)" office:value-type="float" office:value="1" calcext:value-type="float">
            <text:p>1</text:p>
          </table:table-cell>
          <table:table-cell table:style-name="ce168" table:formula="of:=IFERROR(VLOOKUP([$Masterlist.$P89];[$Datasheet.$B$1:.$AV$9809];4;FALSE());&quot;-&quot;)" office:value-type="float" office:value="0" calcext:value-type="float">
            <text:p>0</text:p>
          </table:table-cell>
          <table:table-cell table:style-name="ce168" table:formula="of:=IFERROR(VLOOKUP([$Masterlist.$P89];[$Datasheet.$B$1:.$AV$9809];5;FALSE());&quot;-&quot;)" office:value-type="float" office:value="1" calcext:value-type="float">
            <text:p>1</text:p>
          </table:table-cell>
          <table:table-cell table:style-name="ce191" table:formula="of:=IFERROR(VLOOKUP([$Masterlist.$P89];[$Datasheet.$B$1:.$AV$9809];6;FALSE());&quot;-&quot;)" office:value-type="float" office:value="0" calcext:value-type="float">
            <text:p>0</text:p>
          </table:table-cell>
          <table:table-cell table:style-name="ce168" table:formula="of:=IFERROR(VLOOKUP([$Masterlist.$P89];[$Datasheet.$B$1:.$AV$9809];7;FALSE());&quot;-&quot;)" office:value-type="float" office:value="0" calcext:value-type="float">
            <text:p>0</text:p>
          </table:table-cell>
          <table:table-cell table:style-name="ce168" table:formula="of:=IFERROR(VLOOKUP([$Masterlist.$P89];[$Datasheet.$B$1:.$AV$9809];8;FALSE());&quot;-&quot;)" office:value-type="float" office:value="1" calcext:value-type="float">
            <text:p>1</text:p>
          </table:table-cell>
          <table:table-cell table:style-name="ce168" table:formula="of:=IFERROR(VLOOKUP([$Masterlist.$P89];[$Datasheet.$B$1:.$AV$9809];9;FALSE());&quot;-&quot;)" office:value-type="float" office:value="1" calcext:value-type="float">
            <text:p>1</text:p>
          </table:table-cell>
          <table:table-cell table:style-name="ce168" table:formula="of:=IFERROR(VLOOKUP([$Masterlist.$P89];[$Datasheet.$B$1:.$AV$9809];10;FALSE());&quot;-&quot;)" office:value-type="float" office:value="0" calcext:value-type="float">
            <text:p>0</text:p>
          </table:table-cell>
          <table:table-cell table:style-name="ce168" table:formula="of:=IFERROR(VLOOKUP([$Masterlist.$P89];[$Datasheet.$B$1:.$AV$9809];11;FALSE());&quot;-&quot;)" office:value-type="float" office:value="1" calcext:value-type="float">
            <text:p>1</text:p>
          </table:table-cell>
          <table:table-cell table:style-name="ce168" table:formula="of:=IFERROR(VLOOKUP([$Masterlist.$P89];[$Datasheet.$B$1:.$AV$9809];12;FALSE());&quot;-&quot;)" office:value-type="float" office:value="0" calcext:value-type="float">
            <text:p>0</text:p>
          </table:table-cell>
          <table:table-cell table:style-name="ce168" table:formula="of:=IFERROR(VLOOKUP([$Masterlist.$P89];[$Datasheet.$B$1:.$AV$9809];13;FALSE());&quot;-&quot;)" office:value-type="float" office:value="0" calcext:value-type="float">
            <text:p>0</text:p>
          </table:table-cell>
          <table:table-cell table:style-name="ce168" table:formula="of:=IFERROR(VLOOKUP([$Masterlist.$P89];[$Datasheet.$B$1:.$AV$9809];14;FALSE());&quot;-&quot;)" office:value-type="float" office:value="0" calcext:value-type="float">
            <text:p>0</text:p>
          </table:table-cell>
          <table:table-cell table:style-name="ce168" table:formula="of:=IFERROR(VLOOKUP([$Masterlist.$P89];[$Datasheet.$B$1:.$AV$9809];15;FALSE());&quot;-&quot;)" office:value-type="float" office:value="0" calcext:value-type="float">
            <text:p>0</text:p>
          </table:table-cell>
          <table:table-cell table:style-name="ce168" table:formula="of:=IFERROR(VLOOKUP([$Masterlist.$P89];[$Datasheet.$B$1:.$AV$9809];16;FALSE());&quot;-&quot;)" office:value-type="float" office:value="0" calcext:value-type="float">
            <text:p/>
          </table:table-cell>
          <table:table-cell table:style-name="ce168" table:formula="of:=IFERROR(VLOOKUP([$Masterlist.$P89];[$Datasheet.$B$1:.$AV$9809];17;FALSE());&quot;-&quot;)" office:value-type="float" office:value="0" calcext:value-type="float">
            <text:p/>
          </table:table-cell>
          <table:table-cell table:style-name="ce168" table:formula="of:=IFERROR(VLOOKUP([$Masterlist.$P89];[$Datasheet.$B$1:.$AV$9809];18;FALSE());&quot;-&quot;)" office:value-type="float" office:value="0" calcext:value-type="float">
            <text:p/>
          </table:table-cell>
          <table:table-cell table:style-name="ce244" table:formula="of:=IFERROR(VLOOKUP([$Masterlist.$P89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33" office:value-type="string" calcext:value-type="string">
            <text:p>L</text:p>
          </table:table-cell>
          <table:table-cell table:style-name="ce58" office:value-type="string" calcext:value-type="string">
            <text:p>Yes</text:p>
          </table:table-cell>
          <table:table-cell table:number-columns-repeated="2" table:style-name="ce49" office:value-type="string" calcext:value-type="string">
            <text:p>Yes</text:p>
          </table:table-cell>
          <table:table-cell table:style-name="ce50" table:number-columns-repeated="8"/>
          <table:table-cell table:style-name="ce84"/>
          <table:table-cell table:style-name="ce95" office:value-type="string" calcext:value-type="string">
            <text:p>Lighting Technician</text:p>
          </table:table-cell>
          <table:table-cell table:style-name="ce108" office:value-type="string" calcext:value-type="string">
            <text:p>Charl Wehrs</text:p>
          </table:table-cell>
          <table:table-cell table:style-name="ce121" table:formula="of:=IF(ISNUMBER(MATCH([.P90];[$Datasheet.$B$1:.$B$9809];0));&quot;✓&quot;;&quot;x&quot;)" office:value-type="string" office:string-value="✓" calcext:value-type="string">
            <text:p>✓</text:p>
          </table:table-cell>
          <table:table-cell table:style-name="ce142" table:formula="of:=IFERROR(VLOOKUP([$Masterlist.$P90];[$Datasheet.$B$1:.$AV$9809];2;FALSE());&quot;-&quot;)" office:value-type="float" office:value="0" calcext:value-type="float">
            <text:p>0</text:p>
          </table:table-cell>
          <table:table-cell table:style-name="ce168" table:formula="of:=IFERROR(VLOOKUP([$Masterlist.$P90];[$Datasheet.$B$1:.$AV$9809];3;FALSE());&quot;-&quot;)" office:value-type="float" office:value="0" calcext:value-type="float">
            <text:p>0</text:p>
          </table:table-cell>
          <table:table-cell table:style-name="ce168" table:formula="of:=IFERROR(VLOOKUP([$Masterlist.$P90];[$Datasheet.$B$1:.$AV$9809];4;FALSE());&quot;-&quot;)" office:value-type="float" office:value="0" calcext:value-type="float">
            <text:p>0</text:p>
          </table:table-cell>
          <table:table-cell table:style-name="ce168" table:formula="of:=IFERROR(VLOOKUP([$Masterlist.$P90];[$Datasheet.$B$1:.$AV$9809];5;FALSE());&quot;-&quot;)" office:value-type="float" office:value="1" calcext:value-type="float">
            <text:p>1</text:p>
          </table:table-cell>
          <table:table-cell table:style-name="ce191" table:formula="of:=IFERROR(VLOOKUP([$Masterlist.$P90];[$Datasheet.$B$1:.$AV$9809];6;FALSE());&quot;-&quot;)" office:value-type="float" office:value="1" calcext:value-type="float">
            <text:p>1</text:p>
          </table:table-cell>
          <table:table-cell table:style-name="ce168" table:formula="of:=IFERROR(VLOOKUP([$Masterlist.$P90];[$Datasheet.$B$1:.$AV$9809];7;FALSE());&quot;-&quot;)" office:value-type="float" office:value="0" calcext:value-type="float">
            <text:p>0</text:p>
          </table:table-cell>
          <table:table-cell table:style-name="ce168" table:formula="of:=IFERROR(VLOOKUP([$Masterlist.$P90];[$Datasheet.$B$1:.$AV$9809];8;FALSE());&quot;-&quot;)" office:value-type="float" office:value="0" calcext:value-type="float">
            <text:p>0</text:p>
          </table:table-cell>
          <table:table-cell table:style-name="ce168" table:formula="of:=IFERROR(VLOOKUP([$Masterlist.$P90];[$Datasheet.$B$1:.$AV$9809];9;FALSE());&quot;-&quot;)" office:value-type="float" office:value="1" calcext:value-type="float">
            <text:p>1</text:p>
          </table:table-cell>
          <table:table-cell table:style-name="ce168" table:formula="of:=IFERROR(VLOOKUP([$Masterlist.$P90];[$Datasheet.$B$1:.$AV$9809];10;FALSE());&quot;-&quot;)" office:value-type="float" office:value="1" calcext:value-type="float">
            <text:p>1</text:p>
          </table:table-cell>
          <table:table-cell table:style-name="ce168" table:formula="of:=IFERROR(VLOOKUP([$Masterlist.$P90];[$Datasheet.$B$1:.$AV$9809];11;FALSE());&quot;-&quot;)" office:value-type="float" office:value="0" calcext:value-type="float">
            <text:p>0</text:p>
          </table:table-cell>
          <table:table-cell table:style-name="ce168" table:formula="of:=IFERROR(VLOOKUP([$Masterlist.$P90];[$Datasheet.$B$1:.$AV$9809];12;FALSE());&quot;-&quot;)" office:value-type="float" office:value="0" calcext:value-type="float">
            <text:p>0</text:p>
          </table:table-cell>
          <table:table-cell table:style-name="ce168" table:formula="of:=IFERROR(VLOOKUP([$Masterlist.$P90];[$Datasheet.$B$1:.$AV$9809];13;FALSE());&quot;-&quot;)" office:value-type="float" office:value="1" calcext:value-type="float">
            <text:p>1</text:p>
          </table:table-cell>
          <table:table-cell table:style-name="ce168" table:formula="of:=IFERROR(VLOOKUP([$Masterlist.$P90];[$Datasheet.$B$1:.$AV$9809];14;FALSE());&quot;-&quot;)" office:value-type="float" office:value="1" calcext:value-type="float">
            <text:p>1</text:p>
          </table:table-cell>
          <table:table-cell table:style-name="ce168" table:formula="of:=IFERROR(VLOOKUP([$Masterlist.$P90];[$Datasheet.$B$1:.$AV$9809];15;FALSE());&quot;-&quot;)" office:value-type="float" office:value="0" calcext:value-type="float">
            <text:p>0</text:p>
          </table:table-cell>
          <table:table-cell table:style-name="ce168" table:formula="of:=IFERROR(VLOOKUP([$Masterlist.$P90];[$Datasheet.$B$1:.$AV$9809];16;FALSE());&quot;-&quot;)" office:value-type="float" office:value="0" calcext:value-type="float">
            <text:p/>
          </table:table-cell>
          <table:table-cell table:style-name="ce168" table:formula="of:=IFERROR(VLOOKUP([$Masterlist.$P90];[$Datasheet.$B$1:.$AV$9809];17;FALSE());&quot;-&quot;)" office:value-type="float" office:value="0" calcext:value-type="float">
            <text:p/>
          </table:table-cell>
          <table:table-cell table:style-name="ce168" table:formula="of:=IFERROR(VLOOKUP([$Masterlist.$P90];[$Datasheet.$B$1:.$AV$9809];18;FALSE());&quot;-&quot;)" office:value-type="float" office:value="0" calcext:value-type="float">
            <text:p/>
          </table:table-cell>
          <table:table-cell table:style-name="ce244" table:formula="of:=IFERROR(VLOOKUP([$Masterlist.$P90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33" office:value-type="string" calcext:value-type="string">
            <text:p>L</text:p>
          </table:table-cell>
          <table:table-cell table:style-name="ce58" office:value-type="string" calcext:value-type="string">
            <text:p>Yes</text:p>
          </table:table-cell>
          <table:table-cell table:number-columns-repeated="2" table:style-name="ce49" office:value-type="string" calcext:value-type="string">
            <text:p>Yes</text:p>
          </table:table-cell>
          <table:table-cell table:style-name="ce49"/>
          <table:table-cell table:style-name="ce50" table:number-columns-repeated="7"/>
          <table:table-cell table:style-name="ce84"/>
          <table:table-cell table:style-name="ce95" office:value-type="string" calcext:value-type="string">
            <text:p>Lighting Technician</text:p>
          </table:table-cell>
          <table:table-cell table:style-name="ce108" office:value-type="string" calcext:value-type="string">
            <text:p>Christopher Geyer</text:p>
          </table:table-cell>
          <table:table-cell table:style-name="ce121" table:formula="of:=IF(ISNUMBER(MATCH([.P91];[$Datasheet.$B$1:.$B$9809];0));&quot;✓&quot;;&quot;x&quot;)" office:value-type="string" office:string-value="✓" calcext:value-type="string">
            <text:p>✓</text:p>
          </table:table-cell>
          <table:table-cell table:style-name="ce142" table:formula="of:=IFERROR(VLOOKUP([$Masterlist.$P91];[$Datasheet.$B$1:.$AV$9809];2;FALSE());&quot;-&quot;)" office:value-type="float" office:value="1" calcext:value-type="float">
            <text:p>1</text:p>
          </table:table-cell>
          <table:table-cell table:style-name="ce168" table:formula="of:=IFERROR(VLOOKUP([$Masterlist.$P91];[$Datasheet.$B$1:.$AV$9809];3;FALSE());&quot;-&quot;)" office:value-type="float" office:value="1" calcext:value-type="float">
            <text:p>1</text:p>
          </table:table-cell>
          <table:table-cell table:style-name="ce168" table:formula="of:=IFERROR(VLOOKUP([$Masterlist.$P91];[$Datasheet.$B$1:.$AV$9809];4;FALSE());&quot;-&quot;)" office:value-type="float" office:value="0" calcext:value-type="float">
            <text:p>0</text:p>
          </table:table-cell>
          <table:table-cell table:style-name="ce168" table:formula="of:=IFERROR(VLOOKUP([$Masterlist.$P91];[$Datasheet.$B$1:.$AV$9809];5;FALSE());&quot;-&quot;)" office:value-type="float" office:value="0" calcext:value-type="float">
            <text:p>0</text:p>
          </table:table-cell>
          <table:table-cell table:style-name="ce191" table:formula="of:=IFERROR(VLOOKUP([$Masterlist.$P91];[$Datasheet.$B$1:.$AV$9809];6;FALSE());&quot;-&quot;)" office:value-type="float" office:value="1" calcext:value-type="float">
            <text:p>1</text:p>
          </table:table-cell>
          <table:table-cell table:style-name="ce168" table:formula="of:=IFERROR(VLOOKUP([$Masterlist.$P91];[$Datasheet.$B$1:.$AV$9809];7;FALSE());&quot;-&quot;)" office:value-type="float" office:value="1" calcext:value-type="float">
            <text:p>1</text:p>
          </table:table-cell>
          <table:table-cell table:style-name="ce168" table:formula="of:=IFERROR(VLOOKUP([$Masterlist.$P91];[$Datasheet.$B$1:.$AV$9809];8;FALSE());&quot;-&quot;)" office:value-type="float" office:value="0" calcext:value-type="float">
            <text:p>0</text:p>
          </table:table-cell>
          <table:table-cell table:style-name="ce168" table:formula="of:=IFERROR(VLOOKUP([$Masterlist.$P91];[$Datasheet.$B$1:.$AV$9809];9;FALSE());&quot;-&quot;)" office:value-type="float" office:value="0" calcext:value-type="float">
            <text:p>0</text:p>
          </table:table-cell>
          <table:table-cell table:style-name="ce168" table:formula="of:=IFERROR(VLOOKUP([$Masterlist.$P91];[$Datasheet.$B$1:.$AV$9809];10;FALSE());&quot;-&quot;)" office:value-type="float" office:value="1" calcext:value-type="float">
            <text:p>1</text:p>
          </table:table-cell>
          <table:table-cell table:style-name="ce168" table:formula="of:=IFERROR(VLOOKUP([$Masterlist.$P91];[$Datasheet.$B$1:.$AV$9809];11;FALSE());&quot;-&quot;)" office:value-type="float" office:value="1" calcext:value-type="float">
            <text:p>1</text:p>
          </table:table-cell>
          <table:table-cell table:style-name="ce168" table:formula="of:=IFERROR(VLOOKUP([$Masterlist.$P91];[$Datasheet.$B$1:.$AV$9809];12;FALSE());&quot;-&quot;)" office:value-type="float" office:value="0" calcext:value-type="float">
            <text:p>0</text:p>
          </table:table-cell>
          <table:table-cell table:style-name="ce168" table:formula="of:=IFERROR(VLOOKUP([$Masterlist.$P91];[$Datasheet.$B$1:.$AV$9809];13;FALSE());&quot;-&quot;)" office:value-type="float" office:value="0" calcext:value-type="float">
            <text:p>0</text:p>
          </table:table-cell>
          <table:table-cell table:style-name="ce168" table:formula="of:=IFERROR(VLOOKUP([$Masterlist.$P91];[$Datasheet.$B$1:.$AV$9809];14;FALSE());&quot;-&quot;)" office:value-type="float" office:value="1" calcext:value-type="float">
            <text:p>1</text:p>
          </table:table-cell>
          <table:table-cell table:style-name="ce168" table:formula="of:=IFERROR(VLOOKUP([$Masterlist.$P91];[$Datasheet.$B$1:.$AV$9809];15;FALSE());&quot;-&quot;)" office:value-type="float" office:value="1" calcext:value-type="float">
            <text:p>1</text:p>
          </table:table-cell>
          <table:table-cell table:style-name="ce168" table:formula="of:=IFERROR(VLOOKUP([$Masterlist.$P91];[$Datasheet.$B$1:.$AV$9809];16;FALSE());&quot;-&quot;)" office:value-type="float" office:value="0" calcext:value-type="float">
            <text:p/>
          </table:table-cell>
          <table:table-cell table:style-name="ce168" table:formula="of:=IFERROR(VLOOKUP([$Masterlist.$P91];[$Datasheet.$B$1:.$AV$9809];17;FALSE());&quot;-&quot;)" office:value-type="float" office:value="0" calcext:value-type="float">
            <text:p/>
          </table:table-cell>
          <table:table-cell table:style-name="ce168" table:formula="of:=IFERROR(VLOOKUP([$Masterlist.$P91];[$Datasheet.$B$1:.$AV$9809];18;FALSE());&quot;-&quot;)" office:value-type="float" office:value="0" calcext:value-type="float">
            <text:p/>
          </table:table-cell>
          <table:table-cell table:style-name="ce244" table:formula="of:=IFERROR(VLOOKUP([$Masterlist.$P91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33" office:value-type="string" calcext:value-type="string">
            <text:p>M</text:p>
          </table:table-cell>
          <table:table-cell table:style-name="ce58" office:value-type="string" calcext:value-type="string">
            <text:p>Yes</text:p>
          </table:table-cell>
          <table:table-cell table:number-columns-repeated="2" table:style-name="ce49" office:value-type="string" calcext:value-type="string">
            <text:p>Yes</text:p>
          </table:table-cell>
          <table:table-cell table:style-name="ce50" table:number-columns-repeated="8"/>
          <table:table-cell table:style-name="ce84"/>
          <table:table-cell table:style-name="ce95" office:value-type="string" calcext:value-type="string">
            <text:p>Lighting Technician</text:p>
          </table:table-cell>
          <table:table-cell table:style-name="ce108" office:value-type="string" calcext:value-type="string">
            <text:p>Creflo Goliath</text:p>
          </table:table-cell>
          <table:table-cell table:style-name="ce121" table:formula="of:=IF(ISNUMBER(MATCH([.P92];[$Datasheet.$B$1:.$B$9809];0));&quot;✓&quot;;&quot;x&quot;)" office:value-type="string" office:string-value="✓" calcext:value-type="string">
            <text:p>✓</text:p>
          </table:table-cell>
          <table:table-cell table:style-name="ce142" table:formula="of:=IFERROR(VLOOKUP([$Masterlist.$P92];[$Datasheet.$B$1:.$AV$9809];2;FALSE());&quot;-&quot;)" office:value-type="float" office:value="0" calcext:value-type="float">
            <text:p>0</text:p>
          </table:table-cell>
          <table:table-cell table:style-name="ce168" table:formula="of:=IFERROR(VLOOKUP([$Masterlist.$P92];[$Datasheet.$B$1:.$AV$9809];3;FALSE());&quot;-&quot;)" office:value-type="float" office:value="1" calcext:value-type="float">
            <text:p>1</text:p>
          </table:table-cell>
          <table:table-cell table:style-name="ce168" table:formula="of:=IFERROR(VLOOKUP([$Masterlist.$P92];[$Datasheet.$B$1:.$AV$9809];4;FALSE());&quot;-&quot;)" office:value-type="float" office:value="0" calcext:value-type="float">
            <text:p>0</text:p>
          </table:table-cell>
          <table:table-cell table:style-name="ce168" table:formula="of:=IFERROR(VLOOKUP([$Masterlist.$P92];[$Datasheet.$B$1:.$AV$9809];5;FALSE());&quot;-&quot;)" office:value-type="float" office:value="1" calcext:value-type="float">
            <text:p>1</text:p>
          </table:table-cell>
          <table:table-cell table:style-name="ce191" table:formula="of:=IFERROR(VLOOKUP([$Masterlist.$P92];[$Datasheet.$B$1:.$AV$9809];6;FALSE());&quot;-&quot;)" office:value-type="float" office:value="0" calcext:value-type="float">
            <text:p>0</text:p>
          </table:table-cell>
          <table:table-cell table:style-name="ce168" table:formula="of:=IFERROR(VLOOKUP([$Masterlist.$P92];[$Datasheet.$B$1:.$AV$9809];7;FALSE());&quot;-&quot;)" office:value-type="float" office:value="0" calcext:value-type="float">
            <text:p>0</text:p>
          </table:table-cell>
          <table:table-cell table:style-name="ce168" table:formula="of:=IFERROR(VLOOKUP([$Masterlist.$P92];[$Datasheet.$B$1:.$AV$9809];8;FALSE());&quot;-&quot;)" office:value-type="float" office:value="1" calcext:value-type="float">
            <text:p>1</text:p>
          </table:table-cell>
          <table:table-cell table:style-name="ce168" table:formula="of:=IFERROR(VLOOKUP([$Masterlist.$P92];[$Datasheet.$B$1:.$AV$9809];9;FALSE());&quot;-&quot;)" office:value-type="float" office:value="1" calcext:value-type="float">
            <text:p>1</text:p>
          </table:table-cell>
          <table:table-cell table:style-name="ce168" table:formula="of:=IFERROR(VLOOKUP([$Masterlist.$P92];[$Datasheet.$B$1:.$AV$9809];10;FALSE());&quot;-&quot;)" office:value-type="float" office:value="0" calcext:value-type="float">
            <text:p>0</text:p>
          </table:table-cell>
          <table:table-cell table:style-name="ce168" table:formula="of:=IFERROR(VLOOKUP([$Masterlist.$P92];[$Datasheet.$B$1:.$AV$9809];11;FALSE());&quot;-&quot;)" office:value-type="float" office:value="0" calcext:value-type="float">
            <text:p>0</text:p>
          </table:table-cell>
          <table:table-cell table:style-name="ce168" table:formula="of:=IFERROR(VLOOKUP([$Masterlist.$P92];[$Datasheet.$B$1:.$AV$9809];12;FALSE());&quot;-&quot;)" office:value-type="float" office:value="0" calcext:value-type="float">
            <text:p>0</text:p>
          </table:table-cell>
          <table:table-cell table:style-name="ce168" table:formula="of:=IFERROR(VLOOKUP([$Masterlist.$P92];[$Datasheet.$B$1:.$AV$9809];13;FALSE());&quot;-&quot;)" office:value-type="float" office:value="0" calcext:value-type="float">
            <text:p>0</text:p>
          </table:table-cell>
          <table:table-cell table:style-name="ce168" table:formula="of:=IFERROR(VLOOKUP([$Masterlist.$P92];[$Datasheet.$B$1:.$AV$9809];14;FALSE());&quot;-&quot;)" office:value-type="float" office:value="0" calcext:value-type="float">
            <text:p>0</text:p>
          </table:table-cell>
          <table:table-cell table:style-name="ce168" table:formula="of:=IFERROR(VLOOKUP([$Masterlist.$P92];[$Datasheet.$B$1:.$AV$9809];15;FALSE());&quot;-&quot;)" office:value-type="float" office:value="1" calcext:value-type="float">
            <text:p>1</text:p>
          </table:table-cell>
          <table:table-cell table:style-name="ce168" table:formula="of:=IFERROR(VLOOKUP([$Masterlist.$P92];[$Datasheet.$B$1:.$AV$9809];16;FALSE());&quot;-&quot;)" office:value-type="float" office:value="0" calcext:value-type="float">
            <text:p/>
          </table:table-cell>
          <table:table-cell table:style-name="ce168" table:formula="of:=IFERROR(VLOOKUP([$Masterlist.$P92];[$Datasheet.$B$1:.$AV$9809];17;FALSE());&quot;-&quot;)" office:value-type="float" office:value="0" calcext:value-type="float">
            <text:p/>
          </table:table-cell>
          <table:table-cell table:style-name="ce168" table:formula="of:=IFERROR(VLOOKUP([$Masterlist.$P92];[$Datasheet.$B$1:.$AV$9809];18;FALSE());&quot;-&quot;)" office:value-type="float" office:value="0" calcext:value-type="float">
            <text:p/>
          </table:table-cell>
          <table:table-cell table:style-name="ce244" table:formula="of:=IFERROR(VLOOKUP([$Masterlist.$P92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33" office:value-type="string" calcext:value-type="string">
            <text:p>L</text:p>
          </table:table-cell>
          <table:table-cell table:style-name="ce58" office:value-type="string" calcext:value-type="string">
            <text:p>Yes</text:p>
          </table:table-cell>
          <table:table-cell table:number-columns-repeated="2" table:style-name="ce49" office:value-type="string" calcext:value-type="string">
            <text:p>Yes</text:p>
          </table:table-cell>
          <table:table-cell table:style-name="ce50" table:number-columns-repeated="8"/>
          <table:table-cell table:style-name="ce84"/>
          <table:table-cell table:style-name="ce95" office:value-type="string" calcext:value-type="string">
            <text:p>Lighting Technician</text:p>
          </table:table-cell>
          <table:table-cell table:style-name="ce108" office:value-type="string" calcext:value-type="string">
            <text:p>Franco Conradie</text:p>
          </table:table-cell>
          <table:table-cell table:style-name="ce121" table:formula="of:=IF(ISNUMBER(MATCH([.P93];[$Datasheet.$B$1:.$B$9809];0));&quot;✓&quot;;&quot;x&quot;)" office:value-type="string" office:string-value="✓" calcext:value-type="string">
            <text:p>✓</text:p>
          </table:table-cell>
          <table:table-cell table:style-name="ce142" table:formula="of:=IFERROR(VLOOKUP([$Masterlist.$P93];[$Datasheet.$B$1:.$AV$9809];2;FALSE());&quot;-&quot;)" office:value-type="float" office:value="0" calcext:value-type="float">
            <text:p>0</text:p>
          </table:table-cell>
          <table:table-cell table:style-name="ce168" table:formula="of:=IFERROR(VLOOKUP([$Masterlist.$P93];[$Datasheet.$B$1:.$AV$9809];3;FALSE());&quot;-&quot;)" office:value-type="float" office:value="0" calcext:value-type="float">
            <text:p>0</text:p>
          </table:table-cell>
          <table:table-cell table:style-name="ce168" table:formula="of:=IFERROR(VLOOKUP([$Masterlist.$P93];[$Datasheet.$B$1:.$AV$9809];4;FALSE());&quot;-&quot;)" office:value-type="float" office:value="1" calcext:value-type="float">
            <text:p>1</text:p>
          </table:table-cell>
          <table:table-cell table:style-name="ce168" table:formula="of:=IFERROR(VLOOKUP([$Masterlist.$P93];[$Datasheet.$B$1:.$AV$9809];5;FALSE());&quot;-&quot;)" office:value-type="float" office:value="1" calcext:value-type="float">
            <text:p>1</text:p>
          </table:table-cell>
          <table:table-cell table:style-name="ce191" table:formula="of:=IFERROR(VLOOKUP([$Masterlist.$P93];[$Datasheet.$B$1:.$AV$9809];6;FALSE());&quot;-&quot;)" office:value-type="float" office:value="0" calcext:value-type="float">
            <text:p>0</text:p>
          </table:table-cell>
          <table:table-cell table:style-name="ce168" table:formula="of:=IFERROR(VLOOKUP([$Masterlist.$P93];[$Datasheet.$B$1:.$AV$9809];7;FALSE());&quot;-&quot;)" office:value-type="float" office:value="0" calcext:value-type="float">
            <text:p>0</text:p>
          </table:table-cell>
          <table:table-cell table:style-name="ce168" table:formula="of:=IFERROR(VLOOKUP([$Masterlist.$P93];[$Datasheet.$B$1:.$AV$9809];8;FALSE());&quot;-&quot;)" office:value-type="float" office:value="1" calcext:value-type="float">
            <text:p>1</text:p>
          </table:table-cell>
          <table:table-cell table:style-name="ce168" table:formula="of:=IFERROR(VLOOKUP([$Masterlist.$P93];[$Datasheet.$B$1:.$AV$9809];9;FALSE());&quot;-&quot;)" office:value-type="float" office:value="1" calcext:value-type="float">
            <text:p>1</text:p>
          </table:table-cell>
          <table:table-cell table:style-name="ce168" table:formula="of:=IFERROR(VLOOKUP([$Masterlist.$P93];[$Datasheet.$B$1:.$AV$9809];10;FALSE());&quot;-&quot;)" office:value-type="float" office:value="0" calcext:value-type="float">
            <text:p>0</text:p>
          </table:table-cell>
          <table:table-cell table:style-name="ce168" table:formula="of:=IFERROR(VLOOKUP([$Masterlist.$P93];[$Datasheet.$B$1:.$AV$9809];11;FALSE());&quot;-&quot;)" office:value-type="float" office:value="0" calcext:value-type="float">
            <text:p>0</text:p>
          </table:table-cell>
          <table:table-cell table:style-name="ce168" table:formula="of:=IFERROR(VLOOKUP([$Masterlist.$P93];[$Datasheet.$B$1:.$AV$9809];12;FALSE());&quot;-&quot;)" office:value-type="float" office:value="1" calcext:value-type="float">
            <text:p>1</text:p>
          </table:table-cell>
          <table:table-cell table:style-name="ce168" table:formula="of:=IFERROR(VLOOKUP([$Masterlist.$P93];[$Datasheet.$B$1:.$AV$9809];13;FALSE());&quot;-&quot;)" office:value-type="float" office:value="1" calcext:value-type="float">
            <text:p>1</text:p>
          </table:table-cell>
          <table:table-cell table:style-name="ce168" table:formula="of:=IFERROR(VLOOKUP([$Masterlist.$P93];[$Datasheet.$B$1:.$AV$9809];14;FALSE());&quot;-&quot;)" office:value-type="float" office:value="0" calcext:value-type="float">
            <text:p>0</text:p>
          </table:table-cell>
          <table:table-cell table:style-name="ce168" table:formula="of:=IFERROR(VLOOKUP([$Masterlist.$P93];[$Datasheet.$B$1:.$AV$9809];15;FALSE());&quot;-&quot;)" office:value-type="float" office:value="0" calcext:value-type="float">
            <text:p>0</text:p>
          </table:table-cell>
          <table:table-cell table:style-name="ce168" table:formula="of:=IFERROR(VLOOKUP([$Masterlist.$P93];[$Datasheet.$B$1:.$AV$9809];16;FALSE());&quot;-&quot;)" office:value-type="float" office:value="0" calcext:value-type="float">
            <text:p/>
          </table:table-cell>
          <table:table-cell table:style-name="ce168" table:formula="of:=IFERROR(VLOOKUP([$Masterlist.$P93];[$Datasheet.$B$1:.$AV$9809];17;FALSE());&quot;-&quot;)" office:value-type="float" office:value="0" calcext:value-type="float">
            <text:p/>
          </table:table-cell>
          <table:table-cell table:style-name="ce168" table:formula="of:=IFERROR(VLOOKUP([$Masterlist.$P93];[$Datasheet.$B$1:.$AV$9809];18;FALSE());&quot;-&quot;)" office:value-type="float" office:value="0" calcext:value-type="float">
            <text:p/>
          </table:table-cell>
          <table:table-cell table:style-name="ce244" table:formula="of:=IFERROR(VLOOKUP([$Masterlist.$P93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33" office:value-type="string" calcext:value-type="string">
            <text:p>L</text:p>
          </table:table-cell>
          <table:table-cell table:style-name="ce58" office:value-type="string" calcext:value-type="string">
            <text:p>Yes</text:p>
          </table:table-cell>
          <table:table-cell table:number-columns-repeated="2" table:style-name="ce49" office:value-type="string" calcext:value-type="string">
            <text:p>Yes</text:p>
          </table:table-cell>
          <table:table-cell table:style-name="ce50" office:value-type="string" calcext:value-type="string">
            <text:p>Yes</text:p>
          </table:table-cell>
          <table:table-cell table:style-name="ce50" table:number-columns-repeated="7"/>
          <table:table-cell table:style-name="ce84"/>
          <table:table-cell table:style-name="ce95" office:value-type="string" calcext:value-type="string">
            <text:p>Lighting Technician</text:p>
          </table:table-cell>
          <table:table-cell table:style-name="ce108" office:value-type="string" calcext:value-type="string">
            <text:p>Iddo Smith</text:p>
          </table:table-cell>
          <table:table-cell table:style-name="ce121" table:formula="of:=IF(ISNUMBER(MATCH([.P94];[$Datasheet.$B$1:.$B$9809];0));&quot;✓&quot;;&quot;x&quot;)" office:value-type="string" office:string-value="✓" calcext:value-type="string">
            <text:p>✓</text:p>
          </table:table-cell>
          <table:table-cell table:style-name="ce142" table:formula="of:=IFERROR(VLOOKUP([$Masterlist.$P94];[$Datasheet.$B$1:.$AV$9809];2;FALSE());&quot;-&quot;)" office:value-type="float" office:value="1" calcext:value-type="float">
            <text:p>1</text:p>
          </table:table-cell>
          <table:table-cell table:style-name="ce168" table:formula="of:=IFERROR(VLOOKUP([$Masterlist.$P94];[$Datasheet.$B$1:.$AV$9809];3;FALSE());&quot;-&quot;)" office:value-type="float" office:value="1" calcext:value-type="float">
            <text:p>1</text:p>
          </table:table-cell>
          <table:table-cell table:style-name="ce168" table:formula="of:=IFERROR(VLOOKUP([$Masterlist.$P94];[$Datasheet.$B$1:.$AV$9809];4;FALSE());&quot;-&quot;)" office:value-type="float" office:value="1" calcext:value-type="float">
            <text:p>1</text:p>
          </table:table-cell>
          <table:table-cell table:style-name="ce168" table:formula="of:=IFERROR(VLOOKUP([$Masterlist.$P94];[$Datasheet.$B$1:.$AV$9809];5;FALSE());&quot;-&quot;)" office:value-type="float" office:value="1" calcext:value-type="float">
            <text:p>1</text:p>
          </table:table-cell>
          <table:table-cell table:style-name="ce191" table:formula="of:=IFERROR(VLOOKUP([$Masterlist.$P94];[$Datasheet.$B$1:.$AV$9809];6;FALSE());&quot;-&quot;)" office:value-type="float" office:value="1" calcext:value-type="float">
            <text:p>1</text:p>
          </table:table-cell>
          <table:table-cell table:style-name="ce168" table:formula="of:=IFERROR(VLOOKUP([$Masterlist.$P94];[$Datasheet.$B$1:.$AV$9809];7;FALSE());&quot;-&quot;)" office:value-type="float" office:value="1" calcext:value-type="float">
            <text:p>1</text:p>
          </table:table-cell>
          <table:table-cell table:style-name="ce168" table:formula="of:=IFERROR(VLOOKUP([$Masterlist.$P94];[$Datasheet.$B$1:.$AV$9809];8;FALSE());&quot;-&quot;)" office:value-type="float" office:value="1" calcext:value-type="float">
            <text:p>1</text:p>
          </table:table-cell>
          <table:table-cell table:style-name="ce168" table:formula="of:=IFERROR(VLOOKUP([$Masterlist.$P94];[$Datasheet.$B$1:.$AV$9809];9;FALSE());&quot;-&quot;)" office:value-type="float" office:value="1" calcext:value-type="float">
            <text:p>1</text:p>
          </table:table-cell>
          <table:table-cell table:style-name="ce168" table:formula="of:=IFERROR(VLOOKUP([$Masterlist.$P94];[$Datasheet.$B$1:.$AV$9809];10;FALSE());&quot;-&quot;)" office:value-type="float" office:value="1" calcext:value-type="float">
            <text:p>1</text:p>
          </table:table-cell>
          <table:table-cell table:style-name="ce168" table:formula="of:=IFERROR(VLOOKUP([$Masterlist.$P94];[$Datasheet.$B$1:.$AV$9809];11;FALSE());&quot;-&quot;)" office:value-type="float" office:value="1" calcext:value-type="float">
            <text:p>1</text:p>
          </table:table-cell>
          <table:table-cell table:style-name="ce168" table:formula="of:=IFERROR(VLOOKUP([$Masterlist.$P94];[$Datasheet.$B$1:.$AV$9809];12;FALSE());&quot;-&quot;)" office:value-type="float" office:value="0" calcext:value-type="float">
            <text:p>0</text:p>
          </table:table-cell>
          <table:table-cell table:style-name="ce168" table:formula="of:=IFERROR(VLOOKUP([$Masterlist.$P94];[$Datasheet.$B$1:.$AV$9809];13;FALSE());&quot;-&quot;)" office:value-type="float" office:value="0" calcext:value-type="float">
            <text:p>0</text:p>
          </table:table-cell>
          <table:table-cell table:style-name="ce168" table:formula="of:=IFERROR(VLOOKUP([$Masterlist.$P94];[$Datasheet.$B$1:.$AV$9809];14;FALSE());&quot;-&quot;)" office:value-type="float" office:value="1" calcext:value-type="float">
            <text:p>1</text:p>
          </table:table-cell>
          <table:table-cell table:style-name="ce168" table:formula="of:=IFERROR(VLOOKUP([$Masterlist.$P94];[$Datasheet.$B$1:.$AV$9809];15;FALSE());&quot;-&quot;)" office:value-type="float" office:value="1" calcext:value-type="float">
            <text:p>1</text:p>
          </table:table-cell>
          <table:table-cell table:style-name="ce168" table:formula="of:=IFERROR(VLOOKUP([$Masterlist.$P94];[$Datasheet.$B$1:.$AV$9809];16;FALSE());&quot;-&quot;)" office:value-type="float" office:value="0" calcext:value-type="float">
            <text:p/>
          </table:table-cell>
          <table:table-cell table:style-name="ce168" table:formula="of:=IFERROR(VLOOKUP([$Masterlist.$P94];[$Datasheet.$B$1:.$AV$9809];17;FALSE());&quot;-&quot;)" office:value-type="float" office:value="0" calcext:value-type="float">
            <text:p/>
          </table:table-cell>
          <table:table-cell table:style-name="ce168" table:formula="of:=IFERROR(VLOOKUP([$Masterlist.$P94];[$Datasheet.$B$1:.$AV$9809];18;FALSE());&quot;-&quot;)" office:value-type="float" office:value="0" calcext:value-type="float">
            <text:p/>
          </table:table-cell>
          <table:table-cell table:style-name="ce244" table:formula="of:=IFERROR(VLOOKUP([$Masterlist.$P94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33" office:value-type="string" calcext:value-type="string">
            <text:p>L</text:p>
          </table:table-cell>
          <table:table-cell table:style-name="ce58" office:value-type="string" calcext:value-type="string">
            <text:p>Yes</text:p>
          </table:table-cell>
          <table:table-cell table:number-columns-repeated="2" table:style-name="ce49" office:value-type="string" calcext:value-type="string">
            <text:p>Yes</text:p>
          </table:table-cell>
          <table:table-cell table:style-name="ce50" office:value-type="string" calcext:value-type="string">
            <text:p>Yes</text:p>
          </table:table-cell>
          <table:table-cell table:style-name="ce50" table:number-columns-repeated="7"/>
          <table:table-cell table:style-name="ce84"/>
          <table:table-cell table:style-name="ce95" office:value-type="string" calcext:value-type="string">
            <text:p>Lighting Technician</text:p>
          </table:table-cell>
          <table:table-cell table:style-name="ce108" office:value-type="string" calcext:value-type="string">
            <text:p>Ilana Pelser</text:p>
          </table:table-cell>
          <table:table-cell table:style-name="ce121" table:formula="of:=IF(ISNUMBER(MATCH([.P95];[$Datasheet.$B$1:.$B$9809];0));&quot;✓&quot;;&quot;x&quot;)" office:value-type="string" office:string-value="✓" calcext:value-type="string">
            <text:p>✓</text:p>
          </table:table-cell>
          <table:table-cell table:style-name="ce142" table:formula="of:=IFERROR(VLOOKUP([$Masterlist.$P95];[$Datasheet.$B$1:.$AV$9809];2;FALSE());&quot;-&quot;)" office:value-type="float" office:value="0" calcext:value-type="float">
            <text:p>0</text:p>
          </table:table-cell>
          <table:table-cell table:style-name="ce168" table:formula="of:=IFERROR(VLOOKUP([$Masterlist.$P95];[$Datasheet.$B$1:.$AV$9809];3;FALSE());&quot;-&quot;)" office:value-type="float" office:value="0" calcext:value-type="float">
            <text:p>0</text:p>
          </table:table-cell>
          <table:table-cell table:style-name="ce168" table:formula="of:=IFERROR(VLOOKUP([$Masterlist.$P95];[$Datasheet.$B$1:.$AV$9809];4;FALSE());&quot;-&quot;)" office:value-type="float" office:value="1" calcext:value-type="float">
            <text:p>1</text:p>
          </table:table-cell>
          <table:table-cell table:style-name="ce168" table:formula="of:=IFERROR(VLOOKUP([$Masterlist.$P95];[$Datasheet.$B$1:.$AV$9809];5;FALSE());&quot;-&quot;)" office:value-type="float" office:value="1" calcext:value-type="float">
            <text:p>1</text:p>
          </table:table-cell>
          <table:table-cell table:style-name="ce191" table:formula="of:=IFERROR(VLOOKUP([$Masterlist.$P95];[$Datasheet.$B$1:.$AV$9809];6;FALSE());&quot;-&quot;)" office:value-type="float" office:value="0" calcext:value-type="float">
            <text:p>0</text:p>
          </table:table-cell>
          <table:table-cell table:style-name="ce168" table:formula="of:=IFERROR(VLOOKUP([$Masterlist.$P95];[$Datasheet.$B$1:.$AV$9809];7;FALSE());&quot;-&quot;)" office:value-type="float" office:value="0" calcext:value-type="float">
            <text:p>0</text:p>
          </table:table-cell>
          <table:table-cell table:style-name="ce168" table:formula="of:=IFERROR(VLOOKUP([$Masterlist.$P95];[$Datasheet.$B$1:.$AV$9809];8;FALSE());&quot;-&quot;)" office:value-type="float" office:value="1" calcext:value-type="float">
            <text:p>1</text:p>
          </table:table-cell>
          <table:table-cell table:style-name="ce168" table:formula="of:=IFERROR(VLOOKUP([$Masterlist.$P95];[$Datasheet.$B$1:.$AV$9809];9;FALSE());&quot;-&quot;)" office:value-type="float" office:value="1" calcext:value-type="float">
            <text:p>1</text:p>
          </table:table-cell>
          <table:table-cell table:style-name="ce168" table:formula="of:=IFERROR(VLOOKUP([$Masterlist.$P95];[$Datasheet.$B$1:.$AV$9809];10;FALSE());&quot;-&quot;)" office:value-type="float" office:value="0" calcext:value-type="float">
            <text:p>0</text:p>
          </table:table-cell>
          <table:table-cell table:style-name="ce168" table:formula="of:=IFERROR(VLOOKUP([$Masterlist.$P95];[$Datasheet.$B$1:.$AV$9809];11;FALSE());&quot;-&quot;)" office:value-type="float" office:value="0" calcext:value-type="float">
            <text:p>0</text:p>
          </table:table-cell>
          <table:table-cell table:style-name="ce168" table:formula="of:=IFERROR(VLOOKUP([$Masterlist.$P95];[$Datasheet.$B$1:.$AV$9809];12;FALSE());&quot;-&quot;)" office:value-type="float" office:value="1" calcext:value-type="float">
            <text:p>1</text:p>
          </table:table-cell>
          <table:table-cell table:style-name="ce168" table:formula="of:=IFERROR(VLOOKUP([$Masterlist.$P95];[$Datasheet.$B$1:.$AV$9809];13;FALSE());&quot;-&quot;)" office:value-type="float" office:value="1" calcext:value-type="float">
            <text:p>1</text:p>
          </table:table-cell>
          <table:table-cell table:style-name="ce168" table:formula="of:=IFERROR(VLOOKUP([$Masterlist.$P95];[$Datasheet.$B$1:.$AV$9809];14;FALSE());&quot;-&quot;)" office:value-type="float" office:value="0" calcext:value-type="float">
            <text:p>0</text:p>
          </table:table-cell>
          <table:table-cell table:style-name="ce168" table:formula="of:=IFERROR(VLOOKUP([$Masterlist.$P95];[$Datasheet.$B$1:.$AV$9809];15;FALSE());&quot;-&quot;)" office:value-type="float" office:value="0" calcext:value-type="float">
            <text:p>0</text:p>
          </table:table-cell>
          <table:table-cell table:style-name="ce168" table:formula="of:=IFERROR(VLOOKUP([$Masterlist.$P95];[$Datasheet.$B$1:.$AV$9809];16;FALSE());&quot;-&quot;)" office:value-type="float" office:value="0" calcext:value-type="float">
            <text:p/>
          </table:table-cell>
          <table:table-cell table:style-name="ce168" table:formula="of:=IFERROR(VLOOKUP([$Masterlist.$P95];[$Datasheet.$B$1:.$AV$9809];17;FALSE());&quot;-&quot;)" office:value-type="float" office:value="0" calcext:value-type="float">
            <text:p/>
          </table:table-cell>
          <table:table-cell table:style-name="ce168" table:formula="of:=IFERROR(VLOOKUP([$Masterlist.$P95];[$Datasheet.$B$1:.$AV$9809];18;FALSE());&quot;-&quot;)" office:value-type="float" office:value="0" calcext:value-type="float">
            <text:p/>
          </table:table-cell>
          <table:table-cell table:style-name="ce244" table:formula="of:=IFERROR(VLOOKUP([$Masterlist.$P95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33" office:value-type="string" calcext:value-type="string">
            <text:p>M</text:p>
          </table:table-cell>
          <table:table-cell table:style-name="ce58" office:value-type="string" calcext:value-type="string">
            <text:p>Yes</text:p>
          </table:table-cell>
          <table:table-cell table:number-columns-repeated="2" table:style-name="ce49" office:value-type="string" calcext:value-type="string">
            <text:p>Yes</text:p>
          </table:table-cell>
          <table:table-cell table:style-name="ce50" table:number-columns-repeated="8"/>
          <table:table-cell table:style-name="ce84"/>
          <table:table-cell table:style-name="ce95" office:value-type="string" calcext:value-type="string">
            <text:p>Lighting Technician</text:p>
          </table:table-cell>
          <table:table-cell table:style-name="ce108" office:value-type="string" calcext:value-type="string">
            <text:p>Jaco Smit</text:p>
          </table:table-cell>
          <table:table-cell table:style-name="ce121" table:formula="of:=IF(ISNUMBER(MATCH([.P96];[$Datasheet.$B$1:.$B$9809];0));&quot;✓&quot;;&quot;x&quot;)" office:value-type="string" office:string-value="✓" calcext:value-type="string">
            <text:p>✓</text:p>
          </table:table-cell>
          <table:table-cell table:style-name="ce142" table:formula="of:=IFERROR(VLOOKUP([$Masterlist.$P96];[$Datasheet.$B$1:.$AV$9809];2;FALSE());&quot;-&quot;)" office:value-type="float" office:value="0" calcext:value-type="float">
            <text:p>0</text:p>
          </table:table-cell>
          <table:table-cell table:style-name="ce168" table:formula="of:=IFERROR(VLOOKUP([$Masterlist.$P96];[$Datasheet.$B$1:.$AV$9809];3;FALSE());&quot;-&quot;)" office:value-type="float" office:value="1" calcext:value-type="float">
            <text:p>1</text:p>
          </table:table-cell>
          <table:table-cell table:style-name="ce168" table:formula="of:=IFERROR(VLOOKUP([$Masterlist.$P96];[$Datasheet.$B$1:.$AV$9809];4;FALSE());&quot;-&quot;)" office:value-type="float" office:value="0" calcext:value-type="float">
            <text:p>0</text:p>
          </table:table-cell>
          <table:table-cell table:style-name="ce168" table:formula="of:=IFERROR(VLOOKUP([$Masterlist.$P96];[$Datasheet.$B$1:.$AV$9809];5;FALSE());&quot;-&quot;)" office:value-type="float" office:value="0" calcext:value-type="float">
            <text:p>0</text:p>
          </table:table-cell>
          <table:table-cell table:style-name="ce191" table:formula="of:=IFERROR(VLOOKUP([$Masterlist.$P96];[$Datasheet.$B$1:.$AV$9809];6;FALSE());&quot;-&quot;)" office:value-type="float" office:value="0" calcext:value-type="float">
            <text:p>0</text:p>
          </table:table-cell>
          <table:table-cell table:style-name="ce168" table:formula="of:=IFERROR(VLOOKUP([$Masterlist.$P96];[$Datasheet.$B$1:.$AV$9809];7;FALSE());&quot;-&quot;)" office:value-type="float" office:value="1" calcext:value-type="float">
            <text:p>1</text:p>
          </table:table-cell>
          <table:table-cell table:style-name="ce168" table:formula="of:=IFERROR(VLOOKUP([$Masterlist.$P96];[$Datasheet.$B$1:.$AV$9809];8;FALSE());&quot;-&quot;)" office:value-type="float" office:value="0" calcext:value-type="float">
            <text:p>0</text:p>
          </table:table-cell>
          <table:table-cell table:style-name="ce168" table:formula="of:=IFERROR(VLOOKUP([$Masterlist.$P96];[$Datasheet.$B$1:.$AV$9809];9;FALSE());&quot;-&quot;)" office:value-type="float" office:value="0" calcext:value-type="float">
            <text:p>0</text:p>
          </table:table-cell>
          <table:table-cell table:style-name="ce168" table:formula="of:=IFERROR(VLOOKUP([$Masterlist.$P96];[$Datasheet.$B$1:.$AV$9809];10;FALSE());&quot;-&quot;)" office:value-type="float" office:value="0" calcext:value-type="float">
            <text:p>0</text:p>
          </table:table-cell>
          <table:table-cell table:style-name="ce168" table:formula="of:=IFERROR(VLOOKUP([$Masterlist.$P96];[$Datasheet.$B$1:.$AV$9809];11;FALSE());&quot;-&quot;)" office:value-type="float" office:value="1" calcext:value-type="float">
            <text:p>1</text:p>
          </table:table-cell>
          <table:table-cell table:style-name="ce168" table:formula="of:=IFERROR(VLOOKUP([$Masterlist.$P96];[$Datasheet.$B$1:.$AV$9809];12;FALSE());&quot;-&quot;)" office:value-type="float" office:value="0" calcext:value-type="float">
            <text:p>0</text:p>
          </table:table-cell>
          <table:table-cell table:style-name="ce168" table:formula="of:=IFERROR(VLOOKUP([$Masterlist.$P96];[$Datasheet.$B$1:.$AV$9809];13;FALSE());&quot;-&quot;)" office:value-type="float" office:value="0" calcext:value-type="float">
            <text:p>0</text:p>
          </table:table-cell>
          <table:table-cell table:style-name="ce168" table:formula="of:=IFERROR(VLOOKUP([$Masterlist.$P96];[$Datasheet.$B$1:.$AV$9809];14;FALSE());&quot;-&quot;)" office:value-type="float" office:value="0" calcext:value-type="float">
            <text:p>0</text:p>
          </table:table-cell>
          <table:table-cell table:style-name="ce168" table:formula="of:=IFERROR(VLOOKUP([$Masterlist.$P96];[$Datasheet.$B$1:.$AV$9809];15;FALSE());&quot;-&quot;)" office:value-type="float" office:value="0" calcext:value-type="float">
            <text:p>0</text:p>
          </table:table-cell>
          <table:table-cell table:style-name="ce168" table:formula="of:=IFERROR(VLOOKUP([$Masterlist.$P96];[$Datasheet.$B$1:.$AV$9809];16;FALSE());&quot;-&quot;)" office:value-type="float" office:value="0" calcext:value-type="float">
            <text:p/>
          </table:table-cell>
          <table:table-cell table:style-name="ce168" table:formula="of:=IFERROR(VLOOKUP([$Masterlist.$P96];[$Datasheet.$B$1:.$AV$9809];17;FALSE());&quot;-&quot;)" office:value-type="float" office:value="0" calcext:value-type="float">
            <text:p/>
          </table:table-cell>
          <table:table-cell table:style-name="ce168" table:formula="of:=IFERROR(VLOOKUP([$Masterlist.$P96];[$Datasheet.$B$1:.$AV$9809];18;FALSE());&quot;-&quot;)" office:value-type="float" office:value="0" calcext:value-type="float">
            <text:p/>
          </table:table-cell>
          <table:table-cell table:style-name="ce244" table:formula="of:=IFERROR(VLOOKUP([$Masterlist.$P96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33" office:value-type="string" calcext:value-type="string">
            <text:p>L</text:p>
          </table:table-cell>
          <table:table-cell table:style-name="ce58" office:value-type="string" calcext:value-type="string">
            <text:p>Yes</text:p>
          </table:table-cell>
          <table:table-cell table:number-columns-repeated="2" table:style-name="ce49" office:value-type="string" calcext:value-type="string">
            <text:p>Yes</text:p>
          </table:table-cell>
          <table:table-cell table:style-name="ce50" table:number-columns-repeated="8"/>
          <table:table-cell table:style-name="ce84"/>
          <table:table-cell table:style-name="ce95" office:value-type="string" calcext:value-type="string">
            <text:p>Lighting Technician</text:p>
          </table:table-cell>
          <table:table-cell table:style-name="ce108" office:value-type="string" calcext:value-type="string">
            <text:p>Jenique Mouton</text:p>
          </table:table-cell>
          <table:table-cell table:style-name="ce121" table:formula="of:=IF(ISNUMBER(MATCH([.P97];[$Datasheet.$B$1:.$B$9809];0));&quot;✓&quot;;&quot;x&quot;)" office:value-type="string" office:string-value="✓" calcext:value-type="string">
            <text:p>✓</text:p>
          </table:table-cell>
          <table:table-cell table:style-name="ce142" table:formula="of:=IFERROR(VLOOKUP([$Masterlist.$P97];[$Datasheet.$B$1:.$AV$9809];2;FALSE());&quot;-&quot;)" office:value-type="float" office:value="0" calcext:value-type="float">
            <text:p>0</text:p>
          </table:table-cell>
          <table:table-cell table:style-name="ce168" table:formula="of:=IFERROR(VLOOKUP([$Masterlist.$P97];[$Datasheet.$B$1:.$AV$9809];3;FALSE());&quot;-&quot;)" office:value-type="float" office:value="1" calcext:value-type="float">
            <text:p>1</text:p>
          </table:table-cell>
          <table:table-cell table:style-name="ce168" table:formula="of:=IFERROR(VLOOKUP([$Masterlist.$P97];[$Datasheet.$B$1:.$AV$9809];4;FALSE());&quot;-&quot;)" office:value-type="float" office:value="1" calcext:value-type="float">
            <text:p>1</text:p>
          </table:table-cell>
          <table:table-cell table:style-name="ce168" table:formula="of:=IFERROR(VLOOKUP([$Masterlist.$P97];[$Datasheet.$B$1:.$AV$9809];5;FALSE());&quot;-&quot;)" office:value-type="float" office:value="1" calcext:value-type="float">
            <text:p>1</text:p>
          </table:table-cell>
          <table:table-cell table:style-name="ce191" table:formula="of:=IFERROR(VLOOKUP([$Masterlist.$P97];[$Datasheet.$B$1:.$AV$9809];6;FALSE());&quot;-&quot;)" office:value-type="float" office:value="1" calcext:value-type="float">
            <text:p>1</text:p>
          </table:table-cell>
          <table:table-cell table:style-name="ce168" table:formula="of:=IFERROR(VLOOKUP([$Masterlist.$P97];[$Datasheet.$B$1:.$AV$9809];7;FALSE());&quot;-&quot;)" office:value-type="float" office:value="1" calcext:value-type="float">
            <text:p>1</text:p>
          </table:table-cell>
          <table:table-cell table:style-name="ce168" table:formula="of:=IFERROR(VLOOKUP([$Masterlist.$P97];[$Datasheet.$B$1:.$AV$9809];8;FALSE());&quot;-&quot;)" office:value-type="float" office:value="1" calcext:value-type="float">
            <text:p>1</text:p>
          </table:table-cell>
          <table:table-cell table:style-name="ce168" table:formula="of:=IFERROR(VLOOKUP([$Masterlist.$P97];[$Datasheet.$B$1:.$AV$9809];9;FALSE());&quot;-&quot;)" office:value-type="float" office:value="1" calcext:value-type="float">
            <text:p>1</text:p>
          </table:table-cell>
          <table:table-cell table:style-name="ce168" table:formula="of:=IFERROR(VLOOKUP([$Masterlist.$P97];[$Datasheet.$B$1:.$AV$9809];10;FALSE());&quot;-&quot;)" office:value-type="float" office:value="1" calcext:value-type="float">
            <text:p>1</text:p>
          </table:table-cell>
          <table:table-cell table:style-name="ce168" table:formula="of:=IFERROR(VLOOKUP([$Masterlist.$P97];[$Datasheet.$B$1:.$AV$9809];11;FALSE());&quot;-&quot;)" office:value-type="float" office:value="1" calcext:value-type="float">
            <text:p>1</text:p>
          </table:table-cell>
          <table:table-cell table:style-name="ce168" table:formula="of:=IFERROR(VLOOKUP([$Masterlist.$P97];[$Datasheet.$B$1:.$AV$9809];12;FALSE());&quot;-&quot;)" office:value-type="float" office:value="0" calcext:value-type="float">
            <text:p>0</text:p>
          </table:table-cell>
          <table:table-cell table:style-name="ce168" table:formula="of:=IFERROR(VLOOKUP([$Masterlist.$P97];[$Datasheet.$B$1:.$AV$9809];13;FALSE());&quot;-&quot;)" office:value-type="float" office:value="0" calcext:value-type="float">
            <text:p>0</text:p>
          </table:table-cell>
          <table:table-cell table:style-name="ce168" table:formula="of:=IFERROR(VLOOKUP([$Masterlist.$P97];[$Datasheet.$B$1:.$AV$9809];14;FALSE());&quot;-&quot;)" office:value-type="float" office:value="0" calcext:value-type="float">
            <text:p>0</text:p>
          </table:table-cell>
          <table:table-cell table:style-name="ce168" table:formula="of:=IFERROR(VLOOKUP([$Masterlist.$P97];[$Datasheet.$B$1:.$AV$9809];15;FALSE());&quot;-&quot;)" office:value-type="float" office:value="0" calcext:value-type="float">
            <text:p>0</text:p>
          </table:table-cell>
          <table:table-cell table:style-name="ce168" table:formula="of:=IFERROR(VLOOKUP([$Masterlist.$P97];[$Datasheet.$B$1:.$AV$9809];16;FALSE());&quot;-&quot;)" office:value-type="float" office:value="0" calcext:value-type="float">
            <text:p/>
          </table:table-cell>
          <table:table-cell table:style-name="ce168" table:formula="of:=IFERROR(VLOOKUP([$Masterlist.$P97];[$Datasheet.$B$1:.$AV$9809];17;FALSE());&quot;-&quot;)" office:value-type="float" office:value="0" calcext:value-type="float">
            <text:p/>
          </table:table-cell>
          <table:table-cell table:style-name="ce168" table:formula="of:=IFERROR(VLOOKUP([$Masterlist.$P97];[$Datasheet.$B$1:.$AV$9809];18;FALSE());&quot;-&quot;)" office:value-type="float" office:value="0" calcext:value-type="float">
            <text:p/>
          </table:table-cell>
          <table:table-cell table:style-name="ce244" table:formula="of:=IFERROR(VLOOKUP([$Masterlist.$P97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34" office:value-type="string" calcext:value-type="string">
            <text:p>L</text:p>
          </table:table-cell>
          <table:table-cell table:style-name="ce58" office:value-type="string" calcext:value-type="string">
            <text:p>Yes</text:p>
          </table:table-cell>
          <table:table-cell table:number-columns-repeated="3" table:style-name="ce49" office:value-type="string" calcext:value-type="string">
            <text:p>Yes</text:p>
          </table:table-cell>
          <table:table-cell table:style-name="ce49"/>
          <table:table-cell table:style-name="ce50" table:number-columns-repeated="6"/>
          <table:table-cell table:style-name="ce84"/>
          <table:table-cell table:style-name="ce95" office:value-type="string" calcext:value-type="string">
            <text:p>Lighting Technician</text:p>
          </table:table-cell>
          <table:table-cell table:style-name="ce108" office:value-type="string" calcext:value-type="string">
            <text:p>Llewelyn Marais</text:p>
          </table:table-cell>
          <table:table-cell table:style-name="ce121" table:formula="of:=IF(ISNUMBER(MATCH([.P98];[$Datasheet.$B$1:.$B$9809];0));&quot;✓&quot;;&quot;x&quot;)" office:value-type="string" office:string-value="✓" calcext:value-type="string">
            <text:p>✓</text:p>
          </table:table-cell>
          <table:table-cell table:style-name="ce142" table:formula="of:=IFERROR(VLOOKUP([$Masterlist.$P98];[$Datasheet.$B$1:.$AV$9809];2;FALSE());&quot;-&quot;)" office:value-type="float" office:value="0" calcext:value-type="float">
            <text:p>0</text:p>
          </table:table-cell>
          <table:table-cell table:style-name="ce168" table:formula="of:=IFERROR(VLOOKUP([$Masterlist.$P98];[$Datasheet.$B$1:.$AV$9809];3;FALSE());&quot;-&quot;)" office:value-type="float" office:value="1" calcext:value-type="float">
            <text:p>1</text:p>
          </table:table-cell>
          <table:table-cell table:style-name="ce168" table:formula="of:=IFERROR(VLOOKUP([$Masterlist.$P98];[$Datasheet.$B$1:.$AV$9809];4;FALSE());&quot;-&quot;)" office:value-type="float" office:value="0" calcext:value-type="float">
            <text:p>0</text:p>
          </table:table-cell>
          <table:table-cell table:style-name="ce168" table:formula="of:=IFERROR(VLOOKUP([$Masterlist.$P98];[$Datasheet.$B$1:.$AV$9809];5;FALSE());&quot;-&quot;)" office:value-type="float" office:value="0" calcext:value-type="float">
            <text:p>0</text:p>
          </table:table-cell>
          <table:table-cell table:style-name="ce191" table:formula="of:=IFERROR(VLOOKUP([$Masterlist.$P98];[$Datasheet.$B$1:.$AV$9809];6;FALSE());&quot;-&quot;)" office:value-type="float" office:value="0" calcext:value-type="float">
            <text:p>0</text:p>
          </table:table-cell>
          <table:table-cell table:style-name="ce168" table:formula="of:=IFERROR(VLOOKUP([$Masterlist.$P98];[$Datasheet.$B$1:.$AV$9809];7;FALSE());&quot;-&quot;)" office:value-type="float" office:value="1" calcext:value-type="float">
            <text:p>1</text:p>
          </table:table-cell>
          <table:table-cell table:style-name="ce168" table:formula="of:=IFERROR(VLOOKUP([$Masterlist.$P98];[$Datasheet.$B$1:.$AV$9809];8;FALSE());&quot;-&quot;)" office:value-type="float" office:value="0" calcext:value-type="float">
            <text:p>0</text:p>
          </table:table-cell>
          <table:table-cell table:style-name="ce168" table:formula="of:=IFERROR(VLOOKUP([$Masterlist.$P98];[$Datasheet.$B$1:.$AV$9809];9;FALSE());&quot;-&quot;)" office:value-type="float" office:value="1" calcext:value-type="float">
            <text:p>1</text:p>
          </table:table-cell>
          <table:table-cell table:style-name="ce168" table:formula="of:=IFERROR(VLOOKUP([$Masterlist.$P98];[$Datasheet.$B$1:.$AV$9809];10;FALSE());&quot;-&quot;)" office:value-type="float" office:value="0" calcext:value-type="float">
            <text:p>0</text:p>
          </table:table-cell>
          <table:table-cell table:style-name="ce168" table:formula="of:=IFERROR(VLOOKUP([$Masterlist.$P98];[$Datasheet.$B$1:.$AV$9809];11;FALSE());&quot;-&quot;)" office:value-type="float" office:value="1" calcext:value-type="float">
            <text:p>1</text:p>
          </table:table-cell>
          <table:table-cell table:style-name="ce168" table:formula="of:=IFERROR(VLOOKUP([$Masterlist.$P98];[$Datasheet.$B$1:.$AV$9809];12;FALSE());&quot;-&quot;)" office:value-type="float" office:value="0" calcext:value-type="float">
            <text:p>0</text:p>
          </table:table-cell>
          <table:table-cell table:style-name="ce168" table:formula="of:=IFERROR(VLOOKUP([$Masterlist.$P98];[$Datasheet.$B$1:.$AV$9809];13;FALSE());&quot;-&quot;)" office:value-type="float" office:value="1" calcext:value-type="float">
            <text:p>1</text:p>
          </table:table-cell>
          <table:table-cell table:style-name="ce168" table:formula="of:=IFERROR(VLOOKUP([$Masterlist.$P98];[$Datasheet.$B$1:.$AV$9809];14;FALSE());&quot;-&quot;)" office:value-type="float" office:value="0" calcext:value-type="float">
            <text:p>0</text:p>
          </table:table-cell>
          <table:table-cell table:style-name="ce168" table:formula="of:=IFERROR(VLOOKUP([$Masterlist.$P98];[$Datasheet.$B$1:.$AV$9809];15;FALSE());&quot;-&quot;)" office:value-type="float" office:value="1" calcext:value-type="float">
            <text:p>1</text:p>
          </table:table-cell>
          <table:table-cell table:style-name="ce168" table:formula="of:=IFERROR(VLOOKUP([$Masterlist.$P98];[$Datasheet.$B$1:.$AV$9809];16;FALSE());&quot;-&quot;)" office:value-type="float" office:value="0" calcext:value-type="float">
            <text:p/>
          </table:table-cell>
          <table:table-cell table:style-name="ce168" table:formula="of:=IFERROR(VLOOKUP([$Masterlist.$P98];[$Datasheet.$B$1:.$AV$9809];17;FALSE());&quot;-&quot;)" office:value-type="float" office:value="0" calcext:value-type="float">
            <text:p/>
          </table:table-cell>
          <table:table-cell table:style-name="ce168" table:formula="of:=IFERROR(VLOOKUP([$Masterlist.$P98];[$Datasheet.$B$1:.$AV$9809];18;FALSE());&quot;-&quot;)" office:value-type="float" office:value="0" calcext:value-type="float">
            <text:p/>
          </table:table-cell>
          <table:table-cell table:style-name="ce244" table:formula="of:=IFERROR(VLOOKUP([$Masterlist.$P98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33" office:value-type="string" calcext:value-type="string">
            <text:p>L</text:p>
          </table:table-cell>
          <table:table-cell table:style-name="ce58" office:value-type="string" calcext:value-type="string">
            <text:p>Yes</text:p>
          </table:table-cell>
          <table:table-cell table:number-columns-repeated="3" table:style-name="ce49" office:value-type="string" calcext:value-type="string">
            <text:p>Yes</text:p>
          </table:table-cell>
          <table:table-cell table:style-name="ce50" table:number-columns-repeated="7"/>
          <table:table-cell table:style-name="ce84"/>
          <table:table-cell table:style-name="ce95" office:value-type="string" calcext:value-type="string">
            <text:p>Lighting Technician</text:p>
          </table:table-cell>
          <table:table-cell table:style-name="ce108" office:value-type="string" calcext:value-type="string">
            <text:p>Lunga Sibya</text:p>
          </table:table-cell>
          <table:table-cell table:style-name="ce121" table:formula="of:=IF(ISNUMBER(MATCH([.P99];[$Datasheet.$B$1:.$B$9809];0));&quot;✓&quot;;&quot;x&quot;)" office:value-type="string" office:string-value="✓" calcext:value-type="string">
            <text:p>✓</text:p>
          </table:table-cell>
          <table:table-cell table:style-name="ce142" table:formula="of:=IFERROR(VLOOKUP([$Masterlist.$P99];[$Datasheet.$B$1:.$AV$9809];2;FALSE());&quot;-&quot;)" office:value-type="float" office:value="0" calcext:value-type="float">
            <text:p>0</text:p>
          </table:table-cell>
          <table:table-cell table:style-name="ce168" table:formula="of:=IFERROR(VLOOKUP([$Masterlist.$P99];[$Datasheet.$B$1:.$AV$9809];3;FALSE());&quot;-&quot;)" office:value-type="float" office:value="1" calcext:value-type="float">
            <text:p>1</text:p>
          </table:table-cell>
          <table:table-cell table:style-name="ce168" table:formula="of:=IFERROR(VLOOKUP([$Masterlist.$P99];[$Datasheet.$B$1:.$AV$9809];4;FALSE());&quot;-&quot;)" office:value-type="float" office:value="1" calcext:value-type="float">
            <text:p>1</text:p>
          </table:table-cell>
          <table:table-cell table:style-name="ce168" table:formula="of:=IFERROR(VLOOKUP([$Masterlist.$P99];[$Datasheet.$B$1:.$AV$9809];5;FALSE());&quot;-&quot;)" office:value-type="float" office:value="0" calcext:value-type="float">
            <text:p>0</text:p>
          </table:table-cell>
          <table:table-cell table:style-name="ce191" table:formula="of:=IFERROR(VLOOKUP([$Masterlist.$P99];[$Datasheet.$B$1:.$AV$9809];6;FALSE());&quot;-&quot;)" office:value-type="float" office:value="0" calcext:value-type="float">
            <text:p>0</text:p>
          </table:table-cell>
          <table:table-cell table:style-name="ce168" table:formula="of:=IFERROR(VLOOKUP([$Masterlist.$P99];[$Datasheet.$B$1:.$AV$9809];7;FALSE());&quot;-&quot;)" office:value-type="float" office:value="0" calcext:value-type="float">
            <text:p>0</text:p>
          </table:table-cell>
          <table:table-cell table:style-name="ce168" table:formula="of:=IFERROR(VLOOKUP([$Masterlist.$P99];[$Datasheet.$B$1:.$AV$9809];8;FALSE());&quot;-&quot;)" office:value-type="float" office:value="1" calcext:value-type="float">
            <text:p>1</text:p>
          </table:table-cell>
          <table:table-cell table:style-name="ce168" table:formula="of:=IFERROR(VLOOKUP([$Masterlist.$P99];[$Datasheet.$B$1:.$AV$9809];9;FALSE());&quot;-&quot;)" office:value-type="float" office:value="1" calcext:value-type="float">
            <text:p>1</text:p>
          </table:table-cell>
          <table:table-cell table:style-name="ce168" table:formula="of:=IFERROR(VLOOKUP([$Masterlist.$P99];[$Datasheet.$B$1:.$AV$9809];10;FALSE());&quot;-&quot;)" office:value-type="float" office:value="0" calcext:value-type="float">
            <text:p>0</text:p>
          </table:table-cell>
          <table:table-cell table:style-name="ce168" table:formula="of:=IFERROR(VLOOKUP([$Masterlist.$P99];[$Datasheet.$B$1:.$AV$9809];11;FALSE());&quot;-&quot;)" office:value-type="float" office:value="1" calcext:value-type="float">
            <text:p>1</text:p>
          </table:table-cell>
          <table:table-cell table:style-name="ce168" table:formula="of:=IFERROR(VLOOKUP([$Masterlist.$P99];[$Datasheet.$B$1:.$AV$9809];12;FALSE());&quot;-&quot;)" office:value-type="float" office:value="0" calcext:value-type="float">
            <text:p>0</text:p>
          </table:table-cell>
          <table:table-cell table:style-name="ce168" table:formula="of:=IFERROR(VLOOKUP([$Masterlist.$P99];[$Datasheet.$B$1:.$AV$9809];13;FALSE());&quot;-&quot;)" office:value-type="float" office:value="1" calcext:value-type="float">
            <text:p>1</text:p>
          </table:table-cell>
          <table:table-cell table:style-name="ce168" table:formula="of:=IFERROR(VLOOKUP([$Masterlist.$P99];[$Datasheet.$B$1:.$AV$9809];14;FALSE());&quot;-&quot;)" office:value-type="float" office:value="0" calcext:value-type="float">
            <text:p>0</text:p>
          </table:table-cell>
          <table:table-cell table:style-name="ce168" table:formula="of:=IFERROR(VLOOKUP([$Masterlist.$P99];[$Datasheet.$B$1:.$AV$9809];15;FALSE());&quot;-&quot;)" office:value-type="float" office:value="1" calcext:value-type="float">
            <text:p>1</text:p>
          </table:table-cell>
          <table:table-cell table:style-name="ce168" table:formula="of:=IFERROR(VLOOKUP([$Masterlist.$P99];[$Datasheet.$B$1:.$AV$9809];16;FALSE());&quot;-&quot;)" office:value-type="float" office:value="0" calcext:value-type="float">
            <text:p/>
          </table:table-cell>
          <table:table-cell table:style-name="ce168" table:formula="of:=IFERROR(VLOOKUP([$Masterlist.$P99];[$Datasheet.$B$1:.$AV$9809];17;FALSE());&quot;-&quot;)" office:value-type="float" office:value="0" calcext:value-type="float">
            <text:p/>
          </table:table-cell>
          <table:table-cell table:style-name="ce168" table:formula="of:=IFERROR(VLOOKUP([$Masterlist.$P99];[$Datasheet.$B$1:.$AV$9809];18;FALSE());&quot;-&quot;)" office:value-type="float" office:value="0" calcext:value-type="float">
            <text:p/>
          </table:table-cell>
          <table:table-cell table:style-name="ce244" table:formula="of:=IFERROR(VLOOKUP([$Masterlist.$P99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33" office:value-type="string" calcext:value-type="string">
            <text:p>L</text:p>
          </table:table-cell>
          <table:table-cell table:style-name="ce58" office:value-type="string" calcext:value-type="string">
            <text:p>Yes</text:p>
          </table:table-cell>
          <table:table-cell table:style-name="ce49" office:value-type="string" calcext:value-type="string">
            <text:p>Yes</text:p>
          </table:table-cell>
          <table:table-cell table:style-name="ce49"/>
          <table:table-cell table:style-name="ce50" table:number-columns-repeated="8"/>
          <table:table-cell table:style-name="ce84"/>
          <table:table-cell table:style-name="ce95" office:value-type="string" calcext:value-type="string">
            <text:p>Lighting Technician</text:p>
          </table:table-cell>
          <table:table-cell table:style-name="ce108" office:value-type="string" calcext:value-type="string">
            <text:p>Prince Ngubane</text:p>
          </table:table-cell>
          <table:table-cell table:style-name="ce121" table:formula="of:=IF(ISNUMBER(MATCH([.P100];[$Datasheet.$B$1:.$B$9809];0));&quot;✓&quot;;&quot;x&quot;)" office:value-type="string" office:string-value="✓" calcext:value-type="string">
            <text:p>✓</text:p>
          </table:table-cell>
          <table:table-cell table:style-name="ce143" table:formula="of:=IFERROR(VLOOKUP([$Masterlist.$P100];[$Datasheet.$B$1:.$AV$9809];2;FALSE());&quot;-&quot;)" office:value-type="float" office:value="0" calcext:value-type="float">
            <text:p>0</text:p>
          </table:table-cell>
          <table:table-cell table:style-name="ce174" table:formula="of:=IFERROR(VLOOKUP([$Masterlist.$P100];[$Datasheet.$B$1:.$AV$9809];3;FALSE());&quot;-&quot;)" office:value-type="float" office:value="0" calcext:value-type="float">
            <text:p>0</text:p>
          </table:table-cell>
          <table:table-cell table:style-name="ce174" table:formula="of:=IFERROR(VLOOKUP([$Masterlist.$P100];[$Datasheet.$B$1:.$AV$9809];4;FALSE());&quot;-&quot;)" office:value-type="float" office:value="1" calcext:value-type="float">
            <text:p>1</text:p>
          </table:table-cell>
          <table:table-cell table:style-name="ce174" table:formula="of:=IFERROR(VLOOKUP([$Masterlist.$P100];[$Datasheet.$B$1:.$AV$9809];5;FALSE());&quot;-&quot;)" office:value-type="float" office:value="1" calcext:value-type="float">
            <text:p>1</text:p>
          </table:table-cell>
          <table:table-cell table:style-name="ce192" table:formula="of:=IFERROR(VLOOKUP([$Masterlist.$P100];[$Datasheet.$B$1:.$AV$9809];6;FALSE());&quot;-&quot;)" office:value-type="float" office:value="0" calcext:value-type="float">
            <text:p>0</text:p>
          </table:table-cell>
          <table:table-cell table:style-name="ce174" table:formula="of:=IFERROR(VLOOKUP([$Masterlist.$P100];[$Datasheet.$B$1:.$AV$9809];7;FALSE());&quot;-&quot;)" office:value-type="float" office:value="0" calcext:value-type="float">
            <text:p>0</text:p>
          </table:table-cell>
          <table:table-cell table:style-name="ce174" table:formula="of:=IFERROR(VLOOKUP([$Masterlist.$P100];[$Datasheet.$B$1:.$AV$9809];8;FALSE());&quot;-&quot;)" office:value-type="float" office:value="0" calcext:value-type="float">
            <text:p>0</text:p>
          </table:table-cell>
          <table:table-cell table:style-name="ce174" table:formula="of:=IFERROR(VLOOKUP([$Masterlist.$P100];[$Datasheet.$B$1:.$AV$9809];9;FALSE());&quot;-&quot;)" office:value-type="float" office:value="1" calcext:value-type="float">
            <text:p>1</text:p>
          </table:table-cell>
          <table:table-cell table:style-name="ce174" table:formula="of:=IFERROR(VLOOKUP([$Masterlist.$P100];[$Datasheet.$B$1:.$AV$9809];10;FALSE());&quot;-&quot;)" office:value-type="float" office:value="1" calcext:value-type="float">
            <text:p>1</text:p>
          </table:table-cell>
          <table:table-cell table:style-name="ce174" table:formula="of:=IFERROR(VLOOKUP([$Masterlist.$P100];[$Datasheet.$B$1:.$AV$9809];11;FALSE());&quot;-&quot;)" office:value-type="float" office:value="0" calcext:value-type="float">
            <text:p>0</text:p>
          </table:table-cell>
          <table:table-cell table:style-name="ce174" table:formula="of:=IFERROR(VLOOKUP([$Masterlist.$P100];[$Datasheet.$B$1:.$AV$9809];12;FALSE());&quot;-&quot;)" office:value-type="float" office:value="0" calcext:value-type="float">
            <text:p>0</text:p>
          </table:table-cell>
          <table:table-cell table:style-name="ce174" table:formula="of:=IFERROR(VLOOKUP([$Masterlist.$P100];[$Datasheet.$B$1:.$AV$9809];13;FALSE());&quot;-&quot;)" office:value-type="float" office:value="1" calcext:value-type="float">
            <text:p>1</text:p>
          </table:table-cell>
          <table:table-cell table:style-name="ce174" table:formula="of:=IFERROR(VLOOKUP([$Masterlist.$P100];[$Datasheet.$B$1:.$AV$9809];14;FALSE());&quot;-&quot;)" office:value-type="float" office:value="1" calcext:value-type="float">
            <text:p>1</text:p>
          </table:table-cell>
          <table:table-cell table:style-name="ce174" table:formula="of:=IFERROR(VLOOKUP([$Masterlist.$P100];[$Datasheet.$B$1:.$AV$9809];15;FALSE());&quot;-&quot;)" office:value-type="float" office:value="1" calcext:value-type="float">
            <text:p>1</text:p>
          </table:table-cell>
          <table:table-cell table:style-name="ce174" table:formula="of:=IFERROR(VLOOKUP([$Masterlist.$P100];[$Datasheet.$B$1:.$AV$9809];16;FALSE());&quot;-&quot;)" office:value-type="float" office:value="0" calcext:value-type="float">
            <text:p/>
          </table:table-cell>
          <table:table-cell table:style-name="ce174" table:formula="of:=IFERROR(VLOOKUP([$Masterlist.$P100];[$Datasheet.$B$1:.$AV$9809];17;FALSE());&quot;-&quot;)" office:value-type="float" office:value="0" calcext:value-type="float">
            <text:p/>
          </table:table-cell>
          <table:table-cell table:style-name="ce174" table:formula="of:=IFERROR(VLOOKUP([$Masterlist.$P100];[$Datasheet.$B$1:.$AV$9809];18;FALSE());&quot;-&quot;)" office:value-type="float" office:value="0" calcext:value-type="float">
            <text:p/>
          </table:table-cell>
          <table:table-cell table:style-name="ce245" table:formula="of:=IFERROR(VLOOKUP([$Masterlist.$P100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33" office:value-type="string" calcext:value-type="string">
            <text:p>M</text:p>
          </table:table-cell>
          <table:table-cell table:style-name="ce58" office:value-type="string" calcext:value-type="string">
            <text:p>Yes</text:p>
          </table:table-cell>
          <table:table-cell table:number-columns-repeated="2" table:style-name="ce49" office:value-type="string" calcext:value-type="string">
            <text:p>Yes</text:p>
          </table:table-cell>
          <table:table-cell table:style-name="ce50" table:number-columns-repeated="8"/>
          <table:table-cell table:style-name="ce84"/>
          <table:table-cell table:style-name="ce95" office:value-type="string" calcext:value-type="string">
            <text:p>Lighting Technician</text:p>
          </table:table-cell>
          <table:table-cell table:style-name="ce108" office:value-type="string" calcext:value-type="string">
            <text:p>Reinhardt Visser</text:p>
          </table:table-cell>
          <table:table-cell table:style-name="ce121" table:formula="of:=IF(ISNUMBER(MATCH([.P101];[$Datasheet.$B$1:.$B$9809];0));&quot;✓&quot;;&quot;x&quot;)" office:value-type="string" office:string-value="✓" calcext:value-type="string">
            <text:p>✓</text:p>
          </table:table-cell>
          <table:table-cell table:style-name="ce143" table:formula="of:=IFERROR(VLOOKUP([$Masterlist.$P101];[$Datasheet.$B$1:.$AV$9809];2;FALSE());&quot;-&quot;)" office:value-type="float" office:value="1" calcext:value-type="float">
            <text:p>1</text:p>
          </table:table-cell>
          <table:table-cell table:style-name="ce174" table:formula="of:=IFERROR(VLOOKUP([$Masterlist.$P101];[$Datasheet.$B$1:.$AV$9809];3;FALSE());&quot;-&quot;)" office:value-type="float" office:value="1" calcext:value-type="float">
            <text:p>1</text:p>
          </table:table-cell>
          <table:table-cell table:style-name="ce174" table:formula="of:=IFERROR(VLOOKUP([$Masterlist.$P101];[$Datasheet.$B$1:.$AV$9809];4;FALSE());&quot;-&quot;)" office:value-type="float" office:value="0" calcext:value-type="float">
            <text:p>0</text:p>
          </table:table-cell>
          <table:table-cell table:style-name="ce174" table:formula="of:=IFERROR(VLOOKUP([$Masterlist.$P101];[$Datasheet.$B$1:.$AV$9809];5;FALSE());&quot;-&quot;)" office:value-type="float" office:value="0" calcext:value-type="float">
            <text:p>0</text:p>
          </table:table-cell>
          <table:table-cell table:style-name="ce192" table:formula="of:=IFERROR(VLOOKUP([$Masterlist.$P101];[$Datasheet.$B$1:.$AV$9809];6;FALSE());&quot;-&quot;)" office:value-type="float" office:value="1" calcext:value-type="float">
            <text:p>1</text:p>
          </table:table-cell>
          <table:table-cell table:style-name="ce174" table:formula="of:=IFERROR(VLOOKUP([$Masterlist.$P101];[$Datasheet.$B$1:.$AV$9809];7;FALSE());&quot;-&quot;)" office:value-type="float" office:value="1" calcext:value-type="float">
            <text:p>1</text:p>
          </table:table-cell>
          <table:table-cell table:style-name="ce174" table:formula="of:=IFERROR(VLOOKUP([$Masterlist.$P101];[$Datasheet.$B$1:.$AV$9809];8;FALSE());&quot;-&quot;)" office:value-type="float" office:value="1" calcext:value-type="float">
            <text:p>1</text:p>
          </table:table-cell>
          <table:table-cell table:style-name="ce174" table:formula="of:=IFERROR(VLOOKUP([$Masterlist.$P101];[$Datasheet.$B$1:.$AV$9809];9;FALSE());&quot;-&quot;)" office:value-type="float" office:value="1" calcext:value-type="float">
            <text:p>1</text:p>
          </table:table-cell>
          <table:table-cell table:style-name="ce174" table:formula="of:=IFERROR(VLOOKUP([$Masterlist.$P101];[$Datasheet.$B$1:.$AV$9809];10;FALSE());&quot;-&quot;)" office:value-type="float" office:value="0" calcext:value-type="float">
            <text:p>0</text:p>
          </table:table-cell>
          <table:table-cell table:style-name="ce174" table:formula="of:=IFERROR(VLOOKUP([$Masterlist.$P101];[$Datasheet.$B$1:.$AV$9809];11;FALSE());&quot;-&quot;)" office:value-type="float" office:value="0" calcext:value-type="float">
            <text:p>0</text:p>
          </table:table-cell>
          <table:table-cell table:style-name="ce174" table:formula="of:=IFERROR(VLOOKUP([$Masterlist.$P101];[$Datasheet.$B$1:.$AV$9809];12;FALSE());&quot;-&quot;)" office:value-type="float" office:value="1" calcext:value-type="float">
            <text:p>1</text:p>
          </table:table-cell>
          <table:table-cell table:style-name="ce174" table:formula="of:=IFERROR(VLOOKUP([$Masterlist.$P101];[$Datasheet.$B$1:.$AV$9809];13;FALSE());&quot;-&quot;)" office:value-type="float" office:value="1" calcext:value-type="float">
            <text:p>1</text:p>
          </table:table-cell>
          <table:table-cell table:style-name="ce174" table:formula="of:=IFERROR(VLOOKUP([$Masterlist.$P101];[$Datasheet.$B$1:.$AV$9809];14;FALSE());&quot;-&quot;)" office:value-type="float" office:value="1" calcext:value-type="float">
            <text:p>1</text:p>
          </table:table-cell>
          <table:table-cell table:style-name="ce174" table:formula="of:=IFERROR(VLOOKUP([$Masterlist.$P101];[$Datasheet.$B$1:.$AV$9809];15;FALSE());&quot;-&quot;)" office:value-type="float" office:value="1" calcext:value-type="float">
            <text:p>1</text:p>
          </table:table-cell>
          <table:table-cell table:style-name="ce174" table:formula="of:=IFERROR(VLOOKUP([$Masterlist.$P101];[$Datasheet.$B$1:.$AV$9809];16;FALSE());&quot;-&quot;)" office:value-type="float" office:value="0" calcext:value-type="float">
            <text:p/>
          </table:table-cell>
          <table:table-cell table:style-name="ce174" table:formula="of:=IFERROR(VLOOKUP([$Masterlist.$P101];[$Datasheet.$B$1:.$AV$9809];17;FALSE());&quot;-&quot;)" office:value-type="float" office:value="0" calcext:value-type="float">
            <text:p/>
          </table:table-cell>
          <table:table-cell table:style-name="ce174" table:formula="of:=IFERROR(VLOOKUP([$Masterlist.$P101];[$Datasheet.$B$1:.$AV$9809];18;FALSE());&quot;-&quot;)" office:value-type="float" office:value="0" calcext:value-type="float">
            <text:p/>
          </table:table-cell>
          <table:table-cell table:style-name="ce245" table:formula="of:=IFERROR(VLOOKUP([$Masterlist.$P101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33" office:value-type="string" calcext:value-type="string">
            <text:p>M</text:p>
          </table:table-cell>
          <table:table-cell table:style-name="ce58" office:value-type="string" calcext:value-type="string">
            <text:p>Yes</text:p>
          </table:table-cell>
          <table:table-cell table:number-columns-repeated="2" table:style-name="ce49" office:value-type="string" calcext:value-type="string">
            <text:p>Yes</text:p>
          </table:table-cell>
          <table:table-cell table:style-name="ce50" office:value-type="string" calcext:value-type="string">
            <text:p>Yes</text:p>
          </table:table-cell>
          <table:table-cell table:style-name="ce50" table:number-columns-repeated="7"/>
          <table:table-cell table:style-name="ce84"/>
          <table:table-cell table:style-name="ce95" office:value-type="string" calcext:value-type="string">
            <text:p>Lighting Technician</text:p>
          </table:table-cell>
          <table:table-cell table:style-name="ce108" office:value-type="string" calcext:value-type="string">
            <text:p>Ruan van Tonder</text:p>
          </table:table-cell>
          <table:table-cell table:style-name="ce121" table:formula="of:=IF(ISNUMBER(MATCH([.P102];[$Datasheet.$B$1:.$B$9809];0));&quot;✓&quot;;&quot;x&quot;)" office:value-type="string" office:string-value="✓" calcext:value-type="string">
            <text:p>✓</text:p>
          </table:table-cell>
          <table:table-cell table:style-name="ce143" table:formula="of:=IFERROR(VLOOKUP([$Masterlist.$P102];[$Datasheet.$B$1:.$AV$9809];2;FALSE());&quot;-&quot;)" office:value-type="float" office:value="0" calcext:value-type="float">
            <text:p>0</text:p>
          </table:table-cell>
          <table:table-cell table:style-name="ce174" table:formula="of:=IFERROR(VLOOKUP([$Masterlist.$P102];[$Datasheet.$B$1:.$AV$9809];3;FALSE());&quot;-&quot;)" office:value-type="float" office:value="1" calcext:value-type="float">
            <text:p>1</text:p>
          </table:table-cell>
          <table:table-cell table:style-name="ce174" table:formula="of:=IFERROR(VLOOKUP([$Masterlist.$P102];[$Datasheet.$B$1:.$AV$9809];4;FALSE());&quot;-&quot;)" office:value-type="float" office:value="0" calcext:value-type="float">
            <text:p>0</text:p>
          </table:table-cell>
          <table:table-cell table:style-name="ce174" table:formula="of:=IFERROR(VLOOKUP([$Masterlist.$P102];[$Datasheet.$B$1:.$AV$9809];5;FALSE());&quot;-&quot;)" office:value-type="float" office:value="1" calcext:value-type="float">
            <text:p>1</text:p>
          </table:table-cell>
          <table:table-cell table:style-name="ce192" table:formula="of:=IFERROR(VLOOKUP([$Masterlist.$P102];[$Datasheet.$B$1:.$AV$9809];6;FALSE());&quot;-&quot;)" office:value-type="float" office:value="0" calcext:value-type="float">
            <text:p>0</text:p>
          </table:table-cell>
          <table:table-cell table:style-name="ce174" table:formula="of:=IFERROR(VLOOKUP([$Masterlist.$P102];[$Datasheet.$B$1:.$AV$9809];7;FALSE());&quot;-&quot;)" office:value-type="float" office:value="1" calcext:value-type="float">
            <text:p>1</text:p>
          </table:table-cell>
          <table:table-cell table:style-name="ce174" table:formula="of:=IFERROR(VLOOKUP([$Masterlist.$P102];[$Datasheet.$B$1:.$AV$9809];8;FALSE());&quot;-&quot;)" office:value-type="float" office:value="0" calcext:value-type="float">
            <text:p>0</text:p>
          </table:table-cell>
          <table:table-cell table:style-name="ce174" table:formula="of:=IFERROR(VLOOKUP([$Masterlist.$P102];[$Datasheet.$B$1:.$AV$9809];9;FALSE());&quot;-&quot;)" office:value-type="float" office:value="1" calcext:value-type="float">
            <text:p>1</text:p>
          </table:table-cell>
          <table:table-cell table:style-name="ce174" table:formula="of:=IFERROR(VLOOKUP([$Masterlist.$P102];[$Datasheet.$B$1:.$AV$9809];10;FALSE());&quot;-&quot;)" office:value-type="float" office:value="0" calcext:value-type="float">
            <text:p>0</text:p>
          </table:table-cell>
          <table:table-cell table:style-name="ce174" table:formula="of:=IFERROR(VLOOKUP([$Masterlist.$P102];[$Datasheet.$B$1:.$AV$9809];11;FALSE());&quot;-&quot;)" office:value-type="float" office:value="1" calcext:value-type="float">
            <text:p>1</text:p>
          </table:table-cell>
          <table:table-cell table:style-name="ce174" table:formula="of:=IFERROR(VLOOKUP([$Masterlist.$P102];[$Datasheet.$B$1:.$AV$9809];12;FALSE());&quot;-&quot;)" office:value-type="float" office:value="0" calcext:value-type="float">
            <text:p>0</text:p>
          </table:table-cell>
          <table:table-cell table:style-name="ce174" table:formula="of:=IFERROR(VLOOKUP([$Masterlist.$P102];[$Datasheet.$B$1:.$AV$9809];13;FALSE());&quot;-&quot;)" office:value-type="float" office:value="1" calcext:value-type="float">
            <text:p>1</text:p>
          </table:table-cell>
          <table:table-cell table:style-name="ce174" table:formula="of:=IFERROR(VLOOKUP([$Masterlist.$P102];[$Datasheet.$B$1:.$AV$9809];14;FALSE());&quot;-&quot;)" office:value-type="float" office:value="0" calcext:value-type="float">
            <text:p>0</text:p>
          </table:table-cell>
          <table:table-cell table:style-name="ce174" table:formula="of:=IFERROR(VLOOKUP([$Masterlist.$P102];[$Datasheet.$B$1:.$AV$9809];15;FALSE());&quot;-&quot;)" office:value-type="float" office:value="1" calcext:value-type="float">
            <text:p>1</text:p>
          </table:table-cell>
          <table:table-cell table:style-name="ce174" table:formula="of:=IFERROR(VLOOKUP([$Masterlist.$P102];[$Datasheet.$B$1:.$AV$9809];16;FALSE());&quot;-&quot;)" office:value-type="float" office:value="0" calcext:value-type="float">
            <text:p/>
          </table:table-cell>
          <table:table-cell table:style-name="ce174" table:formula="of:=IFERROR(VLOOKUP([$Masterlist.$P102];[$Datasheet.$B$1:.$AV$9809];17;FALSE());&quot;-&quot;)" office:value-type="float" office:value="0" calcext:value-type="float">
            <text:p/>
          </table:table-cell>
          <table:table-cell table:style-name="ce174" table:formula="of:=IFERROR(VLOOKUP([$Masterlist.$P102];[$Datasheet.$B$1:.$AV$9809];18;FALSE());&quot;-&quot;)" office:value-type="float" office:value="0" calcext:value-type="float">
            <text:p/>
          </table:table-cell>
          <table:table-cell table:style-name="ce245" table:formula="of:=IFERROR(VLOOKUP([$Masterlist.$P102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33" office:value-type="string" calcext:value-type="string">
            <text:p>L</text:p>
          </table:table-cell>
          <table:table-cell table:style-name="ce58" office:value-type="string" calcext:value-type="string">
            <text:p>Yes</text:p>
          </table:table-cell>
          <table:table-cell table:number-columns-repeated="2" table:style-name="ce49" office:value-type="string" calcext:value-type="string">
            <text:p>Yes</text:p>
          </table:table-cell>
          <table:table-cell table:style-name="ce50" table:number-columns-repeated="8"/>
          <table:table-cell table:style-name="ce84"/>
          <table:table-cell table:style-name="ce95" office:value-type="string" calcext:value-type="string">
            <text:p>Lighting Technician</text:p>
          </table:table-cell>
          <table:table-cell table:style-name="ce108" office:value-type="string" calcext:value-type="string">
            <text:p>Thanos Kanellopoulos</text:p>
          </table:table-cell>
          <table:table-cell table:style-name="ce121" table:formula="of:=IF(ISNUMBER(MATCH([.P103];[$Datasheet.$B$1:.$B$9809];0));&quot;✓&quot;;&quot;x&quot;)" office:value-type="string" office:string-value="✓" calcext:value-type="string">
            <text:p>✓</text:p>
          </table:table-cell>
          <table:table-cell table:style-name="ce143" table:formula="of:=IFERROR(VLOOKUP([$Masterlist.$P103];[$Datasheet.$B$1:.$AV$9809];2;FALSE());&quot;-&quot;)" office:value-type="float" office:value="1" calcext:value-type="float">
            <text:p>1</text:p>
          </table:table-cell>
          <table:table-cell table:style-name="ce174" table:formula="of:=IFERROR(VLOOKUP([$Masterlist.$P103];[$Datasheet.$B$1:.$AV$9809];3;FALSE());&quot;-&quot;)" office:value-type="float" office:value="1" calcext:value-type="float">
            <text:p>1</text:p>
          </table:table-cell>
          <table:table-cell table:style-name="ce174" table:formula="of:=IFERROR(VLOOKUP([$Masterlist.$P103];[$Datasheet.$B$1:.$AV$9809];4;FALSE());&quot;-&quot;)" office:value-type="float" office:value="0" calcext:value-type="float">
            <text:p>0</text:p>
          </table:table-cell>
          <table:table-cell table:style-name="ce174" table:formula="of:=IFERROR(VLOOKUP([$Masterlist.$P103];[$Datasheet.$B$1:.$AV$9809];5;FALSE());&quot;-&quot;)" office:value-type="float" office:value="1" calcext:value-type="float">
            <text:p>1</text:p>
          </table:table-cell>
          <table:table-cell table:style-name="ce192" table:formula="of:=IFERROR(VLOOKUP([$Masterlist.$P103];[$Datasheet.$B$1:.$AV$9809];6;FALSE());&quot;-&quot;)" office:value-type="float" office:value="0" calcext:value-type="float">
            <text:p>0</text:p>
          </table:table-cell>
          <table:table-cell table:style-name="ce174" table:formula="of:=IFERROR(VLOOKUP([$Masterlist.$P103];[$Datasheet.$B$1:.$AV$9809];7;FALSE());&quot;-&quot;)" office:value-type="float" office:value="0" calcext:value-type="float">
            <text:p>0</text:p>
          </table:table-cell>
          <table:table-cell table:style-name="ce174" table:formula="of:=IFERROR(VLOOKUP([$Masterlist.$P103];[$Datasheet.$B$1:.$AV$9809];8;FALSE());&quot;-&quot;)" office:value-type="float" office:value="1" calcext:value-type="float">
            <text:p>1</text:p>
          </table:table-cell>
          <table:table-cell table:style-name="ce174" table:formula="of:=IFERROR(VLOOKUP([$Masterlist.$P103];[$Datasheet.$B$1:.$AV$9809];9;FALSE());&quot;-&quot;)" office:value-type="float" office:value="1" calcext:value-type="float">
            <text:p>1</text:p>
          </table:table-cell>
          <table:table-cell table:style-name="ce174" table:formula="of:=IFERROR(VLOOKUP([$Masterlist.$P103];[$Datasheet.$B$1:.$AV$9809];10;FALSE());&quot;-&quot;)" office:value-type="float" office:value="0" calcext:value-type="float">
            <text:p>0</text:p>
          </table:table-cell>
          <table:table-cell table:style-name="ce174" table:formula="of:=IFERROR(VLOOKUP([$Masterlist.$P103];[$Datasheet.$B$1:.$AV$9809];11;FALSE());&quot;-&quot;)" office:value-type="float" office:value="0" calcext:value-type="float">
            <text:p>0</text:p>
          </table:table-cell>
          <table:table-cell table:style-name="ce174" table:formula="of:=IFERROR(VLOOKUP([$Masterlist.$P103];[$Datasheet.$B$1:.$AV$9809];12;FALSE());&quot;-&quot;)" office:value-type="float" office:value="1" calcext:value-type="float">
            <text:p>1</text:p>
          </table:table-cell>
          <table:table-cell table:style-name="ce174" table:formula="of:=IFERROR(VLOOKUP([$Masterlist.$P103];[$Datasheet.$B$1:.$AV$9809];13;FALSE());&quot;-&quot;)" office:value-type="float" office:value="0" calcext:value-type="float">
            <text:p>0</text:p>
          </table:table-cell>
          <table:table-cell table:style-name="ce174" table:formula="of:=IFERROR(VLOOKUP([$Masterlist.$P103];[$Datasheet.$B$1:.$AV$9809];14;FALSE());&quot;-&quot;)" office:value-type="float" office:value="1" calcext:value-type="float">
            <text:p>1</text:p>
          </table:table-cell>
          <table:table-cell table:style-name="ce174" table:formula="of:=IFERROR(VLOOKUP([$Masterlist.$P103];[$Datasheet.$B$1:.$AV$9809];15;FALSE());&quot;-&quot;)" office:value-type="float" office:value="1" calcext:value-type="float">
            <text:p>1</text:p>
          </table:table-cell>
          <table:table-cell table:style-name="ce174" table:formula="of:=IFERROR(VLOOKUP([$Masterlist.$P103];[$Datasheet.$B$1:.$AV$9809];16;FALSE());&quot;-&quot;)" office:value-type="float" office:value="0" calcext:value-type="float">
            <text:p/>
          </table:table-cell>
          <table:table-cell table:style-name="ce174" table:formula="of:=IFERROR(VLOOKUP([$Masterlist.$P103];[$Datasheet.$B$1:.$AV$9809];17;FALSE());&quot;-&quot;)" office:value-type="float" office:value="0" calcext:value-type="float">
            <text:p/>
          </table:table-cell>
          <table:table-cell table:style-name="ce174" table:formula="of:=IFERROR(VLOOKUP([$Masterlist.$P103];[$Datasheet.$B$1:.$AV$9809];18;FALSE());&quot;-&quot;)" office:value-type="float" office:value="0" calcext:value-type="float">
            <text:p/>
          </table:table-cell>
          <table:table-cell table:style-name="ce245" table:formula="of:=IFERROR(VLOOKUP([$Masterlist.$P103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33" office:value-type="string" calcext:value-type="string">
            <text:p>L</text:p>
          </table:table-cell>
          <table:table-cell table:style-name="ce58" office:value-type="string" calcext:value-type="string">
            <text:p>Yes</text:p>
          </table:table-cell>
          <table:table-cell table:number-columns-repeated="2" table:style-name="ce49" office:value-type="string" calcext:value-type="string">
            <text:p>Yes</text:p>
          </table:table-cell>
          <table:table-cell table:style-name="ce50" table:number-columns-repeated="8"/>
          <table:table-cell table:style-name="ce84"/>
          <table:table-cell table:style-name="ce95" office:value-type="string" calcext:value-type="string">
            <text:p>Lighting Technician</text:p>
          </table:table-cell>
          <table:table-cell table:style-name="ce108" office:value-type="string" calcext:value-type="string">
            <text:p>Tiaan Nel</text:p>
          </table:table-cell>
          <table:table-cell table:style-name="ce121" table:formula="of:=IF(ISNUMBER(MATCH([.P104];[$Datasheet.$B$1:.$B$9809];0));&quot;✓&quot;;&quot;x&quot;)" office:value-type="string" office:string-value="✓" calcext:value-type="string">
            <text:p>✓</text:p>
          </table:table-cell>
          <table:table-cell table:style-name="ce144" table:formula="of:=IFERROR(VLOOKUP([$Masterlist.$P104];[$Datasheet.$B$1:.$AV$9809];2;FALSE());&quot;-&quot;)" office:value-type="float" office:value="1" calcext:value-type="float">
            <text:p>1</text:p>
          </table:table-cell>
          <table:table-cell table:style-name="ce175" table:formula="of:=IFERROR(VLOOKUP([$Masterlist.$P104];[$Datasheet.$B$1:.$AV$9809];3;FALSE());&quot;-&quot;)" office:value-type="float" office:value="1" calcext:value-type="float">
            <text:p>1</text:p>
          </table:table-cell>
          <table:table-cell table:style-name="ce175" table:formula="of:=IFERROR(VLOOKUP([$Masterlist.$P104];[$Datasheet.$B$1:.$AV$9809];4;FALSE());&quot;-&quot;)" office:value-type="float" office:value="1" calcext:value-type="float">
            <text:p>1</text:p>
          </table:table-cell>
          <table:table-cell table:style-name="ce175" table:formula="of:=IFERROR(VLOOKUP([$Masterlist.$P104];[$Datasheet.$B$1:.$AV$9809];5;FALSE());&quot;-&quot;)" office:value-type="float" office:value="1" calcext:value-type="float">
            <text:p>1</text:p>
          </table:table-cell>
          <table:table-cell table:style-name="ce193" table:formula="of:=IFERROR(VLOOKUP([$Masterlist.$P104];[$Datasheet.$B$1:.$AV$9809];6;FALSE());&quot;-&quot;)" office:value-type="float" office:value="0" calcext:value-type="float">
            <text:p>0</text:p>
          </table:table-cell>
          <table:table-cell table:style-name="ce175" table:formula="of:=IFERROR(VLOOKUP([$Masterlist.$P104];[$Datasheet.$B$1:.$AV$9809];7;FALSE());&quot;-&quot;)" office:value-type="float" office:value="0" calcext:value-type="float">
            <text:p>0</text:p>
          </table:table-cell>
          <table:table-cell table:style-name="ce175" table:formula="of:=IFERROR(VLOOKUP([$Masterlist.$P104];[$Datasheet.$B$1:.$AV$9809];8;FALSE());&quot;-&quot;)" office:value-type="float" office:value="1" calcext:value-type="float">
            <text:p>1</text:p>
          </table:table-cell>
          <table:table-cell table:style-name="ce175" table:formula="of:=IFERROR(VLOOKUP([$Masterlist.$P104];[$Datasheet.$B$1:.$AV$9809];9;FALSE());&quot;-&quot;)" office:value-type="float" office:value="1" calcext:value-type="float">
            <text:p>1</text:p>
          </table:table-cell>
          <table:table-cell table:style-name="ce219" table:formula="of:=IFERROR(VLOOKUP([$Masterlist.$P104];[$Datasheet.$B$1:.$AV$9809];10;FALSE());&quot;-&quot;)" office:value-type="float" office:value="1" calcext:value-type="float">
            <text:p>1</text:p>
          </table:table-cell>
          <table:table-cell table:style-name="ce219" table:formula="of:=IFERROR(VLOOKUP([$Masterlist.$P104];[$Datasheet.$B$1:.$AV$9809];11;FALSE());&quot;-&quot;)" office:value-type="float" office:value="1" calcext:value-type="float">
            <text:p>1</text:p>
          </table:table-cell>
          <table:table-cell table:style-name="ce219" table:formula="of:=IFERROR(VLOOKUP([$Masterlist.$P104];[$Datasheet.$B$1:.$AV$9809];12;FALSE());&quot;-&quot;)" office:value-type="float" office:value="0" calcext:value-type="float">
            <text:p>0</text:p>
          </table:table-cell>
          <table:table-cell table:style-name="ce219" table:formula="of:=IFERROR(VLOOKUP([$Masterlist.$P104];[$Datasheet.$B$1:.$AV$9809];13;FALSE());&quot;-&quot;)" office:value-type="float" office:value="0" calcext:value-type="float">
            <text:p>0</text:p>
          </table:table-cell>
          <table:table-cell table:style-name="ce219" table:formula="of:=IFERROR(VLOOKUP([$Masterlist.$P104];[$Datasheet.$B$1:.$AV$9809];14;FALSE());&quot;-&quot;)" office:value-type="float" office:value="1" calcext:value-type="float">
            <text:p>1</text:p>
          </table:table-cell>
          <table:table-cell table:style-name="ce219" table:formula="of:=IFERROR(VLOOKUP([$Masterlist.$P104];[$Datasheet.$B$1:.$AV$9809];15;FALSE());&quot;-&quot;)" office:value-type="float" office:value="1" calcext:value-type="float">
            <text:p>1</text:p>
          </table:table-cell>
          <table:table-cell table:style-name="ce219" table:formula="of:=IFERROR(VLOOKUP([$Masterlist.$P104];[$Datasheet.$B$1:.$AV$9809];16;FALSE());&quot;-&quot;)" office:value-type="float" office:value="0" calcext:value-type="float">
            <text:p/>
          </table:table-cell>
          <table:table-cell table:style-name="ce219" table:formula="of:=IFERROR(VLOOKUP([$Masterlist.$P104];[$Datasheet.$B$1:.$AV$9809];17;FALSE());&quot;-&quot;)" office:value-type="float" office:value="0" calcext:value-type="float">
            <text:p/>
          </table:table-cell>
          <table:table-cell table:style-name="ce219" table:formula="of:=IFERROR(VLOOKUP([$Masterlist.$P104];[$Datasheet.$B$1:.$AV$9809];18;FALSE());&quot;-&quot;)" office:value-type="float" office:value="0" calcext:value-type="float">
            <text:p/>
          </table:table-cell>
          <table:table-cell table:style-name="ce246" table:formula="of:=IFERROR(VLOOKUP([$Masterlist.$P104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33" office:value-type="string" calcext:value-type="string">
            <text:p>L</text:p>
          </table:table-cell>
          <table:table-cell table:style-name="ce58" office:value-type="string" calcext:value-type="string">
            <text:p>Yes</text:p>
          </table:table-cell>
          <table:table-cell table:number-columns-repeated="2" table:style-name="ce49" office:value-type="string" calcext:value-type="string">
            <text:p>Yes</text:p>
          </table:table-cell>
          <table:table-cell table:style-name="ce50" office:value-type="string" calcext:value-type="string">
            <text:p>Yes</text:p>
          </table:table-cell>
          <table:table-cell table:style-name="ce50" table:number-columns-repeated="7"/>
          <table:table-cell table:style-name="ce84"/>
          <table:table-cell table:style-name="ce95" office:value-type="string" calcext:value-type="string">
            <text:p>Lighting Technician</text:p>
          </table:table-cell>
          <table:table-cell table:style-name="ce108" office:value-type="string" calcext:value-type="string">
            <text:p>Wiehan Delafield</text:p>
          </table:table-cell>
          <table:table-cell table:style-name="ce121" table:formula="of:=IF(ISNUMBER(MATCH([.P105];[$Datasheet.$B$1:.$B$9809];0));&quot;✓&quot;;&quot;x&quot;)" office:value-type="string" office:string-value="✓" calcext:value-type="string">
            <text:p>✓</text:p>
          </table:table-cell>
          <table:table-cell table:style-name="ce143" table:formula="of:=IFERROR(VLOOKUP([$Masterlist.$P105];[$Datasheet.$B$1:.$AV$9809];2;FALSE());&quot;-&quot;)" office:value-type="float" office:value="1" calcext:value-type="float">
            <text:p>1</text:p>
          </table:table-cell>
          <table:table-cell table:style-name="ce174" table:formula="of:=IFERROR(VLOOKUP([$Masterlist.$P105];[$Datasheet.$B$1:.$AV$9809];3;FALSE());&quot;-&quot;)" office:value-type="float" office:value="1" calcext:value-type="float">
            <text:p>1</text:p>
          </table:table-cell>
          <table:table-cell table:style-name="ce174" table:formula="of:=IFERROR(VLOOKUP([$Masterlist.$P105];[$Datasheet.$B$1:.$AV$9809];4;FALSE());&quot;-&quot;)" office:value-type="float" office:value="1" calcext:value-type="float">
            <text:p>1</text:p>
          </table:table-cell>
          <table:table-cell table:style-name="ce174" table:formula="of:=IFERROR(VLOOKUP([$Masterlist.$P105];[$Datasheet.$B$1:.$AV$9809];5;FALSE());&quot;-&quot;)" office:value-type="float" office:value="1" calcext:value-type="float">
            <text:p>1</text:p>
          </table:table-cell>
          <table:table-cell table:style-name="ce192" table:formula="of:=IFERROR(VLOOKUP([$Masterlist.$P105];[$Datasheet.$B$1:.$AV$9809];6;FALSE());&quot;-&quot;)" office:value-type="float" office:value="1" calcext:value-type="float">
            <text:p>1</text:p>
          </table:table-cell>
          <table:table-cell table:style-name="ce174" table:formula="of:=IFERROR(VLOOKUP([$Masterlist.$P105];[$Datasheet.$B$1:.$AV$9809];7;FALSE());&quot;-&quot;)" office:value-type="float" office:value="1" calcext:value-type="float">
            <text:p>1</text:p>
          </table:table-cell>
          <table:table-cell table:style-name="ce174" table:formula="of:=IFERROR(VLOOKUP([$Masterlist.$P105];[$Datasheet.$B$1:.$AV$9809];8;FALSE());&quot;-&quot;)" office:value-type="float" office:value="1" calcext:value-type="float">
            <text:p>1</text:p>
          </table:table-cell>
          <table:table-cell table:style-name="ce174" table:formula="of:=IFERROR(VLOOKUP([$Masterlist.$P105];[$Datasheet.$B$1:.$AV$9809];9;FALSE());&quot;-&quot;)" office:value-type="float" office:value="1" calcext:value-type="float">
            <text:p>1</text:p>
          </table:table-cell>
          <table:table-cell table:style-name="ce174" table:formula="of:=IFERROR(VLOOKUP([$Masterlist.$P105];[$Datasheet.$B$1:.$AV$9809];10;FALSE());&quot;-&quot;)" office:value-type="float" office:value="1" calcext:value-type="float">
            <text:p>1</text:p>
          </table:table-cell>
          <table:table-cell table:style-name="ce174" table:formula="of:=IFERROR(VLOOKUP([$Masterlist.$P105];[$Datasheet.$B$1:.$AV$9809];11;FALSE());&quot;-&quot;)" office:value-type="float" office:value="1" calcext:value-type="float">
            <text:p>1</text:p>
          </table:table-cell>
          <table:table-cell table:style-name="ce174" table:formula="of:=IFERROR(VLOOKUP([$Masterlist.$P105];[$Datasheet.$B$1:.$AV$9809];12;FALSE());&quot;-&quot;)" office:value-type="float" office:value="1" calcext:value-type="float">
            <text:p>1</text:p>
          </table:table-cell>
          <table:table-cell table:style-name="ce174" table:formula="of:=IFERROR(VLOOKUP([$Masterlist.$P105];[$Datasheet.$B$1:.$AV$9809];13;FALSE());&quot;-&quot;)" office:value-type="float" office:value="1" calcext:value-type="float">
            <text:p>1</text:p>
          </table:table-cell>
          <table:table-cell table:style-name="ce174" table:formula="of:=IFERROR(VLOOKUP([$Masterlist.$P105];[$Datasheet.$B$1:.$AV$9809];14;FALSE());&quot;-&quot;)" office:value-type="float" office:value="1" calcext:value-type="float">
            <text:p>1</text:p>
          </table:table-cell>
          <table:table-cell table:style-name="ce174" table:formula="of:=IFERROR(VLOOKUP([$Masterlist.$P105];[$Datasheet.$B$1:.$AV$9809];15;FALSE());&quot;-&quot;)" office:value-type="float" office:value="1" calcext:value-type="float">
            <text:p>1</text:p>
          </table:table-cell>
          <table:table-cell table:style-name="ce174" table:formula="of:=IFERROR(VLOOKUP([$Masterlist.$P105];[$Datasheet.$B$1:.$AV$9809];16;FALSE());&quot;-&quot;)" office:value-type="float" office:value="0" calcext:value-type="float">
            <text:p/>
          </table:table-cell>
          <table:table-cell table:style-name="ce174" table:formula="of:=IFERROR(VLOOKUP([$Masterlist.$P105];[$Datasheet.$B$1:.$AV$9809];17;FALSE());&quot;-&quot;)" office:value-type="float" office:value="0" calcext:value-type="float">
            <text:p/>
          </table:table-cell>
          <table:table-cell table:style-name="ce174" table:formula="of:=IFERROR(VLOOKUP([$Masterlist.$P105];[$Datasheet.$B$1:.$AV$9809];18;FALSE());&quot;-&quot;)" office:value-type="float" office:value="0" calcext:value-type="float">
            <text:p/>
          </table:table-cell>
          <table:table-cell table:style-name="ce245" table:formula="of:=IFERROR(VLOOKUP([$Masterlist.$P105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33" office:value-type="string" calcext:value-type="string">
            <text:p>A</text:p>
          </table:table-cell>
          <table:table-cell table:style-name="ce58" office:value-type="string" calcext:value-type="string">
            <text:p>Yes</text:p>
          </table:table-cell>
          <table:table-cell table:number-columns-repeated="2" table:style-name="ce49" office:value-type="string" calcext:value-type="string">
            <text:p>Yes</text:p>
          </table:table-cell>
          <table:table-cell table:style-name="ce50" table:number-columns-repeated="8"/>
          <table:table-cell table:style-name="ce84"/>
          <table:table-cell table:style-name="ce95" office:value-type="string" calcext:value-type="string">
            <text:p>Lighting Technician</text:p>
          </table:table-cell>
          <table:table-cell table:style-name="ce109" office:value-type="string" calcext:value-type="string">
            <text:p>Zelmi Du Toit</text:p>
          </table:table-cell>
          <table:table-cell table:style-name="ce121" table:formula="of:=IF(ISNUMBER(MATCH([.P106];[$Datasheet.$B$1:.$B$9809];0));&quot;✓&quot;;&quot;x&quot;)" office:value-type="string" office:string-value="✓" calcext:value-type="string">
            <text:p>✓</text:p>
          </table:table-cell>
          <table:table-cell table:style-name="ce143" table:formula="of:=IFERROR(VLOOKUP([$Masterlist.$P106];[$Datasheet.$B$1:.$AV$9809];2;FALSE());&quot;-&quot;)" office:value-type="float" office:value="1" calcext:value-type="float">
            <text:p>1</text:p>
          </table:table-cell>
          <table:table-cell table:style-name="ce174" table:formula="of:=IFERROR(VLOOKUP([$Masterlist.$P106];[$Datasheet.$B$1:.$AV$9809];3;FALSE());&quot;-&quot;)" office:value-type="float" office:value="1" calcext:value-type="float">
            <text:p>1</text:p>
          </table:table-cell>
          <table:table-cell table:style-name="ce174" table:formula="of:=IFERROR(VLOOKUP([$Masterlist.$P106];[$Datasheet.$B$1:.$AV$9809];4;FALSE());&quot;-&quot;)" office:value-type="float" office:value="1" calcext:value-type="float">
            <text:p>1</text:p>
          </table:table-cell>
          <table:table-cell table:style-name="ce174" table:formula="of:=IFERROR(VLOOKUP([$Masterlist.$P106];[$Datasheet.$B$1:.$AV$9809];5;FALSE());&quot;-&quot;)" office:value-type="float" office:value="1" calcext:value-type="float">
            <text:p>1</text:p>
          </table:table-cell>
          <table:table-cell table:style-name="ce192" table:formula="of:=IFERROR(VLOOKUP([$Masterlist.$P106];[$Datasheet.$B$1:.$AV$9809];6;FALSE());&quot;-&quot;)" office:value-type="float" office:value="0" calcext:value-type="float">
            <text:p>0</text:p>
          </table:table-cell>
          <table:table-cell table:style-name="ce174" table:formula="of:=IFERROR(VLOOKUP([$Masterlist.$P106];[$Datasheet.$B$1:.$AV$9809];7;FALSE());&quot;-&quot;)" office:value-type="float" office:value="0" calcext:value-type="float">
            <text:p>0</text:p>
          </table:table-cell>
          <table:table-cell table:style-name="ce174" table:formula="of:=IFERROR(VLOOKUP([$Masterlist.$P106];[$Datasheet.$B$1:.$AV$9809];8;FALSE());&quot;-&quot;)" office:value-type="float" office:value="0" calcext:value-type="float">
            <text:p>0</text:p>
          </table:table-cell>
          <table:table-cell table:style-name="ce174" table:formula="of:=IFERROR(VLOOKUP([$Masterlist.$P106];[$Datasheet.$B$1:.$AV$9809];9;FALSE());&quot;-&quot;)" office:value-type="float" office:value="1" calcext:value-type="float">
            <text:p>1</text:p>
          </table:table-cell>
          <table:table-cell table:style-name="ce174" table:formula="of:=IFERROR(VLOOKUP([$Masterlist.$P106];[$Datasheet.$B$1:.$AV$9809];10;FALSE());&quot;-&quot;)" office:value-type="float" office:value="1" calcext:value-type="float">
            <text:p>1</text:p>
          </table:table-cell>
          <table:table-cell table:style-name="ce174" table:formula="of:=IFERROR(VLOOKUP([$Masterlist.$P106];[$Datasheet.$B$1:.$AV$9809];11;FALSE());&quot;-&quot;)" office:value-type="float" office:value="1" calcext:value-type="float">
            <text:p>1</text:p>
          </table:table-cell>
          <table:table-cell table:style-name="ce174" table:formula="of:=IFERROR(VLOOKUP([$Masterlist.$P106];[$Datasheet.$B$1:.$AV$9809];12;FALSE());&quot;-&quot;)" office:value-type="float" office:value="0" calcext:value-type="float">
            <text:p>0</text:p>
          </table:table-cell>
          <table:table-cell table:style-name="ce174" table:formula="of:=IFERROR(VLOOKUP([$Masterlist.$P106];[$Datasheet.$B$1:.$AV$9809];13;FALSE());&quot;-&quot;)" office:value-type="float" office:value="1" calcext:value-type="float">
            <text:p>1</text:p>
          </table:table-cell>
          <table:table-cell table:style-name="ce174" table:formula="of:=IFERROR(VLOOKUP([$Masterlist.$P106];[$Datasheet.$B$1:.$AV$9809];14;FALSE());&quot;-&quot;)" office:value-type="float" office:value="0" calcext:value-type="float">
            <text:p>0</text:p>
          </table:table-cell>
          <table:table-cell table:style-name="ce174" table:formula="of:=IFERROR(VLOOKUP([$Masterlist.$P106];[$Datasheet.$B$1:.$AV$9809];15;FALSE());&quot;-&quot;)" office:value-type="float" office:value="0" calcext:value-type="float">
            <text:p>0</text:p>
          </table:table-cell>
          <table:table-cell table:style-name="ce174" table:formula="of:=IFERROR(VLOOKUP([$Masterlist.$P106];[$Datasheet.$B$1:.$AV$9809];16;FALSE());&quot;-&quot;)" office:value-type="float" office:value="0" calcext:value-type="float">
            <text:p/>
          </table:table-cell>
          <table:table-cell table:style-name="ce174" table:formula="of:=IFERROR(VLOOKUP([$Masterlist.$P106];[$Datasheet.$B$1:.$AV$9809];17;FALSE());&quot;-&quot;)" office:value-type="float" office:value="0" calcext:value-type="float">
            <text:p/>
          </table:table-cell>
          <table:table-cell table:style-name="ce174" table:formula="of:=IFERROR(VLOOKUP([$Masterlist.$P106];[$Datasheet.$B$1:.$AV$9809];18;FALSE());&quot;-&quot;)" office:value-type="float" office:value="0" calcext:value-type="float">
            <text:p/>
          </table:table-cell>
          <table:table-cell table:style-name="ce245" table:formula="of:=IFERROR(VLOOKUP([$Masterlist.$P106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33" office:value-type="string" calcext:value-type="string">
            <text:p>M</text:p>
          </table:table-cell>
          <table:table-cell table:style-name="ce59"/>
          <table:table-cell table:style-name="ce50" table:number-columns-repeated="3"/>
          <table:table-cell table:style-name="ce49" office:value-type="string" calcext:value-type="string">
            <text:p>Yes</text:p>
          </table:table-cell>
          <table:table-cell table:style-name="ce50" table:number-columns-repeated="6"/>
          <table:table-cell table:style-name="ce84"/>
          <table:table-cell table:style-name="ce95" office:value-type="string" calcext:value-type="string">
            <text:p>Lighting Technician</text:p>
          </table:table-cell>
          <table:table-cell table:style-name="ce107" office:value-type="string" calcext:value-type="string">
            <text:p>Casandri Klopper</text:p>
          </table:table-cell>
          <table:table-cell table:style-name="ce121" table:formula="of:=IF(ISNUMBER(MATCH([.P107];[$Datasheet.$B$1:.$B$9809];0));&quot;✓&quot;;&quot;x&quot;)" office:value-type="string" office:string-value="✓" calcext:value-type="string">
            <text:p>✓</text:p>
          </table:table-cell>
          <table:table-cell table:style-name="ce143" table:formula="of:=IFERROR(VLOOKUP([$Masterlist.$P107];[$Datasheet.$B$1:.$AV$9809];2;FALSE());&quot;-&quot;)" office:value-type="float" office:value="0" calcext:value-type="float">
            <text:p>0</text:p>
          </table:table-cell>
          <table:table-cell table:style-name="ce174" table:formula="of:=IFERROR(VLOOKUP([$Masterlist.$P107];[$Datasheet.$B$1:.$AV$9809];3;FALSE());&quot;-&quot;)" office:value-type="float" office:value="0" calcext:value-type="float">
            <text:p>0</text:p>
          </table:table-cell>
          <table:table-cell table:style-name="ce174" table:formula="of:=IFERROR(VLOOKUP([$Masterlist.$P107];[$Datasheet.$B$1:.$AV$9809];4;FALSE());&quot;-&quot;)" office:value-type="float" office:value="0" calcext:value-type="float">
            <text:p>0</text:p>
          </table:table-cell>
          <table:table-cell table:style-name="ce174" table:formula="of:=IFERROR(VLOOKUP([$Masterlist.$P107];[$Datasheet.$B$1:.$AV$9809];5;FALSE());&quot;-&quot;)" office:value-type="float" office:value="0" calcext:value-type="float">
            <text:p>0</text:p>
          </table:table-cell>
          <table:table-cell table:style-name="ce192" table:formula="of:=IFERROR(VLOOKUP([$Masterlist.$P107];[$Datasheet.$B$1:.$AV$9809];6;FALSE());&quot;-&quot;)" office:value-type="float" office:value="0" calcext:value-type="float">
            <text:p>0</text:p>
          </table:table-cell>
          <table:table-cell table:style-name="ce174" table:formula="of:=IFERROR(VLOOKUP([$Masterlist.$P107];[$Datasheet.$B$1:.$AV$9809];7;FALSE());&quot;-&quot;)" office:value-type="float" office:value="0" calcext:value-type="float">
            <text:p>0</text:p>
          </table:table-cell>
          <table:table-cell table:style-name="ce174" table:formula="of:=IFERROR(VLOOKUP([$Masterlist.$P107];[$Datasheet.$B$1:.$AV$9809];8;FALSE());&quot;-&quot;)" office:value-type="float" office:value="0" calcext:value-type="float">
            <text:p>0</text:p>
          </table:table-cell>
          <table:table-cell table:style-name="ce174" table:formula="of:=IFERROR(VLOOKUP([$Masterlist.$P107];[$Datasheet.$B$1:.$AV$9809];9;FALSE());&quot;-&quot;)" office:value-type="float" office:value="0" calcext:value-type="float">
            <text:p>0</text:p>
          </table:table-cell>
          <table:table-cell table:style-name="ce174" table:formula="of:=IFERROR(VLOOKUP([$Masterlist.$P107];[$Datasheet.$B$1:.$AV$9809];10;FALSE());&quot;-&quot;)" office:value-type="float" office:value="0" calcext:value-type="float">
            <text:p>0</text:p>
          </table:table-cell>
          <table:table-cell table:style-name="ce174" table:formula="of:=IFERROR(VLOOKUP([$Masterlist.$P107];[$Datasheet.$B$1:.$AV$9809];11;FALSE());&quot;-&quot;)" office:value-type="float" office:value="0" calcext:value-type="float">
            <text:p>0</text:p>
          </table:table-cell>
          <table:table-cell table:style-name="ce174" table:formula="of:=IFERROR(VLOOKUP([$Masterlist.$P107];[$Datasheet.$B$1:.$AV$9809];12;FALSE());&quot;-&quot;)" office:value-type="float" office:value="1" calcext:value-type="float">
            <text:p>1</text:p>
          </table:table-cell>
          <table:table-cell table:style-name="ce174" table:formula="of:=IFERROR(VLOOKUP([$Masterlist.$P107];[$Datasheet.$B$1:.$AV$9809];13;FALSE());&quot;-&quot;)" office:value-type="float" office:value="1" calcext:value-type="float">
            <text:p>1</text:p>
          </table:table-cell>
          <table:table-cell table:style-name="ce174" table:formula="of:=IFERROR(VLOOKUP([$Masterlist.$P107];[$Datasheet.$B$1:.$AV$9809];14;FALSE());&quot;-&quot;)" office:value-type="float" office:value="1" calcext:value-type="float">
            <text:p>1</text:p>
          </table:table-cell>
          <table:table-cell table:style-name="ce174" table:formula="of:=IFERROR(VLOOKUP([$Masterlist.$P107];[$Datasheet.$B$1:.$AV$9809];15;FALSE());&quot;-&quot;)" office:value-type="float" office:value="1" calcext:value-type="float">
            <text:p>1</text:p>
          </table:table-cell>
          <table:table-cell table:style-name="ce174" table:formula="of:=IFERROR(VLOOKUP([$Masterlist.$P107];[$Datasheet.$B$1:.$AV$9809];16;FALSE());&quot;-&quot;)" office:value-type="float" office:value="0" calcext:value-type="float">
            <text:p/>
          </table:table-cell>
          <table:table-cell table:style-name="ce174" table:formula="of:=IFERROR(VLOOKUP([$Masterlist.$P107];[$Datasheet.$B$1:.$AV$9809];17;FALSE());&quot;-&quot;)" office:value-type="float" office:value="0" calcext:value-type="float">
            <text:p/>
          </table:table-cell>
          <table:table-cell table:style-name="ce174" table:formula="of:=IFERROR(VLOOKUP([$Masterlist.$P107];[$Datasheet.$B$1:.$AV$9809];18;FALSE());&quot;-&quot;)" office:value-type="float" office:value="0" calcext:value-type="float">
            <text:p/>
          </table:table-cell>
          <table:table-cell table:style-name="ce245" table:formula="of:=IFERROR(VLOOKUP([$Masterlist.$P107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33" office:value-type="string" calcext:value-type="string">
            <text:p>A</text:p>
          </table:table-cell>
          <table:table-cell table:style-name="ce59"/>
          <table:table-cell table:style-name="ce50" table:number-columns-repeated="3"/>
          <table:table-cell table:style-name="ce49" office:value-type="string" calcext:value-type="string">
            <text:p>Yes</text:p>
          </table:table-cell>
          <table:table-cell table:style-name="ce50" table:number-columns-repeated="6"/>
          <table:table-cell table:style-name="ce84"/>
          <table:table-cell table:style-name="ce95" office:value-type="string" calcext:value-type="string">
            <text:p>Lighting Technician</text:p>
          </table:table-cell>
          <table:table-cell table:style-name="ce108" office:value-type="string" calcext:value-type="string">
            <text:p>Chris Myburgh</text:p>
          </table:table-cell>
          <table:table-cell table:style-name="ce121" table:formula="of:=IF(ISNUMBER(MATCH([.P108];[$Datasheet.$B$1:.$B$9809];0));&quot;✓&quot;;&quot;x&quot;)" office:value-type="string" office:string-value="✓" calcext:value-type="string">
            <text:p>✓</text:p>
          </table:table-cell>
          <table:table-cell table:style-name="ce143" table:formula="of:=IFERROR(VLOOKUP([$Masterlist.$P108];[$Datasheet.$B$1:.$AV$9809];2;FALSE());&quot;-&quot;)" office:value-type="float" office:value="1" calcext:value-type="float">
            <text:p>1</text:p>
          </table:table-cell>
          <table:table-cell table:style-name="ce174" table:formula="of:=IFERROR(VLOOKUP([$Masterlist.$P108];[$Datasheet.$B$1:.$AV$9809];3;FALSE());&quot;-&quot;)" office:value-type="float" office:value="1" calcext:value-type="float">
            <text:p>1</text:p>
          </table:table-cell>
          <table:table-cell table:style-name="ce174" table:formula="of:=IFERROR(VLOOKUP([$Masterlist.$P108];[$Datasheet.$B$1:.$AV$9809];4;FALSE());&quot;-&quot;)" office:value-type="float" office:value="1" calcext:value-type="float">
            <text:p>1</text:p>
          </table:table-cell>
          <table:table-cell table:style-name="ce174" table:formula="of:=IFERROR(VLOOKUP([$Masterlist.$P108];[$Datasheet.$B$1:.$AV$9809];5;FALSE());&quot;-&quot;)" office:value-type="float" office:value="1" calcext:value-type="float">
            <text:p>1</text:p>
          </table:table-cell>
          <table:table-cell table:style-name="ce192" table:formula="of:=IFERROR(VLOOKUP([$Masterlist.$P108];[$Datasheet.$B$1:.$AV$9809];6;FALSE());&quot;-&quot;)" office:value-type="float" office:value="0" calcext:value-type="float">
            <text:p>0</text:p>
          </table:table-cell>
          <table:table-cell table:style-name="ce174" table:formula="of:=IFERROR(VLOOKUP([$Masterlist.$P108];[$Datasheet.$B$1:.$AV$9809];7;FALSE());&quot;-&quot;)" office:value-type="float" office:value="0" calcext:value-type="float">
            <text:p>0</text:p>
          </table:table-cell>
          <table:table-cell table:style-name="ce174" table:formula="of:=IFERROR(VLOOKUP([$Masterlist.$P108];[$Datasheet.$B$1:.$AV$9809];8;FALSE());&quot;-&quot;)" office:value-type="float" office:value="0" calcext:value-type="float">
            <text:p>0</text:p>
          </table:table-cell>
          <table:table-cell table:style-name="ce174" table:formula="of:=IFERROR(VLOOKUP([$Masterlist.$P108];[$Datasheet.$B$1:.$AV$9809];9;FALSE());&quot;-&quot;)" office:value-type="float" office:value="0" calcext:value-type="float">
            <text:p>0</text:p>
          </table:table-cell>
          <table:table-cell table:style-name="ce174" table:formula="of:=IFERROR(VLOOKUP([$Masterlist.$P108];[$Datasheet.$B$1:.$AV$9809];10;FALSE());&quot;-&quot;)" office:value-type="float" office:value="0" calcext:value-type="float">
            <text:p>0</text:p>
          </table:table-cell>
          <table:table-cell table:style-name="ce174" table:formula="of:=IFERROR(VLOOKUP([$Masterlist.$P108];[$Datasheet.$B$1:.$AV$9809];11;FALSE());&quot;-&quot;)" office:value-type="float" office:value="0" calcext:value-type="float">
            <text:p>0</text:p>
          </table:table-cell>
          <table:table-cell table:style-name="ce174" table:formula="of:=IFERROR(VLOOKUP([$Masterlist.$P108];[$Datasheet.$B$1:.$AV$9809];12;FALSE());&quot;-&quot;)" office:value-type="float" office:value="0" calcext:value-type="float">
            <text:p>0</text:p>
          </table:table-cell>
          <table:table-cell table:style-name="ce174" table:formula="of:=IFERROR(VLOOKUP([$Masterlist.$P108];[$Datasheet.$B$1:.$AV$9809];13;FALSE());&quot;-&quot;)" office:value-type="float" office:value="0" calcext:value-type="float">
            <text:p>0</text:p>
          </table:table-cell>
          <table:table-cell table:style-name="ce174" table:formula="of:=IFERROR(VLOOKUP([$Masterlist.$P108];[$Datasheet.$B$1:.$AV$9809];14;FALSE());&quot;-&quot;)" office:value-type="float" office:value="0" calcext:value-type="float">
            <text:p>0</text:p>
          </table:table-cell>
          <table:table-cell table:style-name="ce174" table:formula="of:=IFERROR(VLOOKUP([$Masterlist.$P108];[$Datasheet.$B$1:.$AV$9809];15;FALSE());&quot;-&quot;)" office:value-type="float" office:value="0" calcext:value-type="float">
            <text:p>0</text:p>
          </table:table-cell>
          <table:table-cell table:style-name="ce174" table:formula="of:=IFERROR(VLOOKUP([$Masterlist.$P108];[$Datasheet.$B$1:.$AV$9809];16;FALSE());&quot;-&quot;)" office:value-type="float" office:value="0" calcext:value-type="float">
            <text:p/>
          </table:table-cell>
          <table:table-cell table:style-name="ce174" table:formula="of:=IFERROR(VLOOKUP([$Masterlist.$P108];[$Datasheet.$B$1:.$AV$9809];17;FALSE());&quot;-&quot;)" office:value-type="float" office:value="0" calcext:value-type="float">
            <text:p/>
          </table:table-cell>
          <table:table-cell table:style-name="ce174" table:formula="of:=IFERROR(VLOOKUP([$Masterlist.$P108];[$Datasheet.$B$1:.$AV$9809];18;FALSE());&quot;-&quot;)" office:value-type="float" office:value="0" calcext:value-type="float">
            <text:p/>
          </table:table-cell>
          <table:table-cell table:style-name="ce245" table:formula="of:=IFERROR(VLOOKUP([$Masterlist.$P108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33" office:value-type="string" calcext:value-type="string">
            <text:p>L</text:p>
          </table:table-cell>
          <table:table-cell table:style-name="ce59"/>
          <table:table-cell table:style-name="ce50" table:number-columns-repeated="3"/>
          <table:table-cell table:style-name="ce50" office:value-type="string" calcext:value-type="string">
            <text:p>Yes</text:p>
          </table:table-cell>
          <table:table-cell table:style-name="ce50" table:number-columns-repeated="2"/>
          <table:table-cell table:style-name="ce51" table:number-columns-repeated="4"/>
          <table:table-cell table:style-name="ce85"/>
          <table:table-cell table:style-name="ce95" office:value-type="string" calcext:value-type="string">
            <text:p>Lighting Technician</text:p>
          </table:table-cell>
          <table:table-cell table:style-name="ce110" office:value-type="string" calcext:value-type="string">
            <text:p>Dieune Mostert</text:p>
          </table:table-cell>
          <table:table-cell table:style-name="ce121" table:formula="of:=IF(ISNUMBER(MATCH([.P109];[$Datasheet.$B$1:.$B$9809];0));&quot;✓&quot;;&quot;x&quot;)" office:value-type="string" office:string-value="✓" calcext:value-type="string">
            <text:p>✓</text:p>
          </table:table-cell>
          <table:table-cell table:style-name="ce142" table:formula="of:=IFERROR(VLOOKUP([$Masterlist.$P109];[$Datasheet.$B$1:.$AV$9809];2;FALSE());&quot;-&quot;)" office:value-type="float" office:value="0" calcext:value-type="float">
            <text:p>0</text:p>
          </table:table-cell>
          <table:table-cell table:style-name="ce168" table:formula="of:=IFERROR(VLOOKUP([$Masterlist.$P109];[$Datasheet.$B$1:.$AV$9809];3;FALSE());&quot;-&quot;)" office:value-type="float" office:value="0" calcext:value-type="float">
            <text:p>0</text:p>
          </table:table-cell>
          <table:table-cell table:style-name="ce168" table:formula="of:=IFERROR(VLOOKUP([$Masterlist.$P109];[$Datasheet.$B$1:.$AV$9809];4;FALSE());&quot;-&quot;)" office:value-type="float" office:value="1" calcext:value-type="float">
            <text:p>1</text:p>
          </table:table-cell>
          <table:table-cell table:style-name="ce168" table:formula="of:=IFERROR(VLOOKUP([$Masterlist.$P109];[$Datasheet.$B$1:.$AV$9809];5;FALSE());&quot;-&quot;)" office:value-type="float" office:value="1" calcext:value-type="float">
            <text:p>1</text:p>
          </table:table-cell>
          <table:table-cell table:style-name="ce191" table:formula="of:=IFERROR(VLOOKUP([$Masterlist.$P109];[$Datasheet.$B$1:.$AV$9809];6;FALSE());&quot;-&quot;)" office:value-type="float" office:value="1" calcext:value-type="float">
            <text:p>1</text:p>
          </table:table-cell>
          <table:table-cell table:style-name="ce168" table:formula="of:=IFERROR(VLOOKUP([$Masterlist.$P109];[$Datasheet.$B$1:.$AV$9809];7;FALSE());&quot;-&quot;)" office:value-type="float" office:value="1" calcext:value-type="float">
            <text:p>1</text:p>
          </table:table-cell>
          <table:table-cell table:style-name="ce168" table:formula="of:=IFERROR(VLOOKUP([$Masterlist.$P109];[$Datasheet.$B$1:.$AV$9809];8;FALSE());&quot;-&quot;)" office:value-type="float" office:value="0" calcext:value-type="float">
            <text:p>0</text:p>
          </table:table-cell>
          <table:table-cell table:style-name="ce168" table:formula="of:=IFERROR(VLOOKUP([$Masterlist.$P109];[$Datasheet.$B$1:.$AV$9809];9;FALSE());&quot;-&quot;)" office:value-type="float" office:value="0" calcext:value-type="float">
            <text:p>0</text:p>
          </table:table-cell>
          <table:table-cell table:style-name="ce168" table:formula="of:=IFERROR(VLOOKUP([$Masterlist.$P109];[$Datasheet.$B$1:.$AV$9809];10;FALSE());&quot;-&quot;)" office:value-type="float" office:value="1" calcext:value-type="float">
            <text:p>1</text:p>
          </table:table-cell>
          <table:table-cell table:style-name="ce168" table:formula="of:=IFERROR(VLOOKUP([$Masterlist.$P109];[$Datasheet.$B$1:.$AV$9809];11;FALSE());&quot;-&quot;)" office:value-type="float" office:value="1" calcext:value-type="float">
            <text:p>1</text:p>
          </table:table-cell>
          <table:table-cell table:style-name="ce168" table:formula="of:=IFERROR(VLOOKUP([$Masterlist.$P109];[$Datasheet.$B$1:.$AV$9809];12;FALSE());&quot;-&quot;)" office:value-type="float" office:value="1" calcext:value-type="float">
            <text:p>1</text:p>
          </table:table-cell>
          <table:table-cell table:style-name="ce168" table:formula="of:=IFERROR(VLOOKUP([$Masterlist.$P109];[$Datasheet.$B$1:.$AV$9809];13;FALSE());&quot;-&quot;)" office:value-type="float" office:value="1" calcext:value-type="float">
            <text:p>1</text:p>
          </table:table-cell>
          <table:table-cell table:style-name="ce168" table:formula="of:=IFERROR(VLOOKUP([$Masterlist.$P109];[$Datasheet.$B$1:.$AV$9809];14;FALSE());&quot;-&quot;)" office:value-type="float" office:value="1" calcext:value-type="float">
            <text:p>1</text:p>
          </table:table-cell>
          <table:table-cell table:style-name="ce168" table:formula="of:=IFERROR(VLOOKUP([$Masterlist.$P109];[$Datasheet.$B$1:.$AV$9809];15;FALSE());&quot;-&quot;)" office:value-type="float" office:value="1" calcext:value-type="float">
            <text:p>1</text:p>
          </table:table-cell>
          <table:table-cell table:style-name="ce168" table:formula="of:=IFERROR(VLOOKUP([$Masterlist.$P109];[$Datasheet.$B$1:.$AV$9809];16;FALSE());&quot;-&quot;)" office:value-type="float" office:value="0" calcext:value-type="float">
            <text:p/>
          </table:table-cell>
          <table:table-cell table:style-name="ce168" table:formula="of:=IFERROR(VLOOKUP([$Masterlist.$P109];[$Datasheet.$B$1:.$AV$9809];17;FALSE());&quot;-&quot;)" office:value-type="float" office:value="0" calcext:value-type="float">
            <text:p/>
          </table:table-cell>
          <table:table-cell table:style-name="ce168" table:formula="of:=IFERROR(VLOOKUP([$Masterlist.$P109];[$Datasheet.$B$1:.$AV$9809];18;FALSE());&quot;-&quot;)" office:value-type="float" office:value="0" calcext:value-type="float">
            <text:p/>
          </table:table-cell>
          <table:table-cell table:style-name="ce244" table:formula="of:=IFERROR(VLOOKUP([$Masterlist.$P109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33" office:value-type="string" calcext:value-type="string">
            <text:p>L</text:p>
          </table:table-cell>
          <table:table-cell table:style-name="ce58"/>
          <table:table-cell table:style-name="ce49" table:number-columns-repeated="3"/>
          <table:table-cell table:style-name="ce50" office:value-type="string" calcext:value-type="string">
            <text:p>Yes</text:p>
          </table:table-cell>
          <table:table-cell table:style-name="ce50" table:number-columns-repeated="6"/>
          <table:table-cell table:style-name="ce84"/>
          <table:table-cell table:style-name="ce95" office:value-type="string" calcext:value-type="string">
            <text:p>Lighting Technician</text:p>
          </table:table-cell>
          <table:table-cell table:style-name="ce108" office:value-type="string" calcext:value-type="string">
            <text:p>Francois Pieterse</text:p>
          </table:table-cell>
          <table:table-cell table:style-name="ce121" table:formula="of:=IF(ISNUMBER(MATCH([.P110];[$Datasheet.$B$1:.$B$9809];0));&quot;✓&quot;;&quot;x&quot;)" office:value-type="string" office:string-value="✓" calcext:value-type="string">
            <text:p>✓</text:p>
          </table:table-cell>
          <table:table-cell table:style-name="ce142" table:formula="of:=IFERROR(VLOOKUP([$Masterlist.$P110];[$Datasheet.$B$1:.$AV$9809];2;FALSE());&quot;-&quot;)" office:value-type="float" office:value="0" calcext:value-type="float">
            <text:p>0</text:p>
          </table:table-cell>
          <table:table-cell table:style-name="ce168" table:formula="of:=IFERROR(VLOOKUP([$Masterlist.$P110];[$Datasheet.$B$1:.$AV$9809];3;FALSE());&quot;-&quot;)" office:value-type="float" office:value="0" calcext:value-type="float">
            <text:p>0</text:p>
          </table:table-cell>
          <table:table-cell table:style-name="ce168" table:formula="of:=IFERROR(VLOOKUP([$Masterlist.$P110];[$Datasheet.$B$1:.$AV$9809];4;FALSE());&quot;-&quot;)" office:value-type="float" office:value="1" calcext:value-type="float">
            <text:p>1</text:p>
          </table:table-cell>
          <table:table-cell table:style-name="ce168" table:formula="of:=IFERROR(VLOOKUP([$Masterlist.$P110];[$Datasheet.$B$1:.$AV$9809];5;FALSE());&quot;-&quot;)" office:value-type="float" office:value="1" calcext:value-type="float">
            <text:p>1</text:p>
          </table:table-cell>
          <table:table-cell table:style-name="ce191" table:formula="of:=IFERROR(VLOOKUP([$Masterlist.$P110];[$Datasheet.$B$1:.$AV$9809];6;FALSE());&quot;-&quot;)" office:value-type="float" office:value="1" calcext:value-type="float">
            <text:p>1</text:p>
          </table:table-cell>
          <table:table-cell table:style-name="ce168" table:formula="of:=IFERROR(VLOOKUP([$Masterlist.$P110];[$Datasheet.$B$1:.$AV$9809];7;FALSE());&quot;-&quot;)" office:value-type="float" office:value="1" calcext:value-type="float">
            <text:p>1</text:p>
          </table:table-cell>
          <table:table-cell table:style-name="ce168" table:formula="of:=IFERROR(VLOOKUP([$Masterlist.$P110];[$Datasheet.$B$1:.$AV$9809];8;FALSE());&quot;-&quot;)" office:value-type="float" office:value="1" calcext:value-type="float">
            <text:p>1</text:p>
          </table:table-cell>
          <table:table-cell table:style-name="ce168" table:formula="of:=IFERROR(VLOOKUP([$Masterlist.$P110];[$Datasheet.$B$1:.$AV$9809];9;FALSE());&quot;-&quot;)" office:value-type="float" office:value="1" calcext:value-type="float">
            <text:p>1</text:p>
          </table:table-cell>
          <table:table-cell table:style-name="ce168" table:formula="of:=IFERROR(VLOOKUP([$Masterlist.$P110];[$Datasheet.$B$1:.$AV$9809];10;FALSE());&quot;-&quot;)" office:value-type="float" office:value="1" calcext:value-type="float">
            <text:p>1</text:p>
          </table:table-cell>
          <table:table-cell table:style-name="ce168" table:formula="of:=IFERROR(VLOOKUP([$Masterlist.$P110];[$Datasheet.$B$1:.$AV$9809];11;FALSE());&quot;-&quot;)" office:value-type="float" office:value="1" calcext:value-type="float">
            <text:p>1</text:p>
          </table:table-cell>
          <table:table-cell table:style-name="ce168" table:formula="of:=IFERROR(VLOOKUP([$Masterlist.$P110];[$Datasheet.$B$1:.$AV$9809];12;FALSE());&quot;-&quot;)" office:value-type="float" office:value="1" calcext:value-type="float">
            <text:p>1</text:p>
          </table:table-cell>
          <table:table-cell table:style-name="ce168" table:formula="of:=IFERROR(VLOOKUP([$Masterlist.$P110];[$Datasheet.$B$1:.$AV$9809];13;FALSE());&quot;-&quot;)" office:value-type="float" office:value="1" calcext:value-type="float">
            <text:p>1</text:p>
          </table:table-cell>
          <table:table-cell table:style-name="ce168" table:formula="of:=IFERROR(VLOOKUP([$Masterlist.$P110];[$Datasheet.$B$1:.$AV$9809];14;FALSE());&quot;-&quot;)" office:value-type="float" office:value="1" calcext:value-type="float">
            <text:p>1</text:p>
          </table:table-cell>
          <table:table-cell table:style-name="ce168" table:formula="of:=IFERROR(VLOOKUP([$Masterlist.$P110];[$Datasheet.$B$1:.$AV$9809];15;FALSE());&quot;-&quot;)" office:value-type="float" office:value="1" calcext:value-type="float">
            <text:p>1</text:p>
          </table:table-cell>
          <table:table-cell table:style-name="ce168" table:formula="of:=IFERROR(VLOOKUP([$Masterlist.$P110];[$Datasheet.$B$1:.$AV$9809];16;FALSE());&quot;-&quot;)" office:value-type="float" office:value="0" calcext:value-type="float">
            <text:p/>
          </table:table-cell>
          <table:table-cell table:style-name="ce168" table:formula="of:=IFERROR(VLOOKUP([$Masterlist.$P110];[$Datasheet.$B$1:.$AV$9809];17;FALSE());&quot;-&quot;)" office:value-type="float" office:value="0" calcext:value-type="float">
            <text:p/>
          </table:table-cell>
          <table:table-cell table:style-name="ce168" table:formula="of:=IFERROR(VLOOKUP([$Masterlist.$P110];[$Datasheet.$B$1:.$AV$9809];18;FALSE());&quot;-&quot;)" office:value-type="float" office:value="0" calcext:value-type="float">
            <text:p/>
          </table:table-cell>
          <table:table-cell table:style-name="ce244" table:formula="of:=IFERROR(VLOOKUP([$Masterlist.$P110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35" office:value-type="string" calcext:value-type="string">
            <text:p>L</text:p>
          </table:table-cell>
          <table:table-cell table:style-name="ce60"/>
          <table:table-cell table:style-name="ce51" table:number-columns-repeated="3"/>
          <table:table-cell table:style-name="ce49" office:value-type="string" calcext:value-type="string">
            <text:p>Yes</text:p>
          </table:table-cell>
          <table:table-cell table:style-name="ce51" table:number-columns-repeated="6"/>
          <table:table-cell table:style-name="ce85"/>
          <table:table-cell table:style-name="ce95" office:value-type="string" calcext:value-type="string">
            <text:p>Lighting Technician</text:p>
          </table:table-cell>
          <table:table-cell table:style-name="ce110" office:value-type="string" calcext:value-type="string">
            <text:p>Philip Lerm</text:p>
          </table:table-cell>
          <table:table-cell table:style-name="ce121" table:formula="of:=IF(ISNUMBER(MATCH([.P111];[$Datasheet.$B$1:.$B$9809];0));&quot;✓&quot;;&quot;x&quot;)" office:value-type="string" office:string-value="✓" calcext:value-type="string">
            <text:p>✓</text:p>
          </table:table-cell>
          <table:table-cell table:style-name="ce142" table:formula="of:=IFERROR(VLOOKUP([$Masterlist.$P111];[$Datasheet.$B$1:.$AV$9809];2;FALSE());&quot;-&quot;)" office:value-type="float" office:value="0" calcext:value-type="float">
            <text:p>0</text:p>
          </table:table-cell>
          <table:table-cell table:style-name="ce168" table:formula="of:=IFERROR(VLOOKUP([$Masterlist.$P111];[$Datasheet.$B$1:.$AV$9809];3;FALSE());&quot;-&quot;)" office:value-type="float" office:value="0" calcext:value-type="float">
            <text:p>0</text:p>
          </table:table-cell>
          <table:table-cell table:style-name="ce168" table:formula="of:=IFERROR(VLOOKUP([$Masterlist.$P111];[$Datasheet.$B$1:.$AV$9809];4;FALSE());&quot;-&quot;)" office:value-type="float" office:value="1" calcext:value-type="float">
            <text:p>1</text:p>
          </table:table-cell>
          <table:table-cell table:style-name="ce168" table:formula="of:=IFERROR(VLOOKUP([$Masterlist.$P111];[$Datasheet.$B$1:.$AV$9809];5;FALSE());&quot;-&quot;)" office:value-type="float" office:value="0" calcext:value-type="float">
            <text:p>0</text:p>
          </table:table-cell>
          <table:table-cell table:style-name="ce191" table:formula="of:=IFERROR(VLOOKUP([$Masterlist.$P111];[$Datasheet.$B$1:.$AV$9809];6;FALSE());&quot;-&quot;)" office:value-type="float" office:value="1" calcext:value-type="float">
            <text:p>1</text:p>
          </table:table-cell>
          <table:table-cell table:style-name="ce168" table:formula="of:=IFERROR(VLOOKUP([$Masterlist.$P111];[$Datasheet.$B$1:.$AV$9809];7;FALSE());&quot;-&quot;)" office:value-type="float" office:value="1" calcext:value-type="float">
            <text:p>1</text:p>
          </table:table-cell>
          <table:table-cell table:style-name="ce168" table:formula="of:=IFERROR(VLOOKUP([$Masterlist.$P111];[$Datasheet.$B$1:.$AV$9809];8;FALSE());&quot;-&quot;)" office:value-type="float" office:value="1" calcext:value-type="float">
            <text:p>1</text:p>
          </table:table-cell>
          <table:table-cell table:style-name="ce168" table:formula="of:=IFERROR(VLOOKUP([$Masterlist.$P111];[$Datasheet.$B$1:.$AV$9809];9;FALSE());&quot;-&quot;)" office:value-type="float" office:value="1" calcext:value-type="float">
            <text:p>1</text:p>
          </table:table-cell>
          <table:table-cell table:style-name="ce168" table:formula="of:=IFERROR(VLOOKUP([$Masterlist.$P111];[$Datasheet.$B$1:.$AV$9809];10;FALSE());&quot;-&quot;)" office:value-type="float" office:value="1" calcext:value-type="float">
            <text:p>1</text:p>
          </table:table-cell>
          <table:table-cell table:style-name="ce168" table:formula="of:=IFERROR(VLOOKUP([$Masterlist.$P111];[$Datasheet.$B$1:.$AV$9809];11;FALSE());&quot;-&quot;)" office:value-type="float" office:value="1" calcext:value-type="float">
            <text:p>1</text:p>
          </table:table-cell>
          <table:table-cell table:style-name="ce168" table:formula="of:=IFERROR(VLOOKUP([$Masterlist.$P111];[$Datasheet.$B$1:.$AV$9809];12;FALSE());&quot;-&quot;)" office:value-type="float" office:value="0" calcext:value-type="float">
            <text:p>0</text:p>
          </table:table-cell>
          <table:table-cell table:style-name="ce168" table:formula="of:=IFERROR(VLOOKUP([$Masterlist.$P111];[$Datasheet.$B$1:.$AV$9809];13;FALSE());&quot;-&quot;)" office:value-type="float" office:value="0" calcext:value-type="float">
            <text:p>0</text:p>
          </table:table-cell>
          <table:table-cell table:style-name="ce168" table:formula="of:=IFERROR(VLOOKUP([$Masterlist.$P111];[$Datasheet.$B$1:.$AV$9809];14;FALSE());&quot;-&quot;)" office:value-type="float" office:value="0" calcext:value-type="float">
            <text:p>0</text:p>
          </table:table-cell>
          <table:table-cell table:style-name="ce168" table:formula="of:=IFERROR(VLOOKUP([$Masterlist.$P111];[$Datasheet.$B$1:.$AV$9809];15;FALSE());&quot;-&quot;)" office:value-type="float" office:value="0" calcext:value-type="float">
            <text:p>0</text:p>
          </table:table-cell>
          <table:table-cell table:style-name="ce168" table:formula="of:=IFERROR(VLOOKUP([$Masterlist.$P111];[$Datasheet.$B$1:.$AV$9809];16;FALSE());&quot;-&quot;)" office:value-type="float" office:value="0" calcext:value-type="float">
            <text:p/>
          </table:table-cell>
          <table:table-cell table:style-name="ce168" table:formula="of:=IFERROR(VLOOKUP([$Masterlist.$P111];[$Datasheet.$B$1:.$AV$9809];17;FALSE());&quot;-&quot;)" office:value-type="float" office:value="0" calcext:value-type="float">
            <text:p/>
          </table:table-cell>
          <table:table-cell table:style-name="ce168" table:formula="of:=IFERROR(VLOOKUP([$Masterlist.$P111];[$Datasheet.$B$1:.$AV$9809];18;FALSE());&quot;-&quot;)" office:value-type="float" office:value="0" calcext:value-type="float">
            <text:p/>
          </table:table-cell>
          <table:table-cell table:style-name="ce244" table:formula="of:=IFERROR(VLOOKUP([$Masterlist.$P111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35" office:value-type="string" calcext:value-type="string">
            <text:p>L</text:p>
          </table:table-cell>
          <table:table-cell table:style-name="ce60"/>
          <table:table-cell table:style-name="ce51" table:number-columns-repeated="3"/>
          <table:table-cell table:style-name="ce49" office:value-type="string" calcext:value-type="string">
            <text:p>Yes</text:p>
          </table:table-cell>
          <table:table-cell table:style-name="ce51" table:number-columns-repeated="6"/>
          <table:table-cell table:style-name="ce85"/>
          <table:table-cell table:style-name="ce95" office:value-type="string" calcext:value-type="string">
            <text:p>Lighting Technician</text:p>
          </table:table-cell>
          <table:table-cell table:style-name="ce110" office:value-type="string" calcext:value-type="string">
            <text:p>Refilwe Mohasi</text:p>
          </table:table-cell>
          <table:table-cell table:style-name="ce121" table:formula="of:=IF(ISNUMBER(MATCH([.P112];[$Datasheet.$B$1:.$B$9809];0));&quot;✓&quot;;&quot;x&quot;)" office:value-type="string" office:string-value="✓" calcext:value-type="string">
            <text:p>✓</text:p>
          </table:table-cell>
          <table:table-cell table:style-name="ce142" table:formula="of:=IFERROR(VLOOKUP([$Masterlist.$P112];[$Datasheet.$B$1:.$AV$9809];2;FALSE());&quot;-&quot;)" office:value-type="float" office:value="1" calcext:value-type="float">
            <text:p>1</text:p>
          </table:table-cell>
          <table:table-cell table:style-name="ce168" table:formula="of:=IFERROR(VLOOKUP([$Masterlist.$P112];[$Datasheet.$B$1:.$AV$9809];3;FALSE());&quot;-&quot;)" office:value-type="float" office:value="0" calcext:value-type="float">
            <text:p>0</text:p>
          </table:table-cell>
          <table:table-cell table:style-name="ce168" table:formula="of:=IFERROR(VLOOKUP([$Masterlist.$P112];[$Datasheet.$B$1:.$AV$9809];4;FALSE());&quot;-&quot;)" office:value-type="float" office:value="1" calcext:value-type="float">
            <text:p>1</text:p>
          </table:table-cell>
          <table:table-cell table:style-name="ce168" table:formula="of:=IFERROR(VLOOKUP([$Masterlist.$P112];[$Datasheet.$B$1:.$AV$9809];5;FALSE());&quot;-&quot;)" office:value-type="float" office:value="1" calcext:value-type="float">
            <text:p>1</text:p>
          </table:table-cell>
          <table:table-cell table:style-name="ce191" table:formula="of:=IFERROR(VLOOKUP([$Masterlist.$P112];[$Datasheet.$B$1:.$AV$9809];6;FALSE());&quot;-&quot;)" office:value-type="float" office:value="0" calcext:value-type="float">
            <text:p>0</text:p>
          </table:table-cell>
          <table:table-cell table:style-name="ce168" table:formula="of:=IFERROR(VLOOKUP([$Masterlist.$P112];[$Datasheet.$B$1:.$AV$9809];7;FALSE());&quot;-&quot;)" office:value-type="float" office:value="0" calcext:value-type="float">
            <text:p>0</text:p>
          </table:table-cell>
          <table:table-cell table:style-name="ce168" table:formula="of:=IFERROR(VLOOKUP([$Masterlist.$P112];[$Datasheet.$B$1:.$AV$9809];8;FALSE());&quot;-&quot;)" office:value-type="float" office:value="1" calcext:value-type="float">
            <text:p>1</text:p>
          </table:table-cell>
          <table:table-cell table:style-name="ce168" table:formula="of:=IFERROR(VLOOKUP([$Masterlist.$P112];[$Datasheet.$B$1:.$AV$9809];9;FALSE());&quot;-&quot;)" office:value-type="float" office:value="1" calcext:value-type="float">
            <text:p>1</text:p>
          </table:table-cell>
          <table:table-cell table:style-name="ce168" table:formula="of:=IFERROR(VLOOKUP([$Masterlist.$P112];[$Datasheet.$B$1:.$AV$9809];10;FALSE());&quot;-&quot;)" office:value-type="float" office:value="0" calcext:value-type="float">
            <text:p>0</text:p>
          </table:table-cell>
          <table:table-cell table:style-name="ce168" table:formula="of:=IFERROR(VLOOKUP([$Masterlist.$P112];[$Datasheet.$B$1:.$AV$9809];11;FALSE());&quot;-&quot;)" office:value-type="float" office:value="0" calcext:value-type="float">
            <text:p>0</text:p>
          </table:table-cell>
          <table:table-cell table:style-name="ce168" table:formula="of:=IFERROR(VLOOKUP([$Masterlist.$P112];[$Datasheet.$B$1:.$AV$9809];12;FALSE());&quot;-&quot;)" office:value-type="float" office:value="1" calcext:value-type="float">
            <text:p>1</text:p>
          </table:table-cell>
          <table:table-cell table:style-name="ce168" table:formula="of:=IFERROR(VLOOKUP([$Masterlist.$P112];[$Datasheet.$B$1:.$AV$9809];13;FALSE());&quot;-&quot;)" office:value-type="float" office:value="1" calcext:value-type="float">
            <text:p>1</text:p>
          </table:table-cell>
          <table:table-cell table:style-name="ce168" table:formula="of:=IFERROR(VLOOKUP([$Masterlist.$P112];[$Datasheet.$B$1:.$AV$9809];14;FALSE());&quot;-&quot;)" office:value-type="float" office:value="1" calcext:value-type="float">
            <text:p>1</text:p>
          </table:table-cell>
          <table:table-cell table:style-name="ce168" table:formula="of:=IFERROR(VLOOKUP([$Masterlist.$P112];[$Datasheet.$B$1:.$AV$9809];15;FALSE());&quot;-&quot;)" office:value-type="float" office:value="1" calcext:value-type="float">
            <text:p>1</text:p>
          </table:table-cell>
          <table:table-cell table:style-name="ce168" table:formula="of:=IFERROR(VLOOKUP([$Masterlist.$P112];[$Datasheet.$B$1:.$AV$9809];16;FALSE());&quot;-&quot;)" office:value-type="float" office:value="0" calcext:value-type="float">
            <text:p/>
          </table:table-cell>
          <table:table-cell table:style-name="ce168" table:formula="of:=IFERROR(VLOOKUP([$Masterlist.$P112];[$Datasheet.$B$1:.$AV$9809];17;FALSE());&quot;-&quot;)" office:value-type="float" office:value="0" calcext:value-type="float">
            <text:p/>
          </table:table-cell>
          <table:table-cell table:style-name="ce168" table:formula="of:=IFERROR(VLOOKUP([$Masterlist.$P112];[$Datasheet.$B$1:.$AV$9809];18;FALSE());&quot;-&quot;)" office:value-type="float" office:value="0" calcext:value-type="float">
            <text:p/>
          </table:table-cell>
          <table:table-cell table:style-name="ce244" table:formula="of:=IFERROR(VLOOKUP([$Masterlist.$P112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35" office:value-type="string" calcext:value-type="string">
            <text:p>L</text:p>
          </table:table-cell>
          <table:table-cell table:style-name="ce60"/>
          <table:table-cell table:style-name="ce51" table:number-columns-repeated="3"/>
          <table:table-cell table:style-name="ce49" office:value-type="string" calcext:value-type="string">
            <text:p>Yes</text:p>
          </table:table-cell>
          <table:table-cell table:style-name="ce51" table:number-columns-repeated="6"/>
          <table:table-cell table:style-name="ce85"/>
          <table:table-cell table:style-name="ce95" office:value-type="string" calcext:value-type="string">
            <text:p>Lighting Technician</text:p>
          </table:table-cell>
          <table:table-cell table:style-name="ce110" office:value-type="string" calcext:value-type="string">
            <text:p>Richann Ellis</text:p>
          </table:table-cell>
          <table:table-cell table:style-name="ce121" table:formula="of:=IF(ISNUMBER(MATCH([.P113];[$Datasheet.$B$1:.$B$9809];0));&quot;✓&quot;;&quot;x&quot;)" office:value-type="string" office:string-value="✓" calcext:value-type="string">
            <text:p>✓</text:p>
          </table:table-cell>
          <table:table-cell table:style-name="ce142" table:formula="of:=IFERROR(VLOOKUP([$Masterlist.$P113];[$Datasheet.$B$1:.$AV$9809];2;FALSE());&quot;-&quot;)" office:value-type="float" office:value="1" calcext:value-type="float">
            <text:p>1</text:p>
          </table:table-cell>
          <table:table-cell table:style-name="ce168" table:formula="of:=IFERROR(VLOOKUP([$Masterlist.$P113];[$Datasheet.$B$1:.$AV$9809];3;FALSE());&quot;-&quot;)" office:value-type="float" office:value="1" calcext:value-type="float">
            <text:p>1</text:p>
          </table:table-cell>
          <table:table-cell table:style-name="ce168" table:formula="of:=IFERROR(VLOOKUP([$Masterlist.$P113];[$Datasheet.$B$1:.$AV$9809];4;FALSE());&quot;-&quot;)" office:value-type="float" office:value="1" calcext:value-type="float">
            <text:p>1</text:p>
          </table:table-cell>
          <table:table-cell table:style-name="ce168" table:formula="of:=IFERROR(VLOOKUP([$Masterlist.$P113];[$Datasheet.$B$1:.$AV$9809];5;FALSE());&quot;-&quot;)" office:value-type="float" office:value="0" calcext:value-type="float">
            <text:p>0</text:p>
          </table:table-cell>
          <table:table-cell table:style-name="ce191" table:formula="of:=IFERROR(VLOOKUP([$Masterlist.$P113];[$Datasheet.$B$1:.$AV$9809];6;FALSE());&quot;-&quot;)" office:value-type="float" office:value="1" calcext:value-type="float">
            <text:p>1</text:p>
          </table:table-cell>
          <table:table-cell table:style-name="ce168" table:formula="of:=IFERROR(VLOOKUP([$Masterlist.$P113];[$Datasheet.$B$1:.$AV$9809];7;FALSE());&quot;-&quot;)" office:value-type="float" office:value="0" calcext:value-type="float">
            <text:p>0</text:p>
          </table:table-cell>
          <table:table-cell table:style-name="ce168" table:formula="of:=IFERROR(VLOOKUP([$Masterlist.$P113];[$Datasheet.$B$1:.$AV$9809];8;FALSE());&quot;-&quot;)" office:value-type="float" office:value="0" calcext:value-type="float">
            <text:p>0</text:p>
          </table:table-cell>
          <table:table-cell table:style-name="ce168" table:formula="of:=IFERROR(VLOOKUP([$Masterlist.$P113];[$Datasheet.$B$1:.$AV$9809];9;FALSE());&quot;-&quot;)" office:value-type="float" office:value="0" calcext:value-type="float">
            <text:p>0</text:p>
          </table:table-cell>
          <table:table-cell table:style-name="ce168" table:formula="of:=IFERROR(VLOOKUP([$Masterlist.$P113];[$Datasheet.$B$1:.$AV$9809];10;FALSE());&quot;-&quot;)" office:value-type="float" office:value="0" calcext:value-type="float">
            <text:p>0</text:p>
          </table:table-cell>
          <table:table-cell table:style-name="ce168" table:formula="of:=IFERROR(VLOOKUP([$Masterlist.$P113];[$Datasheet.$B$1:.$AV$9809];11;FALSE());&quot;-&quot;)" office:value-type="float" office:value="0" calcext:value-type="float">
            <text:p>0</text:p>
          </table:table-cell>
          <table:table-cell table:style-name="ce168" table:formula="of:=IFERROR(VLOOKUP([$Masterlist.$P113];[$Datasheet.$B$1:.$AV$9809];12;FALSE());&quot;-&quot;)" office:value-type="float" office:value="0" calcext:value-type="float">
            <text:p>0</text:p>
          </table:table-cell>
          <table:table-cell table:style-name="ce168" table:formula="of:=IFERROR(VLOOKUP([$Masterlist.$P113];[$Datasheet.$B$1:.$AV$9809];13;FALSE());&quot;-&quot;)" office:value-type="float" office:value="0" calcext:value-type="float">
            <text:p>0</text:p>
          </table:table-cell>
          <table:table-cell table:style-name="ce168" table:formula="of:=IFERROR(VLOOKUP([$Masterlist.$P113];[$Datasheet.$B$1:.$AV$9809];14;FALSE());&quot;-&quot;)" office:value-type="float" office:value="0" calcext:value-type="float">
            <text:p>0</text:p>
          </table:table-cell>
          <table:table-cell table:style-name="ce168" table:formula="of:=IFERROR(VLOOKUP([$Masterlist.$P113];[$Datasheet.$B$1:.$AV$9809];15;FALSE());&quot;-&quot;)" office:value-type="float" office:value="0" calcext:value-type="float">
            <text:p>0</text:p>
          </table:table-cell>
          <table:table-cell table:style-name="ce168" table:formula="of:=IFERROR(VLOOKUP([$Masterlist.$P113];[$Datasheet.$B$1:.$AV$9809];16;FALSE());&quot;-&quot;)" office:value-type="float" office:value="0" calcext:value-type="float">
            <text:p/>
          </table:table-cell>
          <table:table-cell table:style-name="ce168" table:formula="of:=IFERROR(VLOOKUP([$Masterlist.$P113];[$Datasheet.$B$1:.$AV$9809];17;FALSE());&quot;-&quot;)" office:value-type="float" office:value="0" calcext:value-type="float">
            <text:p/>
          </table:table-cell>
          <table:table-cell table:style-name="ce168" table:formula="of:=IFERROR(VLOOKUP([$Masterlist.$P113];[$Datasheet.$B$1:.$AV$9809];18;FALSE());&quot;-&quot;)" office:value-type="float" office:value="0" calcext:value-type="float">
            <text:p/>
          </table:table-cell>
          <table:table-cell table:style-name="ce244" table:formula="of:=IFERROR(VLOOKUP([$Masterlist.$P113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33" office:value-type="string" calcext:value-type="string">
            <text:p>L</text:p>
          </table:table-cell>
          <table:table-cell table:style-name="ce59"/>
          <table:table-cell table:style-name="ce50" table:number-columns-repeated="3"/>
          <table:table-cell table:style-name="ce49" office:value-type="string" calcext:value-type="string">
            <text:p>Yes</text:p>
          </table:table-cell>
          <table:table-cell table:style-name="ce50" table:number-columns-repeated="6"/>
          <table:table-cell table:style-name="ce84"/>
          <table:table-cell table:style-name="ce95" office:value-type="string" calcext:value-type="string">
            <text:p>Lighting Technician</text:p>
          </table:table-cell>
          <table:table-cell table:style-name="ce108" office:value-type="string" calcext:value-type="string">
            <text:p>Vida Ras</text:p>
          </table:table-cell>
          <table:table-cell table:style-name="ce121" table:formula="of:=IF(ISNUMBER(MATCH([.P114];[$Datasheet.$B$1:.$B$9809];0));&quot;✓&quot;;&quot;x&quot;)" office:value-type="string" office:string-value="✓" calcext:value-type="string">
            <text:p>✓</text:p>
          </table:table-cell>
          <table:table-cell table:style-name="ce143" table:formula="of:=IFERROR(VLOOKUP([$Masterlist.$P114];[$Datasheet.$B$1:.$AV$9809];2;FALSE());&quot;-&quot;)" office:value-type="float" office:value="1" calcext:value-type="float">
            <text:p>1</text:p>
          </table:table-cell>
          <table:table-cell table:style-name="ce174" table:formula="of:=IFERROR(VLOOKUP([$Masterlist.$P114];[$Datasheet.$B$1:.$AV$9809];3;FALSE());&quot;-&quot;)" office:value-type="float" office:value="1" calcext:value-type="float">
            <text:p>1</text:p>
          </table:table-cell>
          <table:table-cell table:style-name="ce174" table:formula="of:=IFERROR(VLOOKUP([$Masterlist.$P114];[$Datasheet.$B$1:.$AV$9809];4;FALSE());&quot;-&quot;)" office:value-type="float" office:value="1" calcext:value-type="float">
            <text:p>1</text:p>
          </table:table-cell>
          <table:table-cell table:style-name="ce174" table:formula="of:=IFERROR(VLOOKUP([$Masterlist.$P114];[$Datasheet.$B$1:.$AV$9809];5;FALSE());&quot;-&quot;)" office:value-type="float" office:value="1" calcext:value-type="float">
            <text:p>1</text:p>
          </table:table-cell>
          <table:table-cell table:style-name="ce192" table:formula="of:=IFERROR(VLOOKUP([$Masterlist.$P114];[$Datasheet.$B$1:.$AV$9809];6;FALSE());&quot;-&quot;)" office:value-type="float" office:value="1" calcext:value-type="float">
            <text:p>1</text:p>
          </table:table-cell>
          <table:table-cell table:style-name="ce174" table:formula="of:=IFERROR(VLOOKUP([$Masterlist.$P114];[$Datasheet.$B$1:.$AV$9809];7;FALSE());&quot;-&quot;)" office:value-type="float" office:value="1" calcext:value-type="float">
            <text:p>1</text:p>
          </table:table-cell>
          <table:table-cell table:style-name="ce174" table:formula="of:=IFERROR(VLOOKUP([$Masterlist.$P114];[$Datasheet.$B$1:.$AV$9809];8;FALSE());&quot;-&quot;)" office:value-type="float" office:value="1" calcext:value-type="float">
            <text:p>1</text:p>
          </table:table-cell>
          <table:table-cell table:style-name="ce174" table:formula="of:=IFERROR(VLOOKUP([$Masterlist.$P114];[$Datasheet.$B$1:.$AV$9809];9;FALSE());&quot;-&quot;)" office:value-type="float" office:value="1" calcext:value-type="float">
            <text:p>1</text:p>
          </table:table-cell>
          <table:table-cell table:style-name="ce174" table:formula="of:=IFERROR(VLOOKUP([$Masterlist.$P114];[$Datasheet.$B$1:.$AV$9809];10;FALSE());&quot;-&quot;)" office:value-type="float" office:value="1" calcext:value-type="float">
            <text:p>1</text:p>
          </table:table-cell>
          <table:table-cell table:style-name="ce174" table:formula="of:=IFERROR(VLOOKUP([$Masterlist.$P114];[$Datasheet.$B$1:.$AV$9809];11;FALSE());&quot;-&quot;)" office:value-type="float" office:value="1" calcext:value-type="float">
            <text:p>1</text:p>
          </table:table-cell>
          <table:table-cell table:style-name="ce174" table:formula="of:=IFERROR(VLOOKUP([$Masterlist.$P114];[$Datasheet.$B$1:.$AV$9809];12;FALSE());&quot;-&quot;)" office:value-type="float" office:value="1" calcext:value-type="float">
            <text:p>1</text:p>
          </table:table-cell>
          <table:table-cell table:style-name="ce174" table:formula="of:=IFERROR(VLOOKUP([$Masterlist.$P114];[$Datasheet.$B$1:.$AV$9809];13;FALSE());&quot;-&quot;)" office:value-type="float" office:value="1" calcext:value-type="float">
            <text:p>1</text:p>
          </table:table-cell>
          <table:table-cell table:style-name="ce174" table:formula="of:=IFERROR(VLOOKUP([$Masterlist.$P114];[$Datasheet.$B$1:.$AV$9809];14;FALSE());&quot;-&quot;)" office:value-type="float" office:value="1" calcext:value-type="float">
            <text:p>1</text:p>
          </table:table-cell>
          <table:table-cell table:style-name="ce174" table:formula="of:=IFERROR(VLOOKUP([$Masterlist.$P114];[$Datasheet.$B$1:.$AV$9809];15;FALSE());&quot;-&quot;)" office:value-type="float" office:value="1" calcext:value-type="float">
            <text:p>1</text:p>
          </table:table-cell>
          <table:table-cell table:style-name="ce174" table:formula="of:=IFERROR(VLOOKUP([$Masterlist.$P114];[$Datasheet.$B$1:.$AV$9809];16;FALSE());&quot;-&quot;)" office:value-type="float" office:value="0" calcext:value-type="float">
            <text:p/>
          </table:table-cell>
          <table:table-cell table:style-name="ce174" table:formula="of:=IFERROR(VLOOKUP([$Masterlist.$P114];[$Datasheet.$B$1:.$AV$9809];17;FALSE());&quot;-&quot;)" office:value-type="float" office:value="0" calcext:value-type="float">
            <text:p/>
          </table:table-cell>
          <table:table-cell table:style-name="ce174" table:formula="of:=IFERROR(VLOOKUP([$Masterlist.$P114];[$Datasheet.$B$1:.$AV$9809];18;FALSE());&quot;-&quot;)" office:value-type="float" office:value="0" calcext:value-type="float">
            <text:p/>
          </table:table-cell>
          <table:table-cell table:style-name="ce245" table:formula="of:=IFERROR(VLOOKUP([$Masterlist.$P114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33" office:value-type="string" calcext:value-type="string">
            <text:p>A</text:p>
          </table:table-cell>
          <table:table-cell table:style-name="ce59"/>
          <table:table-cell table:style-name="ce50" table:number-columns-repeated="3"/>
          <table:table-cell table:style-name="ce49" office:value-type="string" calcext:value-type="string">
            <text:p>Yes</text:p>
          </table:table-cell>
          <table:table-cell table:style-name="ce50" table:number-columns-repeated="6"/>
          <table:table-cell table:style-name="ce84"/>
          <table:table-cell table:style-name="ce95" office:value-type="string" calcext:value-type="string">
            <text:p>Lighting Technician</text:p>
          </table:table-cell>
          <table:table-cell table:style-name="ce108" office:value-type="string" calcext:value-type="string">
            <text:p>Zea De Wet</text:p>
          </table:table-cell>
          <table:table-cell table:style-name="ce121" table:formula="of:=IF(ISNUMBER(MATCH([.P115];[$Datasheet.$B$1:.$B$9809];0));&quot;✓&quot;;&quot;x&quot;)" office:value-type="string" office:string-value="✓" calcext:value-type="string">
            <text:p>✓</text:p>
          </table:table-cell>
          <table:table-cell table:style-name="ce143" table:formula="of:=IFERROR(VLOOKUP([$Masterlist.$P115];[$Datasheet.$B$1:.$AV$9809];2;FALSE());&quot;-&quot;)" office:value-type="float" office:value="0" calcext:value-type="float">
            <text:p>0</text:p>
          </table:table-cell>
          <table:table-cell table:style-name="ce174" table:formula="of:=IFERROR(VLOOKUP([$Masterlist.$P115];[$Datasheet.$B$1:.$AV$9809];3;FALSE());&quot;-&quot;)" office:value-type="float" office:value="1" calcext:value-type="float">
            <text:p>1</text:p>
          </table:table-cell>
          <table:table-cell table:style-name="ce174" table:formula="of:=IFERROR(VLOOKUP([$Masterlist.$P115];[$Datasheet.$B$1:.$AV$9809];4;FALSE());&quot;-&quot;)" office:value-type="float" office:value="0" calcext:value-type="float">
            <text:p>0</text:p>
          </table:table-cell>
          <table:table-cell table:style-name="ce174" table:formula="of:=IFERROR(VLOOKUP([$Masterlist.$P115];[$Datasheet.$B$1:.$AV$9809];5;FALSE());&quot;-&quot;)" office:value-type="float" office:value="1" calcext:value-type="float">
            <text:p>1</text:p>
          </table:table-cell>
          <table:table-cell table:style-name="ce192" table:formula="of:=IFERROR(VLOOKUP([$Masterlist.$P115];[$Datasheet.$B$1:.$AV$9809];6;FALSE());&quot;-&quot;)" office:value-type="float" office:value="0" calcext:value-type="float">
            <text:p>0</text:p>
          </table:table-cell>
          <table:table-cell table:style-name="ce174" table:formula="of:=IFERROR(VLOOKUP([$Masterlist.$P115];[$Datasheet.$B$1:.$AV$9809];7;FALSE());&quot;-&quot;)" office:value-type="float" office:value="0" calcext:value-type="float">
            <text:p>0</text:p>
          </table:table-cell>
          <table:table-cell table:style-name="ce174" table:formula="of:=IFERROR(VLOOKUP([$Masterlist.$P115];[$Datasheet.$B$1:.$AV$9809];8;FALSE());&quot;-&quot;)" office:value-type="float" office:value="0" calcext:value-type="float">
            <text:p>0</text:p>
          </table:table-cell>
          <table:table-cell table:style-name="ce174" table:formula="of:=IFERROR(VLOOKUP([$Masterlist.$P115];[$Datasheet.$B$1:.$AV$9809];9;FALSE());&quot;-&quot;)" office:value-type="float" office:value="0" calcext:value-type="float">
            <text:p>0</text:p>
          </table:table-cell>
          <table:table-cell table:style-name="ce174" table:formula="of:=IFERROR(VLOOKUP([$Masterlist.$P115];[$Datasheet.$B$1:.$AV$9809];10;FALSE());&quot;-&quot;)" office:value-type="float" office:value="0" calcext:value-type="float">
            <text:p>0</text:p>
          </table:table-cell>
          <table:table-cell table:style-name="ce174" table:formula="of:=IFERROR(VLOOKUP([$Masterlist.$P115];[$Datasheet.$B$1:.$AV$9809];11;FALSE());&quot;-&quot;)" office:value-type="float" office:value="0" calcext:value-type="float">
            <text:p>0</text:p>
          </table:table-cell>
          <table:table-cell table:style-name="ce174" table:formula="of:=IFERROR(VLOOKUP([$Masterlist.$P115];[$Datasheet.$B$1:.$AV$9809];12;FALSE());&quot;-&quot;)" office:value-type="float" office:value="0" calcext:value-type="float">
            <text:p>0</text:p>
          </table:table-cell>
          <table:table-cell table:style-name="ce174" table:formula="of:=IFERROR(VLOOKUP([$Masterlist.$P115];[$Datasheet.$B$1:.$AV$9809];13;FALSE());&quot;-&quot;)" office:value-type="float" office:value="0" calcext:value-type="float">
            <text:p>0</text:p>
          </table:table-cell>
          <table:table-cell table:style-name="ce174" table:formula="of:=IFERROR(VLOOKUP([$Masterlist.$P115];[$Datasheet.$B$1:.$AV$9809];14;FALSE());&quot;-&quot;)" office:value-type="float" office:value="0" calcext:value-type="float">
            <text:p>0</text:p>
          </table:table-cell>
          <table:table-cell table:style-name="ce174" table:formula="of:=IFERROR(VLOOKUP([$Masterlist.$P115];[$Datasheet.$B$1:.$AV$9809];15;FALSE());&quot;-&quot;)" office:value-type="float" office:value="0" calcext:value-type="float">
            <text:p>0</text:p>
          </table:table-cell>
          <table:table-cell table:style-name="ce174" table:formula="of:=IFERROR(VLOOKUP([$Masterlist.$P115];[$Datasheet.$B$1:.$AV$9809];16;FALSE());&quot;-&quot;)" office:value-type="float" office:value="0" calcext:value-type="float">
            <text:p/>
          </table:table-cell>
          <table:table-cell table:style-name="ce174" table:formula="of:=IFERROR(VLOOKUP([$Masterlist.$P115];[$Datasheet.$B$1:.$AV$9809];17;FALSE());&quot;-&quot;)" office:value-type="float" office:value="0" calcext:value-type="float">
            <text:p/>
          </table:table-cell>
          <table:table-cell table:style-name="ce174" table:formula="of:=IFERROR(VLOOKUP([$Masterlist.$P115];[$Datasheet.$B$1:.$AV$9809];18;FALSE());&quot;-&quot;)" office:value-type="float" office:value="0" calcext:value-type="float">
            <text:p/>
          </table:table-cell>
          <table:table-cell table:style-name="ce245" table:formula="of:=IFERROR(VLOOKUP([$Masterlist.$P115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33" office:value-type="string" calcext:value-type="string">
            <text:p>L</text:p>
          </table:table-cell>
          <table:table-cell table:style-name="ce59"/>
          <table:table-cell table:style-name="ce50" table:number-columns-repeated="3"/>
          <table:table-cell table:style-name="ce49" office:value-type="string" calcext:value-type="string">
            <text:p>Yes</text:p>
          </table:table-cell>
          <table:table-cell table:style-name="ce50" table:number-columns-repeated="6"/>
          <table:table-cell table:style-name="ce84"/>
          <table:table-cell table:style-name="ce95" office:value-type="string" calcext:value-type="string">
            <text:p>Lighting Technician</text:p>
          </table:table-cell>
          <table:table-cell table:style-name="ce109" office:value-type="string" calcext:value-type="string">
            <text:p>Zené Willemse</text:p>
          </table:table-cell>
          <table:table-cell table:style-name="ce121" table:formula="of:=IF(ISNUMBER(MATCH([.P116];[$Datasheet.$B$1:.$B$9809];0));&quot;✓&quot;;&quot;x&quot;)" office:value-type="string" office:string-value="✓" calcext:value-type="string">
            <text:p>✓</text:p>
          </table:table-cell>
          <table:table-cell table:style-name="ce143" table:formula="of:=IFERROR(VLOOKUP([$Masterlist.$P116];[$Datasheet.$B$1:.$AV$9809];2;FALSE());&quot;-&quot;)" office:value-type="float" office:value="0" calcext:value-type="float">
            <text:p>0</text:p>
          </table:table-cell>
          <table:table-cell table:style-name="ce174" table:formula="of:=IFERROR(VLOOKUP([$Masterlist.$P116];[$Datasheet.$B$1:.$AV$9809];3;FALSE());&quot;-&quot;)" office:value-type="float" office:value="0" calcext:value-type="float">
            <text:p>0</text:p>
          </table:table-cell>
          <table:table-cell table:style-name="ce174" table:formula="of:=IFERROR(VLOOKUP([$Masterlist.$P116];[$Datasheet.$B$1:.$AV$9809];4;FALSE());&quot;-&quot;)" office:value-type="float" office:value="1" calcext:value-type="float">
            <text:p>1</text:p>
          </table:table-cell>
          <table:table-cell table:style-name="ce174" table:formula="of:=IFERROR(VLOOKUP([$Masterlist.$P116];[$Datasheet.$B$1:.$AV$9809];5;FALSE());&quot;-&quot;)" office:value-type="float" office:value="1" calcext:value-type="float">
            <text:p>1</text:p>
          </table:table-cell>
          <table:table-cell table:style-name="ce192" table:formula="of:=IFERROR(VLOOKUP([$Masterlist.$P116];[$Datasheet.$B$1:.$AV$9809];6;FALSE());&quot;-&quot;)" office:value-type="float" office:value="1" calcext:value-type="float">
            <text:p>1</text:p>
          </table:table-cell>
          <table:table-cell table:style-name="ce174" table:formula="of:=IFERROR(VLOOKUP([$Masterlist.$P116];[$Datasheet.$B$1:.$AV$9809];7;FALSE());&quot;-&quot;)" office:value-type="float" office:value="1" calcext:value-type="float">
            <text:p>1</text:p>
          </table:table-cell>
          <table:table-cell table:style-name="ce174" table:formula="of:=IFERROR(VLOOKUP([$Masterlist.$P116];[$Datasheet.$B$1:.$AV$9809];8;FALSE());&quot;-&quot;)" office:value-type="float" office:value="0" calcext:value-type="float">
            <text:p>0</text:p>
          </table:table-cell>
          <table:table-cell table:style-name="ce174" table:formula="of:=IFERROR(VLOOKUP([$Masterlist.$P116];[$Datasheet.$B$1:.$AV$9809];9;FALSE());&quot;-&quot;)" office:value-type="float" office:value="0" calcext:value-type="float">
            <text:p>0</text:p>
          </table:table-cell>
          <table:table-cell table:style-name="ce174" table:formula="of:=IFERROR(VLOOKUP([$Masterlist.$P116];[$Datasheet.$B$1:.$AV$9809];10;FALSE());&quot;-&quot;)" office:value-type="float" office:value="1" calcext:value-type="float">
            <text:p>1</text:p>
          </table:table-cell>
          <table:table-cell table:style-name="ce174" table:formula="of:=IFERROR(VLOOKUP([$Masterlist.$P116];[$Datasheet.$B$1:.$AV$9809];11;FALSE());&quot;-&quot;)" office:value-type="float" office:value="1" calcext:value-type="float">
            <text:p>1</text:p>
          </table:table-cell>
          <table:table-cell table:style-name="ce174" table:formula="of:=IFERROR(VLOOKUP([$Masterlist.$P116];[$Datasheet.$B$1:.$AV$9809];12;FALSE());&quot;-&quot;)" office:value-type="float" office:value="1" calcext:value-type="float">
            <text:p>1</text:p>
          </table:table-cell>
          <table:table-cell table:style-name="ce174" table:formula="of:=IFERROR(VLOOKUP([$Masterlist.$P116];[$Datasheet.$B$1:.$AV$9809];13;FALSE());&quot;-&quot;)" office:value-type="float" office:value="1" calcext:value-type="float">
            <text:p>1</text:p>
          </table:table-cell>
          <table:table-cell table:style-name="ce174" table:formula="of:=IFERROR(VLOOKUP([$Masterlist.$P116];[$Datasheet.$B$1:.$AV$9809];14;FALSE());&quot;-&quot;)" office:value-type="float" office:value="1" calcext:value-type="float">
            <text:p>1</text:p>
          </table:table-cell>
          <table:table-cell table:style-name="ce174" table:formula="of:=IFERROR(VLOOKUP([$Masterlist.$P116];[$Datasheet.$B$1:.$AV$9809];15;FALSE());&quot;-&quot;)" office:value-type="float" office:value="1" calcext:value-type="float">
            <text:p>1</text:p>
          </table:table-cell>
          <table:table-cell table:style-name="ce174" table:formula="of:=IFERROR(VLOOKUP([$Masterlist.$P116];[$Datasheet.$B$1:.$AV$9809];16;FALSE());&quot;-&quot;)" office:value-type="float" office:value="0" calcext:value-type="float">
            <text:p/>
          </table:table-cell>
          <table:table-cell table:style-name="ce174" table:formula="of:=IFERROR(VLOOKUP([$Masterlist.$P116];[$Datasheet.$B$1:.$AV$9809];17;FALSE());&quot;-&quot;)" office:value-type="float" office:value="0" calcext:value-type="float">
            <text:p/>
          </table:table-cell>
          <table:table-cell table:style-name="ce174" table:formula="of:=IFERROR(VLOOKUP([$Masterlist.$P116];[$Datasheet.$B$1:.$AV$9809];18;FALSE());&quot;-&quot;)" office:value-type="float" office:value="0" calcext:value-type="float">
            <text:p/>
          </table:table-cell>
          <table:table-cell table:style-name="ce245" table:formula="of:=IFERROR(VLOOKUP([$Masterlist.$P116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33" office:value-type="string" calcext:value-type="string">
            <text:p>L</text:p>
          </table:table-cell>
          <table:table-cell table:style-name="ce59"/>
          <table:table-cell table:style-name="ce50" table:number-columns-repeated="4"/>
          <table:table-cell table:number-columns-repeated="3" table:style-name="ce49" office:value-type="string" calcext:value-type="string">
            <text:p>Yes</text:p>
          </table:table-cell>
          <table:table-cell table:style-name="ce50" table:number-columns-repeated="3"/>
          <table:table-cell table:style-name="ce84"/>
          <table:table-cell table:style-name="ce95" office:value-type="string" calcext:value-type="string">
            <text:p>Lighting Technician</text:p>
          </table:table-cell>
          <table:table-cell table:style-name="ce107" office:value-type="string" calcext:value-type="string">
            <text:p>André Lesch</text:p>
          </table:table-cell>
          <table:table-cell table:style-name="ce121" table:formula="of:=IF(ISNUMBER(MATCH([.P117];[$Datasheet.$B$1:.$B$9809];0));&quot;✓&quot;;&quot;x&quot;)" office:value-type="string" office:string-value="✓" calcext:value-type="string">
            <text:p>✓</text:p>
          </table:table-cell>
          <table:table-cell table:style-name="ce143" table:formula="of:=IFERROR(VLOOKUP([$Masterlist.$P117];[$Datasheet.$B$1:.$AV$9809];2;FALSE());&quot;-&quot;)" office:value-type="float" office:value="0" calcext:value-type="float">
            <text:p>0</text:p>
          </table:table-cell>
          <table:table-cell table:style-name="ce174" table:formula="of:=IFERROR(VLOOKUP([$Masterlist.$P117];[$Datasheet.$B$1:.$AV$9809];3;FALSE());&quot;-&quot;)" office:value-type="float" office:value="1" calcext:value-type="float">
            <text:p>1</text:p>
          </table:table-cell>
          <table:table-cell table:style-name="ce174" table:formula="of:=IFERROR(VLOOKUP([$Masterlist.$P117];[$Datasheet.$B$1:.$AV$9809];4;FALSE());&quot;-&quot;)" office:value-type="float" office:value="1" calcext:value-type="float">
            <text:p>1</text:p>
          </table:table-cell>
          <table:table-cell table:style-name="ce174" table:formula="of:=IFERROR(VLOOKUP([$Masterlist.$P117];[$Datasheet.$B$1:.$AV$9809];5;FALSE());&quot;-&quot;)" office:value-type="float" office:value="1" calcext:value-type="float">
            <text:p>1</text:p>
          </table:table-cell>
          <table:table-cell table:style-name="ce192" table:formula="of:=IFERROR(VLOOKUP([$Masterlist.$P117];[$Datasheet.$B$1:.$AV$9809];6;FALSE());&quot;-&quot;)" office:value-type="float" office:value="1" calcext:value-type="float">
            <text:p>1</text:p>
          </table:table-cell>
          <table:table-cell table:style-name="ce174" table:formula="of:=IFERROR(VLOOKUP([$Masterlist.$P117];[$Datasheet.$B$1:.$AV$9809];7;FALSE());&quot;-&quot;)" office:value-type="float" office:value="1" calcext:value-type="float">
            <text:p>1</text:p>
          </table:table-cell>
          <table:table-cell table:style-name="ce174" table:formula="of:=IFERROR(VLOOKUP([$Masterlist.$P117];[$Datasheet.$B$1:.$AV$9809];8;FALSE());&quot;-&quot;)" office:value-type="float" office:value="1" calcext:value-type="float">
            <text:p>1</text:p>
          </table:table-cell>
          <table:table-cell table:style-name="ce174" table:formula="of:=IFERROR(VLOOKUP([$Masterlist.$P117];[$Datasheet.$B$1:.$AV$9809];9;FALSE());&quot;-&quot;)" office:value-type="float" office:value="1" calcext:value-type="float">
            <text:p>1</text:p>
          </table:table-cell>
          <table:table-cell table:style-name="ce174" table:formula="of:=IFERROR(VLOOKUP([$Masterlist.$P117];[$Datasheet.$B$1:.$AV$9809];10;FALSE());&quot;-&quot;)" office:value-type="float" office:value="1" calcext:value-type="float">
            <text:p>1</text:p>
          </table:table-cell>
          <table:table-cell table:style-name="ce174" table:formula="of:=IFERROR(VLOOKUP([$Masterlist.$P117];[$Datasheet.$B$1:.$AV$9809];11;FALSE());&quot;-&quot;)" office:value-type="float" office:value="1" calcext:value-type="float">
            <text:p>1</text:p>
          </table:table-cell>
          <table:table-cell table:style-name="ce174" table:formula="of:=IFERROR(VLOOKUP([$Masterlist.$P117];[$Datasheet.$B$1:.$AV$9809];12;FALSE());&quot;-&quot;)" office:value-type="float" office:value="0" calcext:value-type="float">
            <text:p>0</text:p>
          </table:table-cell>
          <table:table-cell table:style-name="ce174" table:formula="of:=IFERROR(VLOOKUP([$Masterlist.$P117];[$Datasheet.$B$1:.$AV$9809];13;FALSE());&quot;-&quot;)" office:value-type="float" office:value="0" calcext:value-type="float">
            <text:p>0</text:p>
          </table:table-cell>
          <table:table-cell table:style-name="ce174" table:formula="of:=IFERROR(VLOOKUP([$Masterlist.$P117];[$Datasheet.$B$1:.$AV$9809];14;FALSE());&quot;-&quot;)" office:value-type="float" office:value="1" calcext:value-type="float">
            <text:p>1</text:p>
          </table:table-cell>
          <table:table-cell table:style-name="ce174" table:formula="of:=IFERROR(VLOOKUP([$Masterlist.$P117];[$Datasheet.$B$1:.$AV$9809];15;FALSE());&quot;-&quot;)" office:value-type="float" office:value="1" calcext:value-type="float">
            <text:p>1</text:p>
          </table:table-cell>
          <table:table-cell table:style-name="ce174" table:formula="of:=IFERROR(VLOOKUP([$Masterlist.$P117];[$Datasheet.$B$1:.$AV$9809];16;FALSE());&quot;-&quot;)" office:value-type="float" office:value="0" calcext:value-type="float">
            <text:p/>
          </table:table-cell>
          <table:table-cell table:style-name="ce174" table:formula="of:=IFERROR(VLOOKUP([$Masterlist.$P117];[$Datasheet.$B$1:.$AV$9809];17;FALSE());&quot;-&quot;)" office:value-type="float" office:value="0" calcext:value-type="float">
            <text:p/>
          </table:table-cell>
          <table:table-cell table:style-name="ce174" table:formula="of:=IFERROR(VLOOKUP([$Masterlist.$P117];[$Datasheet.$B$1:.$AV$9809];18;FALSE());&quot;-&quot;)" office:value-type="float" office:value="0" calcext:value-type="float">
            <text:p/>
          </table:table-cell>
          <table:table-cell table:style-name="ce245" table:formula="of:=IFERROR(VLOOKUP([$Masterlist.$P117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33" office:value-type="string" calcext:value-type="string">
            <text:p>L</text:p>
          </table:table-cell>
          <table:table-cell table:style-name="ce59"/>
          <table:table-cell table:style-name="ce50" table:number-columns-repeated="4"/>
          <table:table-cell table:number-columns-repeated="2" table:style-name="ce49" office:value-type="string" calcext:value-type="string">
            <text:p>Yes</text:p>
          </table:table-cell>
          <table:table-cell table:style-name="ce49"/>
          <table:table-cell table:style-name="ce50" table:number-columns-repeated="3"/>
          <table:table-cell table:style-name="ce84"/>
          <table:table-cell table:style-name="ce95" office:value-type="string" calcext:value-type="string">
            <text:p>Lighting Technician</text:p>
          </table:table-cell>
          <table:table-cell table:style-name="ce108" office:value-type="string" calcext:value-type="string">
            <text:p>Christo Schoeman</text:p>
          </table:table-cell>
          <table:table-cell table:style-name="ce121" table:formula="of:=IF(ISNUMBER(MATCH([.P118];[$Datasheet.$B$1:.$B$9809];0));&quot;✓&quot;;&quot;x&quot;)" office:value-type="string" office:string-value="✓" calcext:value-type="string">
            <text:p>✓</text:p>
          </table:table-cell>
          <table:table-cell table:style-name="ce143" table:formula="of:=IFERROR(VLOOKUP([$Masterlist.$P118];[$Datasheet.$B$1:.$AV$9809];2;FALSE());&quot;-&quot;)" office:value-type="float" office:value="1" calcext:value-type="float">
            <text:p>1</text:p>
          </table:table-cell>
          <table:table-cell table:style-name="ce174" table:formula="of:=IFERROR(VLOOKUP([$Masterlist.$P118];[$Datasheet.$B$1:.$AV$9809];3;FALSE());&quot;-&quot;)" office:value-type="float" office:value="1" calcext:value-type="float">
            <text:p>1</text:p>
          </table:table-cell>
          <table:table-cell table:style-name="ce174" table:formula="of:=IFERROR(VLOOKUP([$Masterlist.$P118];[$Datasheet.$B$1:.$AV$9809];4;FALSE());&quot;-&quot;)" office:value-type="float" office:value="1" calcext:value-type="float">
            <text:p>1</text:p>
          </table:table-cell>
          <table:table-cell table:style-name="ce174" table:formula="of:=IFERROR(VLOOKUP([$Masterlist.$P118];[$Datasheet.$B$1:.$AV$9809];5;FALSE());&quot;-&quot;)" office:value-type="float" office:value="1" calcext:value-type="float">
            <text:p>1</text:p>
          </table:table-cell>
          <table:table-cell table:style-name="ce192" table:formula="of:=IFERROR(VLOOKUP([$Masterlist.$P118];[$Datasheet.$B$1:.$AV$9809];6;FALSE());&quot;-&quot;)" office:value-type="float" office:value="1" calcext:value-type="float">
            <text:p>1</text:p>
          </table:table-cell>
          <table:table-cell table:style-name="ce174" table:formula="of:=IFERROR(VLOOKUP([$Masterlist.$P118];[$Datasheet.$B$1:.$AV$9809];7;FALSE());&quot;-&quot;)" office:value-type="float" office:value="1" calcext:value-type="float">
            <text:p>1</text:p>
          </table:table-cell>
          <table:table-cell table:style-name="ce174" table:formula="of:=IFERROR(VLOOKUP([$Masterlist.$P118];[$Datasheet.$B$1:.$AV$9809];8;FALSE());&quot;-&quot;)" office:value-type="float" office:value="1" calcext:value-type="float">
            <text:p>1</text:p>
          </table:table-cell>
          <table:table-cell table:style-name="ce174" table:formula="of:=IFERROR(VLOOKUP([$Masterlist.$P118];[$Datasheet.$B$1:.$AV$9809];9;FALSE());&quot;-&quot;)" office:value-type="float" office:value="1" calcext:value-type="float">
            <text:p>1</text:p>
          </table:table-cell>
          <table:table-cell table:style-name="ce174" table:formula="of:=IFERROR(VLOOKUP([$Masterlist.$P118];[$Datasheet.$B$1:.$AV$9809];10;FALSE());&quot;-&quot;)" office:value-type="float" office:value="1" calcext:value-type="float">
            <text:p>1</text:p>
          </table:table-cell>
          <table:table-cell table:style-name="ce174" table:formula="of:=IFERROR(VLOOKUP([$Masterlist.$P118];[$Datasheet.$B$1:.$AV$9809];11;FALSE());&quot;-&quot;)" office:value-type="float" office:value="1" calcext:value-type="float">
            <text:p>1</text:p>
          </table:table-cell>
          <table:table-cell table:style-name="ce174" table:formula="of:=IFERROR(VLOOKUP([$Masterlist.$P118];[$Datasheet.$B$1:.$AV$9809];12;FALSE());&quot;-&quot;)" office:value-type="float" office:value="1" calcext:value-type="float">
            <text:p>1</text:p>
          </table:table-cell>
          <table:table-cell table:style-name="ce174" table:formula="of:=IFERROR(VLOOKUP([$Masterlist.$P118];[$Datasheet.$B$1:.$AV$9809];13;FALSE());&quot;-&quot;)" office:value-type="float" office:value="1" calcext:value-type="float">
            <text:p>1</text:p>
          </table:table-cell>
          <table:table-cell table:style-name="ce174" table:formula="of:=IFERROR(VLOOKUP([$Masterlist.$P118];[$Datasheet.$B$1:.$AV$9809];14;FALSE());&quot;-&quot;)" office:value-type="float" office:value="0" calcext:value-type="float">
            <text:p>0</text:p>
          </table:table-cell>
          <table:table-cell table:style-name="ce174" table:formula="of:=IFERROR(VLOOKUP([$Masterlist.$P118];[$Datasheet.$B$1:.$AV$9809];15;FALSE());&quot;-&quot;)" office:value-type="float" office:value="0" calcext:value-type="float">
            <text:p>0</text:p>
          </table:table-cell>
          <table:table-cell table:style-name="ce174" table:formula="of:=IFERROR(VLOOKUP([$Masterlist.$P118];[$Datasheet.$B$1:.$AV$9809];16;FALSE());&quot;-&quot;)" office:value-type="float" office:value="0" calcext:value-type="float">
            <text:p/>
          </table:table-cell>
          <table:table-cell table:style-name="ce174" table:formula="of:=IFERROR(VLOOKUP([$Masterlist.$P118];[$Datasheet.$B$1:.$AV$9809];17;FALSE());&quot;-&quot;)" office:value-type="float" office:value="0" calcext:value-type="float">
            <text:p/>
          </table:table-cell>
          <table:table-cell table:style-name="ce174" table:formula="of:=IFERROR(VLOOKUP([$Masterlist.$P118];[$Datasheet.$B$1:.$AV$9809];18;FALSE());&quot;-&quot;)" office:value-type="float" office:value="0" calcext:value-type="float">
            <text:p/>
          </table:table-cell>
          <table:table-cell table:style-name="ce245" table:formula="of:=IFERROR(VLOOKUP([$Masterlist.$P118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33" office:value-type="string" calcext:value-type="string">
            <text:p>L</text:p>
          </table:table-cell>
          <table:table-cell table:style-name="ce59"/>
          <table:table-cell table:style-name="ce50" table:number-columns-repeated="4"/>
          <table:table-cell table:number-columns-repeated="2" table:style-name="ce49" office:value-type="string" calcext:value-type="string">
            <text:p>Yes</text:p>
          </table:table-cell>
          <table:table-cell table:style-name="ce49"/>
          <table:table-cell table:style-name="ce50" table:number-columns-repeated="3"/>
          <table:table-cell table:style-name="ce84"/>
          <table:table-cell table:style-name="ce95" office:value-type="string" calcext:value-type="string">
            <text:p>Lighting Technician</text:p>
          </table:table-cell>
          <table:table-cell table:style-name="ce108" office:value-type="string" calcext:value-type="string">
            <text:p>Christoph Snell</text:p>
          </table:table-cell>
          <table:table-cell table:style-name="ce121" table:formula="of:=IF(ISNUMBER(MATCH([.P119];[$Datasheet.$B$1:.$B$9809];0));&quot;✓&quot;;&quot;x&quot;)" office:value-type="string" office:string-value="✓" calcext:value-type="string">
            <text:p>✓</text:p>
          </table:table-cell>
          <table:table-cell table:style-name="ce143" table:formula="of:=IFERROR(VLOOKUP([$Masterlist.$P119];[$Datasheet.$B$1:.$AV$9809];2;FALSE());&quot;-&quot;)" office:value-type="float" office:value="0" calcext:value-type="float">
            <text:p>0</text:p>
          </table:table-cell>
          <table:table-cell table:style-name="ce174" table:formula="of:=IFERROR(VLOOKUP([$Masterlist.$P119];[$Datasheet.$B$1:.$AV$9809];3;FALSE());&quot;-&quot;)" office:value-type="float" office:value="1" calcext:value-type="float">
            <text:p>1</text:p>
          </table:table-cell>
          <table:table-cell table:style-name="ce174" table:formula="of:=IFERROR(VLOOKUP([$Masterlist.$P119];[$Datasheet.$B$1:.$AV$9809];4;FALSE());&quot;-&quot;)" office:value-type="float" office:value="1" calcext:value-type="float">
            <text:p>1</text:p>
          </table:table-cell>
          <table:table-cell table:style-name="ce174" table:formula="of:=IFERROR(VLOOKUP([$Masterlist.$P119];[$Datasheet.$B$1:.$AV$9809];5;FALSE());&quot;-&quot;)" office:value-type="float" office:value="1" calcext:value-type="float">
            <text:p>1</text:p>
          </table:table-cell>
          <table:table-cell table:style-name="ce192" table:formula="of:=IFERROR(VLOOKUP([$Masterlist.$P119];[$Datasheet.$B$1:.$AV$9809];6;FALSE());&quot;-&quot;)" office:value-type="float" office:value="0" calcext:value-type="float">
            <text:p>0</text:p>
          </table:table-cell>
          <table:table-cell table:style-name="ce174" table:formula="of:=IFERROR(VLOOKUP([$Masterlist.$P119];[$Datasheet.$B$1:.$AV$9809];7;FALSE());&quot;-&quot;)" office:value-type="float" office:value="0" calcext:value-type="float">
            <text:p>0</text:p>
          </table:table-cell>
          <table:table-cell table:style-name="ce174" table:formula="of:=IFERROR(VLOOKUP([$Masterlist.$P119];[$Datasheet.$B$1:.$AV$9809];8;FALSE());&quot;-&quot;)" office:value-type="float" office:value="1" calcext:value-type="float">
            <text:p>1</text:p>
          </table:table-cell>
          <table:table-cell table:style-name="ce174" table:formula="of:=IFERROR(VLOOKUP([$Masterlist.$P119];[$Datasheet.$B$1:.$AV$9809];9;FALSE());&quot;-&quot;)" office:value-type="float" office:value="1" calcext:value-type="float">
            <text:p>1</text:p>
          </table:table-cell>
          <table:table-cell table:style-name="ce174" table:formula="of:=IFERROR(VLOOKUP([$Masterlist.$P119];[$Datasheet.$B$1:.$AV$9809];10;FALSE());&quot;-&quot;)" office:value-type="float" office:value="0" calcext:value-type="float">
            <text:p>0</text:p>
          </table:table-cell>
          <table:table-cell table:style-name="ce174" table:formula="of:=IFERROR(VLOOKUP([$Masterlist.$P119];[$Datasheet.$B$1:.$AV$9809];11;FALSE());&quot;-&quot;)" office:value-type="float" office:value="0" calcext:value-type="float">
            <text:p>0</text:p>
          </table:table-cell>
          <table:table-cell table:style-name="ce174" table:formula="of:=IFERROR(VLOOKUP([$Masterlist.$P119];[$Datasheet.$B$1:.$AV$9809];12;FALSE());&quot;-&quot;)" office:value-type="float" office:value="0" calcext:value-type="float">
            <text:p>0</text:p>
          </table:table-cell>
          <table:table-cell table:style-name="ce174" table:formula="of:=IFERROR(VLOOKUP([$Masterlist.$P119];[$Datasheet.$B$1:.$AV$9809];13;FALSE());&quot;-&quot;)" office:value-type="float" office:value="0" calcext:value-type="float">
            <text:p>0</text:p>
          </table:table-cell>
          <table:table-cell table:style-name="ce174" table:formula="of:=IFERROR(VLOOKUP([$Masterlist.$P119];[$Datasheet.$B$1:.$AV$9809];14;FALSE());&quot;-&quot;)" office:value-type="float" office:value="1" calcext:value-type="float">
            <text:p>1</text:p>
          </table:table-cell>
          <table:table-cell table:style-name="ce174" table:formula="of:=IFERROR(VLOOKUP([$Masterlist.$P119];[$Datasheet.$B$1:.$AV$9809];15;FALSE());&quot;-&quot;)" office:value-type="float" office:value="1" calcext:value-type="float">
            <text:p>1</text:p>
          </table:table-cell>
          <table:table-cell table:style-name="ce174" table:formula="of:=IFERROR(VLOOKUP([$Masterlist.$P119];[$Datasheet.$B$1:.$AV$9809];16;FALSE());&quot;-&quot;)" office:value-type="float" office:value="0" calcext:value-type="float">
            <text:p/>
          </table:table-cell>
          <table:table-cell table:style-name="ce174" table:formula="of:=IFERROR(VLOOKUP([$Masterlist.$P119];[$Datasheet.$B$1:.$AV$9809];17;FALSE());&quot;-&quot;)" office:value-type="float" office:value="0" calcext:value-type="float">
            <text:p/>
          </table:table-cell>
          <table:table-cell table:style-name="ce174" table:formula="of:=IFERROR(VLOOKUP([$Masterlist.$P119];[$Datasheet.$B$1:.$AV$9809];18;FALSE());&quot;-&quot;)" office:value-type="float" office:value="0" calcext:value-type="float">
            <text:p/>
          </table:table-cell>
          <table:table-cell table:style-name="ce245" table:formula="of:=IFERROR(VLOOKUP([$Masterlist.$P119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33" office:value-type="string" calcext:value-type="string">
            <text:p>L</text:p>
          </table:table-cell>
          <table:table-cell table:style-name="ce59"/>
          <table:table-cell table:style-name="ce50" table:number-columns-repeated="4"/>
          <table:table-cell table:number-columns-repeated="2" table:style-name="ce49" office:value-type="string" calcext:value-type="string">
            <text:p>Yes</text:p>
          </table:table-cell>
          <table:table-cell table:style-name="ce49"/>
          <table:table-cell table:style-name="ce50" table:number-columns-repeated="3"/>
          <table:table-cell table:style-name="ce84"/>
          <table:table-cell table:style-name="ce95" office:value-type="string" calcext:value-type="string">
            <text:p>Lighting Technician</text:p>
          </table:table-cell>
          <table:table-cell table:style-name="ce108" office:value-type="string" calcext:value-type="string">
            <text:p>Henry Norris</text:p>
          </table:table-cell>
          <table:table-cell table:style-name="ce121" table:formula="of:=IF(ISNUMBER(MATCH([.P120];[$Datasheet.$B$1:.$B$9809];0));&quot;✓&quot;;&quot;x&quot;)" office:value-type="string" office:string-value="✓" calcext:value-type="string">
            <text:p>✓</text:p>
          </table:table-cell>
          <table:table-cell table:style-name="ce143" table:formula="of:=IFERROR(VLOOKUP([$Masterlist.$P120];[$Datasheet.$B$1:.$AV$9809];2;FALSE());&quot;-&quot;)" office:value-type="float" office:value="0" calcext:value-type="float">
            <text:p>0</text:p>
          </table:table-cell>
          <table:table-cell table:style-name="ce174" table:formula="of:=IFERROR(VLOOKUP([$Masterlist.$P120];[$Datasheet.$B$1:.$AV$9809];3;FALSE());&quot;-&quot;)" office:value-type="float" office:value="0" calcext:value-type="float">
            <text:p>0</text:p>
          </table:table-cell>
          <table:table-cell table:style-name="ce174" table:formula="of:=IFERROR(VLOOKUP([$Masterlist.$P120];[$Datasheet.$B$1:.$AV$9809];4;FALSE());&quot;-&quot;)" office:value-type="float" office:value="1" calcext:value-type="float">
            <text:p>1</text:p>
          </table:table-cell>
          <table:table-cell table:style-name="ce174" table:formula="of:=IFERROR(VLOOKUP([$Masterlist.$P120];[$Datasheet.$B$1:.$AV$9809];5;FALSE());&quot;-&quot;)" office:value-type="float" office:value="1" calcext:value-type="float">
            <text:p>1</text:p>
          </table:table-cell>
          <table:table-cell table:style-name="ce192" table:formula="of:=IFERROR(VLOOKUP([$Masterlist.$P120];[$Datasheet.$B$1:.$AV$9809];6;FALSE());&quot;-&quot;)" office:value-type="float" office:value="1" calcext:value-type="float">
            <text:p>1</text:p>
          </table:table-cell>
          <table:table-cell table:style-name="ce174" table:formula="of:=IFERROR(VLOOKUP([$Masterlist.$P120];[$Datasheet.$B$1:.$AV$9809];7;FALSE());&quot;-&quot;)" office:value-type="float" office:value="1" calcext:value-type="float">
            <text:p>1</text:p>
          </table:table-cell>
          <table:table-cell table:style-name="ce174" table:formula="of:=IFERROR(VLOOKUP([$Masterlist.$P120];[$Datasheet.$B$1:.$AV$9809];8;FALSE());&quot;-&quot;)" office:value-type="float" office:value="1" calcext:value-type="float">
            <text:p>1</text:p>
          </table:table-cell>
          <table:table-cell table:style-name="ce174" table:formula="of:=IFERROR(VLOOKUP([$Masterlist.$P120];[$Datasheet.$B$1:.$AV$9809];9;FALSE());&quot;-&quot;)" office:value-type="float" office:value="1" calcext:value-type="float">
            <text:p>1</text:p>
          </table:table-cell>
          <table:table-cell table:style-name="ce174" table:formula="of:=IFERROR(VLOOKUP([$Masterlist.$P120];[$Datasheet.$B$1:.$AV$9809];10;FALSE());&quot;-&quot;)" office:value-type="float" office:value="1" calcext:value-type="float">
            <text:p>1</text:p>
          </table:table-cell>
          <table:table-cell table:style-name="ce174" table:formula="of:=IFERROR(VLOOKUP([$Masterlist.$P120];[$Datasheet.$B$1:.$AV$9809];11;FALSE());&quot;-&quot;)" office:value-type="float" office:value="1" calcext:value-type="float">
            <text:p>1</text:p>
          </table:table-cell>
          <table:table-cell table:style-name="ce174" table:formula="of:=IFERROR(VLOOKUP([$Masterlist.$P120];[$Datasheet.$B$1:.$AV$9809];12;FALSE());&quot;-&quot;)" office:value-type="float" office:value="1" calcext:value-type="float">
            <text:p>1</text:p>
          </table:table-cell>
          <table:table-cell table:style-name="ce174" table:formula="of:=IFERROR(VLOOKUP([$Masterlist.$P120];[$Datasheet.$B$1:.$AV$9809];13;FALSE());&quot;-&quot;)" office:value-type="float" office:value="1" calcext:value-type="float">
            <text:p>1</text:p>
          </table:table-cell>
          <table:table-cell table:style-name="ce174" table:formula="of:=IFERROR(VLOOKUP([$Masterlist.$P120];[$Datasheet.$B$1:.$AV$9809];14;FALSE());&quot;-&quot;)" office:value-type="float" office:value="1" calcext:value-type="float">
            <text:p>1</text:p>
          </table:table-cell>
          <table:table-cell table:style-name="ce174" table:formula="of:=IFERROR(VLOOKUP([$Masterlist.$P120];[$Datasheet.$B$1:.$AV$9809];15;FALSE());&quot;-&quot;)" office:value-type="float" office:value="1" calcext:value-type="float">
            <text:p>1</text:p>
          </table:table-cell>
          <table:table-cell table:style-name="ce174" table:formula="of:=IFERROR(VLOOKUP([$Masterlist.$P120];[$Datasheet.$B$1:.$AV$9809];16;FALSE());&quot;-&quot;)" office:value-type="float" office:value="0" calcext:value-type="float">
            <text:p/>
          </table:table-cell>
          <table:table-cell table:style-name="ce174" table:formula="of:=IFERROR(VLOOKUP([$Masterlist.$P120];[$Datasheet.$B$1:.$AV$9809];17;FALSE());&quot;-&quot;)" office:value-type="float" office:value="0" calcext:value-type="float">
            <text:p/>
          </table:table-cell>
          <table:table-cell table:style-name="ce174" table:formula="of:=IFERROR(VLOOKUP([$Masterlist.$P120];[$Datasheet.$B$1:.$AV$9809];18;FALSE());&quot;-&quot;)" office:value-type="float" office:value="0" calcext:value-type="float">
            <text:p/>
          </table:table-cell>
          <table:table-cell table:style-name="ce245" table:formula="of:=IFERROR(VLOOKUP([$Masterlist.$P120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33" office:value-type="string" calcext:value-type="string">
            <text:p>M</text:p>
          </table:table-cell>
          <table:table-cell table:style-name="ce59"/>
          <table:table-cell table:style-name="ce50" table:number-columns-repeated="4"/>
          <table:table-cell table:number-columns-repeated="2" table:style-name="ce49" office:value-type="string" calcext:value-type="string">
            <text:p>Yes</text:p>
          </table:table-cell>
          <table:table-cell table:style-name="ce49"/>
          <table:table-cell table:style-name="ce50" table:number-columns-repeated="3"/>
          <table:table-cell table:style-name="ce84"/>
          <table:table-cell table:style-name="ce95" office:value-type="string" calcext:value-type="string">
            <text:p>Lighting Technician</text:p>
          </table:table-cell>
          <table:table-cell table:style-name="ce108" office:value-type="string" calcext:value-type="string">
            <text:p>Jarryd Sevenoaks</text:p>
          </table:table-cell>
          <table:table-cell table:style-name="ce121" table:formula="of:=IF(ISNUMBER(MATCH([.P121];[$Datasheet.$B$1:.$B$9809];0));&quot;✓&quot;;&quot;x&quot;)" office:value-type="string" office:string-value="✓" calcext:value-type="string">
            <text:p>✓</text:p>
          </table:table-cell>
          <table:table-cell table:style-name="ce143" table:formula="of:=IFERROR(VLOOKUP([$Masterlist.$P121];[$Datasheet.$B$1:.$AV$9809];2;FALSE());&quot;-&quot;)" office:value-type="float" office:value="1" calcext:value-type="float">
            <text:p>1</text:p>
          </table:table-cell>
          <table:table-cell table:style-name="ce174" table:formula="of:=IFERROR(VLOOKUP([$Masterlist.$P121];[$Datasheet.$B$1:.$AV$9809];3;FALSE());&quot;-&quot;)" office:value-type="float" office:value="1" calcext:value-type="float">
            <text:p>1</text:p>
          </table:table-cell>
          <table:table-cell table:style-name="ce174" table:formula="of:=IFERROR(VLOOKUP([$Masterlist.$P121];[$Datasheet.$B$1:.$AV$9809];4;FALSE());&quot;-&quot;)" office:value-type="float" office:value="1" calcext:value-type="float">
            <text:p>1</text:p>
          </table:table-cell>
          <table:table-cell table:style-name="ce174" table:formula="of:=IFERROR(VLOOKUP([$Masterlist.$P121];[$Datasheet.$B$1:.$AV$9809];5;FALSE());&quot;-&quot;)" office:value-type="float" office:value="1" calcext:value-type="float">
            <text:p>1</text:p>
          </table:table-cell>
          <table:table-cell table:style-name="ce192" table:formula="of:=IFERROR(VLOOKUP([$Masterlist.$P121];[$Datasheet.$B$1:.$AV$9809];6;FALSE());&quot;-&quot;)" office:value-type="float" office:value="1" calcext:value-type="float">
            <text:p>1</text:p>
          </table:table-cell>
          <table:table-cell table:style-name="ce174" table:formula="of:=IFERROR(VLOOKUP([$Masterlist.$P121];[$Datasheet.$B$1:.$AV$9809];7;FALSE());&quot;-&quot;)" office:value-type="float" office:value="1" calcext:value-type="float">
            <text:p>1</text:p>
          </table:table-cell>
          <table:table-cell table:style-name="ce174" table:formula="of:=IFERROR(VLOOKUP([$Masterlist.$P121];[$Datasheet.$B$1:.$AV$9809];8;FALSE());&quot;-&quot;)" office:value-type="float" office:value="1" calcext:value-type="float">
            <text:p>1</text:p>
          </table:table-cell>
          <table:table-cell table:style-name="ce174" table:formula="of:=IFERROR(VLOOKUP([$Masterlist.$P121];[$Datasheet.$B$1:.$AV$9809];9;FALSE());&quot;-&quot;)" office:value-type="float" office:value="1" calcext:value-type="float">
            <text:p>1</text:p>
          </table:table-cell>
          <table:table-cell table:style-name="ce174" table:formula="of:=IFERROR(VLOOKUP([$Masterlist.$P121];[$Datasheet.$B$1:.$AV$9809];10;FALSE());&quot;-&quot;)" office:value-type="float" office:value="1" calcext:value-type="float">
            <text:p>1</text:p>
          </table:table-cell>
          <table:table-cell table:style-name="ce174" table:formula="of:=IFERROR(VLOOKUP([$Masterlist.$P121];[$Datasheet.$B$1:.$AV$9809];11;FALSE());&quot;-&quot;)" office:value-type="float" office:value="1" calcext:value-type="float">
            <text:p>1</text:p>
          </table:table-cell>
          <table:table-cell table:style-name="ce174" table:formula="of:=IFERROR(VLOOKUP([$Masterlist.$P121];[$Datasheet.$B$1:.$AV$9809];12;FALSE());&quot;-&quot;)" office:value-type="float" office:value="1" calcext:value-type="float">
            <text:p>1</text:p>
          </table:table-cell>
          <table:table-cell table:style-name="ce174" table:formula="of:=IFERROR(VLOOKUP([$Masterlist.$P121];[$Datasheet.$B$1:.$AV$9809];13;FALSE());&quot;-&quot;)" office:value-type="float" office:value="1" calcext:value-type="float">
            <text:p>1</text:p>
          </table:table-cell>
          <table:table-cell table:style-name="ce174" table:formula="of:=IFERROR(VLOOKUP([$Masterlist.$P121];[$Datasheet.$B$1:.$AV$9809];14;FALSE());&quot;-&quot;)" office:value-type="float" office:value="1" calcext:value-type="float">
            <text:p>1</text:p>
          </table:table-cell>
          <table:table-cell table:style-name="ce174" table:formula="of:=IFERROR(VLOOKUP([$Masterlist.$P121];[$Datasheet.$B$1:.$AV$9809];15;FALSE());&quot;-&quot;)" office:value-type="float" office:value="1" calcext:value-type="float">
            <text:p>1</text:p>
          </table:table-cell>
          <table:table-cell table:style-name="ce174" table:formula="of:=IFERROR(VLOOKUP([$Masterlist.$P121];[$Datasheet.$B$1:.$AV$9809];16;FALSE());&quot;-&quot;)" office:value-type="float" office:value="0" calcext:value-type="float">
            <text:p/>
          </table:table-cell>
          <table:table-cell table:style-name="ce174" table:formula="of:=IFERROR(VLOOKUP([$Masterlist.$P121];[$Datasheet.$B$1:.$AV$9809];17;FALSE());&quot;-&quot;)" office:value-type="float" office:value="0" calcext:value-type="float">
            <text:p/>
          </table:table-cell>
          <table:table-cell table:style-name="ce174" table:formula="of:=IFERROR(VLOOKUP([$Masterlist.$P121];[$Datasheet.$B$1:.$AV$9809];18;FALSE());&quot;-&quot;)" office:value-type="float" office:value="0" calcext:value-type="float">
            <text:p/>
          </table:table-cell>
          <table:table-cell table:style-name="ce245" table:formula="of:=IFERROR(VLOOKUP([$Masterlist.$P121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35" office:value-type="string" calcext:value-type="string">
            <text:p>L</text:p>
          </table:table-cell>
          <table:table-cell table:style-name="ce59"/>
          <table:table-cell table:style-name="ce50" table:number-columns-repeated="4"/>
          <table:table-cell table:number-columns-repeated="2" table:style-name="ce49" office:value-type="string" calcext:value-type="string">
            <text:p>Yes</text:p>
          </table:table-cell>
          <table:table-cell table:style-name="ce49"/>
          <table:table-cell table:style-name="ce50" table:number-columns-repeated="3"/>
          <table:table-cell table:style-name="ce84"/>
          <table:table-cell table:style-name="ce95" office:value-type="string" calcext:value-type="string">
            <text:p>Lighting Technician</text:p>
          </table:table-cell>
          <table:table-cell table:style-name="ce108" office:value-type="string" calcext:value-type="string">
            <text:p>Joe Meyer</text:p>
          </table:table-cell>
          <table:table-cell table:style-name="ce121" table:formula="of:=IF(ISNUMBER(MATCH([.P122];[$Datasheet.$B$1:.$B$9809];0));&quot;✓&quot;;&quot;x&quot;)" office:value-type="string" office:string-value="✓" calcext:value-type="string">
            <text:p>✓</text:p>
          </table:table-cell>
          <table:table-cell table:style-name="ce143" table:formula="of:=IFERROR(VLOOKUP([$Masterlist.$P122];[$Datasheet.$B$1:.$AV$9809];2;FALSE());&quot;-&quot;)" office:value-type="float" office:value="0" calcext:value-type="float">
            <text:p>0</text:p>
          </table:table-cell>
          <table:table-cell table:style-name="ce174" table:formula="of:=IFERROR(VLOOKUP([$Masterlist.$P122];[$Datasheet.$B$1:.$AV$9809];3;FALSE());&quot;-&quot;)" office:value-type="float" office:value="1" calcext:value-type="float">
            <text:p>1</text:p>
          </table:table-cell>
          <table:table-cell table:style-name="ce174" table:formula="of:=IFERROR(VLOOKUP([$Masterlist.$P122];[$Datasheet.$B$1:.$AV$9809];4;FALSE());&quot;-&quot;)" office:value-type="float" office:value="1" calcext:value-type="float">
            <text:p>1</text:p>
          </table:table-cell>
          <table:table-cell table:style-name="ce174" table:formula="of:=IFERROR(VLOOKUP([$Masterlist.$P122];[$Datasheet.$B$1:.$AV$9809];5;FALSE());&quot;-&quot;)" office:value-type="float" office:value="1" calcext:value-type="float">
            <text:p>1</text:p>
          </table:table-cell>
          <table:table-cell table:style-name="ce192" table:formula="of:=IFERROR(VLOOKUP([$Masterlist.$P122];[$Datasheet.$B$1:.$AV$9809];6;FALSE());&quot;-&quot;)" office:value-type="float" office:value="0" calcext:value-type="float">
            <text:p>0</text:p>
          </table:table-cell>
          <table:table-cell table:style-name="ce174" table:formula="of:=IFERROR(VLOOKUP([$Masterlist.$P122];[$Datasheet.$B$1:.$AV$9809];7;FALSE());&quot;-&quot;)" office:value-type="float" office:value="0" calcext:value-type="float">
            <text:p>0</text:p>
          </table:table-cell>
          <table:table-cell table:style-name="ce174" table:formula="of:=IFERROR(VLOOKUP([$Masterlist.$P122];[$Datasheet.$B$1:.$AV$9809];8;FALSE());&quot;-&quot;)" office:value-type="float" office:value="0" calcext:value-type="float">
            <text:p>0</text:p>
          </table:table-cell>
          <table:table-cell table:style-name="ce174" table:formula="of:=IFERROR(VLOOKUP([$Masterlist.$P122];[$Datasheet.$B$1:.$AV$9809];9;FALSE());&quot;-&quot;)" office:value-type="float" office:value="1" calcext:value-type="float">
            <text:p>1</text:p>
          </table:table-cell>
          <table:table-cell table:style-name="ce174" table:formula="of:=IFERROR(VLOOKUP([$Masterlist.$P122];[$Datasheet.$B$1:.$AV$9809];10;FALSE());&quot;-&quot;)" office:value-type="float" office:value="0" calcext:value-type="float">
            <text:p>0</text:p>
          </table:table-cell>
          <table:table-cell table:style-name="ce174" table:formula="of:=IFERROR(VLOOKUP([$Masterlist.$P122];[$Datasheet.$B$1:.$AV$9809];11;FALSE());&quot;-&quot;)" office:value-type="float" office:value="1" calcext:value-type="float">
            <text:p>1</text:p>
          </table:table-cell>
          <table:table-cell table:style-name="ce174" table:formula="of:=IFERROR(VLOOKUP([$Masterlist.$P122];[$Datasheet.$B$1:.$AV$9809];12;FALSE());&quot;-&quot;)" office:value-type="float" office:value="0" calcext:value-type="float">
            <text:p>0</text:p>
          </table:table-cell>
          <table:table-cell table:style-name="ce174" table:formula="of:=IFERROR(VLOOKUP([$Masterlist.$P122];[$Datasheet.$B$1:.$AV$9809];13;FALSE());&quot;-&quot;)" office:value-type="float" office:value="0" calcext:value-type="float">
            <text:p>0</text:p>
          </table:table-cell>
          <table:table-cell table:style-name="ce174" table:formula="of:=IFERROR(VLOOKUP([$Masterlist.$P122];[$Datasheet.$B$1:.$AV$9809];14;FALSE());&quot;-&quot;)" office:value-type="float" office:value="0" calcext:value-type="float">
            <text:p>0</text:p>
          </table:table-cell>
          <table:table-cell table:style-name="ce174" table:formula="of:=IFERROR(VLOOKUP([$Masterlist.$P122];[$Datasheet.$B$1:.$AV$9809];15;FALSE());&quot;-&quot;)" office:value-type="float" office:value="0" calcext:value-type="float">
            <text:p>0</text:p>
          </table:table-cell>
          <table:table-cell table:style-name="ce174" table:formula="of:=IFERROR(VLOOKUP([$Masterlist.$P122];[$Datasheet.$B$1:.$AV$9809];16;FALSE());&quot;-&quot;)" office:value-type="float" office:value="0" calcext:value-type="float">
            <text:p/>
          </table:table-cell>
          <table:table-cell table:style-name="ce174" table:formula="of:=IFERROR(VLOOKUP([$Masterlist.$P122];[$Datasheet.$B$1:.$AV$9809];17;FALSE());&quot;-&quot;)" office:value-type="float" office:value="0" calcext:value-type="float">
            <text:p/>
          </table:table-cell>
          <table:table-cell table:style-name="ce174" table:formula="of:=IFERROR(VLOOKUP([$Masterlist.$P122];[$Datasheet.$B$1:.$AV$9809];18;FALSE());&quot;-&quot;)" office:value-type="float" office:value="0" calcext:value-type="float">
            <text:p/>
          </table:table-cell>
          <table:table-cell table:style-name="ce245" table:formula="of:=IFERROR(VLOOKUP([$Masterlist.$P122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33" office:value-type="string" calcext:value-type="string">
            <text:p>L</text:p>
          </table:table-cell>
          <table:table-cell table:style-name="ce60"/>
          <table:table-cell table:style-name="ce50" table:number-columns-repeated="4"/>
          <table:table-cell table:number-columns-repeated="2" table:style-name="ce49" office:value-type="string" calcext:value-type="string">
            <text:p>Yes</text:p>
          </table:table-cell>
          <table:table-cell table:style-name="ce50"/>
          <table:table-cell table:style-name="ce51" table:number-columns-repeated="3"/>
          <table:table-cell table:style-name="ce85"/>
          <table:table-cell table:style-name="ce95" office:value-type="string" calcext:value-type="string">
            <text:p>Lighting Technician</text:p>
          </table:table-cell>
          <table:table-cell table:style-name="ce108" office:value-type="string" calcext:value-type="string">
            <text:p>Eugene Snyders</text:p>
          </table:table-cell>
          <table:table-cell table:style-name="ce121" table:formula="of:=IF(ISNUMBER(MATCH([.P123];[$Datasheet.$B$1:.$B$9809];0));&quot;✓&quot;;&quot;x&quot;)" office:value-type="string" office:string-value="✓" calcext:value-type="string">
            <text:p>✓</text:p>
          </table:table-cell>
          <table:table-cell table:style-name="ce143" table:formula="of:=IFERROR(VLOOKUP([$Masterlist.$P123];[$Datasheet.$B$1:.$AV$9809];2;FALSE());&quot;-&quot;)" office:value-type="float" office:value="1" calcext:value-type="float">
            <text:p>1</text:p>
          </table:table-cell>
          <table:table-cell table:style-name="ce174" table:formula="of:=IFERROR(VLOOKUP([$Masterlist.$P123];[$Datasheet.$B$1:.$AV$9809];3;FALSE());&quot;-&quot;)" office:value-type="float" office:value="1" calcext:value-type="float">
            <text:p>1</text:p>
          </table:table-cell>
          <table:table-cell table:style-name="ce174" table:formula="of:=IFERROR(VLOOKUP([$Masterlist.$P123];[$Datasheet.$B$1:.$AV$9809];4;FALSE());&quot;-&quot;)" office:value-type="float" office:value="0" calcext:value-type="float">
            <text:p>0</text:p>
          </table:table-cell>
          <table:table-cell table:style-name="ce174" table:formula="of:=IFERROR(VLOOKUP([$Masterlist.$P123];[$Datasheet.$B$1:.$AV$9809];5;FALSE());&quot;-&quot;)" office:value-type="float" office:value="0" calcext:value-type="float">
            <text:p>0</text:p>
          </table:table-cell>
          <table:table-cell table:style-name="ce192" table:formula="of:=IFERROR(VLOOKUP([$Masterlist.$P123];[$Datasheet.$B$1:.$AV$9809];6;FALSE());&quot;-&quot;)" office:value-type="float" office:value="1" calcext:value-type="float">
            <text:p>1</text:p>
          </table:table-cell>
          <table:table-cell table:style-name="ce174" table:formula="of:=IFERROR(VLOOKUP([$Masterlist.$P123];[$Datasheet.$B$1:.$AV$9809];7;FALSE());&quot;-&quot;)" office:value-type="float" office:value="1" calcext:value-type="float">
            <text:p>1</text:p>
          </table:table-cell>
          <table:table-cell table:style-name="ce174" table:formula="of:=IFERROR(VLOOKUP([$Masterlist.$P123];[$Datasheet.$B$1:.$AV$9809];8;FALSE());&quot;-&quot;)" office:value-type="float" office:value="1" calcext:value-type="float">
            <text:p>1</text:p>
          </table:table-cell>
          <table:table-cell table:style-name="ce174" table:formula="of:=IFERROR(VLOOKUP([$Masterlist.$P123];[$Datasheet.$B$1:.$AV$9809];9;FALSE());&quot;-&quot;)" office:value-type="float" office:value="1" calcext:value-type="float">
            <text:p>1</text:p>
          </table:table-cell>
          <table:table-cell table:style-name="ce174" table:formula="of:=IFERROR(VLOOKUP([$Masterlist.$P123];[$Datasheet.$B$1:.$AV$9809];10;FALSE());&quot;-&quot;)" office:value-type="float" office:value="1" calcext:value-type="float">
            <text:p>1</text:p>
          </table:table-cell>
          <table:table-cell table:style-name="ce174" table:formula="of:=IFERROR(VLOOKUP([$Masterlist.$P123];[$Datasheet.$B$1:.$AV$9809];11;FALSE());&quot;-&quot;)" office:value-type="float" office:value="1" calcext:value-type="float">
            <text:p>1</text:p>
          </table:table-cell>
          <table:table-cell table:style-name="ce174" table:formula="of:=IFERROR(VLOOKUP([$Masterlist.$P123];[$Datasheet.$B$1:.$AV$9809];12;FALSE());&quot;-&quot;)" office:value-type="float" office:value="1" calcext:value-type="float">
            <text:p>1</text:p>
          </table:table-cell>
          <table:table-cell table:style-name="ce174" table:formula="of:=IFERROR(VLOOKUP([$Masterlist.$P123];[$Datasheet.$B$1:.$AV$9809];13;FALSE());&quot;-&quot;)" office:value-type="float" office:value="1" calcext:value-type="float">
            <text:p>1</text:p>
          </table:table-cell>
          <table:table-cell table:style-name="ce174" table:formula="of:=IFERROR(VLOOKUP([$Masterlist.$P123];[$Datasheet.$B$1:.$AV$9809];14;FALSE());&quot;-&quot;)" office:value-type="float" office:value="1" calcext:value-type="float">
            <text:p>1</text:p>
          </table:table-cell>
          <table:table-cell table:style-name="ce174" table:formula="of:=IFERROR(VLOOKUP([$Masterlist.$P123];[$Datasheet.$B$1:.$AV$9809];15;FALSE());&quot;-&quot;)" office:value-type="float" office:value="1" calcext:value-type="float">
            <text:p>1</text:p>
          </table:table-cell>
          <table:table-cell table:style-name="ce174" table:formula="of:=IFERROR(VLOOKUP([$Masterlist.$P123];[$Datasheet.$B$1:.$AV$9809];16;FALSE());&quot;-&quot;)" office:value-type="float" office:value="0" calcext:value-type="float">
            <text:p/>
          </table:table-cell>
          <table:table-cell table:style-name="ce174" table:formula="of:=IFERROR(VLOOKUP([$Masterlist.$P123];[$Datasheet.$B$1:.$AV$9809];17;FALSE());&quot;-&quot;)" office:value-type="float" office:value="0" calcext:value-type="float">
            <text:p/>
          </table:table-cell>
          <table:table-cell table:style-name="ce174" table:formula="of:=IFERROR(VLOOKUP([$Masterlist.$P123];[$Datasheet.$B$1:.$AV$9809];18;FALSE());&quot;-&quot;)" office:value-type="float" office:value="0" calcext:value-type="float">
            <text:p/>
          </table:table-cell>
          <table:table-cell table:style-name="ce245" table:formula="of:=IFERROR(VLOOKUP([$Masterlist.$P123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33" office:value-type="string" calcext:value-type="string">
            <text:p>A</text:p>
          </table:table-cell>
          <table:table-cell table:style-name="ce59"/>
          <table:table-cell table:style-name="ce50" table:number-columns-repeated="4"/>
          <table:table-cell table:number-columns-repeated="2" table:style-name="ce49" office:value-type="string" calcext:value-type="string">
            <text:p>Yes</text:p>
          </table:table-cell>
          <table:table-cell table:style-name="ce50" table:number-columns-repeated="4"/>
          <table:table-cell table:style-name="ce84"/>
          <table:table-cell table:style-name="ce95" office:value-type="string" calcext:value-type="string">
            <text:p>Lighting Technician</text:p>
          </table:table-cell>
          <table:table-cell table:style-name="ce110" office:value-type="string" calcext:value-type="string">
            <text:p>Laura-Lee Kruyswijk</text:p>
          </table:table-cell>
          <table:table-cell table:style-name="ce121" table:formula="of:=IF(ISNUMBER(MATCH([.P124];[$Datasheet.$B$1:.$B$9809];0));&quot;✓&quot;;&quot;x&quot;)" office:value-type="string" office:string-value="✓" calcext:value-type="string">
            <text:p>✓</text:p>
          </table:table-cell>
          <table:table-cell table:style-name="ce143" table:formula="of:=IFERROR(VLOOKUP([$Masterlist.$P124];[$Datasheet.$B$1:.$AV$9809];2;FALSE());&quot;-&quot;)" office:value-type="float" office:value="1" calcext:value-type="float">
            <text:p>1</text:p>
          </table:table-cell>
          <table:table-cell table:style-name="ce174" table:formula="of:=IFERROR(VLOOKUP([$Masterlist.$P124];[$Datasheet.$B$1:.$AV$9809];3;FALSE());&quot;-&quot;)" office:value-type="float" office:value="1" calcext:value-type="float">
            <text:p>1</text:p>
          </table:table-cell>
          <table:table-cell table:style-name="ce174" table:formula="of:=IFERROR(VLOOKUP([$Masterlist.$P124];[$Datasheet.$B$1:.$AV$9809];4;FALSE());&quot;-&quot;)" office:value-type="float" office:value="0" calcext:value-type="float">
            <text:p>0</text:p>
          </table:table-cell>
          <table:table-cell table:style-name="ce174" table:formula="of:=IFERROR(VLOOKUP([$Masterlist.$P124];[$Datasheet.$B$1:.$AV$9809];5;FALSE());&quot;-&quot;)" office:value-type="float" office:value="0" calcext:value-type="float">
            <text:p>0</text:p>
          </table:table-cell>
          <table:table-cell table:style-name="ce192" table:formula="of:=IFERROR(VLOOKUP([$Masterlist.$P124];[$Datasheet.$B$1:.$AV$9809];6;FALSE());&quot;-&quot;)" office:value-type="float" office:value="1" calcext:value-type="float">
            <text:p>1</text:p>
          </table:table-cell>
          <table:table-cell table:style-name="ce174" table:formula="of:=IFERROR(VLOOKUP([$Masterlist.$P124];[$Datasheet.$B$1:.$AV$9809];7;FALSE());&quot;-&quot;)" office:value-type="float" office:value="1" calcext:value-type="float">
            <text:p>1</text:p>
          </table:table-cell>
          <table:table-cell table:style-name="ce174" table:formula="of:=IFERROR(VLOOKUP([$Masterlist.$P124];[$Datasheet.$B$1:.$AV$9809];8;FALSE());&quot;-&quot;)" office:value-type="float" office:value="0" calcext:value-type="float">
            <text:p>0</text:p>
          </table:table-cell>
          <table:table-cell table:style-name="ce174" table:formula="of:=IFERROR(VLOOKUP([$Masterlist.$P124];[$Datasheet.$B$1:.$AV$9809];9;FALSE());&quot;-&quot;)" office:value-type="float" office:value="0" calcext:value-type="float">
            <text:p>0</text:p>
          </table:table-cell>
          <table:table-cell table:style-name="ce174" table:formula="of:=IFERROR(VLOOKUP([$Masterlist.$P124];[$Datasheet.$B$1:.$AV$9809];10;FALSE());&quot;-&quot;)" office:value-type="float" office:value="1" calcext:value-type="float">
            <text:p>1</text:p>
          </table:table-cell>
          <table:table-cell table:style-name="ce174" table:formula="of:=IFERROR(VLOOKUP([$Masterlist.$P124];[$Datasheet.$B$1:.$AV$9809];11;FALSE());&quot;-&quot;)" office:value-type="float" office:value="1" calcext:value-type="float">
            <text:p>1</text:p>
          </table:table-cell>
          <table:table-cell table:style-name="ce174" table:formula="of:=IFERROR(VLOOKUP([$Masterlist.$P124];[$Datasheet.$B$1:.$AV$9809];12;FALSE());&quot;-&quot;)" office:value-type="float" office:value="0" calcext:value-type="float">
            <text:p>0</text:p>
          </table:table-cell>
          <table:table-cell table:style-name="ce174" table:formula="of:=IFERROR(VLOOKUP([$Masterlist.$P124];[$Datasheet.$B$1:.$AV$9809];13;FALSE());&quot;-&quot;)" office:value-type="float" office:value="0" calcext:value-type="float">
            <text:p>0</text:p>
          </table:table-cell>
          <table:table-cell table:style-name="ce174" table:formula="of:=IFERROR(VLOOKUP([$Masterlist.$P124];[$Datasheet.$B$1:.$AV$9809];14;FALSE());&quot;-&quot;)" office:value-type="float" office:value="1" calcext:value-type="float">
            <text:p>1</text:p>
          </table:table-cell>
          <table:table-cell table:style-name="ce174" table:formula="of:=IFERROR(VLOOKUP([$Masterlist.$P124];[$Datasheet.$B$1:.$AV$9809];15;FALSE());&quot;-&quot;)" office:value-type="float" office:value="1" calcext:value-type="float">
            <text:p>1</text:p>
          </table:table-cell>
          <table:table-cell table:style-name="ce174" table:formula="of:=IFERROR(VLOOKUP([$Masterlist.$P124];[$Datasheet.$B$1:.$AV$9809];16;FALSE());&quot;-&quot;)" office:value-type="float" office:value="0" calcext:value-type="float">
            <text:p/>
          </table:table-cell>
          <table:table-cell table:style-name="ce174" table:formula="of:=IFERROR(VLOOKUP([$Masterlist.$P124];[$Datasheet.$B$1:.$AV$9809];17;FALSE());&quot;-&quot;)" office:value-type="float" office:value="0" calcext:value-type="float">
            <text:p/>
          </table:table-cell>
          <table:table-cell table:style-name="ce174" table:formula="of:=IFERROR(VLOOKUP([$Masterlist.$P124];[$Datasheet.$B$1:.$AV$9809];18;FALSE());&quot;-&quot;)" office:value-type="float" office:value="0" calcext:value-type="float">
            <text:p/>
          </table:table-cell>
          <table:table-cell table:style-name="ce245" table:formula="of:=IFERROR(VLOOKUP([$Masterlist.$P124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33" office:value-type="string" calcext:value-type="string">
            <text:p>L</text:p>
          </table:table-cell>
          <table:table-cell table:style-name="ce59"/>
          <table:table-cell table:style-name="ce50" table:number-columns-repeated="4"/>
          <table:table-cell table:number-columns-repeated="3" table:style-name="ce49" office:value-type="string" calcext:value-type="string">
            <text:p>Yes</text:p>
          </table:table-cell>
          <table:table-cell table:style-name="ce50" table:number-columns-repeated="3"/>
          <table:table-cell table:style-name="ce84"/>
          <table:table-cell table:style-name="ce95" office:value-type="string" calcext:value-type="string">
            <text:p>Lighting Technician</text:p>
          </table:table-cell>
          <table:table-cell table:style-name="ce110" office:value-type="string" calcext:value-type="string">
            <text:p>Robert Lyons</text:p>
          </table:table-cell>
          <table:table-cell table:style-name="ce121" table:formula="of:=IF(ISNUMBER(MATCH([.P125];[$Datasheet.$B$1:.$B$9809];0));&quot;✓&quot;;&quot;x&quot;)" office:value-type="string" office:string-value="✓" calcext:value-type="string">
            <text:p>✓</text:p>
          </table:table-cell>
          <table:table-cell table:style-name="ce143" table:formula="of:=IFERROR(VLOOKUP([$Masterlist.$P125];[$Datasheet.$B$1:.$AV$9809];2;FALSE());&quot;-&quot;)" office:value-type="float" office:value="0" calcext:value-type="float">
            <text:p>0</text:p>
          </table:table-cell>
          <table:table-cell table:style-name="ce174" table:formula="of:=IFERROR(VLOOKUP([$Masterlist.$P125];[$Datasheet.$B$1:.$AV$9809];3;FALSE());&quot;-&quot;)" office:value-type="float" office:value="0" calcext:value-type="float">
            <text:p>0</text:p>
          </table:table-cell>
          <table:table-cell table:style-name="ce174" table:formula="of:=IFERROR(VLOOKUP([$Masterlist.$P125];[$Datasheet.$B$1:.$AV$9809];4;FALSE());&quot;-&quot;)" office:value-type="float" office:value="1" calcext:value-type="float">
            <text:p>1</text:p>
          </table:table-cell>
          <table:table-cell table:style-name="ce174" table:formula="of:=IFERROR(VLOOKUP([$Masterlist.$P125];[$Datasheet.$B$1:.$AV$9809];5;FALSE());&quot;-&quot;)" office:value-type="float" office:value="1" calcext:value-type="float">
            <text:p>1</text:p>
          </table:table-cell>
          <table:table-cell table:style-name="ce192" table:formula="of:=IFERROR(VLOOKUP([$Masterlist.$P125];[$Datasheet.$B$1:.$AV$9809];6;FALSE());&quot;-&quot;)" office:value-type="float" office:value="1" calcext:value-type="float">
            <text:p>1</text:p>
          </table:table-cell>
          <table:table-cell table:style-name="ce174" table:formula="of:=IFERROR(VLOOKUP([$Masterlist.$P125];[$Datasheet.$B$1:.$AV$9809];7;FALSE());&quot;-&quot;)" office:value-type="float" office:value="1" calcext:value-type="float">
            <text:p>1</text:p>
          </table:table-cell>
          <table:table-cell table:style-name="ce174" table:formula="of:=IFERROR(VLOOKUP([$Masterlist.$P125];[$Datasheet.$B$1:.$AV$9809];8;FALSE());&quot;-&quot;)" office:value-type="float" office:value="0" calcext:value-type="float">
            <text:p>0</text:p>
          </table:table-cell>
          <table:table-cell table:style-name="ce174" table:formula="of:=IFERROR(VLOOKUP([$Masterlist.$P125];[$Datasheet.$B$1:.$AV$9809];9;FALSE());&quot;-&quot;)" office:value-type="float" office:value="0" calcext:value-type="float">
            <text:p>0</text:p>
          </table:table-cell>
          <table:table-cell table:style-name="ce174" table:formula="of:=IFERROR(VLOOKUP([$Masterlist.$P125];[$Datasheet.$B$1:.$AV$9809];10;FALSE());&quot;-&quot;)" office:value-type="float" office:value="1" calcext:value-type="float">
            <text:p>1</text:p>
          </table:table-cell>
          <table:table-cell table:style-name="ce174" table:formula="of:=IFERROR(VLOOKUP([$Masterlist.$P125];[$Datasheet.$B$1:.$AV$9809];11;FALSE());&quot;-&quot;)" office:value-type="float" office:value="1" calcext:value-type="float">
            <text:p>1</text:p>
          </table:table-cell>
          <table:table-cell table:style-name="ce174" table:formula="of:=IFERROR(VLOOKUP([$Masterlist.$P125];[$Datasheet.$B$1:.$AV$9809];12;FALSE());&quot;-&quot;)" office:value-type="float" office:value="0" calcext:value-type="float">
            <text:p>0</text:p>
          </table:table-cell>
          <table:table-cell table:style-name="ce174" table:formula="of:=IFERROR(VLOOKUP([$Masterlist.$P125];[$Datasheet.$B$1:.$AV$9809];13;FALSE());&quot;-&quot;)" office:value-type="float" office:value="0" calcext:value-type="float">
            <text:p>0</text:p>
          </table:table-cell>
          <table:table-cell table:style-name="ce174" table:formula="of:=IFERROR(VLOOKUP([$Masterlist.$P125];[$Datasheet.$B$1:.$AV$9809];14;FALSE());&quot;-&quot;)" office:value-type="float" office:value="0" calcext:value-type="float">
            <text:p>0</text:p>
          </table:table-cell>
          <table:table-cell table:style-name="ce174" table:formula="of:=IFERROR(VLOOKUP([$Masterlist.$P125];[$Datasheet.$B$1:.$AV$9809];15;FALSE());&quot;-&quot;)" office:value-type="float" office:value="0" calcext:value-type="float">
            <text:p>0</text:p>
          </table:table-cell>
          <table:table-cell table:style-name="ce174" table:formula="of:=IFERROR(VLOOKUP([$Masterlist.$P125];[$Datasheet.$B$1:.$AV$9809];16;FALSE());&quot;-&quot;)" office:value-type="float" office:value="0" calcext:value-type="float">
            <text:p/>
          </table:table-cell>
          <table:table-cell table:style-name="ce174" table:formula="of:=IFERROR(VLOOKUP([$Masterlist.$P125];[$Datasheet.$B$1:.$AV$9809];17;FALSE());&quot;-&quot;)" office:value-type="float" office:value="0" calcext:value-type="float">
            <text:p/>
          </table:table-cell>
          <table:table-cell table:style-name="ce174" table:formula="of:=IFERROR(VLOOKUP([$Masterlist.$P125];[$Datasheet.$B$1:.$AV$9809];18;FALSE());&quot;-&quot;)" office:value-type="float" office:value="0" calcext:value-type="float">
            <text:p/>
          </table:table-cell>
          <table:table-cell table:style-name="ce245" table:formula="of:=IFERROR(VLOOKUP([$Masterlist.$P125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33" office:value-type="string" calcext:value-type="string">
            <text:p>L</text:p>
          </table:table-cell>
          <table:table-cell table:style-name="ce59"/>
          <table:table-cell table:style-name="ce50" table:number-columns-repeated="4"/>
          <table:table-cell table:number-columns-repeated="2" table:style-name="ce49" office:value-type="string" calcext:value-type="string">
            <text:p>Yes</text:p>
          </table:table-cell>
          <table:table-cell table:style-name="ce49"/>
          <table:table-cell table:style-name="ce50" table:number-columns-repeated="3"/>
          <table:table-cell table:style-name="ce84"/>
          <table:table-cell table:style-name="ce95" office:value-type="string" calcext:value-type="string">
            <text:p>Lighting Technician</text:p>
          </table:table-cell>
          <table:table-cell table:style-name="ce110" office:value-type="string" calcext:value-type="string">
            <text:p>Ruan de Jonge</text:p>
          </table:table-cell>
          <table:table-cell table:style-name="ce121" table:formula="of:=IF(ISNUMBER(MATCH([.P126];[$Datasheet.$B$1:.$B$9809];0));&quot;✓&quot;;&quot;x&quot;)" office:value-type="string" office:string-value="✓" calcext:value-type="string">
            <text:p>✓</text:p>
          </table:table-cell>
          <table:table-cell table:style-name="ce143" table:formula="of:=IFERROR(VLOOKUP([$Masterlist.$P126];[$Datasheet.$B$1:.$AV$9809];2;FALSE());&quot;-&quot;)" office:value-type="float" office:value="0" calcext:value-type="float">
            <text:p>0</text:p>
          </table:table-cell>
          <table:table-cell table:style-name="ce174" table:formula="of:=IFERROR(VLOOKUP([$Masterlist.$P126];[$Datasheet.$B$1:.$AV$9809];3;FALSE());&quot;-&quot;)" office:value-type="float" office:value="0" calcext:value-type="float">
            <text:p>0</text:p>
          </table:table-cell>
          <table:table-cell table:style-name="ce174" table:formula="of:=IFERROR(VLOOKUP([$Masterlist.$P126];[$Datasheet.$B$1:.$AV$9809];4;FALSE());&quot;-&quot;)" office:value-type="float" office:value="1" calcext:value-type="float">
            <text:p>1</text:p>
          </table:table-cell>
          <table:table-cell table:style-name="ce174" table:formula="of:=IFERROR(VLOOKUP([$Masterlist.$P126];[$Datasheet.$B$1:.$AV$9809];5;FALSE());&quot;-&quot;)" office:value-type="float" office:value="1" calcext:value-type="float">
            <text:p>1</text:p>
          </table:table-cell>
          <table:table-cell table:style-name="ce192" table:formula="of:=IFERROR(VLOOKUP([$Masterlist.$P126];[$Datasheet.$B$1:.$AV$9809];6;FALSE());&quot;-&quot;)" office:value-type="float" office:value="0" calcext:value-type="float">
            <text:p>0</text:p>
          </table:table-cell>
          <table:table-cell table:style-name="ce174" table:formula="of:=IFERROR(VLOOKUP([$Masterlist.$P126];[$Datasheet.$B$1:.$AV$9809];7;FALSE());&quot;-&quot;)" office:value-type="float" office:value="0" calcext:value-type="float">
            <text:p>0</text:p>
          </table:table-cell>
          <table:table-cell table:style-name="ce174" table:formula="of:=IFERROR(VLOOKUP([$Masterlist.$P126];[$Datasheet.$B$1:.$AV$9809];8;FALSE());&quot;-&quot;)" office:value-type="float" office:value="0" calcext:value-type="float">
            <text:p>0</text:p>
          </table:table-cell>
          <table:table-cell table:style-name="ce174" table:formula="of:=IFERROR(VLOOKUP([$Masterlist.$P126];[$Datasheet.$B$1:.$AV$9809];9;FALSE());&quot;-&quot;)" office:value-type="float" office:value="0" calcext:value-type="float">
            <text:p>0</text:p>
          </table:table-cell>
          <table:table-cell table:style-name="ce174" table:formula="of:=IFERROR(VLOOKUP([$Masterlist.$P126];[$Datasheet.$B$1:.$AV$9809];10;FALSE());&quot;-&quot;)" office:value-type="float" office:value="1" calcext:value-type="float">
            <text:p>1</text:p>
          </table:table-cell>
          <table:table-cell table:style-name="ce174" table:formula="of:=IFERROR(VLOOKUP([$Masterlist.$P126];[$Datasheet.$B$1:.$AV$9809];11;FALSE());&quot;-&quot;)" office:value-type="float" office:value="1" calcext:value-type="float">
            <text:p>1</text:p>
          </table:table-cell>
          <table:table-cell table:style-name="ce174" table:formula="of:=IFERROR(VLOOKUP([$Masterlist.$P126];[$Datasheet.$B$1:.$AV$9809];12;FALSE());&quot;-&quot;)" office:value-type="float" office:value="0" calcext:value-type="float">
            <text:p>0</text:p>
          </table:table-cell>
          <table:table-cell table:style-name="ce174" table:formula="of:=IFERROR(VLOOKUP([$Masterlist.$P126];[$Datasheet.$B$1:.$AV$9809];13;FALSE());&quot;-&quot;)" office:value-type="float" office:value="0" calcext:value-type="float">
            <text:p>0</text:p>
          </table:table-cell>
          <table:table-cell table:style-name="ce174" table:formula="of:=IFERROR(VLOOKUP([$Masterlist.$P126];[$Datasheet.$B$1:.$AV$9809];14;FALSE());&quot;-&quot;)" office:value-type="float" office:value="1" calcext:value-type="float">
            <text:p>1</text:p>
          </table:table-cell>
          <table:table-cell table:style-name="ce174" table:formula="of:=IFERROR(VLOOKUP([$Masterlist.$P126];[$Datasheet.$B$1:.$AV$9809];15;FALSE());&quot;-&quot;)" office:value-type="float" office:value="1" calcext:value-type="float">
            <text:p>1</text:p>
          </table:table-cell>
          <table:table-cell table:style-name="ce174" table:formula="of:=IFERROR(VLOOKUP([$Masterlist.$P126];[$Datasheet.$B$1:.$AV$9809];16;FALSE());&quot;-&quot;)" office:value-type="float" office:value="0" calcext:value-type="float">
            <text:p/>
          </table:table-cell>
          <table:table-cell table:style-name="ce174" table:formula="of:=IFERROR(VLOOKUP([$Masterlist.$P126];[$Datasheet.$B$1:.$AV$9809];17;FALSE());&quot;-&quot;)" office:value-type="float" office:value="0" calcext:value-type="float">
            <text:p/>
          </table:table-cell>
          <table:table-cell table:style-name="ce174" table:formula="of:=IFERROR(VLOOKUP([$Masterlist.$P126];[$Datasheet.$B$1:.$AV$9809];18;FALSE());&quot;-&quot;)" office:value-type="float" office:value="0" calcext:value-type="float">
            <text:p/>
          </table:table-cell>
          <table:table-cell table:style-name="ce245" table:formula="of:=IFERROR(VLOOKUP([$Masterlist.$P126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33" office:value-type="string" calcext:value-type="string">
            <text:p>L</text:p>
          </table:table-cell>
          <table:table-cell table:style-name="ce59"/>
          <table:table-cell table:style-name="ce50" table:number-columns-repeated="4"/>
          <table:table-cell table:number-columns-repeated="2" table:style-name="ce49" office:value-type="string" calcext:value-type="string">
            <text:p>Yes</text:p>
          </table:table-cell>
          <table:table-cell table:style-name="ce49"/>
          <table:table-cell table:style-name="ce50" table:number-columns-repeated="3"/>
          <table:table-cell table:style-name="ce84"/>
          <table:table-cell table:style-name="ce95" office:value-type="string" calcext:value-type="string">
            <text:p>Lighting Technician</text:p>
          </table:table-cell>
          <table:table-cell table:style-name="ce110" office:value-type="string" calcext:value-type="string">
            <text:p>Saskia Marais</text:p>
          </table:table-cell>
          <table:table-cell table:style-name="ce121" table:formula="of:=IF(ISNUMBER(MATCH([.P127];[$Datasheet.$B$1:.$B$9809];0));&quot;✓&quot;;&quot;x&quot;)" office:value-type="string" office:string-value="✓" calcext:value-type="string">
            <text:p>✓</text:p>
          </table:table-cell>
          <table:table-cell table:style-name="ce143" table:formula="of:=IFERROR(VLOOKUP([$Masterlist.$P127];[$Datasheet.$B$1:.$AV$9809];2;FALSE());&quot;-&quot;)" office:value-type="float" office:value="0" calcext:value-type="float">
            <text:p>0</text:p>
          </table:table-cell>
          <table:table-cell table:style-name="ce174" table:formula="of:=IFERROR(VLOOKUP([$Masterlist.$P127];[$Datasheet.$B$1:.$AV$9809];3;FALSE());&quot;-&quot;)" office:value-type="float" office:value="0" calcext:value-type="float">
            <text:p>0</text:p>
          </table:table-cell>
          <table:table-cell table:style-name="ce174" table:formula="of:=IFERROR(VLOOKUP([$Masterlist.$P127];[$Datasheet.$B$1:.$AV$9809];4;FALSE());&quot;-&quot;)" office:value-type="float" office:value="0" calcext:value-type="float">
            <text:p>0</text:p>
          </table:table-cell>
          <table:table-cell table:style-name="ce174" table:formula="of:=IFERROR(VLOOKUP([$Masterlist.$P127];[$Datasheet.$B$1:.$AV$9809];5;FALSE());&quot;-&quot;)" office:value-type="float" office:value="1" calcext:value-type="float">
            <text:p>1</text:p>
          </table:table-cell>
          <table:table-cell table:style-name="ce192" table:formula="of:=IFERROR(VLOOKUP([$Masterlist.$P127];[$Datasheet.$B$1:.$AV$9809];6;FALSE());&quot;-&quot;)" office:value-type="float" office:value="0" calcext:value-type="float">
            <text:p>0</text:p>
          </table:table-cell>
          <table:table-cell table:style-name="ce174" table:formula="of:=IFERROR(VLOOKUP([$Masterlist.$P127];[$Datasheet.$B$1:.$AV$9809];7;FALSE());&quot;-&quot;)" office:value-type="float" office:value="1" calcext:value-type="float">
            <text:p>1</text:p>
          </table:table-cell>
          <table:table-cell table:style-name="ce174" table:formula="of:=IFERROR(VLOOKUP([$Masterlist.$P127];[$Datasheet.$B$1:.$AV$9809];8;FALSE());&quot;-&quot;)" office:value-type="float" office:value="0" calcext:value-type="float">
            <text:p>0</text:p>
          </table:table-cell>
          <table:table-cell table:style-name="ce174" table:formula="of:=IFERROR(VLOOKUP([$Masterlist.$P127];[$Datasheet.$B$1:.$AV$9809];9;FALSE());&quot;-&quot;)" office:value-type="float" office:value="1" calcext:value-type="float">
            <text:p>1</text:p>
          </table:table-cell>
          <table:table-cell table:style-name="ce174" table:formula="of:=IFERROR(VLOOKUP([$Masterlist.$P127];[$Datasheet.$B$1:.$AV$9809];10;FALSE());&quot;-&quot;)" office:value-type="float" office:value="0" calcext:value-type="float">
            <text:p>0</text:p>
          </table:table-cell>
          <table:table-cell table:style-name="ce174" table:formula="of:=IFERROR(VLOOKUP([$Masterlist.$P127];[$Datasheet.$B$1:.$AV$9809];11;FALSE());&quot;-&quot;)" office:value-type="float" office:value="0" calcext:value-type="float">
            <text:p>0</text:p>
          </table:table-cell>
          <table:table-cell table:style-name="ce174" table:formula="of:=IFERROR(VLOOKUP([$Masterlist.$P127];[$Datasheet.$B$1:.$AV$9809];12;FALSE());&quot;-&quot;)" office:value-type="float" office:value="0" calcext:value-type="float">
            <text:p>0</text:p>
          </table:table-cell>
          <table:table-cell table:style-name="ce174" table:formula="of:=IFERROR(VLOOKUP([$Masterlist.$P127];[$Datasheet.$B$1:.$AV$9809];13;FALSE());&quot;-&quot;)" office:value-type="float" office:value="1" calcext:value-type="float">
            <text:p>1</text:p>
          </table:table-cell>
          <table:table-cell table:style-name="ce174" table:formula="of:=IFERROR(VLOOKUP([$Masterlist.$P127];[$Datasheet.$B$1:.$AV$9809];14;FALSE());&quot;-&quot;)" office:value-type="float" office:value="0" calcext:value-type="float">
            <text:p>0</text:p>
          </table:table-cell>
          <table:table-cell table:style-name="ce174" table:formula="of:=IFERROR(VLOOKUP([$Masterlist.$P127];[$Datasheet.$B$1:.$AV$9809];15;FALSE());&quot;-&quot;)" office:value-type="float" office:value="1" calcext:value-type="float">
            <text:p>1</text:p>
          </table:table-cell>
          <table:table-cell table:style-name="ce174" table:formula="of:=IFERROR(VLOOKUP([$Masterlist.$P127];[$Datasheet.$B$1:.$AV$9809];16;FALSE());&quot;-&quot;)" office:value-type="float" office:value="0" calcext:value-type="float">
            <text:p/>
          </table:table-cell>
          <table:table-cell table:style-name="ce174" table:formula="of:=IFERROR(VLOOKUP([$Masterlist.$P127];[$Datasheet.$B$1:.$AV$9809];17;FALSE());&quot;-&quot;)" office:value-type="float" office:value="0" calcext:value-type="float">
            <text:p/>
          </table:table-cell>
          <table:table-cell table:style-name="ce174" table:formula="of:=IFERROR(VLOOKUP([$Masterlist.$P127];[$Datasheet.$B$1:.$AV$9809];18;FALSE());&quot;-&quot;)" office:value-type="float" office:value="0" calcext:value-type="float">
            <text:p/>
          </table:table-cell>
          <table:table-cell table:style-name="ce245" table:formula="of:=IFERROR(VLOOKUP([$Masterlist.$P127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33" office:value-type="string" calcext:value-type="string">
            <text:p>A</text:p>
          </table:table-cell>
          <table:table-cell table:style-name="ce59"/>
          <table:table-cell table:style-name="ce50" table:number-columns-repeated="4"/>
          <table:table-cell table:number-columns-repeated="2" table:style-name="ce49" office:value-type="string" calcext:value-type="string">
            <text:p>Yes</text:p>
          </table:table-cell>
          <table:table-cell table:style-name="ce49"/>
          <table:table-cell table:style-name="ce50" table:number-columns-repeated="3"/>
          <table:table-cell table:style-name="ce84"/>
          <table:table-cell table:style-name="ce95" office:value-type="string" calcext:value-type="string">
            <text:p>Lighting Technician</text:p>
          </table:table-cell>
          <table:table-cell table:style-name="ce108" office:value-type="string" calcext:value-type="string">
            <text:p>Wian Laing</text:p>
          </table:table-cell>
          <table:table-cell table:style-name="ce121" table:formula="of:=IF(ISNUMBER(MATCH([.P128];[$Datasheet.$B$1:.$B$9809];0));&quot;✓&quot;;&quot;x&quot;)" office:value-type="string" office:string-value="✓" calcext:value-type="string">
            <text:p>✓</text:p>
          </table:table-cell>
          <table:table-cell table:style-name="ce143" table:formula="of:=IFERROR(VLOOKUP([$Masterlist.$P128];[$Datasheet.$B$1:.$AV$9809];2;FALSE());&quot;-&quot;)" office:value-type="float" office:value="0" calcext:value-type="float">
            <text:p>0</text:p>
          </table:table-cell>
          <table:table-cell table:style-name="ce174" table:formula="of:=IFERROR(VLOOKUP([$Masterlist.$P128];[$Datasheet.$B$1:.$AV$9809];3;FALSE());&quot;-&quot;)" office:value-type="float" office:value="0" calcext:value-type="float">
            <text:p>0</text:p>
          </table:table-cell>
          <table:table-cell table:style-name="ce174" table:formula="of:=IFERROR(VLOOKUP([$Masterlist.$P128];[$Datasheet.$B$1:.$AV$9809];4;FALSE());&quot;-&quot;)" office:value-type="float" office:value="1" calcext:value-type="float">
            <text:p>1</text:p>
          </table:table-cell>
          <table:table-cell table:style-name="ce174" table:formula="of:=IFERROR(VLOOKUP([$Masterlist.$P128];[$Datasheet.$B$1:.$AV$9809];5;FALSE());&quot;-&quot;)" office:value-type="float" office:value="1" calcext:value-type="float">
            <text:p>1</text:p>
          </table:table-cell>
          <table:table-cell table:style-name="ce192" table:formula="of:=IFERROR(VLOOKUP([$Masterlist.$P128];[$Datasheet.$B$1:.$AV$9809];6;FALSE());&quot;-&quot;)" office:value-type="float" office:value="1" calcext:value-type="float">
            <text:p>1</text:p>
          </table:table-cell>
          <table:table-cell table:style-name="ce174" table:formula="of:=IFERROR(VLOOKUP([$Masterlist.$P128];[$Datasheet.$B$1:.$AV$9809];7;FALSE());&quot;-&quot;)" office:value-type="float" office:value="1" calcext:value-type="float">
            <text:p>1</text:p>
          </table:table-cell>
          <table:table-cell table:style-name="ce174" table:formula="of:=IFERROR(VLOOKUP([$Masterlist.$P128];[$Datasheet.$B$1:.$AV$9809];8;FALSE());&quot;-&quot;)" office:value-type="float" office:value="1" calcext:value-type="float">
            <text:p>1</text:p>
          </table:table-cell>
          <table:table-cell table:style-name="ce174" table:formula="of:=IFERROR(VLOOKUP([$Masterlist.$P128];[$Datasheet.$B$1:.$AV$9809];9;FALSE());&quot;-&quot;)" office:value-type="float" office:value="1" calcext:value-type="float">
            <text:p>1</text:p>
          </table:table-cell>
          <table:table-cell table:style-name="ce174" table:formula="of:=IFERROR(VLOOKUP([$Masterlist.$P128];[$Datasheet.$B$1:.$AV$9809];10;FALSE());&quot;-&quot;)" office:value-type="float" office:value="1" calcext:value-type="float">
            <text:p>1</text:p>
          </table:table-cell>
          <table:table-cell table:style-name="ce174" table:formula="of:=IFERROR(VLOOKUP([$Masterlist.$P128];[$Datasheet.$B$1:.$AV$9809];11;FALSE());&quot;-&quot;)" office:value-type="float" office:value="1" calcext:value-type="float">
            <text:p>1</text:p>
          </table:table-cell>
          <table:table-cell table:style-name="ce174" table:formula="of:=IFERROR(VLOOKUP([$Masterlist.$P128];[$Datasheet.$B$1:.$AV$9809];12;FALSE());&quot;-&quot;)" office:value-type="float" office:value="1" calcext:value-type="float">
            <text:p>1</text:p>
          </table:table-cell>
          <table:table-cell table:style-name="ce174" table:formula="of:=IFERROR(VLOOKUP([$Masterlist.$P128];[$Datasheet.$B$1:.$AV$9809];13;FALSE());&quot;-&quot;)" office:value-type="float" office:value="1" calcext:value-type="float">
            <text:p>1</text:p>
          </table:table-cell>
          <table:table-cell table:style-name="ce174" table:formula="of:=IFERROR(VLOOKUP([$Masterlist.$P128];[$Datasheet.$B$1:.$AV$9809];14;FALSE());&quot;-&quot;)" office:value-type="float" office:value="1" calcext:value-type="float">
            <text:p>1</text:p>
          </table:table-cell>
          <table:table-cell table:style-name="ce174" table:formula="of:=IFERROR(VLOOKUP([$Masterlist.$P128];[$Datasheet.$B$1:.$AV$9809];15;FALSE());&quot;-&quot;)" office:value-type="float" office:value="1" calcext:value-type="float">
            <text:p>1</text:p>
          </table:table-cell>
          <table:table-cell table:style-name="ce174" table:formula="of:=IFERROR(VLOOKUP([$Masterlist.$P128];[$Datasheet.$B$1:.$AV$9809];16;FALSE());&quot;-&quot;)" office:value-type="float" office:value="0" calcext:value-type="float">
            <text:p/>
          </table:table-cell>
          <table:table-cell table:style-name="ce174" table:formula="of:=IFERROR(VLOOKUP([$Masterlist.$P128];[$Datasheet.$B$1:.$AV$9809];17;FALSE());&quot;-&quot;)" office:value-type="float" office:value="0" calcext:value-type="float">
            <text:p/>
          </table:table-cell>
          <table:table-cell table:style-name="ce174" table:formula="of:=IFERROR(VLOOKUP([$Masterlist.$P128];[$Datasheet.$B$1:.$AV$9809];18;FALSE());&quot;-&quot;)" office:value-type="float" office:value="0" calcext:value-type="float">
            <text:p/>
          </table:table-cell>
          <table:table-cell table:style-name="ce245" table:formula="of:=IFERROR(VLOOKUP([$Masterlist.$P128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33" office:value-type="string" calcext:value-type="string">
            <text:p>L</text:p>
          </table:table-cell>
          <table:table-cell table:style-name="ce59"/>
          <table:table-cell table:style-name="ce50" table:number-columns-repeated="4"/>
          <table:table-cell table:number-columns-repeated="3" table:style-name="ce49" office:value-type="string" calcext:value-type="string">
            <text:p>Yes</text:p>
          </table:table-cell>
          <table:table-cell table:style-name="ce50" table:number-columns-repeated="3"/>
          <table:table-cell table:style-name="ce84"/>
          <table:table-cell table:style-name="ce95" office:value-type="string" calcext:value-type="string">
            <text:p>Lighting Technician</text:p>
          </table:table-cell>
          <table:table-cell table:style-name="ce110" office:value-type="string" calcext:value-type="string">
            <text:p>Zander Stemmet</text:p>
          </table:table-cell>
          <table:table-cell table:style-name="ce121" table:formula="of:=IF(ISNUMBER(MATCH([.P129];[$Datasheet.$B$1:.$B$9809];0));&quot;✓&quot;;&quot;x&quot;)" office:value-type="string" office:string-value="✓" calcext:value-type="string">
            <text:p>✓</text:p>
          </table:table-cell>
          <table:table-cell table:style-name="ce143" table:formula="of:=IFERROR(VLOOKUP([$Masterlist.$P129];[$Datasheet.$B$1:.$AV$9809];2;FALSE());&quot;-&quot;)" office:value-type="float" office:value="0" calcext:value-type="float">
            <text:p>0</text:p>
          </table:table-cell>
          <table:table-cell table:style-name="ce174" table:formula="of:=IFERROR(VLOOKUP([$Masterlist.$P129];[$Datasheet.$B$1:.$AV$9809];3;FALSE());&quot;-&quot;)" office:value-type="float" office:value="1" calcext:value-type="float">
            <text:p>1</text:p>
          </table:table-cell>
          <table:table-cell table:style-name="ce174" table:formula="of:=IFERROR(VLOOKUP([$Masterlist.$P129];[$Datasheet.$B$1:.$AV$9809];4;FALSE());&quot;-&quot;)" office:value-type="float" office:value="1" calcext:value-type="float">
            <text:p>1</text:p>
          </table:table-cell>
          <table:table-cell table:style-name="ce174" table:formula="of:=IFERROR(VLOOKUP([$Masterlist.$P129];[$Datasheet.$B$1:.$AV$9809];5;FALSE());&quot;-&quot;)" office:value-type="float" office:value="1" calcext:value-type="float">
            <text:p>1</text:p>
          </table:table-cell>
          <table:table-cell table:style-name="ce192" table:formula="of:=IFERROR(VLOOKUP([$Masterlist.$P129];[$Datasheet.$B$1:.$AV$9809];6;FALSE());&quot;-&quot;)" office:value-type="float" office:value="1" calcext:value-type="float">
            <text:p>1</text:p>
          </table:table-cell>
          <table:table-cell table:style-name="ce174" table:formula="of:=IFERROR(VLOOKUP([$Masterlist.$P129];[$Datasheet.$B$1:.$AV$9809];7;FALSE());&quot;-&quot;)" office:value-type="float" office:value="1" calcext:value-type="float">
            <text:p>1</text:p>
          </table:table-cell>
          <table:table-cell table:style-name="ce174" table:formula="of:=IFERROR(VLOOKUP([$Masterlist.$P129];[$Datasheet.$B$1:.$AV$9809];8;FALSE());&quot;-&quot;)" office:value-type="float" office:value="1" calcext:value-type="float">
            <text:p>1</text:p>
          </table:table-cell>
          <table:table-cell table:style-name="ce174" table:formula="of:=IFERROR(VLOOKUP([$Masterlist.$P129];[$Datasheet.$B$1:.$AV$9809];9;FALSE());&quot;-&quot;)" office:value-type="float" office:value="1" calcext:value-type="float">
            <text:p>1</text:p>
          </table:table-cell>
          <table:table-cell table:style-name="ce174" table:formula="of:=IFERROR(VLOOKUP([$Masterlist.$P129];[$Datasheet.$B$1:.$AV$9809];10;FALSE());&quot;-&quot;)" office:value-type="float" office:value="1" calcext:value-type="float">
            <text:p>1</text:p>
          </table:table-cell>
          <table:table-cell table:style-name="ce174" table:formula="of:=IFERROR(VLOOKUP([$Masterlist.$P129];[$Datasheet.$B$1:.$AV$9809];11;FALSE());&quot;-&quot;)" office:value-type="float" office:value="1" calcext:value-type="float">
            <text:p>1</text:p>
          </table:table-cell>
          <table:table-cell table:style-name="ce174" table:formula="of:=IFERROR(VLOOKUP([$Masterlist.$P129];[$Datasheet.$B$1:.$AV$9809];12;FALSE());&quot;-&quot;)" office:value-type="float" office:value="1" calcext:value-type="float">
            <text:p>1</text:p>
          </table:table-cell>
          <table:table-cell table:style-name="ce174" table:formula="of:=IFERROR(VLOOKUP([$Masterlist.$P129];[$Datasheet.$B$1:.$AV$9809];13;FALSE());&quot;-&quot;)" office:value-type="float" office:value="1" calcext:value-type="float">
            <text:p>1</text:p>
          </table:table-cell>
          <table:table-cell table:style-name="ce174" table:formula="of:=IFERROR(VLOOKUP([$Masterlist.$P129];[$Datasheet.$B$1:.$AV$9809];14;FALSE());&quot;-&quot;)" office:value-type="float" office:value="1" calcext:value-type="float">
            <text:p>1</text:p>
          </table:table-cell>
          <table:table-cell table:style-name="ce174" table:formula="of:=IFERROR(VLOOKUP([$Masterlist.$P129];[$Datasheet.$B$1:.$AV$9809];15;FALSE());&quot;-&quot;)" office:value-type="float" office:value="1" calcext:value-type="float">
            <text:p>1</text:p>
          </table:table-cell>
          <table:table-cell table:style-name="ce174" table:formula="of:=IFERROR(VLOOKUP([$Masterlist.$P129];[$Datasheet.$B$1:.$AV$9809];16;FALSE());&quot;-&quot;)" office:value-type="float" office:value="0" calcext:value-type="float">
            <text:p/>
          </table:table-cell>
          <table:table-cell table:style-name="ce174" table:formula="of:=IFERROR(VLOOKUP([$Masterlist.$P129];[$Datasheet.$B$1:.$AV$9809];17;FALSE());&quot;-&quot;)" office:value-type="float" office:value="0" calcext:value-type="float">
            <text:p/>
          </table:table-cell>
          <table:table-cell table:style-name="ce174" table:formula="of:=IFERROR(VLOOKUP([$Masterlist.$P129];[$Datasheet.$B$1:.$AV$9809];18;FALSE());&quot;-&quot;)" office:value-type="float" office:value="0" calcext:value-type="float">
            <text:p/>
          </table:table-cell>
          <table:table-cell table:style-name="ce245" table:formula="of:=IFERROR(VLOOKUP([$Masterlist.$P129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36" office:value-type="string" calcext:value-type="string">
            <text:p>L</text:p>
          </table:table-cell>
          <table:table-cell table:style-name="ce61"/>
          <table:table-cell table:style-name="ce65" table:number-columns-repeated="4"/>
          <table:table-cell table:style-name="ce75" table:number-columns-repeated="3"/>
          <table:table-cell table:style-name="ce65" table:number-columns-repeated="3"/>
          <table:table-cell table:style-name="ce86" office:value-type="string" calcext:value-type="string">
            <text:p>Yes</text:p>
          </table:table-cell>
          <table:table-cell table:style-name="ce96" office:value-type="string" calcext:value-type="string">
            <text:p>Lighting Technician</text:p>
          </table:table-cell>
          <table:table-cell table:style-name="ce111" office:value-type="string" calcext:value-type="string">
            <text:p>Marianka Jacobs</text:p>
          </table:table-cell>
          <table:table-cell table:style-name="ce122" table:formula="of:=IF(ISNUMBER(MATCH([.P130];[$Datasheet.$B$1:.$B$9809];0));&quot;✓&quot;;&quot;x&quot;)" office:value-type="string" office:string-value="✓" calcext:value-type="string">
            <text:p>✓</text:p>
          </table:table-cell>
          <table:table-cell table:style-name="ce145" table:formula="of:=IFERROR(VLOOKUP([$Masterlist.$P130];[$Datasheet.$B$1:.$AV$9809];2;FALSE());&quot;-&quot;)" office:value-type="float" office:value="0" calcext:value-type="float">
            <text:p>0</text:p>
          </table:table-cell>
          <table:table-cell table:style-name="ce176" table:formula="of:=IFERROR(VLOOKUP([$Masterlist.$P130];[$Datasheet.$B$1:.$AV$9809];3;FALSE());&quot;-&quot;)" office:value-type="float" office:value="0" calcext:value-type="float">
            <text:p>0</text:p>
          </table:table-cell>
          <table:table-cell table:style-name="ce176" table:formula="of:=IFERROR(VLOOKUP([$Masterlist.$P130];[$Datasheet.$B$1:.$AV$9809];4;FALSE());&quot;-&quot;)" office:value-type="float" office:value="1" calcext:value-type="float">
            <text:p>1</text:p>
          </table:table-cell>
          <table:table-cell table:style-name="ce176" table:formula="of:=IFERROR(VLOOKUP([$Masterlist.$P130];[$Datasheet.$B$1:.$AV$9809];5;FALSE());&quot;-&quot;)" office:value-type="float" office:value="1" calcext:value-type="float">
            <text:p>1</text:p>
          </table:table-cell>
          <table:table-cell table:style-name="ce194" table:formula="of:=IFERROR(VLOOKUP([$Masterlist.$P130];[$Datasheet.$B$1:.$AV$9809];6;FALSE());&quot;-&quot;)" office:value-type="float" office:value="1" calcext:value-type="float">
            <text:p>1</text:p>
          </table:table-cell>
          <table:table-cell table:style-name="ce176" table:formula="of:=IFERROR(VLOOKUP([$Masterlist.$P130];[$Datasheet.$B$1:.$AV$9809];7;FALSE());&quot;-&quot;)" office:value-type="float" office:value="1" calcext:value-type="float">
            <text:p>1</text:p>
          </table:table-cell>
          <table:table-cell table:style-name="ce176" table:formula="of:=IFERROR(VLOOKUP([$Masterlist.$P130];[$Datasheet.$B$1:.$AV$9809];8;FALSE());&quot;-&quot;)" office:value-type="float" office:value="1" calcext:value-type="float">
            <text:p>1</text:p>
          </table:table-cell>
          <table:table-cell table:style-name="ce176" table:formula="of:=IFERROR(VLOOKUP([$Masterlist.$P130];[$Datasheet.$B$1:.$AV$9809];9;FALSE());&quot;-&quot;)" office:value-type="float" office:value="1" calcext:value-type="float">
            <text:p>1</text:p>
          </table:table-cell>
          <table:table-cell table:style-name="ce176" table:formula="of:=IFERROR(VLOOKUP([$Masterlist.$P130];[$Datasheet.$B$1:.$AV$9809];10;FALSE());&quot;-&quot;)" office:value-type="float" office:value="1" calcext:value-type="float">
            <text:p>1</text:p>
          </table:table-cell>
          <table:table-cell table:style-name="ce176" table:formula="of:=IFERROR(VLOOKUP([$Masterlist.$P130];[$Datasheet.$B$1:.$AV$9809];11;FALSE());&quot;-&quot;)" office:value-type="float" office:value="1" calcext:value-type="float">
            <text:p>1</text:p>
          </table:table-cell>
          <table:table-cell table:style-name="ce176" table:formula="of:=IFERROR(VLOOKUP([$Masterlist.$P130];[$Datasheet.$B$1:.$AV$9809];12;FALSE());&quot;-&quot;)" office:value-type="float" office:value="1" calcext:value-type="float">
            <text:p>1</text:p>
          </table:table-cell>
          <table:table-cell table:style-name="ce176" table:formula="of:=IFERROR(VLOOKUP([$Masterlist.$P130];[$Datasheet.$B$1:.$AV$9809];13;FALSE());&quot;-&quot;)" office:value-type="float" office:value="1" calcext:value-type="float">
            <text:p>1</text:p>
          </table:table-cell>
          <table:table-cell table:style-name="ce176" table:formula="of:=IFERROR(VLOOKUP([$Masterlist.$P130];[$Datasheet.$B$1:.$AV$9809];14;FALSE());&quot;-&quot;)" office:value-type="float" office:value="1" calcext:value-type="float">
            <text:p>1</text:p>
          </table:table-cell>
          <table:table-cell table:style-name="ce176" table:formula="of:=IFERROR(VLOOKUP([$Masterlist.$P130];[$Datasheet.$B$1:.$AV$9809];15;FALSE());&quot;-&quot;)" office:value-type="float" office:value="1" calcext:value-type="float">
            <text:p>1</text:p>
          </table:table-cell>
          <table:table-cell table:style-name="ce176" table:formula="of:=IFERROR(VLOOKUP([$Masterlist.$P130];[$Datasheet.$B$1:.$AV$9809];16;FALSE());&quot;-&quot;)" office:value-type="float" office:value="0" calcext:value-type="float">
            <text:p/>
          </table:table-cell>
          <table:table-cell table:style-name="ce176" table:formula="of:=IFERROR(VLOOKUP([$Masterlist.$P130];[$Datasheet.$B$1:.$AV$9809];17;FALSE());&quot;-&quot;)" office:value-type="float" office:value="0" calcext:value-type="float">
            <text:p/>
          </table:table-cell>
          <table:table-cell table:style-name="ce176" table:formula="of:=IFERROR(VLOOKUP([$Masterlist.$P130];[$Datasheet.$B$1:.$AV$9809];18;FALSE());&quot;-&quot;)" office:value-type="float" office:value="0" calcext:value-type="float">
            <text:p/>
          </table:table-cell>
          <table:table-cell table:style-name="ce247" table:formula="of:=IFERROR(VLOOKUP([$Masterlist.$P130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37" office:value-type="string" calcext:value-type="string" table:number-columns-spanned="15" table:number-rows-spanned="1">
            <text:p>MULTIMEDIA - DANE ROBERSTE</text:p>
          </table:table-cell>
          <table:covered-table-cell table:number-columns-repeated="13" table:style-name="ce45"/>
          <table:covered-table-cell table:style-name="ce99"/>
          <table:table-cell table:style-name="ce123"/>
          <table:table-cell table:style-name="ce146" office:value-type="string" calcext:value-type="string" table:number-columns-spanned="18" table:number-rows-spanned="1">
            <text:p>MULTIMEDIA - DANE ROBERSTE</text:p>
          </table:table-cell>
          <table:covered-table-cell table:number-columns-repeated="16" table:style-name="ce177"/>
          <table:covered-table-cell table:style-name="ce248"/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5" office:value-type="string" calcext:value-type="string">
            <text:p>L</text:p>
          </table:table-cell>
          <table:table-cell table:number-columns-repeated="2" table:style-name="ce49" office:value-type="string" calcext:value-type="string">
            <text:p>yes</text:p>
          </table:table-cell>
          <table:table-cell table:style-name="ce49" table:number-columns-repeated="10"/>
          <table:table-cell table:style-name="ce91" office:value-type="string" calcext:value-type="string">
            <text:p>FOH, LED, Broadcast</text:p>
          </table:table-cell>
          <table:table-cell table:style-name="ce100" office:value-type="string" calcext:value-type="string">
            <text:p>Dane Robertse</text:p>
          </table:table-cell>
          <table:table-cell table:style-name="ce13" table:formula="of:=IF(ISNUMBER(MATCH([.P132];[$Datasheet.$B$1:.$B$9809];0));&quot;✓&quot;;&quot;x&quot;)" office:value-type="string" office:string-value="✓" calcext:value-type="string">
            <text:p>✓</text:p>
          </table:table-cell>
          <table:table-cell table:style-name="ce147" table:formula="of:=IFERROR(VLOOKUP([$Masterlist.$P132];[$Datasheet.$B$1:.$AV$9809];2;FALSE());&quot;-&quot;)" office:value-type="float" office:value="0" calcext:value-type="float">
            <text:p>0</text:p>
          </table:table-cell>
          <table:table-cell table:style-name="ce147" table:formula="of:=IFERROR(VLOOKUP([$Masterlist.$P132];[$Datasheet.$B$1:.$AV$9809];3;FALSE());&quot;-&quot;)" office:value-type="float" office:value="1" calcext:value-type="float">
            <text:p>1</text:p>
          </table:table-cell>
          <table:table-cell table:style-name="ce147" table:formula="of:=IFERROR(VLOOKUP([$Masterlist.$P132];[$Datasheet.$B$1:.$AV$9809];4;FALSE());&quot;-&quot;)" office:value-type="float" office:value="0" calcext:value-type="float">
            <text:p>0</text:p>
          </table:table-cell>
          <table:table-cell table:style-name="ce147" table:formula="of:=IFERROR(VLOOKUP([$Masterlist.$P132];[$Datasheet.$B$1:.$AV$9809];5;FALSE());&quot;-&quot;)" office:value-type="float" office:value="0" calcext:value-type="float">
            <text:p>0</text:p>
          </table:table-cell>
          <table:table-cell table:style-name="ce195" table:formula="of:=IFERROR(VLOOKUP([$Masterlist.$P132];[$Datasheet.$B$1:.$AV$9809];6;FALSE());&quot;-&quot;)" office:value-type="float" office:value="0" calcext:value-type="float">
            <text:p>0</text:p>
          </table:table-cell>
          <table:table-cell table:style-name="ce147" table:formula="of:=IFERROR(VLOOKUP([$Masterlist.$P132];[$Datasheet.$B$1:.$AV$9809];7;FALSE());&quot;-&quot;)" office:value-type="float" office:value="1" calcext:value-type="float">
            <text:p>1</text:p>
          </table:table-cell>
          <table:table-cell table:style-name="ce147" table:formula="of:=IFERROR(VLOOKUP([$Masterlist.$P132];[$Datasheet.$B$1:.$AV$9809];8;FALSE());&quot;-&quot;)" office:value-type="float" office:value="0" calcext:value-type="float">
            <text:p>0</text:p>
          </table:table-cell>
          <table:table-cell table:style-name="ce147" table:formula="of:=IFERROR(VLOOKUP([$Masterlist.$P132];[$Datasheet.$B$1:.$AV$9809];9;FALSE());&quot;-&quot;)" office:value-type="float" office:value="1" calcext:value-type="float">
            <text:p>1</text:p>
          </table:table-cell>
          <table:table-cell table:style-name="ce147" table:formula="of:=IFERROR(VLOOKUP([$Masterlist.$P132];[$Datasheet.$B$1:.$AV$9809];10;FALSE());&quot;-&quot;)" office:value-type="float" office:value="0" calcext:value-type="float">
            <text:p>0</text:p>
          </table:table-cell>
          <table:table-cell table:style-name="ce147" table:formula="of:=IFERROR(VLOOKUP([$Masterlist.$P132];[$Datasheet.$B$1:.$AV$9809];11;FALSE());&quot;-&quot;)" office:value-type="float" office:value="1" calcext:value-type="float">
            <text:p>1</text:p>
          </table:table-cell>
          <table:table-cell table:style-name="ce147" table:formula="of:=IFERROR(VLOOKUP([$Masterlist.$P132];[$Datasheet.$B$1:.$AV$9809];12;FALSE());&quot;-&quot;)" office:value-type="float" office:value="0" calcext:value-type="float">
            <text:p>0</text:p>
          </table:table-cell>
          <table:table-cell table:style-name="ce147" table:formula="of:=IFERROR(VLOOKUP([$Masterlist.$P132];[$Datasheet.$B$1:.$AV$9809];13;FALSE());&quot;-&quot;)" office:value-type="float" office:value="1" calcext:value-type="float">
            <text:p>1</text:p>
          </table:table-cell>
          <table:table-cell table:style-name="ce147" table:formula="of:=IFERROR(VLOOKUP([$Masterlist.$P132];[$Datasheet.$B$1:.$AV$9809];14;FALSE());&quot;-&quot;)" office:value-type="float" office:value="0" calcext:value-type="float">
            <text:p>0</text:p>
          </table:table-cell>
          <table:table-cell table:style-name="ce147" table:formula="of:=IFERROR(VLOOKUP([$Masterlist.$P132];[$Datasheet.$B$1:.$AV$9809];15;FALSE());&quot;-&quot;)" office:value-type="float" office:value="1" calcext:value-type="float">
            <text:p>1</text:p>
          </table:table-cell>
          <table:table-cell table:style-name="ce147" table:formula="of:=IFERROR(VLOOKUP([$Masterlist.$P132];[$Datasheet.$B$1:.$AV$9809];16;FALSE());&quot;-&quot;)" office:value-type="float" office:value="0" calcext:value-type="float">
            <text:p/>
          </table:table-cell>
          <table:table-cell table:style-name="ce147" table:formula="of:=IFERROR(VLOOKUP([$Masterlist.$P132];[$Datasheet.$B$1:.$AV$9809];17;FALSE());&quot;-&quot;)" office:value-type="float" office:value="0" calcext:value-type="float">
            <text:p/>
          </table:table-cell>
          <table:table-cell table:style-name="ce147" table:formula="of:=IFERROR(VLOOKUP([$Masterlist.$P132];[$Datasheet.$B$1:.$AV$9809];18;FALSE());&quot;-&quot;)" office:value-type="float" office:value="0" calcext:value-type="float">
            <text:p/>
          </table:table-cell>
          <table:table-cell table:style-name="ce147" table:formula="of:=IFERROR(VLOOKUP([$Masterlist.$P132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AL</text:p>
          </table:table-cell>
          <table:table-cell table:number-columns-repeated="2" table:style-name="ce50" office:value-type="string" calcext:value-type="string">
            <text:p>yes</text:p>
          </table:table-cell>
          <table:table-cell table:style-name="ce50" table:number-columns-repeated="10"/>
          <table:table-cell table:style-name="ce92" office:value-type="string" calcext:value-type="string">
            <text:p>FOH, LED, Broadcast</text:p>
          </table:table-cell>
          <table:table-cell table:style-name="ce8" office:value-type="string" calcext:value-type="string">
            <text:p>Chante Hattingh</text:p>
          </table:table-cell>
          <table:table-cell table:style-name="ce13" table:formula="of:=IF(ISNUMBER(MATCH([.P133];[$Datasheet.$B$1:.$B$9809];0));&quot;✓&quot;;&quot;x&quot;)" office:value-type="string" office:string-value="✓" calcext:value-type="string">
            <text:p>✓</text:p>
          </table:table-cell>
          <table:table-cell table:style-name="ce147" table:formula="of:=IFERROR(VLOOKUP([$Masterlist.$P133];[$Datasheet.$B$1:.$AV$9809];2;FALSE());&quot;-&quot;)" office:value-type="float" office:value="0" calcext:value-type="float">
            <text:p>0</text:p>
          </table:table-cell>
          <table:table-cell table:style-name="ce147" table:formula="of:=IFERROR(VLOOKUP([$Masterlist.$P133];[$Datasheet.$B$1:.$AV$9809];3;FALSE());&quot;-&quot;)" office:value-type="float" office:value="1" calcext:value-type="float">
            <text:p>1</text:p>
          </table:table-cell>
          <table:table-cell table:style-name="ce147" table:formula="of:=IFERROR(VLOOKUP([$Masterlist.$P133];[$Datasheet.$B$1:.$AV$9809];4;FALSE());&quot;-&quot;)" office:value-type="float" office:value="1" calcext:value-type="float">
            <text:p>1</text:p>
          </table:table-cell>
          <table:table-cell table:style-name="ce147" table:formula="of:=IFERROR(VLOOKUP([$Masterlist.$P133];[$Datasheet.$B$1:.$AV$9809];5;FALSE());&quot;-&quot;)" office:value-type="float" office:value="1" calcext:value-type="float">
            <text:p>1</text:p>
          </table:table-cell>
          <table:table-cell table:style-name="ce195" table:formula="of:=IFERROR(VLOOKUP([$Masterlist.$P133];[$Datasheet.$B$1:.$AV$9809];6;FALSE());&quot;-&quot;)" office:value-type="float" office:value="1" calcext:value-type="float">
            <text:p>1</text:p>
          </table:table-cell>
          <table:table-cell table:style-name="ce147" table:formula="of:=IFERROR(VLOOKUP([$Masterlist.$P133];[$Datasheet.$B$1:.$AV$9809];7;FALSE());&quot;-&quot;)" office:value-type="float" office:value="1" calcext:value-type="float">
            <text:p>1</text:p>
          </table:table-cell>
          <table:table-cell table:style-name="ce147" table:formula="of:=IFERROR(VLOOKUP([$Masterlist.$P133];[$Datasheet.$B$1:.$AV$9809];8;FALSE());&quot;-&quot;)" office:value-type="float" office:value="1" calcext:value-type="float">
            <text:p>1</text:p>
          </table:table-cell>
          <table:table-cell table:style-name="ce147" table:formula="of:=IFERROR(VLOOKUP([$Masterlist.$P133];[$Datasheet.$B$1:.$AV$9809];9;FALSE());&quot;-&quot;)" office:value-type="float" office:value="1" calcext:value-type="float">
            <text:p>1</text:p>
          </table:table-cell>
          <table:table-cell table:style-name="ce147" table:formula="of:=IFERROR(VLOOKUP([$Masterlist.$P133];[$Datasheet.$B$1:.$AV$9809];10;FALSE());&quot;-&quot;)" office:value-type="float" office:value="0" calcext:value-type="float">
            <text:p>0</text:p>
          </table:table-cell>
          <table:table-cell table:style-name="ce147" table:formula="of:=IFERROR(VLOOKUP([$Masterlist.$P133];[$Datasheet.$B$1:.$AV$9809];11;FALSE());&quot;-&quot;)" office:value-type="float" office:value="1" calcext:value-type="float">
            <text:p>1</text:p>
          </table:table-cell>
          <table:table-cell table:style-name="ce147" table:formula="of:=IFERROR(VLOOKUP([$Masterlist.$P133];[$Datasheet.$B$1:.$AV$9809];12;FALSE());&quot;-&quot;)" office:value-type="float" office:value="1" calcext:value-type="float">
            <text:p>1</text:p>
          </table:table-cell>
          <table:table-cell table:style-name="ce147" table:formula="of:=IFERROR(VLOOKUP([$Masterlist.$P133];[$Datasheet.$B$1:.$AV$9809];13;FALSE());&quot;-&quot;)" office:value-type="float" office:value="1" calcext:value-type="float">
            <text:p>1</text:p>
          </table:table-cell>
          <table:table-cell table:style-name="ce147" table:formula="of:=IFERROR(VLOOKUP([$Masterlist.$P133];[$Datasheet.$B$1:.$AV$9809];14;FALSE());&quot;-&quot;)" office:value-type="float" office:value="1" calcext:value-type="float">
            <text:p>1</text:p>
          </table:table-cell>
          <table:table-cell table:style-name="ce147" table:formula="of:=IFERROR(VLOOKUP([$Masterlist.$P133];[$Datasheet.$B$1:.$AV$9809];15;FALSE());&quot;-&quot;)" office:value-type="float" office:value="1" calcext:value-type="float">
            <text:p>1</text:p>
          </table:table-cell>
          <table:table-cell table:style-name="ce147" table:formula="of:=IFERROR(VLOOKUP([$Masterlist.$P133];[$Datasheet.$B$1:.$AV$9809];16;FALSE());&quot;-&quot;)" office:value-type="float" office:value="0" calcext:value-type="float">
            <text:p/>
          </table:table-cell>
          <table:table-cell table:style-name="ce147" table:formula="of:=IFERROR(VLOOKUP([$Masterlist.$P133];[$Datasheet.$B$1:.$AV$9809];17;FALSE());&quot;-&quot;)" office:value-type="float" office:value="0" calcext:value-type="float">
            <text:p/>
          </table:table-cell>
          <table:table-cell table:style-name="ce147" table:formula="of:=IFERROR(VLOOKUP([$Masterlist.$P133];[$Datasheet.$B$1:.$AV$9809];18;FALSE());&quot;-&quot;)" office:value-type="float" office:value="0" calcext:value-type="float">
            <text:p/>
          </table:table-cell>
          <table:table-cell table:style-name="ce147" table:formula="of:=IFERROR(VLOOKUP([$Masterlist.$P133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9" office:value-type="string" calcext:value-type="string">
            <text:p>L</text:p>
          </table:table-cell>
          <table:table-cell table:number-columns-repeated="2" table:style-name="ce50" office:value-type="string" calcext:value-type="string">
            <text:p>yes</text:p>
          </table:table-cell>
          <table:table-cell table:style-name="ce50" table:number-columns-repeated="10"/>
          <table:table-cell table:style-name="ce92" office:value-type="string" calcext:value-type="string">
            <text:p>FOH, LED, Broadcast</text:p>
          </table:table-cell>
          <table:table-cell table:style-name="ce8" office:value-type="string" calcext:value-type="string">
            <text:p>Danika van Wyk</text:p>
          </table:table-cell>
          <table:table-cell table:style-name="ce13" table:formula="of:=IF(ISNUMBER(MATCH([.P134];[$Datasheet.$B$1:.$B$9809];0));&quot;✓&quot;;&quot;x&quot;)" office:value-type="string" office:string-value="✓" calcext:value-type="string">
            <text:p>✓</text:p>
          </table:table-cell>
          <table:table-cell table:style-name="ce147" table:formula="of:=IFERROR(VLOOKUP([$Masterlist.$P134];[$Datasheet.$B$1:.$AV$9809];2;FALSE());&quot;-&quot;)" office:value-type="float" office:value="0" calcext:value-type="float">
            <text:p>0</text:p>
          </table:table-cell>
          <table:table-cell table:style-name="ce147" table:formula="of:=IFERROR(VLOOKUP([$Masterlist.$P134];[$Datasheet.$B$1:.$AV$9809];3;FALSE());&quot;-&quot;)" office:value-type="float" office:value="1" calcext:value-type="float">
            <text:p>1</text:p>
          </table:table-cell>
          <table:table-cell table:style-name="ce147" table:formula="of:=IFERROR(VLOOKUP([$Masterlist.$P134];[$Datasheet.$B$1:.$AV$9809];4;FALSE());&quot;-&quot;)" office:value-type="float" office:value="0" calcext:value-type="float">
            <text:p>0</text:p>
          </table:table-cell>
          <table:table-cell table:style-name="ce147" table:formula="of:=IFERROR(VLOOKUP([$Masterlist.$P134];[$Datasheet.$B$1:.$AV$9809];5;FALSE());&quot;-&quot;)" office:value-type="float" office:value="1" calcext:value-type="float">
            <text:p>1</text:p>
          </table:table-cell>
          <table:table-cell table:style-name="ce195" table:formula="of:=IFERROR(VLOOKUP([$Masterlist.$P134];[$Datasheet.$B$1:.$AV$9809];6;FALSE());&quot;-&quot;)" office:value-type="float" office:value="0" calcext:value-type="float">
            <text:p>0</text:p>
          </table:table-cell>
          <table:table-cell table:style-name="ce147" table:formula="of:=IFERROR(VLOOKUP([$Masterlist.$P134];[$Datasheet.$B$1:.$AV$9809];7;FALSE());&quot;-&quot;)" office:value-type="float" office:value="0" calcext:value-type="float">
            <text:p>0</text:p>
          </table:table-cell>
          <table:table-cell table:style-name="ce147" table:formula="of:=IFERROR(VLOOKUP([$Masterlist.$P134];[$Datasheet.$B$1:.$AV$9809];8;FALSE());&quot;-&quot;)" office:value-type="float" office:value="0" calcext:value-type="float">
            <text:p>0</text:p>
          </table:table-cell>
          <table:table-cell table:style-name="ce147" table:formula="of:=IFERROR(VLOOKUP([$Masterlist.$P134];[$Datasheet.$B$1:.$AV$9809];9;FALSE());&quot;-&quot;)" office:value-type="float" office:value="1" calcext:value-type="float">
            <text:p>1</text:p>
          </table:table-cell>
          <table:table-cell table:style-name="ce147" table:formula="of:=IFERROR(VLOOKUP([$Masterlist.$P134];[$Datasheet.$B$1:.$AV$9809];10;FALSE());&quot;-&quot;)" office:value-type="float" office:value="0" calcext:value-type="float">
            <text:p>0</text:p>
          </table:table-cell>
          <table:table-cell table:style-name="ce147" table:formula="of:=IFERROR(VLOOKUP([$Masterlist.$P134];[$Datasheet.$B$1:.$AV$9809];11;FALSE());&quot;-&quot;)" office:value-type="float" office:value="0" calcext:value-type="float">
            <text:p>0</text:p>
          </table:table-cell>
          <table:table-cell table:style-name="ce147" table:formula="of:=IFERROR(VLOOKUP([$Masterlist.$P134];[$Datasheet.$B$1:.$AV$9809];12;FALSE());&quot;-&quot;)" office:value-type="float" office:value="0" calcext:value-type="float">
            <text:p>0</text:p>
          </table:table-cell>
          <table:table-cell table:style-name="ce147" table:formula="of:=IFERROR(VLOOKUP([$Masterlist.$P134];[$Datasheet.$B$1:.$AV$9809];13;FALSE());&quot;-&quot;)" office:value-type="float" office:value="1" calcext:value-type="float">
            <text:p>1</text:p>
          </table:table-cell>
          <table:table-cell table:style-name="ce147" table:formula="of:=IFERROR(VLOOKUP([$Masterlist.$P134];[$Datasheet.$B$1:.$AV$9809];14;FALSE());&quot;-&quot;)" office:value-type="float" office:value="0" calcext:value-type="float">
            <text:p>0</text:p>
          </table:table-cell>
          <table:table-cell table:style-name="ce147" table:formula="of:=IFERROR(VLOOKUP([$Masterlist.$P134];[$Datasheet.$B$1:.$AV$9809];15;FALSE());&quot;-&quot;)" office:value-type="float" office:value="1" calcext:value-type="float">
            <text:p>1</text:p>
          </table:table-cell>
          <table:table-cell table:style-name="ce147" table:formula="of:=IFERROR(VLOOKUP([$Masterlist.$P134];[$Datasheet.$B$1:.$AV$9809];16;FALSE());&quot;-&quot;)" office:value-type="float" office:value="0" calcext:value-type="float">
            <text:p/>
          </table:table-cell>
          <table:table-cell table:style-name="ce147" table:formula="of:=IFERROR(VLOOKUP([$Masterlist.$P134];[$Datasheet.$B$1:.$AV$9809];17;FALSE());&quot;-&quot;)" office:value-type="float" office:value="0" calcext:value-type="float">
            <text:p/>
          </table:table-cell>
          <table:table-cell table:style-name="ce147" table:formula="of:=IFERROR(VLOOKUP([$Masterlist.$P134];[$Datasheet.$B$1:.$AV$9809];18;FALSE());&quot;-&quot;)" office:value-type="float" office:value="0" calcext:value-type="float">
            <text:p/>
          </table:table-cell>
          <table:table-cell table:style-name="ce147" table:formula="of:=IFERROR(VLOOKUP([$Masterlist.$P134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office:value-type="string" calcext:value-type="string">
            <text:p>yes</text:p>
          </table:table-cell>
          <table:table-cell table:style-name="ce50" table:number-columns-repeated="11"/>
          <table:table-cell table:style-name="ce92" office:value-type="string" calcext:value-type="string">
            <text:p>FOH, LED, Broadcast</text:p>
          </table:table-cell>
          <table:table-cell table:style-name="ce8" office:value-type="string" calcext:value-type="string">
            <text:p>Demi de Oliveira</text:p>
          </table:table-cell>
          <table:table-cell table:style-name="ce13" table:formula="of:=IF(ISNUMBER(MATCH([.P135];[$Datasheet.$B$1:.$B$9809];0));&quot;✓&quot;;&quot;x&quot;)" office:value-type="string" office:string-value="✓" calcext:value-type="string">
            <text:p>✓</text:p>
          </table:table-cell>
          <table:table-cell table:style-name="ce147" table:formula="of:=IFERROR(VLOOKUP([$Masterlist.$P135];[$Datasheet.$B$1:.$AV$9809];2;FALSE());&quot;-&quot;)" office:value-type="float" office:value="0" calcext:value-type="float">
            <text:p>0</text:p>
          </table:table-cell>
          <table:table-cell table:style-name="ce147" table:formula="of:=IFERROR(VLOOKUP([$Masterlist.$P135];[$Datasheet.$B$1:.$AV$9809];3;FALSE());&quot;-&quot;)" office:value-type="float" office:value="0" calcext:value-type="float">
            <text:p>0</text:p>
          </table:table-cell>
          <table:table-cell table:style-name="ce147" table:formula="of:=IFERROR(VLOOKUP([$Masterlist.$P135];[$Datasheet.$B$1:.$AV$9809];4;FALSE());&quot;-&quot;)" office:value-type="float" office:value="0" calcext:value-type="float">
            <text:p>0</text:p>
          </table:table-cell>
          <table:table-cell table:style-name="ce147" table:formula="of:=IFERROR(VLOOKUP([$Masterlist.$P135];[$Datasheet.$B$1:.$AV$9809];5;FALSE());&quot;-&quot;)" office:value-type="float" office:value="0" calcext:value-type="float">
            <text:p>0</text:p>
          </table:table-cell>
          <table:table-cell table:style-name="ce195" table:formula="of:=IFERROR(VLOOKUP([$Masterlist.$P135];[$Datasheet.$B$1:.$AV$9809];6;FALSE());&quot;-&quot;)" office:value-type="float" office:value="0" calcext:value-type="float">
            <text:p>0</text:p>
          </table:table-cell>
          <table:table-cell table:style-name="ce147" table:formula="of:=IFERROR(VLOOKUP([$Masterlist.$P135];[$Datasheet.$B$1:.$AV$9809];7;FALSE());&quot;-&quot;)" office:value-type="float" office:value="0" calcext:value-type="float">
            <text:p>0</text:p>
          </table:table-cell>
          <table:table-cell table:style-name="ce147" table:formula="of:=IFERROR(VLOOKUP([$Masterlist.$P135];[$Datasheet.$B$1:.$AV$9809];8;FALSE());&quot;-&quot;)" office:value-type="float" office:value="0" calcext:value-type="float">
            <text:p>0</text:p>
          </table:table-cell>
          <table:table-cell table:style-name="ce147" table:formula="of:=IFERROR(VLOOKUP([$Masterlist.$P135];[$Datasheet.$B$1:.$AV$9809];9;FALSE());&quot;-&quot;)" office:value-type="float" office:value="0" calcext:value-type="float">
            <text:p>0</text:p>
          </table:table-cell>
          <table:table-cell table:style-name="ce147" table:formula="of:=IFERROR(VLOOKUP([$Masterlist.$P135];[$Datasheet.$B$1:.$AV$9809];10;FALSE());&quot;-&quot;)" office:value-type="float" office:value="0" calcext:value-type="float">
            <text:p>0</text:p>
          </table:table-cell>
          <table:table-cell table:style-name="ce147" table:formula="of:=IFERROR(VLOOKUP([$Masterlist.$P135];[$Datasheet.$B$1:.$AV$9809];11;FALSE());&quot;-&quot;)" office:value-type="float" office:value="1" calcext:value-type="float">
            <text:p>1</text:p>
          </table:table-cell>
          <table:table-cell table:style-name="ce147" table:formula="of:=IFERROR(VLOOKUP([$Masterlist.$P135];[$Datasheet.$B$1:.$AV$9809];12;FALSE());&quot;-&quot;)" office:value-type="float" office:value="0" calcext:value-type="float">
            <text:p>0</text:p>
          </table:table-cell>
          <table:table-cell table:style-name="ce147" table:formula="of:=IFERROR(VLOOKUP([$Masterlist.$P135];[$Datasheet.$B$1:.$AV$9809];13;FALSE());&quot;-&quot;)" office:value-type="float" office:value="0" calcext:value-type="float">
            <text:p>0</text:p>
          </table:table-cell>
          <table:table-cell table:style-name="ce147" table:formula="of:=IFERROR(VLOOKUP([$Masterlist.$P135];[$Datasheet.$B$1:.$AV$9809];14;FALSE());&quot;-&quot;)" office:value-type="float" office:value="0" calcext:value-type="float">
            <text:p>0</text:p>
          </table:table-cell>
          <table:table-cell table:style-name="ce147" table:formula="of:=IFERROR(VLOOKUP([$Masterlist.$P135];[$Datasheet.$B$1:.$AV$9809];15;FALSE());&quot;-&quot;)" office:value-type="float" office:value="1" calcext:value-type="float">
            <text:p>1</text:p>
          </table:table-cell>
          <table:table-cell table:style-name="ce147" table:formula="of:=IFERROR(VLOOKUP([$Masterlist.$P135];[$Datasheet.$B$1:.$AV$9809];16;FALSE());&quot;-&quot;)" office:value-type="float" office:value="0" calcext:value-type="float">
            <text:p/>
          </table:table-cell>
          <table:table-cell table:style-name="ce147" table:formula="of:=IFERROR(VLOOKUP([$Masterlist.$P135];[$Datasheet.$B$1:.$AV$9809];17;FALSE());&quot;-&quot;)" office:value-type="float" office:value="0" calcext:value-type="float">
            <text:p/>
          </table:table-cell>
          <table:table-cell table:style-name="ce147" table:formula="of:=IFERROR(VLOOKUP([$Masterlist.$P135];[$Datasheet.$B$1:.$AV$9809];18;FALSE());&quot;-&quot;)" office:value-type="float" office:value="0" calcext:value-type="float">
            <text:p/>
          </table:table-cell>
          <table:table-cell table:style-name="ce147" table:formula="of:=IFERROR(VLOOKUP([$Masterlist.$P135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office:value-type="string" calcext:value-type="string">
            <text:p>yes</text:p>
          </table:table-cell>
          <table:table-cell table:style-name="ce50" table:number-columns-repeated="11"/>
          <table:table-cell table:style-name="ce92" office:value-type="string" calcext:value-type="string">
            <text:p>FOH, LED, Broadcast</text:p>
          </table:table-cell>
          <table:table-cell table:style-name="ce8" office:value-type="string" calcext:value-type="string">
            <text:p>Michelle Engelbrecht</text:p>
          </table:table-cell>
          <table:table-cell table:style-name="ce13" table:formula="of:=IF(ISNUMBER(MATCH([.P136];[$Datasheet.$B$1:.$B$9809];0));&quot;✓&quot;;&quot;x&quot;)" office:value-type="string" office:string-value="✓" calcext:value-type="string">
            <text:p>✓</text:p>
          </table:table-cell>
          <table:table-cell table:style-name="ce147" table:formula="of:=IFERROR(VLOOKUP([$Masterlist.$P136];[$Datasheet.$B$1:.$AV$9809];2;FALSE());&quot;-&quot;)" office:value-type="float" office:value="0" calcext:value-type="float">
            <text:p>0</text:p>
          </table:table-cell>
          <table:table-cell table:style-name="ce147" table:formula="of:=IFERROR(VLOOKUP([$Masterlist.$P136];[$Datasheet.$B$1:.$AV$9809];3;FALSE());&quot;-&quot;)" office:value-type="float" office:value="0" calcext:value-type="float">
            <text:p>0</text:p>
          </table:table-cell>
          <table:table-cell table:style-name="ce147" table:formula="of:=IFERROR(VLOOKUP([$Masterlist.$P136];[$Datasheet.$B$1:.$AV$9809];4;FALSE());&quot;-&quot;)" office:value-type="float" office:value="0" calcext:value-type="float">
            <text:p>0</text:p>
          </table:table-cell>
          <table:table-cell table:style-name="ce147" table:formula="of:=IFERROR(VLOOKUP([$Masterlist.$P136];[$Datasheet.$B$1:.$AV$9809];5;FALSE());&quot;-&quot;)" office:value-type="float" office:value="1" calcext:value-type="float">
            <text:p>1</text:p>
          </table:table-cell>
          <table:table-cell table:style-name="ce195" table:formula="of:=IFERROR(VLOOKUP([$Masterlist.$P136];[$Datasheet.$B$1:.$AV$9809];6;FALSE());&quot;-&quot;)" office:value-type="float" office:value="0" calcext:value-type="float">
            <text:p>0</text:p>
          </table:table-cell>
          <table:table-cell table:style-name="ce147" table:formula="of:=IFERROR(VLOOKUP([$Masterlist.$P136];[$Datasheet.$B$1:.$AV$9809];7;FALSE());&quot;-&quot;)" office:value-type="float" office:value="1" calcext:value-type="float">
            <text:p>1</text:p>
          </table:table-cell>
          <table:table-cell table:style-name="ce147" table:formula="of:=IFERROR(VLOOKUP([$Masterlist.$P136];[$Datasheet.$B$1:.$AV$9809];8;FALSE());&quot;-&quot;)" office:value-type="float" office:value="0" calcext:value-type="float">
            <text:p>0</text:p>
          </table:table-cell>
          <table:table-cell table:style-name="ce147" table:formula="of:=IFERROR(VLOOKUP([$Masterlist.$P136];[$Datasheet.$B$1:.$AV$9809];9;FALSE());&quot;-&quot;)" office:value-type="float" office:value="1" calcext:value-type="float">
            <text:p>1</text:p>
          </table:table-cell>
          <table:table-cell table:style-name="ce147" table:formula="of:=IFERROR(VLOOKUP([$Masterlist.$P136];[$Datasheet.$B$1:.$AV$9809];10;FALSE());&quot;-&quot;)" office:value-type="float" office:value="0" calcext:value-type="float">
            <text:p>0</text:p>
          </table:table-cell>
          <table:table-cell table:style-name="ce147" table:formula="of:=IFERROR(VLOOKUP([$Masterlist.$P136];[$Datasheet.$B$1:.$AV$9809];11;FALSE());&quot;-&quot;)" office:value-type="float" office:value="1" calcext:value-type="float">
            <text:p>1</text:p>
          </table:table-cell>
          <table:table-cell table:style-name="ce147" table:formula="of:=IFERROR(VLOOKUP([$Masterlist.$P136];[$Datasheet.$B$1:.$AV$9809];12;FALSE());&quot;-&quot;)" office:value-type="float" office:value="0" calcext:value-type="float">
            <text:p>0</text:p>
          </table:table-cell>
          <table:table-cell table:style-name="ce147" table:formula="of:=IFERROR(VLOOKUP([$Masterlist.$P136];[$Datasheet.$B$1:.$AV$9809];13;FALSE());&quot;-&quot;)" office:value-type="float" office:value="1" calcext:value-type="float">
            <text:p>1</text:p>
          </table:table-cell>
          <table:table-cell table:style-name="ce147" table:formula="of:=IFERROR(VLOOKUP([$Masterlist.$P136];[$Datasheet.$B$1:.$AV$9809];14;FALSE());&quot;-&quot;)" office:value-type="float" office:value="0" calcext:value-type="float">
            <text:p>0</text:p>
          </table:table-cell>
          <table:table-cell table:style-name="ce147" table:formula="of:=IFERROR(VLOOKUP([$Masterlist.$P136];[$Datasheet.$B$1:.$AV$9809];15;FALSE());&quot;-&quot;)" office:value-type="float" office:value="1" calcext:value-type="float">
            <text:p>1</text:p>
          </table:table-cell>
          <table:table-cell table:style-name="ce147" table:formula="of:=IFERROR(VLOOKUP([$Masterlist.$P136];[$Datasheet.$B$1:.$AV$9809];16;FALSE());&quot;-&quot;)" office:value-type="float" office:value="0" calcext:value-type="float">
            <text:p/>
          </table:table-cell>
          <table:table-cell table:style-name="ce147" table:formula="of:=IFERROR(VLOOKUP([$Masterlist.$P136];[$Datasheet.$B$1:.$AV$9809];17;FALSE());&quot;-&quot;)" office:value-type="float" office:value="0" calcext:value-type="float">
            <text:p/>
          </table:table-cell>
          <table:table-cell table:style-name="ce147" table:formula="of:=IFERROR(VLOOKUP([$Masterlist.$P136];[$Datasheet.$B$1:.$AV$9809];18;FALSE());&quot;-&quot;)" office:value-type="float" office:value="0" calcext:value-type="float">
            <text:p/>
          </table:table-cell>
          <table:table-cell table:style-name="ce147" table:formula="of:=IFERROR(VLOOKUP([$Masterlist.$P136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number-columns-repeated="2" table:style-name="ce50" office:value-type="string" calcext:value-type="string">
            <text:p>yes</text:p>
          </table:table-cell>
          <table:table-cell table:style-name="ce50" table:number-columns-repeated="10"/>
          <table:table-cell table:style-name="ce92" office:value-type="string" calcext:value-type="string">
            <text:p>Brk FOH, Broadcast</text:p>
          </table:table-cell>
          <table:table-cell table:style-name="ce8" office:value-type="string" calcext:value-type="string">
            <text:p>Ash-Lee La Grange</text:p>
          </table:table-cell>
          <table:table-cell table:style-name="ce13" table:formula="of:=IF(ISNUMBER(MATCH([.P137];[$Datasheet.$B$1:.$B$9809];0));&quot;✓&quot;;&quot;x&quot;)" office:value-type="string" office:string-value="✓" calcext:value-type="string">
            <text:p>✓</text:p>
          </table:table-cell>
          <table:table-cell table:style-name="ce147" table:formula="of:=IFERROR(VLOOKUP([$Masterlist.$P137];[$Datasheet.$B$1:.$AV$9809];2;FALSE());&quot;-&quot;)" office:value-type="float" office:value="0" calcext:value-type="float">
            <text:p>0</text:p>
          </table:table-cell>
          <table:table-cell table:style-name="ce147" table:formula="of:=IFERROR(VLOOKUP([$Masterlist.$P137];[$Datasheet.$B$1:.$AV$9809];3;FALSE());&quot;-&quot;)" office:value-type="float" office:value="0" calcext:value-type="float">
            <text:p>0</text:p>
          </table:table-cell>
          <table:table-cell table:style-name="ce147" table:formula="of:=IFERROR(VLOOKUP([$Masterlist.$P137];[$Datasheet.$B$1:.$AV$9809];4;FALSE());&quot;-&quot;)" office:value-type="float" office:value="0" calcext:value-type="float">
            <text:p>0</text:p>
          </table:table-cell>
          <table:table-cell table:style-name="ce147" table:formula="of:=IFERROR(VLOOKUP([$Masterlist.$P137];[$Datasheet.$B$1:.$AV$9809];5;FALSE());&quot;-&quot;)" office:value-type="float" office:value="0" calcext:value-type="float">
            <text:p>0</text:p>
          </table:table-cell>
          <table:table-cell table:style-name="ce195" table:formula="of:=IFERROR(VLOOKUP([$Masterlist.$P137];[$Datasheet.$B$1:.$AV$9809];6;FALSE());&quot;-&quot;)" office:value-type="float" office:value="0" calcext:value-type="float">
            <text:p>0</text:p>
          </table:table-cell>
          <table:table-cell table:style-name="ce147" table:formula="of:=IFERROR(VLOOKUP([$Masterlist.$P137];[$Datasheet.$B$1:.$AV$9809];7;FALSE());&quot;-&quot;)" office:value-type="float" office:value="1" calcext:value-type="float">
            <text:p>1</text:p>
          </table:table-cell>
          <table:table-cell table:style-name="ce147" table:formula="of:=IFERROR(VLOOKUP([$Masterlist.$P137];[$Datasheet.$B$1:.$AV$9809];8;FALSE());&quot;-&quot;)" office:value-type="float" office:value="1" calcext:value-type="float">
            <text:p>1</text:p>
          </table:table-cell>
          <table:table-cell table:style-name="ce147" table:formula="of:=IFERROR(VLOOKUP([$Masterlist.$P137];[$Datasheet.$B$1:.$AV$9809];9;FALSE());&quot;-&quot;)" office:value-type="float" office:value="0" calcext:value-type="float">
            <text:p>0</text:p>
          </table:table-cell>
          <table:table-cell table:style-name="ce147" table:formula="of:=IFERROR(VLOOKUP([$Masterlist.$P137];[$Datasheet.$B$1:.$AV$9809];10;FALSE());&quot;-&quot;)" office:value-type="float" office:value="0" calcext:value-type="float">
            <text:p>0</text:p>
          </table:table-cell>
          <table:table-cell table:style-name="ce147" table:formula="of:=IFERROR(VLOOKUP([$Masterlist.$P137];[$Datasheet.$B$1:.$AV$9809];11;FALSE());&quot;-&quot;)" office:value-type="float" office:value="1" calcext:value-type="float">
            <text:p>1</text:p>
          </table:table-cell>
          <table:table-cell table:style-name="ce147" table:formula="of:=IFERROR(VLOOKUP([$Masterlist.$P137];[$Datasheet.$B$1:.$AV$9809];12;FALSE());&quot;-&quot;)" office:value-type="float" office:value="1" calcext:value-type="float">
            <text:p>1</text:p>
          </table:table-cell>
          <table:table-cell table:style-name="ce147" table:formula="of:=IFERROR(VLOOKUP([$Masterlist.$P137];[$Datasheet.$B$1:.$AV$9809];13;FALSE());&quot;-&quot;)" office:value-type="float" office:value="0" calcext:value-type="float">
            <text:p>0</text:p>
          </table:table-cell>
          <table:table-cell table:style-name="ce147" table:formula="of:=IFERROR(VLOOKUP([$Masterlist.$P137];[$Datasheet.$B$1:.$AV$9809];14;FALSE());&quot;-&quot;)" office:value-type="float" office:value="0" calcext:value-type="float">
            <text:p>0</text:p>
          </table:table-cell>
          <table:table-cell table:style-name="ce147" table:formula="of:=IFERROR(VLOOKUP([$Masterlist.$P137];[$Datasheet.$B$1:.$AV$9809];15;FALSE());&quot;-&quot;)" office:value-type="float" office:value="1" calcext:value-type="float">
            <text:p>1</text:p>
          </table:table-cell>
          <table:table-cell table:style-name="ce147" table:formula="of:=IFERROR(VLOOKUP([$Masterlist.$P137];[$Datasheet.$B$1:.$AV$9809];16;FALSE());&quot;-&quot;)" office:value-type="float" office:value="0" calcext:value-type="float">
            <text:p/>
          </table:table-cell>
          <table:table-cell table:style-name="ce147" table:formula="of:=IFERROR(VLOOKUP([$Masterlist.$P137];[$Datasheet.$B$1:.$AV$9809];17;FALSE());&quot;-&quot;)" office:value-type="float" office:value="0" calcext:value-type="float">
            <text:p/>
          </table:table-cell>
          <table:table-cell table:style-name="ce147" table:formula="of:=IFERROR(VLOOKUP([$Masterlist.$P137];[$Datasheet.$B$1:.$AV$9809];18;FALSE());&quot;-&quot;)" office:value-type="float" office:value="0" calcext:value-type="float">
            <text:p/>
          </table:table-cell>
          <table:table-cell table:style-name="ce147" table:formula="of:=IFERROR(VLOOKUP([$Masterlist.$P137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M</text:p>
          </table:table-cell>
          <table:table-cell table:number-columns-repeated="2" table:style-name="ce50" office:value-type="string" calcext:value-type="string">
            <text:p>yes</text:p>
          </table:table-cell>
          <table:table-cell table:style-name="ce50" table:number-columns-repeated="10"/>
          <table:table-cell table:style-name="ce92" office:value-type="string" calcext:value-type="string">
            <text:p>Broadcast</text:p>
          </table:table-cell>
          <table:table-cell table:style-name="ce8" office:value-type="string" calcext:value-type="string">
            <text:p>Solett Smuts</text:p>
          </table:table-cell>
          <table:table-cell table:style-name="ce13" table:formula="of:=IF(ISNUMBER(MATCH([.P138];[$Datasheet.$B$1:.$B$9809];0));&quot;✓&quot;;&quot;x&quot;)" office:value-type="string" office:string-value="✓" calcext:value-type="string">
            <text:p>✓</text:p>
          </table:table-cell>
          <table:table-cell table:style-name="ce147" table:formula="of:=IFERROR(VLOOKUP([$Masterlist.$P138];[$Datasheet.$B$1:.$AV$9809];2;FALSE());&quot;-&quot;)" office:value-type="float" office:value="0" calcext:value-type="float">
            <text:p>0</text:p>
          </table:table-cell>
          <table:table-cell table:style-name="ce147" table:formula="of:=IFERROR(VLOOKUP([$Masterlist.$P138];[$Datasheet.$B$1:.$AV$9809];3;FALSE());&quot;-&quot;)" office:value-type="float" office:value="1" calcext:value-type="float">
            <text:p>1</text:p>
          </table:table-cell>
          <table:table-cell table:style-name="ce147" table:formula="of:=IFERROR(VLOOKUP([$Masterlist.$P138];[$Datasheet.$B$1:.$AV$9809];4;FALSE());&quot;-&quot;)" office:value-type="float" office:value="0" calcext:value-type="float">
            <text:p>0</text:p>
          </table:table-cell>
          <table:table-cell table:style-name="ce147" table:formula="of:=IFERROR(VLOOKUP([$Masterlist.$P138];[$Datasheet.$B$1:.$AV$9809];5;FALSE());&quot;-&quot;)" office:value-type="float" office:value="0" calcext:value-type="float">
            <text:p>0</text:p>
          </table:table-cell>
          <table:table-cell table:style-name="ce195" table:formula="of:=IFERROR(VLOOKUP([$Masterlist.$P138];[$Datasheet.$B$1:.$AV$9809];6;FALSE());&quot;-&quot;)" office:value-type="float" office:value="1" calcext:value-type="float">
            <text:p>1</text:p>
          </table:table-cell>
          <table:table-cell table:style-name="ce147" table:formula="of:=IFERROR(VLOOKUP([$Masterlist.$P138];[$Datasheet.$B$1:.$AV$9809];7;FALSE());&quot;-&quot;)" office:value-type="float" office:value="1" calcext:value-type="float">
            <text:p>1</text:p>
          </table:table-cell>
          <table:table-cell table:style-name="ce147" table:formula="of:=IFERROR(VLOOKUP([$Masterlist.$P138];[$Datasheet.$B$1:.$AV$9809];8;FALSE());&quot;-&quot;)" office:value-type="float" office:value="1" calcext:value-type="float">
            <text:p>1</text:p>
          </table:table-cell>
          <table:table-cell table:style-name="ce147" table:formula="of:=IFERROR(VLOOKUP([$Masterlist.$P138];[$Datasheet.$B$1:.$AV$9809];9;FALSE());&quot;-&quot;)" office:value-type="float" office:value="1" calcext:value-type="float">
            <text:p>1</text:p>
          </table:table-cell>
          <table:table-cell table:style-name="ce147" table:formula="of:=IFERROR(VLOOKUP([$Masterlist.$P138];[$Datasheet.$B$1:.$AV$9809];10;FALSE());&quot;-&quot;)" office:value-type="float" office:value="0" calcext:value-type="float">
            <text:p>0</text:p>
          </table:table-cell>
          <table:table-cell table:style-name="ce147" table:formula="of:=IFERROR(VLOOKUP([$Masterlist.$P138];[$Datasheet.$B$1:.$AV$9809];11;FALSE());&quot;-&quot;)" office:value-type="float" office:value="0" calcext:value-type="float">
            <text:p>0</text:p>
          </table:table-cell>
          <table:table-cell table:style-name="ce147" table:formula="of:=IFERROR(VLOOKUP([$Masterlist.$P138];[$Datasheet.$B$1:.$AV$9809];12;FALSE());&quot;-&quot;)" office:value-type="float" office:value="1" calcext:value-type="float">
            <text:p>1</text:p>
          </table:table-cell>
          <table:table-cell table:style-name="ce147" table:formula="of:=IFERROR(VLOOKUP([$Masterlist.$P138];[$Datasheet.$B$1:.$AV$9809];13;FALSE());&quot;-&quot;)" office:value-type="float" office:value="1" calcext:value-type="float">
            <text:p>1</text:p>
          </table:table-cell>
          <table:table-cell table:style-name="ce147" table:formula="of:=IFERROR(VLOOKUP([$Masterlist.$P138];[$Datasheet.$B$1:.$AV$9809];14;FALSE());&quot;-&quot;)" office:value-type="float" office:value="0" calcext:value-type="float">
            <text:p>0</text:p>
          </table:table-cell>
          <table:table-cell table:style-name="ce147" table:formula="of:=IFERROR(VLOOKUP([$Masterlist.$P138];[$Datasheet.$B$1:.$AV$9809];15;FALSE());&quot;-&quot;)" office:value-type="float" office:value="0" calcext:value-type="float">
            <text:p>0</text:p>
          </table:table-cell>
          <table:table-cell table:style-name="ce147" table:formula="of:=IFERROR(VLOOKUP([$Masterlist.$P138];[$Datasheet.$B$1:.$AV$9809];16;FALSE());&quot;-&quot;)" office:value-type="float" office:value="0" calcext:value-type="float">
            <text:p/>
          </table:table-cell>
          <table:table-cell table:style-name="ce147" table:formula="of:=IFERROR(VLOOKUP([$Masterlist.$P138];[$Datasheet.$B$1:.$AV$9809];17;FALSE());&quot;-&quot;)" office:value-type="float" office:value="0" calcext:value-type="float">
            <text:p/>
          </table:table-cell>
          <table:table-cell table:style-name="ce147" table:formula="of:=IFERROR(VLOOKUP([$Masterlist.$P138];[$Datasheet.$B$1:.$AV$9809];18;FALSE());&quot;-&quot;)" office:value-type="float" office:value="0" calcext:value-type="float">
            <text:p/>
          </table:table-cell>
          <table:table-cell table:style-name="ce147" table:formula="of:=IFERROR(VLOOKUP([$Masterlist.$P138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number-columns-repeated="2" table:style-name="ce50" office:value-type="string" calcext:value-type="string">
            <text:p>yes</text:p>
          </table:table-cell>
          <table:table-cell table:style-name="ce50" table:number-columns-repeated="10"/>
          <table:table-cell table:style-name="ce92" office:value-type="string" calcext:value-type="string">
            <text:p>Broadcast</text:p>
          </table:table-cell>
          <table:table-cell table:style-name="ce8" office:value-type="string" calcext:value-type="string">
            <text:p>Cara Koorts</text:p>
          </table:table-cell>
          <table:table-cell table:style-name="ce13" table:formula="of:=IF(ISNUMBER(MATCH([.P139];[$Datasheet.$B$1:.$B$9809];0));&quot;✓&quot;;&quot;x&quot;)" office:value-type="string" office:string-value="✓" calcext:value-type="string">
            <text:p>✓</text:p>
          </table:table-cell>
          <table:table-cell table:style-name="ce147" table:formula="of:=IFERROR(VLOOKUP([$Masterlist.$P139];[$Datasheet.$B$1:.$AV$9809];2;FALSE());&quot;-&quot;)" office:value-type="float" office:value="0" calcext:value-type="float">
            <text:p>0</text:p>
          </table:table-cell>
          <table:table-cell table:style-name="ce147" table:formula="of:=IFERROR(VLOOKUP([$Masterlist.$P139];[$Datasheet.$B$1:.$AV$9809];3;FALSE());&quot;-&quot;)" office:value-type="float" office:value="0" calcext:value-type="float">
            <text:p>0</text:p>
          </table:table-cell>
          <table:table-cell table:style-name="ce147" table:formula="of:=IFERROR(VLOOKUP([$Masterlist.$P139];[$Datasheet.$B$1:.$AV$9809];4;FALSE());&quot;-&quot;)" office:value-type="float" office:value="0" calcext:value-type="float">
            <text:p>0</text:p>
          </table:table-cell>
          <table:table-cell table:style-name="ce147" table:formula="of:=IFERROR(VLOOKUP([$Masterlist.$P139];[$Datasheet.$B$1:.$AV$9809];5;FALSE());&quot;-&quot;)" office:value-type="float" office:value="1" calcext:value-type="float">
            <text:p>1</text:p>
          </table:table-cell>
          <table:table-cell table:style-name="ce195" table:formula="of:=IFERROR(VLOOKUP([$Masterlist.$P139];[$Datasheet.$B$1:.$AV$9809];6;FALSE());&quot;-&quot;)" office:value-type="float" office:value="0" calcext:value-type="float">
            <text:p>0</text:p>
          </table:table-cell>
          <table:table-cell table:style-name="ce147" table:formula="of:=IFERROR(VLOOKUP([$Masterlist.$P139];[$Datasheet.$B$1:.$AV$9809];7;FALSE());&quot;-&quot;)" office:value-type="float" office:value="0" calcext:value-type="float">
            <text:p>0</text:p>
          </table:table-cell>
          <table:table-cell table:style-name="ce147" table:formula="of:=IFERROR(VLOOKUP([$Masterlist.$P139];[$Datasheet.$B$1:.$AV$9809];8;FALSE());&quot;-&quot;)" office:value-type="float" office:value="0" calcext:value-type="float">
            <text:p>0</text:p>
          </table:table-cell>
          <table:table-cell table:style-name="ce147" table:formula="of:=IFERROR(VLOOKUP([$Masterlist.$P139];[$Datasheet.$B$1:.$AV$9809];9;FALSE());&quot;-&quot;)" office:value-type="float" office:value="0" calcext:value-type="float">
            <text:p>0</text:p>
          </table:table-cell>
          <table:table-cell table:style-name="ce147" table:formula="of:=IFERROR(VLOOKUP([$Masterlist.$P139];[$Datasheet.$B$1:.$AV$9809];10;FALSE());&quot;-&quot;)" office:value-type="float" office:value="0" calcext:value-type="float">
            <text:p>0</text:p>
          </table:table-cell>
          <table:table-cell table:style-name="ce147" table:formula="of:=IFERROR(VLOOKUP([$Masterlist.$P139];[$Datasheet.$B$1:.$AV$9809];11;FALSE());&quot;-&quot;)" office:value-type="float" office:value="0" calcext:value-type="float">
            <text:p>0</text:p>
          </table:table-cell>
          <table:table-cell table:style-name="ce147" table:formula="of:=IFERROR(VLOOKUP([$Masterlist.$P139];[$Datasheet.$B$1:.$AV$9809];12;FALSE());&quot;-&quot;)" office:value-type="float" office:value="1" calcext:value-type="float">
            <text:p>1</text:p>
          </table:table-cell>
          <table:table-cell table:style-name="ce147" table:formula="of:=IFERROR(VLOOKUP([$Masterlist.$P139];[$Datasheet.$B$1:.$AV$9809];13;FALSE());&quot;-&quot;)" office:value-type="float" office:value="0" calcext:value-type="float">
            <text:p>0</text:p>
          </table:table-cell>
          <table:table-cell table:style-name="ce147" table:formula="of:=IFERROR(VLOOKUP([$Masterlist.$P139];[$Datasheet.$B$1:.$AV$9809];14;FALSE());&quot;-&quot;)" office:value-type="float" office:value="0" calcext:value-type="float">
            <text:p>0</text:p>
          </table:table-cell>
          <table:table-cell table:style-name="ce147" table:formula="of:=IFERROR(VLOOKUP([$Masterlist.$P139];[$Datasheet.$B$1:.$AV$9809];15;FALSE());&quot;-&quot;)" office:value-type="float" office:value="1" calcext:value-type="float">
            <text:p>1</text:p>
          </table:table-cell>
          <table:table-cell table:style-name="ce147" table:formula="of:=IFERROR(VLOOKUP([$Masterlist.$P139];[$Datasheet.$B$1:.$AV$9809];16;FALSE());&quot;-&quot;)" office:value-type="float" office:value="0" calcext:value-type="float">
            <text:p/>
          </table:table-cell>
          <table:table-cell table:style-name="ce147" table:formula="of:=IFERROR(VLOOKUP([$Masterlist.$P139];[$Datasheet.$B$1:.$AV$9809];17;FALSE());&quot;-&quot;)" office:value-type="float" office:value="0" calcext:value-type="float">
            <text:p/>
          </table:table-cell>
          <table:table-cell table:style-name="ce147" table:formula="of:=IFERROR(VLOOKUP([$Masterlist.$P139];[$Datasheet.$B$1:.$AV$9809];18;FALSE());&quot;-&quot;)" office:value-type="float" office:value="0" calcext:value-type="float">
            <text:p/>
          </table:table-cell>
          <table:table-cell table:style-name="ce147" table:formula="of:=IFERROR(VLOOKUP([$Masterlist.$P139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number-columns-repeated="2" table:style-name="ce50" office:value-type="string" calcext:value-type="string">
            <text:p>yes</text:p>
          </table:table-cell>
          <table:table-cell table:style-name="ce50" table:number-columns-repeated="10"/>
          <table:table-cell table:style-name="ce92" office:value-type="string" calcext:value-type="string">
            <text:p>LED, Broadcast</text:p>
          </table:table-cell>
          <table:table-cell table:style-name="ce8" office:value-type="string" calcext:value-type="string">
            <text:p>Nadia Carolus</text:p>
          </table:table-cell>
          <table:table-cell table:style-name="ce13" table:formula="of:=IF(ISNUMBER(MATCH([.P140];[$Datasheet.$B$1:.$B$9809];0));&quot;✓&quot;;&quot;x&quot;)" office:value-type="string" office:string-value="✓" calcext:value-type="string">
            <text:p>✓</text:p>
          </table:table-cell>
          <table:table-cell table:style-name="ce147" table:formula="of:=IFERROR(VLOOKUP([$Masterlist.$P140];[$Datasheet.$B$1:.$AV$9809];2;FALSE());&quot;-&quot;)" office:value-type="float" office:value="0" calcext:value-type="float">
            <text:p>0</text:p>
          </table:table-cell>
          <table:table-cell table:style-name="ce147" table:formula="of:=IFERROR(VLOOKUP([$Masterlist.$P140];[$Datasheet.$B$1:.$AV$9809];3;FALSE());&quot;-&quot;)" office:value-type="float" office:value="0" calcext:value-type="float">
            <text:p>0</text:p>
          </table:table-cell>
          <table:table-cell table:style-name="ce147" table:formula="of:=IFERROR(VLOOKUP([$Masterlist.$P140];[$Datasheet.$B$1:.$AV$9809];4;FALSE());&quot;-&quot;)" office:value-type="float" office:value="0" calcext:value-type="float">
            <text:p>0</text:p>
          </table:table-cell>
          <table:table-cell table:style-name="ce147" table:formula="of:=IFERROR(VLOOKUP([$Masterlist.$P140];[$Datasheet.$B$1:.$AV$9809];5;FALSE());&quot;-&quot;)" office:value-type="float" office:value="1" calcext:value-type="float">
            <text:p>1</text:p>
          </table:table-cell>
          <table:table-cell table:style-name="ce195" table:formula="of:=IFERROR(VLOOKUP([$Masterlist.$P140];[$Datasheet.$B$1:.$AV$9809];6;FALSE());&quot;-&quot;)" office:value-type="float" office:value="0" calcext:value-type="float">
            <text:p>0</text:p>
          </table:table-cell>
          <table:table-cell table:style-name="ce147" table:formula="of:=IFERROR(VLOOKUP([$Masterlist.$P140];[$Datasheet.$B$1:.$AV$9809];7;FALSE());&quot;-&quot;)" office:value-type="float" office:value="1" calcext:value-type="float">
            <text:p>1</text:p>
          </table:table-cell>
          <table:table-cell table:style-name="ce147" table:formula="of:=IFERROR(VLOOKUP([$Masterlist.$P140];[$Datasheet.$B$1:.$AV$9809];8;FALSE());&quot;-&quot;)" office:value-type="float" office:value="0" calcext:value-type="float">
            <text:p>0</text:p>
          </table:table-cell>
          <table:table-cell table:style-name="ce147" table:formula="of:=IFERROR(VLOOKUP([$Masterlist.$P140];[$Datasheet.$B$1:.$AV$9809];9;FALSE());&quot;-&quot;)" office:value-type="float" office:value="0" calcext:value-type="float">
            <text:p>0</text:p>
          </table:table-cell>
          <table:table-cell table:style-name="ce147" table:formula="of:=IFERROR(VLOOKUP([$Masterlist.$P140];[$Datasheet.$B$1:.$AV$9809];10;FALSE());&quot;-&quot;)" office:value-type="float" office:value="0" calcext:value-type="float">
            <text:p>0</text:p>
          </table:table-cell>
          <table:table-cell table:style-name="ce147" table:formula="of:=IFERROR(VLOOKUP([$Masterlist.$P140];[$Datasheet.$B$1:.$AV$9809];11;FALSE());&quot;-&quot;)" office:value-type="float" office:value="0" calcext:value-type="float">
            <text:p>0</text:p>
          </table:table-cell>
          <table:table-cell table:style-name="ce147" table:formula="of:=IFERROR(VLOOKUP([$Masterlist.$P140];[$Datasheet.$B$1:.$AV$9809];12;FALSE());&quot;-&quot;)" office:value-type="float" office:value="0" calcext:value-type="float">
            <text:p>0</text:p>
          </table:table-cell>
          <table:table-cell table:style-name="ce147" table:formula="of:=IFERROR(VLOOKUP([$Masterlist.$P140];[$Datasheet.$B$1:.$AV$9809];13;FALSE());&quot;-&quot;)" office:value-type="float" office:value="1" calcext:value-type="float">
            <text:p>1</text:p>
          </table:table-cell>
          <table:table-cell table:style-name="ce147" table:formula="of:=IFERROR(VLOOKUP([$Masterlist.$P140];[$Datasheet.$B$1:.$AV$9809];14;FALSE());&quot;-&quot;)" office:value-type="float" office:value="0" calcext:value-type="float">
            <text:p>0</text:p>
          </table:table-cell>
          <table:table-cell table:style-name="ce147" table:formula="of:=IFERROR(VLOOKUP([$Masterlist.$P140];[$Datasheet.$B$1:.$AV$9809];15;FALSE());&quot;-&quot;)" office:value-type="float" office:value="1" calcext:value-type="float">
            <text:p>1</text:p>
          </table:table-cell>
          <table:table-cell table:style-name="ce147" table:formula="of:=IFERROR(VLOOKUP([$Masterlist.$P140];[$Datasheet.$B$1:.$AV$9809];16;FALSE());&quot;-&quot;)" office:value-type="float" office:value="0" calcext:value-type="float">
            <text:p/>
          </table:table-cell>
          <table:table-cell table:style-name="ce147" table:formula="of:=IFERROR(VLOOKUP([$Masterlist.$P140];[$Datasheet.$B$1:.$AV$9809];17;FALSE());&quot;-&quot;)" office:value-type="float" office:value="0" calcext:value-type="float">
            <text:p/>
          </table:table-cell>
          <table:table-cell table:style-name="ce147" table:formula="of:=IFERROR(VLOOKUP([$Masterlist.$P140];[$Datasheet.$B$1:.$AV$9809];18;FALSE());&quot;-&quot;)" office:value-type="float" office:value="0" calcext:value-type="float">
            <text:p/>
          </table:table-cell>
          <table:table-cell table:style-name="ce147" table:formula="of:=IFERROR(VLOOKUP([$Masterlist.$P140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AL</text:p>
          </table:table-cell>
          <table:table-cell table:style-name="ce50" office:value-type="string" calcext:value-type="string">
            <text:p>yes</text:p>
          </table:table-cell>
          <table:table-cell table:style-name="ce50" table:number-columns-repeated="11"/>
          <table:table-cell table:style-name="ce92" office:value-type="string" calcext:value-type="string">
            <text:p>LED, Broadcast</text:p>
          </table:table-cell>
          <table:table-cell table:style-name="ce8" office:value-type="string" calcext:value-type="string">
            <text:p>Carla Prinsloo</text:p>
          </table:table-cell>
          <table:table-cell table:style-name="ce13" table:formula="of:=IF(ISNUMBER(MATCH([.P141];[$Datasheet.$B$1:.$B$9809];0));&quot;✓&quot;;&quot;x&quot;)" office:value-type="string" office:string-value="x" calcext:value-type="string">
            <text:p>x</text:p>
          </table:table-cell>
          <table:table-cell table:style-name="ce147" table:formula="of:=IFERROR(VLOOKUP([$Masterlist.$P141];[$Datasheet.$B$1:.$AV$9809];2;FALSE());&quot;-&quot;)" office:value-type="string" office:string-value="-" calcext:value-type="string">
            <text:p>-</text:p>
          </table:table-cell>
          <table:table-cell table:style-name="ce147" table:formula="of:=IFERROR(VLOOKUP([$Masterlist.$P141];[$Datasheet.$B$1:.$AV$9809];3;FALSE());&quot;-&quot;)" office:value-type="string" office:string-value="-" calcext:value-type="string">
            <text:p>-</text:p>
          </table:table-cell>
          <table:table-cell table:style-name="ce147" table:formula="of:=IFERROR(VLOOKUP([$Masterlist.$P141];[$Datasheet.$B$1:.$AV$9809];4;FALSE());&quot;-&quot;)" office:value-type="string" office:string-value="-" calcext:value-type="string">
            <text:p>-</text:p>
          </table:table-cell>
          <table:table-cell table:style-name="ce147" table:formula="of:=IFERROR(VLOOKUP([$Masterlist.$P141];[$Datasheet.$B$1:.$AV$9809];5;FALSE());&quot;-&quot;)" office:value-type="string" office:string-value="-" calcext:value-type="string">
            <text:p>-</text:p>
          </table:table-cell>
          <table:table-cell table:style-name="ce195" table:formula="of:=IFERROR(VLOOKUP([$Masterlist.$P141];[$Datasheet.$B$1:.$AV$9809];6;FALSE());&quot;-&quot;)" office:value-type="string" office:string-value="-" calcext:value-type="string">
            <text:p>-</text:p>
          </table:table-cell>
          <table:table-cell table:style-name="ce147" table:formula="of:=IFERROR(VLOOKUP([$Masterlist.$P141];[$Datasheet.$B$1:.$AV$9809];7;FALSE());&quot;-&quot;)" office:value-type="string" office:string-value="-" calcext:value-type="string">
            <text:p>-</text:p>
          </table:table-cell>
          <table:table-cell table:style-name="ce147" table:formula="of:=IFERROR(VLOOKUP([$Masterlist.$P141];[$Datasheet.$B$1:.$AV$9809];8;FALSE());&quot;-&quot;)" office:value-type="string" office:string-value="-" calcext:value-type="string">
            <text:p>-</text:p>
          </table:table-cell>
          <table:table-cell table:style-name="ce147" table:formula="of:=IFERROR(VLOOKUP([$Masterlist.$P141];[$Datasheet.$B$1:.$AV$9809];9;FALSE());&quot;-&quot;)" office:value-type="string" office:string-value="-" calcext:value-type="string">
            <text:p>-</text:p>
          </table:table-cell>
          <table:table-cell table:style-name="ce147" table:formula="of:=IFERROR(VLOOKUP([$Masterlist.$P141];[$Datasheet.$B$1:.$AV$9809];10;FALSE());&quot;-&quot;)" office:value-type="string" office:string-value="-" calcext:value-type="string">
            <text:p>-</text:p>
          </table:table-cell>
          <table:table-cell table:style-name="ce147" table:formula="of:=IFERROR(VLOOKUP([$Masterlist.$P141];[$Datasheet.$B$1:.$AV$9809];11;FALSE());&quot;-&quot;)" office:value-type="string" office:string-value="-" calcext:value-type="string">
            <text:p>-</text:p>
          </table:table-cell>
          <table:table-cell table:style-name="ce147" table:formula="of:=IFERROR(VLOOKUP([$Masterlist.$P141];[$Datasheet.$B$1:.$AV$9809];12;FALSE());&quot;-&quot;)" office:value-type="string" office:string-value="-" calcext:value-type="string">
            <text:p>-</text:p>
          </table:table-cell>
          <table:table-cell table:style-name="ce147" table:formula="of:=IFERROR(VLOOKUP([$Masterlist.$P141];[$Datasheet.$B$1:.$AV$9809];13;FALSE());&quot;-&quot;)" office:value-type="string" office:string-value="-" calcext:value-type="string">
            <text:p>-</text:p>
          </table:table-cell>
          <table:table-cell table:style-name="ce147" table:formula="of:=IFERROR(VLOOKUP([$Masterlist.$P141];[$Datasheet.$B$1:.$AV$9809];14;FALSE());&quot;-&quot;)" office:value-type="string" office:string-value="-" calcext:value-type="string">
            <text:p>-</text:p>
          </table:table-cell>
          <table:table-cell table:style-name="ce147" table:formula="of:=IFERROR(VLOOKUP([$Masterlist.$P141];[$Datasheet.$B$1:.$AV$9809];15;FALSE());&quot;-&quot;)" office:value-type="string" office:string-value="-" calcext:value-type="string">
            <text:p>-</text:p>
          </table:table-cell>
          <table:table-cell table:style-name="ce147" table:formula="of:=IFERROR(VLOOKUP([$Masterlist.$P141];[$Datasheet.$B$1:.$AV$9809];16;FALSE());&quot;-&quot;)" office:value-type="string" office:string-value="-" calcext:value-type="string">
            <text:p>-</text:p>
          </table:table-cell>
          <table:table-cell table:style-name="ce147" table:formula="of:=IFERROR(VLOOKUP([$Masterlist.$P141];[$Datasheet.$B$1:.$AV$9809];17;FALSE());&quot;-&quot;)" office:value-type="string" office:string-value="-" calcext:value-type="string">
            <text:p>-</text:p>
          </table:table-cell>
          <table:table-cell table:style-name="ce147" table:formula="of:=IFERROR(VLOOKUP([$Masterlist.$P141];[$Datasheet.$B$1:.$AV$9809];18;FALSE());&quot;-&quot;)" office:value-type="string" office:string-value="-" calcext:value-type="string">
            <text:p>-</text:p>
          </table:table-cell>
          <table:table-cell table:style-name="ce147" table:formula="of:=IFERROR(VLOOKUP([$Masterlist.$P141];[$Datasheet.$B$1:.$AV$9809];19;FALSE());&quot;-&quot;)" office:value-type="string" office:string-value="-" calcext:value-type="string">
            <text:p>-</text:p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office:value-type="string" calcext:value-type="string">
            <text:p>yes</text:p>
          </table:table-cell>
          <table:table-cell table:style-name="ce50" table:number-columns-repeated="3"/>
          <table:table-cell table:style-name="ce70"/>
          <table:table-cell table:style-name="ce50" table:number-columns-repeated="7"/>
          <table:table-cell table:style-name="ce92" office:value-type="string" calcext:value-type="string">
            <text:p>LED, Broadcast</text:p>
          </table:table-cell>
          <table:table-cell table:style-name="ce8" office:value-type="string" calcext:value-type="string">
            <text:p>Danielle Rossouw</text:p>
          </table:table-cell>
          <table:table-cell table:style-name="ce13" table:formula="of:=IF(ISNUMBER(MATCH([.P142];[$Datasheet.$B$1:.$B$9809];0));&quot;✓&quot;;&quot;x&quot;)" office:value-type="string" office:string-value="✓" calcext:value-type="string">
            <text:p>✓</text:p>
          </table:table-cell>
          <table:table-cell table:style-name="ce147" table:formula="of:=IFERROR(VLOOKUP([$Masterlist.$P142];[$Datasheet.$B$1:.$AV$9809];2;FALSE());&quot;-&quot;)" office:value-type="float" office:value="0" calcext:value-type="float">
            <text:p>0</text:p>
          </table:table-cell>
          <table:table-cell table:style-name="ce147" table:formula="of:=IFERROR(VLOOKUP([$Masterlist.$P142];[$Datasheet.$B$1:.$AV$9809];3;FALSE());&quot;-&quot;)" office:value-type="float" office:value="1" calcext:value-type="float">
            <text:p>1</text:p>
          </table:table-cell>
          <table:table-cell table:style-name="ce147" table:formula="of:=IFERROR(VLOOKUP([$Masterlist.$P142];[$Datasheet.$B$1:.$AV$9809];4;FALSE());&quot;-&quot;)" office:value-type="float" office:value="0" calcext:value-type="float">
            <text:p>0</text:p>
          </table:table-cell>
          <table:table-cell table:style-name="ce147" table:formula="of:=IFERROR(VLOOKUP([$Masterlist.$P142];[$Datasheet.$B$1:.$AV$9809];5;FALSE());&quot;-&quot;)" office:value-type="float" office:value="0" calcext:value-type="float">
            <text:p>0</text:p>
          </table:table-cell>
          <table:table-cell table:style-name="ce195" table:formula="of:=IFERROR(VLOOKUP([$Masterlist.$P142];[$Datasheet.$B$1:.$AV$9809];6;FALSE());&quot;-&quot;)" office:value-type="float" office:value="0" calcext:value-type="float">
            <text:p>0</text:p>
          </table:table-cell>
          <table:table-cell table:style-name="ce147" table:formula="of:=IFERROR(VLOOKUP([$Masterlist.$P142];[$Datasheet.$B$1:.$AV$9809];7;FALSE());&quot;-&quot;)" office:value-type="float" office:value="0" calcext:value-type="float">
            <text:p>0</text:p>
          </table:table-cell>
          <table:table-cell table:style-name="ce147" table:formula="of:=IFERROR(VLOOKUP([$Masterlist.$P142];[$Datasheet.$B$1:.$AV$9809];8;FALSE());&quot;-&quot;)" office:value-type="float" office:value="0" calcext:value-type="float">
            <text:p>0</text:p>
          </table:table-cell>
          <table:table-cell table:style-name="ce147" table:formula="of:=IFERROR(VLOOKUP([$Masterlist.$P142];[$Datasheet.$B$1:.$AV$9809];9;FALSE());&quot;-&quot;)" office:value-type="float" office:value="1" calcext:value-type="float">
            <text:p>1</text:p>
          </table:table-cell>
          <table:table-cell table:style-name="ce147" table:formula="of:=IFERROR(VLOOKUP([$Masterlist.$P142];[$Datasheet.$B$1:.$AV$9809];10;FALSE());&quot;-&quot;)" office:value-type="float" office:value="0" calcext:value-type="float">
            <text:p>0</text:p>
          </table:table-cell>
          <table:table-cell table:style-name="ce147" table:formula="of:=IFERROR(VLOOKUP([$Masterlist.$P142];[$Datasheet.$B$1:.$AV$9809];11;FALSE());&quot;-&quot;)" office:value-type="float" office:value="1" calcext:value-type="float">
            <text:p>1</text:p>
          </table:table-cell>
          <table:table-cell table:style-name="ce147" table:formula="of:=IFERROR(VLOOKUP([$Masterlist.$P142];[$Datasheet.$B$1:.$AV$9809];12;FALSE());&quot;-&quot;)" office:value-type="float" office:value="0" calcext:value-type="float">
            <text:p>0</text:p>
          </table:table-cell>
          <table:table-cell table:style-name="ce147" table:formula="of:=IFERROR(VLOOKUP([$Masterlist.$P142];[$Datasheet.$B$1:.$AV$9809];13;FALSE());&quot;-&quot;)" office:value-type="float" office:value="0" calcext:value-type="float">
            <text:p>0</text:p>
          </table:table-cell>
          <table:table-cell table:style-name="ce147" table:formula="of:=IFERROR(VLOOKUP([$Masterlist.$P142];[$Datasheet.$B$1:.$AV$9809];14;FALSE());&quot;-&quot;)" office:value-type="float" office:value="0" calcext:value-type="float">
            <text:p>0</text:p>
          </table:table-cell>
          <table:table-cell table:style-name="ce147" table:formula="of:=IFERROR(VLOOKUP([$Masterlist.$P142];[$Datasheet.$B$1:.$AV$9809];15;FALSE());&quot;-&quot;)" office:value-type="float" office:value="1" calcext:value-type="float">
            <text:p>1</text:p>
          </table:table-cell>
          <table:table-cell table:style-name="ce147" table:formula="of:=IFERROR(VLOOKUP([$Masterlist.$P142];[$Datasheet.$B$1:.$AV$9809];16;FALSE());&quot;-&quot;)" office:value-type="float" office:value="0" calcext:value-type="float">
            <text:p/>
          </table:table-cell>
          <table:table-cell table:style-name="ce147" table:formula="of:=IFERROR(VLOOKUP([$Masterlist.$P142];[$Datasheet.$B$1:.$AV$9809];17;FALSE());&quot;-&quot;)" office:value-type="float" office:value="0" calcext:value-type="float">
            <text:p/>
          </table:table-cell>
          <table:table-cell table:style-name="ce147" table:formula="of:=IFERROR(VLOOKUP([$Masterlist.$P142];[$Datasheet.$B$1:.$AV$9809];18;FALSE());&quot;-&quot;)" office:value-type="float" office:value="0" calcext:value-type="float">
            <text:p/>
          </table:table-cell>
          <table:table-cell table:style-name="ce147" table:formula="of:=IFERROR(VLOOKUP([$Masterlist.$P142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number-columns-repeated="2" table:style-name="ce50" office:value-type="string" calcext:value-type="string">
            <text:p>yes</text:p>
          </table:table-cell>
          <table:table-cell table:style-name="ce50" table:number-columns-repeated="10"/>
          <table:table-cell table:style-name="ce92" office:value-type="string" calcext:value-type="string">
            <text:p>Brk FOH, Broadcast</text:p>
          </table:table-cell>
          <table:table-cell table:style-name="ce8" office:value-type="string" calcext:value-type="string">
            <text:p>Danmari Hoffman</text:p>
          </table:table-cell>
          <table:table-cell table:style-name="ce13" table:formula="of:=IF(ISNUMBER(MATCH([.P143];[$Datasheet.$B$1:.$B$9809];0));&quot;✓&quot;;&quot;x&quot;)" office:value-type="string" office:string-value="x" calcext:value-type="string">
            <text:p>x</text:p>
          </table:table-cell>
          <table:table-cell table:style-name="ce147" table:formula="of:=IFERROR(VLOOKUP([$Masterlist.$P143];[$Datasheet.$B$1:.$AV$9809];2;FALSE());&quot;-&quot;)" office:value-type="string" office:string-value="-" calcext:value-type="string">
            <text:p>-</text:p>
          </table:table-cell>
          <table:table-cell table:style-name="ce147" table:formula="of:=IFERROR(VLOOKUP([$Masterlist.$P143];[$Datasheet.$B$1:.$AV$9809];3;FALSE());&quot;-&quot;)" office:value-type="string" office:string-value="-" calcext:value-type="string">
            <text:p>-</text:p>
          </table:table-cell>
          <table:table-cell table:style-name="ce147" table:formula="of:=IFERROR(VLOOKUP([$Masterlist.$P143];[$Datasheet.$B$1:.$AV$9809];4;FALSE());&quot;-&quot;)" office:value-type="string" office:string-value="-" calcext:value-type="string">
            <text:p>-</text:p>
          </table:table-cell>
          <table:table-cell table:style-name="ce147" table:formula="of:=IFERROR(VLOOKUP([$Masterlist.$P143];[$Datasheet.$B$1:.$AV$9809];5;FALSE());&quot;-&quot;)" office:value-type="string" office:string-value="-" calcext:value-type="string">
            <text:p>-</text:p>
          </table:table-cell>
          <table:table-cell table:style-name="ce195" table:formula="of:=IFERROR(VLOOKUP([$Masterlist.$P143];[$Datasheet.$B$1:.$AV$9809];6;FALSE());&quot;-&quot;)" office:value-type="string" office:string-value="-" calcext:value-type="string">
            <text:p>-</text:p>
          </table:table-cell>
          <table:table-cell table:style-name="ce147" table:formula="of:=IFERROR(VLOOKUP([$Masterlist.$P143];[$Datasheet.$B$1:.$AV$9809];7;FALSE());&quot;-&quot;)" office:value-type="string" office:string-value="-" calcext:value-type="string">
            <text:p>-</text:p>
          </table:table-cell>
          <table:table-cell table:style-name="ce147" table:formula="of:=IFERROR(VLOOKUP([$Masterlist.$P143];[$Datasheet.$B$1:.$AV$9809];8;FALSE());&quot;-&quot;)" office:value-type="string" office:string-value="-" calcext:value-type="string">
            <text:p>-</text:p>
          </table:table-cell>
          <table:table-cell table:style-name="ce147" table:formula="of:=IFERROR(VLOOKUP([$Masterlist.$P143];[$Datasheet.$B$1:.$AV$9809];9;FALSE());&quot;-&quot;)" office:value-type="string" office:string-value="-" calcext:value-type="string">
            <text:p>-</text:p>
          </table:table-cell>
          <table:table-cell table:style-name="ce147" table:formula="of:=IFERROR(VLOOKUP([$Masterlist.$P143];[$Datasheet.$B$1:.$AV$9809];10;FALSE());&quot;-&quot;)" office:value-type="string" office:string-value="-" calcext:value-type="string">
            <text:p>-</text:p>
          </table:table-cell>
          <table:table-cell table:style-name="ce147" table:formula="of:=IFERROR(VLOOKUP([$Masterlist.$P143];[$Datasheet.$B$1:.$AV$9809];11;FALSE());&quot;-&quot;)" office:value-type="string" office:string-value="-" calcext:value-type="string">
            <text:p>-</text:p>
          </table:table-cell>
          <table:table-cell table:style-name="ce147" table:formula="of:=IFERROR(VLOOKUP([$Masterlist.$P143];[$Datasheet.$B$1:.$AV$9809];12;FALSE());&quot;-&quot;)" office:value-type="string" office:string-value="-" calcext:value-type="string">
            <text:p>-</text:p>
          </table:table-cell>
          <table:table-cell table:style-name="ce147" table:formula="of:=IFERROR(VLOOKUP([$Masterlist.$P143];[$Datasheet.$B$1:.$AV$9809];13;FALSE());&quot;-&quot;)" office:value-type="string" office:string-value="-" calcext:value-type="string">
            <text:p>-</text:p>
          </table:table-cell>
          <table:table-cell table:style-name="ce147" table:formula="of:=IFERROR(VLOOKUP([$Masterlist.$P143];[$Datasheet.$B$1:.$AV$9809];14;FALSE());&quot;-&quot;)" office:value-type="string" office:string-value="-" calcext:value-type="string">
            <text:p>-</text:p>
          </table:table-cell>
          <table:table-cell table:style-name="ce147" table:formula="of:=IFERROR(VLOOKUP([$Masterlist.$P143];[$Datasheet.$B$1:.$AV$9809];15;FALSE());&quot;-&quot;)" office:value-type="string" office:string-value="-" calcext:value-type="string">
            <text:p>-</text:p>
          </table:table-cell>
          <table:table-cell table:style-name="ce147" table:formula="of:=IFERROR(VLOOKUP([$Masterlist.$P143];[$Datasheet.$B$1:.$AV$9809];16;FALSE());&quot;-&quot;)" office:value-type="string" office:string-value="-" calcext:value-type="string">
            <text:p>-</text:p>
          </table:table-cell>
          <table:table-cell table:style-name="ce147" table:formula="of:=IFERROR(VLOOKUP([$Masterlist.$P143];[$Datasheet.$B$1:.$AV$9809];17;FALSE());&quot;-&quot;)" office:value-type="string" office:string-value="-" calcext:value-type="string">
            <text:p>-</text:p>
          </table:table-cell>
          <table:table-cell table:style-name="ce147" table:formula="of:=IFERROR(VLOOKUP([$Masterlist.$P143];[$Datasheet.$B$1:.$AV$9809];18;FALSE());&quot;-&quot;)" office:value-type="string" office:string-value="-" calcext:value-type="string">
            <text:p>-</text:p>
          </table:table-cell>
          <table:table-cell table:style-name="ce147" table:formula="of:=IFERROR(VLOOKUP([$Masterlist.$P143];[$Datasheet.$B$1:.$AV$9809];19;FALSE());&quot;-&quot;)" office:value-type="string" office:string-value="-" calcext:value-type="string">
            <text:p>-</text:p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office:value-type="string" calcext:value-type="string">
            <text:p>yes</text:p>
          </table:table-cell>
          <table:table-cell table:style-name="ce50" table:number-columns-repeated="3"/>
          <table:table-cell table:style-name="ce50" office:value-type="string" calcext:value-type="string">
            <text:p><text:s/></text:p>
          </table:table-cell>
          <table:table-cell table:style-name="ce50" table:number-columns-repeated="7"/>
          <table:table-cell table:style-name="ce92" office:value-type="string" calcext:value-type="string">
            <text:p>LED, Broadcast</text:p>
          </table:table-cell>
          <table:table-cell table:style-name="ce8" office:value-type="string" calcext:value-type="string">
            <text:p>Diane Pretorius</text:p>
          </table:table-cell>
          <table:table-cell table:style-name="ce13" table:formula="of:=IF(ISNUMBER(MATCH([.P144];[$Datasheet.$B$1:.$B$9809];0));&quot;✓&quot;;&quot;x&quot;)" office:value-type="string" office:string-value="x" calcext:value-type="string">
            <text:p>x</text:p>
          </table:table-cell>
          <table:table-cell table:style-name="ce147" table:formula="of:=IFERROR(VLOOKUP([$Masterlist.$P144];[$Datasheet.$B$1:.$AV$9809];2;FALSE());&quot;-&quot;)" office:value-type="string" office:string-value="-" calcext:value-type="string">
            <text:p>-</text:p>
          </table:table-cell>
          <table:table-cell table:style-name="ce147" table:formula="of:=IFERROR(VLOOKUP([$Masterlist.$P144];[$Datasheet.$B$1:.$AV$9809];3;FALSE());&quot;-&quot;)" office:value-type="string" office:string-value="-" calcext:value-type="string">
            <text:p>-</text:p>
          </table:table-cell>
          <table:table-cell table:style-name="ce147" table:formula="of:=IFERROR(VLOOKUP([$Masterlist.$P144];[$Datasheet.$B$1:.$AV$9809];4;FALSE());&quot;-&quot;)" office:value-type="string" office:string-value="-" calcext:value-type="string">
            <text:p>-</text:p>
          </table:table-cell>
          <table:table-cell table:style-name="ce147" table:formula="of:=IFERROR(VLOOKUP([$Masterlist.$P144];[$Datasheet.$B$1:.$AV$9809];5;FALSE());&quot;-&quot;)" office:value-type="string" office:string-value="-" calcext:value-type="string">
            <text:p>-</text:p>
          </table:table-cell>
          <table:table-cell table:style-name="ce195" table:formula="of:=IFERROR(VLOOKUP([$Masterlist.$P144];[$Datasheet.$B$1:.$AV$9809];6;FALSE());&quot;-&quot;)" office:value-type="string" office:string-value="-" calcext:value-type="string">
            <text:p>-</text:p>
          </table:table-cell>
          <table:table-cell table:style-name="ce147" table:formula="of:=IFERROR(VLOOKUP([$Masterlist.$P144];[$Datasheet.$B$1:.$AV$9809];7;FALSE());&quot;-&quot;)" office:value-type="string" office:string-value="-" calcext:value-type="string">
            <text:p>-</text:p>
          </table:table-cell>
          <table:table-cell table:style-name="ce147" table:formula="of:=IFERROR(VLOOKUP([$Masterlist.$P144];[$Datasheet.$B$1:.$AV$9809];8;FALSE());&quot;-&quot;)" office:value-type="string" office:string-value="-" calcext:value-type="string">
            <text:p>-</text:p>
          </table:table-cell>
          <table:table-cell table:style-name="ce147" table:formula="of:=IFERROR(VLOOKUP([$Masterlist.$P144];[$Datasheet.$B$1:.$AV$9809];9;FALSE());&quot;-&quot;)" office:value-type="string" office:string-value="-" calcext:value-type="string">
            <text:p>-</text:p>
          </table:table-cell>
          <table:table-cell table:style-name="ce147" table:formula="of:=IFERROR(VLOOKUP([$Masterlist.$P144];[$Datasheet.$B$1:.$AV$9809];10;FALSE());&quot;-&quot;)" office:value-type="string" office:string-value="-" calcext:value-type="string">
            <text:p>-</text:p>
          </table:table-cell>
          <table:table-cell table:style-name="ce147" table:formula="of:=IFERROR(VLOOKUP([$Masterlist.$P144];[$Datasheet.$B$1:.$AV$9809];11;FALSE());&quot;-&quot;)" office:value-type="string" office:string-value="-" calcext:value-type="string">
            <text:p>-</text:p>
          </table:table-cell>
          <table:table-cell table:style-name="ce147" table:formula="of:=IFERROR(VLOOKUP([$Masterlist.$P144];[$Datasheet.$B$1:.$AV$9809];12;FALSE());&quot;-&quot;)" office:value-type="string" office:string-value="-" calcext:value-type="string">
            <text:p>-</text:p>
          </table:table-cell>
          <table:table-cell table:style-name="ce147" table:formula="of:=IFERROR(VLOOKUP([$Masterlist.$P144];[$Datasheet.$B$1:.$AV$9809];13;FALSE());&quot;-&quot;)" office:value-type="string" office:string-value="-" calcext:value-type="string">
            <text:p>-</text:p>
          </table:table-cell>
          <table:table-cell table:style-name="ce147" table:formula="of:=IFERROR(VLOOKUP([$Masterlist.$P144];[$Datasheet.$B$1:.$AV$9809];14;FALSE());&quot;-&quot;)" office:value-type="string" office:string-value="-" calcext:value-type="string">
            <text:p>-</text:p>
          </table:table-cell>
          <table:table-cell table:style-name="ce147" table:formula="of:=IFERROR(VLOOKUP([$Masterlist.$P144];[$Datasheet.$B$1:.$AV$9809];15;FALSE());&quot;-&quot;)" office:value-type="string" office:string-value="-" calcext:value-type="string">
            <text:p>-</text:p>
          </table:table-cell>
          <table:table-cell table:style-name="ce147" table:formula="of:=IFERROR(VLOOKUP([$Masterlist.$P144];[$Datasheet.$B$1:.$AV$9809];16;FALSE());&quot;-&quot;)" office:value-type="string" office:string-value="-" calcext:value-type="string">
            <text:p>-</text:p>
          </table:table-cell>
          <table:table-cell table:style-name="ce147" table:formula="of:=IFERROR(VLOOKUP([$Masterlist.$P144];[$Datasheet.$B$1:.$AV$9809];17;FALSE());&quot;-&quot;)" office:value-type="string" office:string-value="-" calcext:value-type="string">
            <text:p>-</text:p>
          </table:table-cell>
          <table:table-cell table:style-name="ce147" table:formula="of:=IFERROR(VLOOKUP([$Masterlist.$P144];[$Datasheet.$B$1:.$AV$9809];18;FALSE());&quot;-&quot;)" office:value-type="string" office:string-value="-" calcext:value-type="string">
            <text:p>-</text:p>
          </table:table-cell>
          <table:table-cell table:style-name="ce147" table:formula="of:=IFERROR(VLOOKUP([$Masterlist.$P144];[$Datasheet.$B$1:.$AV$9809];19;FALSE());&quot;-&quot;)" office:value-type="string" office:string-value="-" calcext:value-type="string">
            <text:p>-</text:p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M</text:p>
          </table:table-cell>
          <table:table-cell table:number-columns-repeated="2" table:style-name="ce50" office:value-type="string" calcext:value-type="string">
            <text:p>yes</text:p>
          </table:table-cell>
          <table:table-cell table:style-name="ce50" table:number-columns-repeated="10"/>
          <table:table-cell table:style-name="ce92" office:value-type="string" calcext:value-type="string">
            <text:p>Broadcast</text:p>
          </table:table-cell>
          <table:table-cell table:style-name="ce8" office:value-type="string" calcext:value-type="string">
            <text:p>Gcobisa Ziki</text:p>
          </table:table-cell>
          <table:table-cell table:style-name="ce13" table:formula="of:=IF(ISNUMBER(MATCH([.P145];[$Datasheet.$B$1:.$B$9809];0));&quot;✓&quot;;&quot;x&quot;)" office:value-type="string" office:string-value="✓" calcext:value-type="string">
            <text:p>✓</text:p>
          </table:table-cell>
          <table:table-cell table:style-name="ce147" table:formula="of:=IFERROR(VLOOKUP([$Masterlist.$P145];[$Datasheet.$B$1:.$AV$9809];2;FALSE());&quot;-&quot;)" office:value-type="float" office:value="0" calcext:value-type="float">
            <text:p>0</text:p>
          </table:table-cell>
          <table:table-cell table:style-name="ce147" table:formula="of:=IFERROR(VLOOKUP([$Masterlist.$P145];[$Datasheet.$B$1:.$AV$9809];3;FALSE());&quot;-&quot;)" office:value-type="float" office:value="1" calcext:value-type="float">
            <text:p>1</text:p>
          </table:table-cell>
          <table:table-cell table:style-name="ce147" table:formula="of:=IFERROR(VLOOKUP([$Masterlist.$P145];[$Datasheet.$B$1:.$AV$9809];4;FALSE());&quot;-&quot;)" office:value-type="float" office:value="0" calcext:value-type="float">
            <text:p>0</text:p>
          </table:table-cell>
          <table:table-cell table:style-name="ce147" table:formula="of:=IFERROR(VLOOKUP([$Masterlist.$P145];[$Datasheet.$B$1:.$AV$9809];5;FALSE());&quot;-&quot;)" office:value-type="float" office:value="1" calcext:value-type="float">
            <text:p>1</text:p>
          </table:table-cell>
          <table:table-cell table:style-name="ce195" table:formula="of:=IFERROR(VLOOKUP([$Masterlist.$P145];[$Datasheet.$B$1:.$AV$9809];6;FALSE());&quot;-&quot;)" office:value-type="float" office:value="0" calcext:value-type="float">
            <text:p>0</text:p>
          </table:table-cell>
          <table:table-cell table:style-name="ce147" table:formula="of:=IFERROR(VLOOKUP([$Masterlist.$P145];[$Datasheet.$B$1:.$AV$9809];7;FALSE());&quot;-&quot;)" office:value-type="float" office:value="1" calcext:value-type="float">
            <text:p>1</text:p>
          </table:table-cell>
          <table:table-cell table:style-name="ce147" table:formula="of:=IFERROR(VLOOKUP([$Masterlist.$P145];[$Datasheet.$B$1:.$AV$9809];8;FALSE());&quot;-&quot;)" office:value-type="float" office:value="0" calcext:value-type="float">
            <text:p>0</text:p>
          </table:table-cell>
          <table:table-cell table:style-name="ce147" table:formula="of:=IFERROR(VLOOKUP([$Masterlist.$P145];[$Datasheet.$B$1:.$AV$9809];9;FALSE());&quot;-&quot;)" office:value-type="float" office:value="0" calcext:value-type="float">
            <text:p>0</text:p>
          </table:table-cell>
          <table:table-cell table:style-name="ce147" table:formula="of:=IFERROR(VLOOKUP([$Masterlist.$P145];[$Datasheet.$B$1:.$AV$9809];10;FALSE());&quot;-&quot;)" office:value-type="float" office:value="0" calcext:value-type="float">
            <text:p>0</text:p>
          </table:table-cell>
          <table:table-cell table:style-name="ce147" table:formula="of:=IFERROR(VLOOKUP([$Masterlist.$P145];[$Datasheet.$B$1:.$AV$9809];11;FALSE());&quot;-&quot;)" office:value-type="float" office:value="1" calcext:value-type="float">
            <text:p>1</text:p>
          </table:table-cell>
          <table:table-cell table:style-name="ce147" table:formula="of:=IFERROR(VLOOKUP([$Masterlist.$P145];[$Datasheet.$B$1:.$AV$9809];12;FALSE());&quot;-&quot;)" office:value-type="float" office:value="0" calcext:value-type="float">
            <text:p>0</text:p>
          </table:table-cell>
          <table:table-cell table:style-name="ce147" table:formula="of:=IFERROR(VLOOKUP([$Masterlist.$P145];[$Datasheet.$B$1:.$AV$9809];13;FALSE());&quot;-&quot;)" office:value-type="float" office:value="1" calcext:value-type="float">
            <text:p>1</text:p>
          </table:table-cell>
          <table:table-cell table:style-name="ce147" table:formula="of:=IFERROR(VLOOKUP([$Masterlist.$P145];[$Datasheet.$B$1:.$AV$9809];14;FALSE());&quot;-&quot;)" office:value-type="float" office:value="0" calcext:value-type="float">
            <text:p>0</text:p>
          </table:table-cell>
          <table:table-cell table:style-name="ce147" table:formula="of:=IFERROR(VLOOKUP([$Masterlist.$P145];[$Datasheet.$B$1:.$AV$9809];15;FALSE());&quot;-&quot;)" office:value-type="float" office:value="1" calcext:value-type="float">
            <text:p>1</text:p>
          </table:table-cell>
          <table:table-cell table:style-name="ce147" table:formula="of:=IFERROR(VLOOKUP([$Masterlist.$P145];[$Datasheet.$B$1:.$AV$9809];16;FALSE());&quot;-&quot;)" office:value-type="float" office:value="0" calcext:value-type="float">
            <text:p/>
          </table:table-cell>
          <table:table-cell table:style-name="ce147" table:formula="of:=IFERROR(VLOOKUP([$Masterlist.$P145];[$Datasheet.$B$1:.$AV$9809];17;FALSE());&quot;-&quot;)" office:value-type="float" office:value="0" calcext:value-type="float">
            <text:p/>
          </table:table-cell>
          <table:table-cell table:style-name="ce147" table:formula="of:=IFERROR(VLOOKUP([$Masterlist.$P145];[$Datasheet.$B$1:.$AV$9809];18;FALSE());&quot;-&quot;)" office:value-type="float" office:value="0" calcext:value-type="float">
            <text:p/>
          </table:table-cell>
          <table:table-cell table:style-name="ce147" table:formula="of:=IFERROR(VLOOKUP([$Masterlist.$P145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A</text:p>
          </table:table-cell>
          <table:table-cell table:number-columns-repeated="3" table:style-name="ce50" office:value-type="string" calcext:value-type="string">
            <text:p>yes</text:p>
          </table:table-cell>
          <table:table-cell table:style-name="ce50" table:number-columns-repeated="9"/>
          <table:table-cell table:style-name="ce92" office:value-type="string" calcext:value-type="string">
            <text:p>FOH, LED, Broadcast</text:p>
          </table:table-cell>
          <table:table-cell table:style-name="ce8" office:value-type="string" calcext:value-type="string">
            <text:p>Karla Naude</text:p>
          </table:table-cell>
          <table:table-cell table:style-name="ce13" table:formula="of:=IF(ISNUMBER(MATCH([.P146];[$Datasheet.$B$1:.$B$9809];0));&quot;✓&quot;;&quot;x&quot;)" office:value-type="string" office:string-value="✓" calcext:value-type="string">
            <text:p>✓</text:p>
          </table:table-cell>
          <table:table-cell table:style-name="ce147" table:formula="of:=IFERROR(VLOOKUP([$Masterlist.$P146];[$Datasheet.$B$1:.$AV$9809];2;FALSE());&quot;-&quot;)" office:value-type="float" office:value="0" calcext:value-type="float">
            <text:p>0</text:p>
          </table:table-cell>
          <table:table-cell table:style-name="ce147" table:formula="of:=IFERROR(VLOOKUP([$Masterlist.$P146];[$Datasheet.$B$1:.$AV$9809];3;FALSE());&quot;-&quot;)" office:value-type="float" office:value="0" calcext:value-type="float">
            <text:p>0</text:p>
          </table:table-cell>
          <table:table-cell table:style-name="ce147" table:formula="of:=IFERROR(VLOOKUP([$Masterlist.$P146];[$Datasheet.$B$1:.$AV$9809];4;FALSE());&quot;-&quot;)" office:value-type="float" office:value="0" calcext:value-type="float">
            <text:p>0</text:p>
          </table:table-cell>
          <table:table-cell table:style-name="ce147" table:formula="of:=IFERROR(VLOOKUP([$Masterlist.$P146];[$Datasheet.$B$1:.$AV$9809];5;FALSE());&quot;-&quot;)" office:value-type="float" office:value="1" calcext:value-type="float">
            <text:p>1</text:p>
          </table:table-cell>
          <table:table-cell table:style-name="ce195" table:formula="of:=IFERROR(VLOOKUP([$Masterlist.$P146];[$Datasheet.$B$1:.$AV$9809];6;FALSE());&quot;-&quot;)" office:value-type="float" office:value="0" calcext:value-type="float">
            <text:p>0</text:p>
          </table:table-cell>
          <table:table-cell table:style-name="ce147" table:formula="of:=IFERROR(VLOOKUP([$Masterlist.$P146];[$Datasheet.$B$1:.$AV$9809];7;FALSE());&quot;-&quot;)" office:value-type="float" office:value="1" calcext:value-type="float">
            <text:p>1</text:p>
          </table:table-cell>
          <table:table-cell table:style-name="ce147" table:formula="of:=IFERROR(VLOOKUP([$Masterlist.$P146];[$Datasheet.$B$1:.$AV$9809];8;FALSE());&quot;-&quot;)" office:value-type="float" office:value="0" calcext:value-type="float">
            <text:p>0</text:p>
          </table:table-cell>
          <table:table-cell table:style-name="ce147" table:formula="of:=IFERROR(VLOOKUP([$Masterlist.$P146];[$Datasheet.$B$1:.$AV$9809];9;FALSE());&quot;-&quot;)" office:value-type="float" office:value="1" calcext:value-type="float">
            <text:p>1</text:p>
          </table:table-cell>
          <table:table-cell table:style-name="ce147" table:formula="of:=IFERROR(VLOOKUP([$Masterlist.$P146];[$Datasheet.$B$1:.$AV$9809];10;FALSE());&quot;-&quot;)" office:value-type="float" office:value="0" calcext:value-type="float">
            <text:p>0</text:p>
          </table:table-cell>
          <table:table-cell table:style-name="ce147" table:formula="of:=IFERROR(VLOOKUP([$Masterlist.$P146];[$Datasheet.$B$1:.$AV$9809];11;FALSE());&quot;-&quot;)" office:value-type="float" office:value="0" calcext:value-type="float">
            <text:p>0</text:p>
          </table:table-cell>
          <table:table-cell table:style-name="ce147" table:formula="of:=IFERROR(VLOOKUP([$Masterlist.$P146];[$Datasheet.$B$1:.$AV$9809];12;FALSE());&quot;-&quot;)" office:value-type="float" office:value="0" calcext:value-type="float">
            <text:p>0</text:p>
          </table:table-cell>
          <table:table-cell table:style-name="ce147" table:formula="of:=IFERROR(VLOOKUP([$Masterlist.$P146];[$Datasheet.$B$1:.$AV$9809];13;FALSE());&quot;-&quot;)" office:value-type="float" office:value="1" calcext:value-type="float">
            <text:p>1</text:p>
          </table:table-cell>
          <table:table-cell table:style-name="ce147" table:formula="of:=IFERROR(VLOOKUP([$Masterlist.$P146];[$Datasheet.$B$1:.$AV$9809];14;FALSE());&quot;-&quot;)" office:value-type="float" office:value="0" calcext:value-type="float">
            <text:p>0</text:p>
          </table:table-cell>
          <table:table-cell table:style-name="ce147" table:formula="of:=IFERROR(VLOOKUP([$Masterlist.$P146];[$Datasheet.$B$1:.$AV$9809];15;FALSE());&quot;-&quot;)" office:value-type="float" office:value="1" calcext:value-type="float">
            <text:p>1</text:p>
          </table:table-cell>
          <table:table-cell table:style-name="ce147" table:formula="of:=IFERROR(VLOOKUP([$Masterlist.$P146];[$Datasheet.$B$1:.$AV$9809];16;FALSE());&quot;-&quot;)" office:value-type="float" office:value="0" calcext:value-type="float">
            <text:p/>
          </table:table-cell>
          <table:table-cell table:style-name="ce147" table:formula="of:=IFERROR(VLOOKUP([$Masterlist.$P146];[$Datasheet.$B$1:.$AV$9809];17;FALSE());&quot;-&quot;)" office:value-type="float" office:value="0" calcext:value-type="float">
            <text:p/>
          </table:table-cell>
          <table:table-cell table:style-name="ce147" table:formula="of:=IFERROR(VLOOKUP([$Masterlist.$P146];[$Datasheet.$B$1:.$AV$9809];18;FALSE());&quot;-&quot;)" office:value-type="float" office:value="0" calcext:value-type="float">
            <text:p/>
          </table:table-cell>
          <table:table-cell table:style-name="ce147" table:formula="of:=IFERROR(VLOOKUP([$Masterlist.$P146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number-columns-repeated="2" table:style-name="ce50" office:value-type="string" calcext:value-type="string">
            <text:p>yes</text:p>
          </table:table-cell>
          <table:table-cell table:style-name="ce50" table:number-columns-repeated="10"/>
          <table:table-cell table:style-name="ce92" office:value-type="string" calcext:value-type="string">
            <text:p>FOH, LED, Broadcast</text:p>
          </table:table-cell>
          <table:table-cell table:style-name="ce8" office:value-type="string" calcext:value-type="string">
            <office:annotation draw:style-name="gr1" draw:text-style-name="P1" svg:width="8.388cm" svg:height="3.756cm" svg:x="37.038cm" svg:y="76.968cm" draw:caption-point-x="-0.407cm" draw:caption-point-y="-0.758cm">
              <dc:creator>Unknown Author</dc:creator>
              <dc:date>2026-05-18T20:20:00</dc:date>
              <text:p>[Threaded comment]</text:p>
              <text:p><text:s/>Your version of Excel allows you to read this threaded comment; however, any edits to it will get removed if the file is opened in a newer version of Excel. Learn more: https://go.microsoft.com/fwlink/?linkid=870924</text:p>
              <text:p>Comment:</text:p>
              <text:p><text:tab/>Prayer only twice a month</text:p>
              <text:p/>
            </office:annotation>
            <text:p>Kendra Botha</text:p>
          </table:table-cell>
          <table:table-cell table:style-name="ce13" table:formula="of:=IF(ISNUMBER(MATCH([.P147];[$Datasheet.$B$1:.$B$9809];0));&quot;✓&quot;;&quot;x&quot;)" office:value-type="string" office:string-value="✓" calcext:value-type="string">
            <text:p>✓</text:p>
          </table:table-cell>
          <table:table-cell table:style-name="ce147" table:formula="of:=IFERROR(VLOOKUP([$Masterlist.$P147];[$Datasheet.$B$1:.$AV$9809];2;FALSE());&quot;-&quot;)" office:value-type="float" office:value="1" calcext:value-type="float">
            <text:p>1</text:p>
          </table:table-cell>
          <table:table-cell table:style-name="ce147" table:formula="of:=IFERROR(VLOOKUP([$Masterlist.$P147];[$Datasheet.$B$1:.$AV$9809];3;FALSE());&quot;-&quot;)" office:value-type="float" office:value="0" calcext:value-type="float">
            <text:p>0</text:p>
          </table:table-cell>
          <table:table-cell table:style-name="ce147" table:formula="of:=IFERROR(VLOOKUP([$Masterlist.$P147];[$Datasheet.$B$1:.$AV$9809];4;FALSE());&quot;-&quot;)" office:value-type="float" office:value="1" calcext:value-type="float">
            <text:p>1</text:p>
          </table:table-cell>
          <table:table-cell table:style-name="ce147" table:formula="of:=IFERROR(VLOOKUP([$Masterlist.$P147];[$Datasheet.$B$1:.$AV$9809];5;FALSE());&quot;-&quot;)" office:value-type="float" office:value="0" calcext:value-type="float">
            <text:p>0</text:p>
          </table:table-cell>
          <table:table-cell table:style-name="ce195" table:formula="of:=IFERROR(VLOOKUP([$Masterlist.$P147];[$Datasheet.$B$1:.$AV$9809];6;FALSE());&quot;-&quot;)" office:value-type="float" office:value="1" calcext:value-type="float">
            <text:p>1</text:p>
          </table:table-cell>
          <table:table-cell table:style-name="ce147" table:formula="of:=IFERROR(VLOOKUP([$Masterlist.$P147];[$Datasheet.$B$1:.$AV$9809];7;FALSE());&quot;-&quot;)" office:value-type="float" office:value="0" calcext:value-type="float">
            <text:p>0</text:p>
          </table:table-cell>
          <table:table-cell table:style-name="ce147" table:formula="of:=IFERROR(VLOOKUP([$Masterlist.$P147];[$Datasheet.$B$1:.$AV$9809];8;FALSE());&quot;-&quot;)" office:value-type="float" office:value="0" calcext:value-type="float">
            <text:p>0</text:p>
          </table:table-cell>
          <table:table-cell table:style-name="ce147" table:formula="of:=IFERROR(VLOOKUP([$Masterlist.$P147];[$Datasheet.$B$1:.$AV$9809];9;FALSE());&quot;-&quot;)" office:value-type="float" office:value="0" calcext:value-type="float">
            <text:p>0</text:p>
          </table:table-cell>
          <table:table-cell table:style-name="ce147" table:formula="of:=IFERROR(VLOOKUP([$Masterlist.$P147];[$Datasheet.$B$1:.$AV$9809];10;FALSE());&quot;-&quot;)" office:value-type="float" office:value="1" calcext:value-type="float">
            <text:p>1</text:p>
          </table:table-cell>
          <table:table-cell table:style-name="ce147" table:formula="of:=IFERROR(VLOOKUP([$Masterlist.$P147];[$Datasheet.$B$1:.$AV$9809];11;FALSE());&quot;-&quot;)" office:value-type="float" office:value="1" calcext:value-type="float">
            <text:p>1</text:p>
          </table:table-cell>
          <table:table-cell table:style-name="ce147" table:formula="of:=IFERROR(VLOOKUP([$Masterlist.$P147];[$Datasheet.$B$1:.$AV$9809];12;FALSE());&quot;-&quot;)" office:value-type="float" office:value="1" calcext:value-type="float">
            <text:p>1</text:p>
          </table:table-cell>
          <table:table-cell table:style-name="ce147" table:formula="of:=IFERROR(VLOOKUP([$Masterlist.$P147];[$Datasheet.$B$1:.$AV$9809];13;FALSE());&quot;-&quot;)" office:value-type="float" office:value="1" calcext:value-type="float">
            <text:p>1</text:p>
          </table:table-cell>
          <table:table-cell table:style-name="ce147" table:formula="of:=IFERROR(VLOOKUP([$Masterlist.$P147];[$Datasheet.$B$1:.$AV$9809];14;FALSE());&quot;-&quot;)" office:value-type="float" office:value="1" calcext:value-type="float">
            <text:p>1</text:p>
          </table:table-cell>
          <table:table-cell table:style-name="ce147" table:formula="of:=IFERROR(VLOOKUP([$Masterlist.$P147];[$Datasheet.$B$1:.$AV$9809];15;FALSE());&quot;-&quot;)" office:value-type="float" office:value="1" calcext:value-type="float">
            <text:p>1</text:p>
          </table:table-cell>
          <table:table-cell table:style-name="ce147" table:formula="of:=IFERROR(VLOOKUP([$Masterlist.$P147];[$Datasheet.$B$1:.$AV$9809];16;FALSE());&quot;-&quot;)" office:value-type="float" office:value="0" calcext:value-type="float">
            <text:p/>
          </table:table-cell>
          <table:table-cell table:style-name="ce147" table:formula="of:=IFERROR(VLOOKUP([$Masterlist.$P147];[$Datasheet.$B$1:.$AV$9809];17;FALSE());&quot;-&quot;)" office:value-type="float" office:value="0" calcext:value-type="float">
            <text:p/>
          </table:table-cell>
          <table:table-cell table:style-name="ce147" table:formula="of:=IFERROR(VLOOKUP([$Masterlist.$P147];[$Datasheet.$B$1:.$AV$9809];18;FALSE());&quot;-&quot;)" office:value-type="float" office:value="0" calcext:value-type="float">
            <text:p/>
          </table:table-cell>
          <table:table-cell table:style-name="ce147" table:formula="of:=IFERROR(VLOOKUP([$Masterlist.$P147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office:value-type="string" calcext:value-type="string">
            <text:p>yes</text:p>
          </table:table-cell>
          <table:table-cell table:style-name="ce50" table:number-columns-repeated="11"/>
          <table:table-cell table:style-name="ce92" office:value-type="string" calcext:value-type="string">
            <text:p>LED, Broadcast</text:p>
          </table:table-cell>
          <table:table-cell table:style-name="ce8" office:value-type="string" calcext:value-type="string">
            <text:p>Krystal-Lee van Heerden</text:p>
          </table:table-cell>
          <table:table-cell table:style-name="ce13" table:formula="of:=IF(ISNUMBER(MATCH([.P148];[$Datasheet.$B$1:.$B$9809];0));&quot;✓&quot;;&quot;x&quot;)" office:value-type="string" office:string-value="✓" calcext:value-type="string">
            <text:p>✓</text:p>
          </table:table-cell>
          <table:table-cell table:style-name="ce147" table:formula="of:=IFERROR(VLOOKUP([$Masterlist.$P148];[$Datasheet.$B$1:.$AV$9809];2;FALSE());&quot;-&quot;)" office:value-type="float" office:value="0" calcext:value-type="float">
            <text:p>0</text:p>
          </table:table-cell>
          <table:table-cell table:style-name="ce147" table:formula="of:=IFERROR(VLOOKUP([$Masterlist.$P148];[$Datasheet.$B$1:.$AV$9809];3;FALSE());&quot;-&quot;)" office:value-type="float" office:value="0" calcext:value-type="float">
            <text:p>0</text:p>
          </table:table-cell>
          <table:table-cell table:style-name="ce147" table:formula="of:=IFERROR(VLOOKUP([$Masterlist.$P148];[$Datasheet.$B$1:.$AV$9809];4;FALSE());&quot;-&quot;)" office:value-type="float" office:value="0" calcext:value-type="float">
            <text:p>0</text:p>
          </table:table-cell>
          <table:table-cell table:style-name="ce147" table:formula="of:=IFERROR(VLOOKUP([$Masterlist.$P148];[$Datasheet.$B$1:.$AV$9809];5;FALSE());&quot;-&quot;)" office:value-type="float" office:value="0" calcext:value-type="float">
            <text:p>0</text:p>
          </table:table-cell>
          <table:table-cell table:style-name="ce195" table:formula="of:=IFERROR(VLOOKUP([$Masterlist.$P148];[$Datasheet.$B$1:.$AV$9809];6;FALSE());&quot;-&quot;)" office:value-type="float" office:value="0" calcext:value-type="float">
            <text:p>0</text:p>
          </table:table-cell>
          <table:table-cell table:style-name="ce147" table:formula="of:=IFERROR(VLOOKUP([$Masterlist.$P148];[$Datasheet.$B$1:.$AV$9809];7;FALSE());&quot;-&quot;)" office:value-type="float" office:value="0" calcext:value-type="float">
            <text:p>0</text:p>
          </table:table-cell>
          <table:table-cell table:style-name="ce147" table:formula="of:=IFERROR(VLOOKUP([$Masterlist.$P148];[$Datasheet.$B$1:.$AV$9809];8;FALSE());&quot;-&quot;)" office:value-type="float" office:value="0" calcext:value-type="float">
            <text:p>0</text:p>
          </table:table-cell>
          <table:table-cell table:style-name="ce147" table:formula="of:=IFERROR(VLOOKUP([$Masterlist.$P148];[$Datasheet.$B$1:.$AV$9809];9;FALSE());&quot;-&quot;)" office:value-type="float" office:value="1" calcext:value-type="float">
            <text:p>1</text:p>
          </table:table-cell>
          <table:table-cell table:style-name="ce147" table:formula="of:=IFERROR(VLOOKUP([$Masterlist.$P148];[$Datasheet.$B$1:.$AV$9809];10;FALSE());&quot;-&quot;)" office:value-type="float" office:value="0" calcext:value-type="float">
            <text:p>0</text:p>
          </table:table-cell>
          <table:table-cell table:style-name="ce147" table:formula="of:=IFERROR(VLOOKUP([$Masterlist.$P148];[$Datasheet.$B$1:.$AV$9809];11;FALSE());&quot;-&quot;)" office:value-type="float" office:value="1" calcext:value-type="float">
            <text:p>1</text:p>
          </table:table-cell>
          <table:table-cell table:style-name="ce147" table:formula="of:=IFERROR(VLOOKUP([$Masterlist.$P148];[$Datasheet.$B$1:.$AV$9809];12;FALSE());&quot;-&quot;)" office:value-type="float" office:value="0" calcext:value-type="float">
            <text:p>0</text:p>
          </table:table-cell>
          <table:table-cell table:style-name="ce147" table:formula="of:=IFERROR(VLOOKUP([$Masterlist.$P148];[$Datasheet.$B$1:.$AV$9809];13;FALSE());&quot;-&quot;)" office:value-type="float" office:value="0" calcext:value-type="float">
            <text:p>0</text:p>
          </table:table-cell>
          <table:table-cell table:style-name="ce147" table:formula="of:=IFERROR(VLOOKUP([$Masterlist.$P148];[$Datasheet.$B$1:.$AV$9809];14;FALSE());&quot;-&quot;)" office:value-type="float" office:value="0" calcext:value-type="float">
            <text:p>0</text:p>
          </table:table-cell>
          <table:table-cell table:style-name="ce147" table:formula="of:=IFERROR(VLOOKUP([$Masterlist.$P148];[$Datasheet.$B$1:.$AV$9809];15;FALSE());&quot;-&quot;)" office:value-type="float" office:value="0" calcext:value-type="float">
            <text:p>0</text:p>
          </table:table-cell>
          <table:table-cell table:style-name="ce147" table:formula="of:=IFERROR(VLOOKUP([$Masterlist.$P148];[$Datasheet.$B$1:.$AV$9809];16;FALSE());&quot;-&quot;)" office:value-type="float" office:value="0" calcext:value-type="float">
            <text:p/>
          </table:table-cell>
          <table:table-cell table:style-name="ce147" table:formula="of:=IFERROR(VLOOKUP([$Masterlist.$P148];[$Datasheet.$B$1:.$AV$9809];17;FALSE());&quot;-&quot;)" office:value-type="float" office:value="0" calcext:value-type="float">
            <text:p/>
          </table:table-cell>
          <table:table-cell table:style-name="ce147" table:formula="of:=IFERROR(VLOOKUP([$Masterlist.$P148];[$Datasheet.$B$1:.$AV$9809];18;FALSE());&quot;-&quot;)" office:value-type="float" office:value="0" calcext:value-type="float">
            <text:p/>
          </table:table-cell>
          <table:table-cell table:style-name="ce147" table:formula="of:=IFERROR(VLOOKUP([$Masterlist.$P148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A</text:p>
          </table:table-cell>
          <table:table-cell table:number-columns-repeated="2" table:style-name="ce50" office:value-type="string" calcext:value-type="string">
            <text:p>yes</text:p>
          </table:table-cell>
          <table:table-cell table:style-name="ce50" table:number-columns-repeated="10"/>
          <table:table-cell table:style-name="ce92" office:value-type="string" calcext:value-type="string">
            <text:p>FOH, LED, Broadcast</text:p>
          </table:table-cell>
          <table:table-cell table:style-name="ce8" office:value-type="string" calcext:value-type="string">
            <text:p>Michelle Grobler</text:p>
          </table:table-cell>
          <table:table-cell table:style-name="ce13" table:formula="of:=IF(ISNUMBER(MATCH([.P149];[$Datasheet.$B$1:.$B$9809];0));&quot;✓&quot;;&quot;x&quot;)" office:value-type="string" office:string-value="✓" calcext:value-type="string">
            <text:p>✓</text:p>
          </table:table-cell>
          <table:table-cell table:style-name="ce147" table:formula="of:=IFERROR(VLOOKUP([$Masterlist.$P149];[$Datasheet.$B$1:.$AV$9809];2;FALSE());&quot;-&quot;)" office:value-type="float" office:value="0" calcext:value-type="float">
            <text:p>0</text:p>
          </table:table-cell>
          <table:table-cell table:style-name="ce147" table:formula="of:=IFERROR(VLOOKUP([$Masterlist.$P149];[$Datasheet.$B$1:.$AV$9809];3;FALSE());&quot;-&quot;)" office:value-type="float" office:value="1" calcext:value-type="float">
            <text:p>1</text:p>
          </table:table-cell>
          <table:table-cell table:style-name="ce147" table:formula="of:=IFERROR(VLOOKUP([$Masterlist.$P149];[$Datasheet.$B$1:.$AV$9809];4;FALSE());&quot;-&quot;)" office:value-type="float" office:value="0" calcext:value-type="float">
            <text:p>0</text:p>
          </table:table-cell>
          <table:table-cell table:style-name="ce147" table:formula="of:=IFERROR(VLOOKUP([$Masterlist.$P149];[$Datasheet.$B$1:.$AV$9809];5;FALSE());&quot;-&quot;)" office:value-type="float" office:value="1" calcext:value-type="float">
            <text:p>1</text:p>
          </table:table-cell>
          <table:table-cell table:style-name="ce195" table:formula="of:=IFERROR(VLOOKUP([$Masterlist.$P149];[$Datasheet.$B$1:.$AV$9809];6;FALSE());&quot;-&quot;)" office:value-type="float" office:value="0" calcext:value-type="float">
            <text:p>0</text:p>
          </table:table-cell>
          <table:table-cell table:style-name="ce147" table:formula="of:=IFERROR(VLOOKUP([$Masterlist.$P149];[$Datasheet.$B$1:.$AV$9809];7;FALSE());&quot;-&quot;)" office:value-type="float" office:value="1" calcext:value-type="float">
            <text:p>1</text:p>
          </table:table-cell>
          <table:table-cell table:style-name="ce147" table:formula="of:=IFERROR(VLOOKUP([$Masterlist.$P149];[$Datasheet.$B$1:.$AV$9809];8;FALSE());&quot;-&quot;)" office:value-type="float" office:value="0" calcext:value-type="float">
            <text:p>0</text:p>
          </table:table-cell>
          <table:table-cell table:style-name="ce147" table:formula="of:=IFERROR(VLOOKUP([$Masterlist.$P149];[$Datasheet.$B$1:.$AV$9809];9;FALSE());&quot;-&quot;)" office:value-type="float" office:value="0" calcext:value-type="float">
            <text:p>0</text:p>
          </table:table-cell>
          <table:table-cell table:style-name="ce147" table:formula="of:=IFERROR(VLOOKUP([$Masterlist.$P149];[$Datasheet.$B$1:.$AV$9809];10;FALSE());&quot;-&quot;)" office:value-type="float" office:value="0" calcext:value-type="float">
            <text:p>0</text:p>
          </table:table-cell>
          <table:table-cell table:style-name="ce147" table:formula="of:=IFERROR(VLOOKUP([$Masterlist.$P149];[$Datasheet.$B$1:.$AV$9809];11;FALSE());&quot;-&quot;)" office:value-type="float" office:value="0" calcext:value-type="float">
            <text:p>0</text:p>
          </table:table-cell>
          <table:table-cell table:style-name="ce147" table:formula="of:=IFERROR(VLOOKUP([$Masterlist.$P149];[$Datasheet.$B$1:.$AV$9809];12;FALSE());&quot;-&quot;)" office:value-type="float" office:value="0" calcext:value-type="float">
            <text:p>0</text:p>
          </table:table-cell>
          <table:table-cell table:style-name="ce147" table:formula="of:=IFERROR(VLOOKUP([$Masterlist.$P149];[$Datasheet.$B$1:.$AV$9809];13;FALSE());&quot;-&quot;)" office:value-type="float" office:value="1" calcext:value-type="float">
            <text:p>1</text:p>
          </table:table-cell>
          <table:table-cell table:style-name="ce147" table:formula="of:=IFERROR(VLOOKUP([$Masterlist.$P149];[$Datasheet.$B$1:.$AV$9809];14;FALSE());&quot;-&quot;)" office:value-type="float" office:value="0" calcext:value-type="float">
            <text:p>0</text:p>
          </table:table-cell>
          <table:table-cell table:style-name="ce147" table:formula="of:=IFERROR(VLOOKUP([$Masterlist.$P149];[$Datasheet.$B$1:.$AV$9809];15;FALSE());&quot;-&quot;)" office:value-type="float" office:value="0" calcext:value-type="float">
            <text:p>0</text:p>
          </table:table-cell>
          <table:table-cell table:style-name="ce147" table:formula="of:=IFERROR(VLOOKUP([$Masterlist.$P149];[$Datasheet.$B$1:.$AV$9809];16;FALSE());&quot;-&quot;)" office:value-type="float" office:value="0" calcext:value-type="float">
            <text:p/>
          </table:table-cell>
          <table:table-cell table:style-name="ce147" table:formula="of:=IFERROR(VLOOKUP([$Masterlist.$P149];[$Datasheet.$B$1:.$AV$9809];17;FALSE());&quot;-&quot;)" office:value-type="float" office:value="0" calcext:value-type="float">
            <text:p/>
          </table:table-cell>
          <table:table-cell table:style-name="ce147" table:formula="of:=IFERROR(VLOOKUP([$Masterlist.$P149];[$Datasheet.$B$1:.$AV$9809];18;FALSE());&quot;-&quot;)" office:value-type="float" office:value="0" calcext:value-type="float">
            <text:p/>
          </table:table-cell>
          <table:table-cell table:style-name="ce147" table:formula="of:=IFERROR(VLOOKUP([$Masterlist.$P149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number-columns-repeated="3" table:style-name="ce50" office:value-type="string" calcext:value-type="string">
            <text:p>yes</text:p>
          </table:table-cell>
          <table:table-cell table:style-name="ce50" table:number-columns-repeated="9"/>
          <table:table-cell table:style-name="ce92" office:value-type="string" calcext:value-type="string">
            <text:p>FOH, LED, Broadcast</text:p>
          </table:table-cell>
          <table:table-cell table:style-name="ce112" office:value-type="string" calcext:value-type="string">
            <text:p>Monique Esterhuizen</text:p>
          </table:table-cell>
          <table:table-cell table:style-name="ce13" table:formula="of:=IF(ISNUMBER(MATCH([.P150];[$Datasheet.$B$1:.$B$9809];0));&quot;✓&quot;;&quot;x&quot;)" office:value-type="string" office:string-value="✓" calcext:value-type="string">
            <text:p>✓</text:p>
          </table:table-cell>
          <table:table-cell table:style-name="ce147" table:formula="of:=IFERROR(VLOOKUP([$Masterlist.$P150];[$Datasheet.$B$1:.$AV$9809];2;FALSE());&quot;-&quot;)" office:value-type="float" office:value="0" calcext:value-type="float">
            <text:p>0</text:p>
          </table:table-cell>
          <table:table-cell table:style-name="ce147" table:formula="of:=IFERROR(VLOOKUP([$Masterlist.$P150];[$Datasheet.$B$1:.$AV$9809];3;FALSE());&quot;-&quot;)" office:value-type="float" office:value="0" calcext:value-type="float">
            <text:p>0</text:p>
          </table:table-cell>
          <table:table-cell table:style-name="ce147" table:formula="of:=IFERROR(VLOOKUP([$Masterlist.$P150];[$Datasheet.$B$1:.$AV$9809];4;FALSE());&quot;-&quot;)" office:value-type="float" office:value="1" calcext:value-type="float">
            <text:p>1</text:p>
          </table:table-cell>
          <table:table-cell table:style-name="ce147" table:formula="of:=IFERROR(VLOOKUP([$Masterlist.$P150];[$Datasheet.$B$1:.$AV$9809];5;FALSE());&quot;-&quot;)" office:value-type="float" office:value="1" calcext:value-type="float">
            <text:p>1</text:p>
          </table:table-cell>
          <table:table-cell table:style-name="ce195" table:formula="of:=IFERROR(VLOOKUP([$Masterlist.$P150];[$Datasheet.$B$1:.$AV$9809];6;FALSE());&quot;-&quot;)" office:value-type="float" office:value="0" calcext:value-type="float">
            <text:p>0</text:p>
          </table:table-cell>
          <table:table-cell table:style-name="ce147" table:formula="of:=IFERROR(VLOOKUP([$Masterlist.$P150];[$Datasheet.$B$1:.$AV$9809];7;FALSE());&quot;-&quot;)" office:value-type="float" office:value="0" calcext:value-type="float">
            <text:p>0</text:p>
          </table:table-cell>
          <table:table-cell table:style-name="ce147" table:formula="of:=IFERROR(VLOOKUP([$Masterlist.$P150];[$Datasheet.$B$1:.$AV$9809];8;FALSE());&quot;-&quot;)" office:value-type="float" office:value="0" calcext:value-type="float">
            <text:p>0</text:p>
          </table:table-cell>
          <table:table-cell table:style-name="ce147" table:formula="of:=IFERROR(VLOOKUP([$Masterlist.$P150];[$Datasheet.$B$1:.$AV$9809];9;FALSE());&quot;-&quot;)" office:value-type="float" office:value="0" calcext:value-type="float">
            <text:p>0</text:p>
          </table:table-cell>
          <table:table-cell table:style-name="ce147" table:formula="of:=IFERROR(VLOOKUP([$Masterlist.$P150];[$Datasheet.$B$1:.$AV$9809];10;FALSE());&quot;-&quot;)" office:value-type="float" office:value="1" calcext:value-type="float">
            <text:p>1</text:p>
          </table:table-cell>
          <table:table-cell table:style-name="ce147" table:formula="of:=IFERROR(VLOOKUP([$Masterlist.$P150];[$Datasheet.$B$1:.$AV$9809];11;FALSE());&quot;-&quot;)" office:value-type="float" office:value="1" calcext:value-type="float">
            <text:p>1</text:p>
          </table:table-cell>
          <table:table-cell table:style-name="ce147" table:formula="of:=IFERROR(VLOOKUP([$Masterlist.$P150];[$Datasheet.$B$1:.$AV$9809];12;FALSE());&quot;-&quot;)" office:value-type="float" office:value="1" calcext:value-type="float">
            <text:p>1</text:p>
          </table:table-cell>
          <table:table-cell table:style-name="ce147" table:formula="of:=IFERROR(VLOOKUP([$Masterlist.$P150];[$Datasheet.$B$1:.$AV$9809];13;FALSE());&quot;-&quot;)" office:value-type="float" office:value="1" calcext:value-type="float">
            <text:p>1</text:p>
          </table:table-cell>
          <table:table-cell table:style-name="ce147" table:formula="of:=IFERROR(VLOOKUP([$Masterlist.$P150];[$Datasheet.$B$1:.$AV$9809];14;FALSE());&quot;-&quot;)" office:value-type="float" office:value="1" calcext:value-type="float">
            <text:p>1</text:p>
          </table:table-cell>
          <table:table-cell table:style-name="ce147" table:formula="of:=IFERROR(VLOOKUP([$Masterlist.$P150];[$Datasheet.$B$1:.$AV$9809];15;FALSE());&quot;-&quot;)" office:value-type="float" office:value="1" calcext:value-type="float">
            <text:p>1</text:p>
          </table:table-cell>
          <table:table-cell table:style-name="ce147" table:formula="of:=IFERROR(VLOOKUP([$Masterlist.$P150];[$Datasheet.$B$1:.$AV$9809];16;FALSE());&quot;-&quot;)" office:value-type="float" office:value="0" calcext:value-type="float">
            <text:p/>
          </table:table-cell>
          <table:table-cell table:style-name="ce147" table:formula="of:=IFERROR(VLOOKUP([$Masterlist.$P150];[$Datasheet.$B$1:.$AV$9809];17;FALSE());&quot;-&quot;)" office:value-type="float" office:value="0" calcext:value-type="float">
            <text:p/>
          </table:table-cell>
          <table:table-cell table:style-name="ce147" table:formula="of:=IFERROR(VLOOKUP([$Masterlist.$P150];[$Datasheet.$B$1:.$AV$9809];18;FALSE());&quot;-&quot;)" office:value-type="float" office:value="0" calcext:value-type="float">
            <text:p/>
          </table:table-cell>
          <table:table-cell table:style-name="ce147" table:formula="of:=IFERROR(VLOOKUP([$Masterlist.$P150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/>
          <table:table-cell table:style-name="ce50" table:number-columns-repeated="12"/>
          <table:table-cell table:style-name="ce92"/>
          <table:table-cell table:style-name="ce8" office:value-type="string" calcext:value-type="string">
            <text:p>JayL Pretorius</text:p>
          </table:table-cell>
          <table:table-cell table:style-name="ce13" table:formula="of:=IF(ISNUMBER(MATCH([.P151];[$Datasheet.$B$1:.$B$9809];0));&quot;✓&quot;;&quot;x&quot;)" office:value-type="string" office:string-value="✓" calcext:value-type="string">
            <text:p>✓</text:p>
          </table:table-cell>
          <table:table-cell table:style-name="ce147" table:formula="of:=IFERROR(VLOOKUP([$Masterlist.$P151];[$Datasheet.$B$1:.$AV$9809];2;FALSE());&quot;-&quot;)" office:value-type="float" office:value="0" calcext:value-type="float">
            <text:p>0</text:p>
          </table:table-cell>
          <table:table-cell table:style-name="ce147" table:formula="of:=IFERROR(VLOOKUP([$Masterlist.$P151];[$Datasheet.$B$1:.$AV$9809];3;FALSE());&quot;-&quot;)" office:value-type="float" office:value="1" calcext:value-type="float">
            <text:p>1</text:p>
          </table:table-cell>
          <table:table-cell table:style-name="ce147" table:formula="of:=IFERROR(VLOOKUP([$Masterlist.$P151];[$Datasheet.$B$1:.$AV$9809];4;FALSE());&quot;-&quot;)" office:value-type="float" office:value="0" calcext:value-type="float">
            <text:p>0</text:p>
          </table:table-cell>
          <table:table-cell table:style-name="ce147" table:formula="of:=IFERROR(VLOOKUP([$Masterlist.$P151];[$Datasheet.$B$1:.$AV$9809];5;FALSE());&quot;-&quot;)" office:value-type="float" office:value="0" calcext:value-type="float">
            <text:p>0</text:p>
          </table:table-cell>
          <table:table-cell table:style-name="ce195" table:formula="of:=IFERROR(VLOOKUP([$Masterlist.$P151];[$Datasheet.$B$1:.$AV$9809];6;FALSE());&quot;-&quot;)" office:value-type="float" office:value="1" calcext:value-type="float">
            <text:p>1</text:p>
          </table:table-cell>
          <table:table-cell table:style-name="ce147" table:formula="of:=IFERROR(VLOOKUP([$Masterlist.$P151];[$Datasheet.$B$1:.$AV$9809];7;FALSE());&quot;-&quot;)" office:value-type="float" office:value="1" calcext:value-type="float">
            <text:p>1</text:p>
          </table:table-cell>
          <table:table-cell table:style-name="ce147" table:formula="of:=IFERROR(VLOOKUP([$Masterlist.$P151];[$Datasheet.$B$1:.$AV$9809];8;FALSE());&quot;-&quot;)" office:value-type="float" office:value="0" calcext:value-type="float">
            <text:p>0</text:p>
          </table:table-cell>
          <table:table-cell table:style-name="ce147" table:formula="of:=IFERROR(VLOOKUP([$Masterlist.$P151];[$Datasheet.$B$1:.$AV$9809];9;FALSE());&quot;-&quot;)" office:value-type="float" office:value="1" calcext:value-type="float">
            <text:p>1</text:p>
          </table:table-cell>
          <table:table-cell table:style-name="ce147" table:formula="of:=IFERROR(VLOOKUP([$Masterlist.$P151];[$Datasheet.$B$1:.$AV$9809];10;FALSE());&quot;-&quot;)" office:value-type="float" office:value="1" calcext:value-type="float">
            <text:p>1</text:p>
          </table:table-cell>
          <table:table-cell table:style-name="ce147" table:formula="of:=IFERROR(VLOOKUP([$Masterlist.$P151];[$Datasheet.$B$1:.$AV$9809];11;FALSE());&quot;-&quot;)" office:value-type="float" office:value="1" calcext:value-type="float">
            <text:p>1</text:p>
          </table:table-cell>
          <table:table-cell table:style-name="ce147" table:formula="of:=IFERROR(VLOOKUP([$Masterlist.$P151];[$Datasheet.$B$1:.$AV$9809];12;FALSE());&quot;-&quot;)" office:value-type="float" office:value="1" calcext:value-type="float">
            <text:p>1</text:p>
          </table:table-cell>
          <table:table-cell table:style-name="ce147" table:formula="of:=IFERROR(VLOOKUP([$Masterlist.$P151];[$Datasheet.$B$1:.$AV$9809];13;FALSE());&quot;-&quot;)" office:value-type="float" office:value="1" calcext:value-type="float">
            <text:p>1</text:p>
          </table:table-cell>
          <table:table-cell table:style-name="ce147" table:formula="of:=IFERROR(VLOOKUP([$Masterlist.$P151];[$Datasheet.$B$1:.$AV$9809];14;FALSE());&quot;-&quot;)" office:value-type="float" office:value="0" calcext:value-type="float">
            <text:p>0</text:p>
          </table:table-cell>
          <table:table-cell table:style-name="ce147" table:formula="of:=IFERROR(VLOOKUP([$Masterlist.$P151];[$Datasheet.$B$1:.$AV$9809];15;FALSE());&quot;-&quot;)" office:value-type="float" office:value="1" calcext:value-type="float">
            <text:p>1</text:p>
          </table:table-cell>
          <table:table-cell table:style-name="ce147" table:formula="of:=IFERROR(VLOOKUP([$Masterlist.$P151];[$Datasheet.$B$1:.$AV$9809];16;FALSE());&quot;-&quot;)" office:value-type="float" office:value="0" calcext:value-type="float">
            <text:p/>
          </table:table-cell>
          <table:table-cell table:style-name="ce147" table:formula="of:=IFERROR(VLOOKUP([$Masterlist.$P151];[$Datasheet.$B$1:.$AV$9809];17;FALSE());&quot;-&quot;)" office:value-type="float" office:value="0" calcext:value-type="float">
            <text:p/>
          </table:table-cell>
          <table:table-cell table:style-name="ce147" table:formula="of:=IFERROR(VLOOKUP([$Masterlist.$P151];[$Datasheet.$B$1:.$AV$9809];18;FALSE());&quot;-&quot;)" office:value-type="float" office:value="0" calcext:value-type="float">
            <text:p/>
          </table:table-cell>
          <table:table-cell table:style-name="ce147" table:formula="of:=IFERROR(VLOOKUP([$Masterlist.$P151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/>
          <table:table-cell table:style-name="ce50" table:number-columns-repeated="12"/>
          <table:table-cell table:style-name="ce92"/>
          <table:table-cell table:style-name="ce8" office:value-type="string" calcext:value-type="string">
            <text:p>Dineke Capazorio</text:p>
          </table:table-cell>
          <table:table-cell table:style-name="ce13" table:formula="of:=IF(ISNUMBER(MATCH([.P152];[$Datasheet.$B$1:.$B$9809];0));&quot;✓&quot;;&quot;x&quot;)" office:value-type="string" office:string-value="x" calcext:value-type="string">
            <text:p>x</text:p>
          </table:table-cell>
          <table:table-cell table:style-name="ce147" table:formula="of:=IFERROR(VLOOKUP([$Masterlist.$P152];[$Datasheet.$B$1:.$AV$9809];2;FALSE());&quot;-&quot;)" office:value-type="string" office:string-value="-" calcext:value-type="string">
            <text:p>-</text:p>
          </table:table-cell>
          <table:table-cell table:style-name="ce147" table:formula="of:=IFERROR(VLOOKUP([$Masterlist.$P152];[$Datasheet.$B$1:.$AV$9809];3;FALSE());&quot;-&quot;)" office:value-type="string" office:string-value="-" calcext:value-type="string">
            <text:p>-</text:p>
          </table:table-cell>
          <table:table-cell table:style-name="ce147" table:formula="of:=IFERROR(VLOOKUP([$Masterlist.$P152];[$Datasheet.$B$1:.$AV$9809];4;FALSE());&quot;-&quot;)" office:value-type="string" office:string-value="-" calcext:value-type="string">
            <text:p>-</text:p>
          </table:table-cell>
          <table:table-cell table:style-name="ce147" table:formula="of:=IFERROR(VLOOKUP([$Masterlist.$P152];[$Datasheet.$B$1:.$AV$9809];5;FALSE());&quot;-&quot;)" office:value-type="string" office:string-value="-" calcext:value-type="string">
            <text:p>-</text:p>
          </table:table-cell>
          <table:table-cell table:style-name="ce195" table:formula="of:=IFERROR(VLOOKUP([$Masterlist.$P152];[$Datasheet.$B$1:.$AV$9809];6;FALSE());&quot;-&quot;)" office:value-type="string" office:string-value="-" calcext:value-type="string">
            <text:p>-</text:p>
          </table:table-cell>
          <table:table-cell table:style-name="ce147" table:formula="of:=IFERROR(VLOOKUP([$Masterlist.$P152];[$Datasheet.$B$1:.$AV$9809];7;FALSE());&quot;-&quot;)" office:value-type="string" office:string-value="-" calcext:value-type="string">
            <text:p>-</text:p>
          </table:table-cell>
          <table:table-cell table:style-name="ce147" table:formula="of:=IFERROR(VLOOKUP([$Masterlist.$P152];[$Datasheet.$B$1:.$AV$9809];8;FALSE());&quot;-&quot;)" office:value-type="string" office:string-value="-" calcext:value-type="string">
            <text:p>-</text:p>
          </table:table-cell>
          <table:table-cell table:style-name="ce147" table:formula="of:=IFERROR(VLOOKUP([$Masterlist.$P152];[$Datasheet.$B$1:.$AV$9809];9;FALSE());&quot;-&quot;)" office:value-type="string" office:string-value="-" calcext:value-type="string">
            <text:p>-</text:p>
          </table:table-cell>
          <table:table-cell table:style-name="ce147" table:formula="of:=IFERROR(VLOOKUP([$Masterlist.$P152];[$Datasheet.$B$1:.$AV$9809];10;FALSE());&quot;-&quot;)" office:value-type="string" office:string-value="-" calcext:value-type="string">
            <text:p>-</text:p>
          </table:table-cell>
          <table:table-cell table:style-name="ce147" table:formula="of:=IFERROR(VLOOKUP([$Masterlist.$P152];[$Datasheet.$B$1:.$AV$9809];11;FALSE());&quot;-&quot;)" office:value-type="string" office:string-value="-" calcext:value-type="string">
            <text:p>-</text:p>
          </table:table-cell>
          <table:table-cell table:style-name="ce147" table:formula="of:=IFERROR(VLOOKUP([$Masterlist.$P152];[$Datasheet.$B$1:.$AV$9809];12;FALSE());&quot;-&quot;)" office:value-type="string" office:string-value="-" calcext:value-type="string">
            <text:p>-</text:p>
          </table:table-cell>
          <table:table-cell table:style-name="ce147" table:formula="of:=IFERROR(VLOOKUP([$Masterlist.$P152];[$Datasheet.$B$1:.$AV$9809];13;FALSE());&quot;-&quot;)" office:value-type="string" office:string-value="-" calcext:value-type="string">
            <text:p>-</text:p>
          </table:table-cell>
          <table:table-cell table:style-name="ce147" table:formula="of:=IFERROR(VLOOKUP([$Masterlist.$P152];[$Datasheet.$B$1:.$AV$9809];14;FALSE());&quot;-&quot;)" office:value-type="string" office:string-value="-" calcext:value-type="string">
            <text:p>-</text:p>
          </table:table-cell>
          <table:table-cell table:style-name="ce147" table:formula="of:=IFERROR(VLOOKUP([$Masterlist.$P152];[$Datasheet.$B$1:.$AV$9809];15;FALSE());&quot;-&quot;)" office:value-type="string" office:string-value="-" calcext:value-type="string">
            <text:p>-</text:p>
          </table:table-cell>
          <table:table-cell table:style-name="ce147" table:formula="of:=IFERROR(VLOOKUP([$Masterlist.$P152];[$Datasheet.$B$1:.$AV$9809];16;FALSE());&quot;-&quot;)" office:value-type="string" office:string-value="-" calcext:value-type="string">
            <text:p>-</text:p>
          </table:table-cell>
          <table:table-cell table:style-name="ce147" table:formula="of:=IFERROR(VLOOKUP([$Masterlist.$P152];[$Datasheet.$B$1:.$AV$9809];17;FALSE());&quot;-&quot;)" office:value-type="string" office:string-value="-" calcext:value-type="string">
            <text:p>-</text:p>
          </table:table-cell>
          <table:table-cell table:style-name="ce147" table:formula="of:=IFERROR(VLOOKUP([$Masterlist.$P152];[$Datasheet.$B$1:.$AV$9809];18;FALSE());&quot;-&quot;)" office:value-type="string" office:string-value="-" calcext:value-type="string">
            <text:p>-</text:p>
          </table:table-cell>
          <table:table-cell table:style-name="ce147" table:formula="of:=IFERROR(VLOOKUP([$Masterlist.$P152];[$Datasheet.$B$1:.$AV$9809];19;FALSE());&quot;-&quot;)" office:value-type="string" office:string-value="-" calcext:value-type="string">
            <text:p>-</text:p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/>
          <table:table-cell table:style-name="ce50" table:number-columns-repeated="12"/>
          <table:table-cell table:style-name="ce92"/>
          <table:table-cell table:style-name="ce8" office:value-type="string" calcext:value-type="string">
            <text:p>Nkomi Selapa</text:p>
          </table:table-cell>
          <table:table-cell table:style-name="ce13" table:formula="of:=IF(ISNUMBER(MATCH([.P153];[$Datasheet.$B$1:.$B$9809];0));&quot;✓&quot;;&quot;x&quot;)" office:value-type="string" office:string-value="✓" calcext:value-type="string">
            <text:p>✓</text:p>
          </table:table-cell>
          <table:table-cell table:style-name="ce147" table:formula="of:=IFERROR(VLOOKUP([$Masterlist.$P153];[$Datasheet.$B$1:.$AV$9809];2;FALSE());&quot;-&quot;)" office:value-type="float" office:value="1" calcext:value-type="float">
            <text:p>1</text:p>
          </table:table-cell>
          <table:table-cell table:style-name="ce147" table:formula="of:=IFERROR(VLOOKUP([$Masterlist.$P153];[$Datasheet.$B$1:.$AV$9809];3;FALSE());&quot;-&quot;)" office:value-type="float" office:value="1" calcext:value-type="float">
            <text:p>1</text:p>
          </table:table-cell>
          <table:table-cell table:style-name="ce147" table:formula="of:=IFERROR(VLOOKUP([$Masterlist.$P153];[$Datasheet.$B$1:.$AV$9809];4;FALSE());&quot;-&quot;)" office:value-type="float" office:value="1" calcext:value-type="float">
            <text:p>1</text:p>
          </table:table-cell>
          <table:table-cell table:style-name="ce147" table:formula="of:=IFERROR(VLOOKUP([$Masterlist.$P153];[$Datasheet.$B$1:.$AV$9809];5;FALSE());&quot;-&quot;)" office:value-type="float" office:value="1" calcext:value-type="float">
            <text:p>1</text:p>
          </table:table-cell>
          <table:table-cell table:style-name="ce195" table:formula="of:=IFERROR(VLOOKUP([$Masterlist.$P153];[$Datasheet.$B$1:.$AV$9809];6;FALSE());&quot;-&quot;)" office:value-type="float" office:value="0" calcext:value-type="float">
            <text:p>0</text:p>
          </table:table-cell>
          <table:table-cell table:style-name="ce147" table:formula="of:=IFERROR(VLOOKUP([$Masterlist.$P153];[$Datasheet.$B$1:.$AV$9809];7;FALSE());&quot;-&quot;)" office:value-type="float" office:value="0" calcext:value-type="float">
            <text:p>0</text:p>
          </table:table-cell>
          <table:table-cell table:style-name="ce147" table:formula="of:=IFERROR(VLOOKUP([$Masterlist.$P153];[$Datasheet.$B$1:.$AV$9809];8;FALSE());&quot;-&quot;)" office:value-type="float" office:value="0" calcext:value-type="float">
            <text:p>0</text:p>
          </table:table-cell>
          <table:table-cell table:style-name="ce147" table:formula="of:=IFERROR(VLOOKUP([$Masterlist.$P153];[$Datasheet.$B$1:.$AV$9809];9;FALSE());&quot;-&quot;)" office:value-type="float" office:value="0" calcext:value-type="float">
            <text:p>0</text:p>
          </table:table-cell>
          <table:table-cell table:style-name="ce147" table:formula="of:=IFERROR(VLOOKUP([$Masterlist.$P153];[$Datasheet.$B$1:.$AV$9809];10;FALSE());&quot;-&quot;)" office:value-type="float" office:value="0" calcext:value-type="float">
            <text:p>0</text:p>
          </table:table-cell>
          <table:table-cell table:style-name="ce147" table:formula="of:=IFERROR(VLOOKUP([$Masterlist.$P153];[$Datasheet.$B$1:.$AV$9809];11;FALSE());&quot;-&quot;)" office:value-type="float" office:value="0" calcext:value-type="float">
            <text:p>0</text:p>
          </table:table-cell>
          <table:table-cell table:style-name="ce147" table:formula="of:=IFERROR(VLOOKUP([$Masterlist.$P153];[$Datasheet.$B$1:.$AV$9809];12;FALSE());&quot;-&quot;)" office:value-type="float" office:value="1" calcext:value-type="float">
            <text:p>1</text:p>
          </table:table-cell>
          <table:table-cell table:style-name="ce147" table:formula="of:=IFERROR(VLOOKUP([$Masterlist.$P153];[$Datasheet.$B$1:.$AV$9809];13;FALSE());&quot;-&quot;)" office:value-type="float" office:value="1" calcext:value-type="float">
            <text:p>1</text:p>
          </table:table-cell>
          <table:table-cell table:style-name="ce147" table:formula="of:=IFERROR(VLOOKUP([$Masterlist.$P153];[$Datasheet.$B$1:.$AV$9809];14;FALSE());&quot;-&quot;)" office:value-type="float" office:value="1" calcext:value-type="float">
            <text:p>1</text:p>
          </table:table-cell>
          <table:table-cell table:style-name="ce147" table:formula="of:=IFERROR(VLOOKUP([$Masterlist.$P153];[$Datasheet.$B$1:.$AV$9809];15;FALSE());&quot;-&quot;)" office:value-type="float" office:value="1" calcext:value-type="float">
            <text:p>1</text:p>
          </table:table-cell>
          <table:table-cell table:style-name="ce147" table:formula="of:=IFERROR(VLOOKUP([$Masterlist.$P153];[$Datasheet.$B$1:.$AV$9809];16;FALSE());&quot;-&quot;)" office:value-type="float" office:value="0" calcext:value-type="float">
            <text:p/>
          </table:table-cell>
          <table:table-cell table:style-name="ce147" table:formula="of:=IFERROR(VLOOKUP([$Masterlist.$P153];[$Datasheet.$B$1:.$AV$9809];17;FALSE());&quot;-&quot;)" office:value-type="float" office:value="0" calcext:value-type="float">
            <text:p/>
          </table:table-cell>
          <table:table-cell table:style-name="ce147" table:formula="of:=IFERROR(VLOOKUP([$Masterlist.$P153];[$Datasheet.$B$1:.$AV$9809];18;FALSE());&quot;-&quot;)" office:value-type="float" office:value="0" calcext:value-type="float">
            <text:p/>
          </table:table-cell>
          <table:table-cell table:style-name="ce147" table:formula="of:=IFERROR(VLOOKUP([$Masterlist.$P153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/>
          <table:table-cell table:style-name="ce50" table:number-columns-repeated="12"/>
          <table:table-cell table:style-name="ce92"/>
          <table:table-cell table:style-name="ce8" office:value-type="string" calcext:value-type="string">
            <text:p>Moshidi Mabaso</text:p>
          </table:table-cell>
          <table:table-cell table:style-name="ce13" table:formula="of:=IF(ISNUMBER(MATCH([.P154];[$Datasheet.$B$1:.$B$9809];0));&quot;✓&quot;;&quot;x&quot;)" office:value-type="string" office:string-value="✓" calcext:value-type="string">
            <text:p>✓</text:p>
          </table:table-cell>
          <table:table-cell table:style-name="ce147" table:formula="of:=IFERROR(VLOOKUP([$Masterlist.$P154];[$Datasheet.$B$1:.$AV$9809];2;FALSE());&quot;-&quot;)" office:value-type="float" office:value="0" calcext:value-type="float">
            <text:p>0</text:p>
          </table:table-cell>
          <table:table-cell table:style-name="ce147" table:formula="of:=IFERROR(VLOOKUP([$Masterlist.$P154];[$Datasheet.$B$1:.$AV$9809];3;FALSE());&quot;-&quot;)" office:value-type="float" office:value="1" calcext:value-type="float">
            <text:p>1</text:p>
          </table:table-cell>
          <table:table-cell table:style-name="ce147" table:formula="of:=IFERROR(VLOOKUP([$Masterlist.$P154];[$Datasheet.$B$1:.$AV$9809];4;FALSE());&quot;-&quot;)" office:value-type="float" office:value="0" calcext:value-type="float">
            <text:p>0</text:p>
          </table:table-cell>
          <table:table-cell table:style-name="ce147" table:formula="of:=IFERROR(VLOOKUP([$Masterlist.$P154];[$Datasheet.$B$1:.$AV$9809];5;FALSE());&quot;-&quot;)" office:value-type="float" office:value="1" calcext:value-type="float">
            <text:p>1</text:p>
          </table:table-cell>
          <table:table-cell table:style-name="ce195" table:formula="of:=IFERROR(VLOOKUP([$Masterlist.$P154];[$Datasheet.$B$1:.$AV$9809];6;FALSE());&quot;-&quot;)" office:value-type="float" office:value="0" calcext:value-type="float">
            <text:p>0</text:p>
          </table:table-cell>
          <table:table-cell table:style-name="ce147" table:formula="of:=IFERROR(VLOOKUP([$Masterlist.$P154];[$Datasheet.$B$1:.$AV$9809];7;FALSE());&quot;-&quot;)" office:value-type="float" office:value="0" calcext:value-type="float">
            <text:p>0</text:p>
          </table:table-cell>
          <table:table-cell table:style-name="ce147" table:formula="of:=IFERROR(VLOOKUP([$Masterlist.$P154];[$Datasheet.$B$1:.$AV$9809];8;FALSE());&quot;-&quot;)" office:value-type="float" office:value="0" calcext:value-type="float">
            <text:p>0</text:p>
          </table:table-cell>
          <table:table-cell table:style-name="ce147" table:formula="of:=IFERROR(VLOOKUP([$Masterlist.$P154];[$Datasheet.$B$1:.$AV$9809];9;FALSE());&quot;-&quot;)" office:value-type="float" office:value="0" calcext:value-type="float">
            <text:p>0</text:p>
          </table:table-cell>
          <table:table-cell table:style-name="ce147" table:formula="of:=IFERROR(VLOOKUP([$Masterlist.$P154];[$Datasheet.$B$1:.$AV$9809];10;FALSE());&quot;-&quot;)" office:value-type="float" office:value="0" calcext:value-type="float">
            <text:p>0</text:p>
          </table:table-cell>
          <table:table-cell table:style-name="ce147" table:formula="of:=IFERROR(VLOOKUP([$Masterlist.$P154];[$Datasheet.$B$1:.$AV$9809];11;FALSE());&quot;-&quot;)" office:value-type="float" office:value="1" calcext:value-type="float">
            <text:p>1</text:p>
          </table:table-cell>
          <table:table-cell table:style-name="ce147" table:formula="of:=IFERROR(VLOOKUP([$Masterlist.$P154];[$Datasheet.$B$1:.$AV$9809];12;FALSE());&quot;-&quot;)" office:value-type="float" office:value="0" calcext:value-type="float">
            <text:p>0</text:p>
          </table:table-cell>
          <table:table-cell table:style-name="ce147" table:formula="of:=IFERROR(VLOOKUP([$Masterlist.$P154];[$Datasheet.$B$1:.$AV$9809];13;FALSE());&quot;-&quot;)" office:value-type="float" office:value="1" calcext:value-type="float">
            <text:p>1</text:p>
          </table:table-cell>
          <table:table-cell table:style-name="ce147" table:formula="of:=IFERROR(VLOOKUP([$Masterlist.$P154];[$Datasheet.$B$1:.$AV$9809];14;FALSE());&quot;-&quot;)" office:value-type="float" office:value="0" calcext:value-type="float">
            <text:p>0</text:p>
          </table:table-cell>
          <table:table-cell table:style-name="ce147" table:formula="of:=IFERROR(VLOOKUP([$Masterlist.$P154];[$Datasheet.$B$1:.$AV$9809];15;FALSE());&quot;-&quot;)" office:value-type="float" office:value="0" calcext:value-type="float">
            <text:p>0</text:p>
          </table:table-cell>
          <table:table-cell table:style-name="ce147" table:formula="of:=IFERROR(VLOOKUP([$Masterlist.$P154];[$Datasheet.$B$1:.$AV$9809];16;FALSE());&quot;-&quot;)" office:value-type="float" office:value="0" calcext:value-type="float">
            <text:p/>
          </table:table-cell>
          <table:table-cell table:style-name="ce147" table:formula="of:=IFERROR(VLOOKUP([$Masterlist.$P154];[$Datasheet.$B$1:.$AV$9809];17;FALSE());&quot;-&quot;)" office:value-type="float" office:value="0" calcext:value-type="float">
            <text:p/>
          </table:table-cell>
          <table:table-cell table:style-name="ce147" table:formula="of:=IFERROR(VLOOKUP([$Masterlist.$P154];[$Datasheet.$B$1:.$AV$9809];18;FALSE());&quot;-&quot;)" office:value-type="float" office:value="0" calcext:value-type="float">
            <text:p/>
          </table:table-cell>
          <table:table-cell table:style-name="ce147" table:formula="of:=IFERROR(VLOOKUP([$Masterlist.$P154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/>
          <table:table-cell table:style-name="ce50" table:number-columns-repeated="12"/>
          <table:table-cell table:style-name="ce92"/>
          <table:table-cell table:style-name="ce8" office:value-type="string" calcext:value-type="string">
            <text:p>Helana Robinson</text:p>
          </table:table-cell>
          <table:table-cell table:style-name="ce13" table:formula="of:=IF(ISNUMBER(MATCH([.P155];[$Datasheet.$B$1:.$B$9809];0));&quot;✓&quot;;&quot;x&quot;)" office:value-type="string" office:string-value="x" calcext:value-type="string">
            <text:p>x</text:p>
          </table:table-cell>
          <table:table-cell table:style-name="ce147" table:formula="of:=IFERROR(VLOOKUP([$Masterlist.$P155];[$Datasheet.$B$1:.$AV$9809];2;FALSE());&quot;-&quot;)" office:value-type="string" office:string-value="-" calcext:value-type="string">
            <text:p>-</text:p>
          </table:table-cell>
          <table:table-cell table:style-name="ce147" table:formula="of:=IFERROR(VLOOKUP([$Masterlist.$P155];[$Datasheet.$B$1:.$AV$9809];3;FALSE());&quot;-&quot;)" office:value-type="string" office:string-value="-" calcext:value-type="string">
            <text:p>-</text:p>
          </table:table-cell>
          <table:table-cell table:style-name="ce147" table:formula="of:=IFERROR(VLOOKUP([$Masterlist.$P155];[$Datasheet.$B$1:.$AV$9809];4;FALSE());&quot;-&quot;)" office:value-type="string" office:string-value="-" calcext:value-type="string">
            <text:p>-</text:p>
          </table:table-cell>
          <table:table-cell table:style-name="ce147" table:formula="of:=IFERROR(VLOOKUP([$Masterlist.$P155];[$Datasheet.$B$1:.$AV$9809];5;FALSE());&quot;-&quot;)" office:value-type="string" office:string-value="-" calcext:value-type="string">
            <text:p>-</text:p>
          </table:table-cell>
          <table:table-cell table:style-name="ce195" table:formula="of:=IFERROR(VLOOKUP([$Masterlist.$P155];[$Datasheet.$B$1:.$AV$9809];6;FALSE());&quot;-&quot;)" office:value-type="string" office:string-value="-" calcext:value-type="string">
            <text:p>-</text:p>
          </table:table-cell>
          <table:table-cell table:style-name="ce147" table:formula="of:=IFERROR(VLOOKUP([$Masterlist.$P155];[$Datasheet.$B$1:.$AV$9809];7;FALSE());&quot;-&quot;)" office:value-type="string" office:string-value="-" calcext:value-type="string">
            <text:p>-</text:p>
          </table:table-cell>
          <table:table-cell table:style-name="ce147" table:formula="of:=IFERROR(VLOOKUP([$Masterlist.$P155];[$Datasheet.$B$1:.$AV$9809];8;FALSE());&quot;-&quot;)" office:value-type="string" office:string-value="-" calcext:value-type="string">
            <text:p>-</text:p>
          </table:table-cell>
          <table:table-cell table:style-name="ce147" table:formula="of:=IFERROR(VLOOKUP([$Masterlist.$P155];[$Datasheet.$B$1:.$AV$9809];9;FALSE());&quot;-&quot;)" office:value-type="string" office:string-value="-" calcext:value-type="string">
            <text:p>-</text:p>
          </table:table-cell>
          <table:table-cell table:style-name="ce147" table:formula="of:=IFERROR(VLOOKUP([$Masterlist.$P155];[$Datasheet.$B$1:.$AV$9809];10;FALSE());&quot;-&quot;)" office:value-type="string" office:string-value="-" calcext:value-type="string">
            <text:p>-</text:p>
          </table:table-cell>
          <table:table-cell table:style-name="ce147" table:formula="of:=IFERROR(VLOOKUP([$Masterlist.$P155];[$Datasheet.$B$1:.$AV$9809];11;FALSE());&quot;-&quot;)" office:value-type="string" office:string-value="-" calcext:value-type="string">
            <text:p>-</text:p>
          </table:table-cell>
          <table:table-cell table:style-name="ce147" table:formula="of:=IFERROR(VLOOKUP([$Masterlist.$P155];[$Datasheet.$B$1:.$AV$9809];12;FALSE());&quot;-&quot;)" office:value-type="string" office:string-value="-" calcext:value-type="string">
            <text:p>-</text:p>
          </table:table-cell>
          <table:table-cell table:style-name="ce147" table:formula="of:=IFERROR(VLOOKUP([$Masterlist.$P155];[$Datasheet.$B$1:.$AV$9809];13;FALSE());&quot;-&quot;)" office:value-type="string" office:string-value="-" calcext:value-type="string">
            <text:p>-</text:p>
          </table:table-cell>
          <table:table-cell table:style-name="ce147" table:formula="of:=IFERROR(VLOOKUP([$Masterlist.$P155];[$Datasheet.$B$1:.$AV$9809];14;FALSE());&quot;-&quot;)" office:value-type="string" office:string-value="-" calcext:value-type="string">
            <text:p>-</text:p>
          </table:table-cell>
          <table:table-cell table:style-name="ce147" table:formula="of:=IFERROR(VLOOKUP([$Masterlist.$P155];[$Datasheet.$B$1:.$AV$9809];15;FALSE());&quot;-&quot;)" office:value-type="string" office:string-value="-" calcext:value-type="string">
            <text:p>-</text:p>
          </table:table-cell>
          <table:table-cell table:style-name="ce147" table:formula="of:=IFERROR(VLOOKUP([$Masterlist.$P155];[$Datasheet.$B$1:.$AV$9809];16;FALSE());&quot;-&quot;)" office:value-type="string" office:string-value="-" calcext:value-type="string">
            <text:p>-</text:p>
          </table:table-cell>
          <table:table-cell table:style-name="ce147" table:formula="of:=IFERROR(VLOOKUP([$Masterlist.$P155];[$Datasheet.$B$1:.$AV$9809];17;FALSE());&quot;-&quot;)" office:value-type="string" office:string-value="-" calcext:value-type="string">
            <text:p>-</text:p>
          </table:table-cell>
          <table:table-cell table:style-name="ce147" table:formula="of:=IFERROR(VLOOKUP([$Masterlist.$P155];[$Datasheet.$B$1:.$AV$9809];18;FALSE());&quot;-&quot;)" office:value-type="string" office:string-value="-" calcext:value-type="string">
            <text:p>-</text:p>
          </table:table-cell>
          <table:table-cell table:style-name="ce147" table:formula="of:=IFERROR(VLOOKUP([$Masterlist.$P155];[$Datasheet.$B$1:.$AV$9809];19;FALSE());&quot;-&quot;)" office:value-type="string" office:string-value="-" calcext:value-type="string">
            <text:p>-</text:p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/>
          <table:table-cell table:style-name="ce50" table:number-columns-repeated="12"/>
          <table:table-cell table:style-name="ce92"/>
          <table:table-cell table:style-name="ce112" office:value-type="string" calcext:value-type="string">
            <text:p>Shardoné Cronje</text:p>
          </table:table-cell>
          <table:table-cell table:style-name="ce13" table:formula="of:=IF(ISNUMBER(MATCH([.P156];[$Datasheet.$B$1:.$B$9809];0));&quot;✓&quot;;&quot;x&quot;)" office:value-type="string" office:string-value="✓" calcext:value-type="string">
            <text:p>✓</text:p>
          </table:table-cell>
          <table:table-cell table:style-name="ce147" table:formula="of:=IFERROR(VLOOKUP([$Masterlist.$P156];[$Datasheet.$B$1:.$AV$9809];2;FALSE());&quot;-&quot;)" office:value-type="string" office:string-value="-" calcext:value-type="string">
            <text:p>-</text:p>
          </table:table-cell>
          <table:table-cell table:style-name="ce147" table:formula="of:=IFERROR(VLOOKUP([$Masterlist.$P156];[$Datasheet.$B$1:.$AV$9809];3;FALSE());&quot;-&quot;)" office:value-type="float" office:value="1" calcext:value-type="float">
            <text:p>1</text:p>
          </table:table-cell>
          <table:table-cell table:style-name="ce147" table:formula="of:=IFERROR(VLOOKUP([$Masterlist.$P156];[$Datasheet.$B$1:.$AV$9809];4;FALSE());&quot;-&quot;)" office:value-type="float" office:value="1" calcext:value-type="float">
            <text:p>1</text:p>
          </table:table-cell>
          <table:table-cell table:style-name="ce147" table:formula="of:=IFERROR(VLOOKUP([$Masterlist.$P156];[$Datasheet.$B$1:.$AV$9809];5;FALSE());&quot;-&quot;)" office:value-type="float" office:value="1" calcext:value-type="float">
            <text:p>1</text:p>
          </table:table-cell>
          <table:table-cell table:style-name="ce195" table:formula="of:=IFERROR(VLOOKUP([$Masterlist.$P156];[$Datasheet.$B$1:.$AV$9809];6;FALSE());&quot;-&quot;)" office:value-type="float" office:value="1" calcext:value-type="float">
            <text:p>1</text:p>
          </table:table-cell>
          <table:table-cell table:style-name="ce147" table:formula="of:=IFERROR(VLOOKUP([$Masterlist.$P156];[$Datasheet.$B$1:.$AV$9809];7;FALSE());&quot;-&quot;)" office:value-type="float" office:value="1" calcext:value-type="float">
            <text:p>1</text:p>
          </table:table-cell>
          <table:table-cell table:style-name="ce147" table:formula="of:=IFERROR(VLOOKUP([$Masterlist.$P156];[$Datasheet.$B$1:.$AV$9809];8;FALSE());&quot;-&quot;)" office:value-type="float" office:value="1" calcext:value-type="float">
            <text:p>1</text:p>
          </table:table-cell>
          <table:table-cell table:style-name="ce147" table:formula="of:=IFERROR(VLOOKUP([$Masterlist.$P156];[$Datasheet.$B$1:.$AV$9809];9;FALSE());&quot;-&quot;)" office:value-type="float" office:value="1" calcext:value-type="float">
            <text:p>1</text:p>
          </table:table-cell>
          <table:table-cell table:style-name="ce147" table:formula="of:=IFERROR(VLOOKUP([$Masterlist.$P156];[$Datasheet.$B$1:.$AV$9809];10;FALSE());&quot;-&quot;)" office:value-type="float" office:value="1" calcext:value-type="float">
            <text:p>1</text:p>
          </table:table-cell>
          <table:table-cell table:style-name="ce147" table:formula="of:=IFERROR(VLOOKUP([$Masterlist.$P156];[$Datasheet.$B$1:.$AV$9809];11;FALSE());&quot;-&quot;)" office:value-type="float" office:value="1" calcext:value-type="float">
            <text:p>1</text:p>
          </table:table-cell>
          <table:table-cell table:style-name="ce147" table:formula="of:=IFERROR(VLOOKUP([$Masterlist.$P156];[$Datasheet.$B$1:.$AV$9809];12;FALSE());&quot;-&quot;)" office:value-type="float" office:value="1" calcext:value-type="float">
            <text:p>1</text:p>
          </table:table-cell>
          <table:table-cell table:style-name="ce147" table:formula="of:=IFERROR(VLOOKUP([$Masterlist.$P156];[$Datasheet.$B$1:.$AV$9809];13;FALSE());&quot;-&quot;)" office:value-type="float" office:value="1" calcext:value-type="float">
            <text:p>1</text:p>
          </table:table-cell>
          <table:table-cell table:style-name="ce147" table:formula="of:=IFERROR(VLOOKUP([$Masterlist.$P156];[$Datasheet.$B$1:.$AV$9809];14;FALSE());&quot;-&quot;)" office:value-type="float" office:value="0" calcext:value-type="float">
            <text:p/>
          </table:table-cell>
          <table:table-cell table:style-name="ce147" table:formula="of:=IFERROR(VLOOKUP([$Masterlist.$P156];[$Datasheet.$B$1:.$AV$9809];15;FALSE());&quot;-&quot;)" office:value-type="float" office:value="0" calcext:value-type="float">
            <text:p/>
          </table:table-cell>
          <table:table-cell table:style-name="ce147" table:formula="of:=IFERROR(VLOOKUP([$Masterlist.$P156];[$Datasheet.$B$1:.$AV$9809];16;FALSE());&quot;-&quot;)" office:value-type="float" office:value="0" calcext:value-type="float">
            <text:p/>
          </table:table-cell>
          <table:table-cell table:style-name="ce147" table:formula="of:=IFERROR(VLOOKUP([$Masterlist.$P156];[$Datasheet.$B$1:.$AV$9809];17;FALSE());&quot;-&quot;)" office:value-type="float" office:value="0" calcext:value-type="float">
            <text:p/>
          </table:table-cell>
          <table:table-cell table:style-name="ce147" table:formula="of:=IFERROR(VLOOKUP([$Masterlist.$P156];[$Datasheet.$B$1:.$AV$9809];18;FALSE());&quot;-&quot;)" office:value-type="float" office:value="0" calcext:value-type="float">
            <text:p/>
          </table:table-cell>
          <table:table-cell table:style-name="ce147" table:formula="of:=IFERROR(VLOOKUP([$Masterlist.$P156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AL</text:p>
          </table:table-cell>
          <table:table-cell table:style-name="ce50" office:value-type="string" calcext:value-type="string">
            <text:p>yes</text:p>
          </table:table-cell>
          <table:table-cell table:style-name="ce50" table:number-columns-repeated="11"/>
          <table:table-cell table:style-name="ce92" office:value-type="string" calcext:value-type="string">
            <text:p>LED, Broadcast</text:p>
          </table:table-cell>
          <table:table-cell table:style-name="ce113" office:value-type="string" calcext:value-type="string">
            <text:p>Lane Heystek</text:p>
          </table:table-cell>
          <table:table-cell table:style-name="ce13" table:formula="of:=IF(ISNUMBER(MATCH([.P157];[$Datasheet.$B$1:.$B$9809];0));&quot;✓&quot;;&quot;x&quot;)" office:value-type="string" office:string-value="x" calcext:value-type="string">
            <text:p>x</text:p>
          </table:table-cell>
          <table:table-cell table:style-name="ce147" table:formula="of:=IFERROR(VLOOKUP([$Masterlist.$P157];[$Datasheet.$B$1:.$AV$9809];2;FALSE());&quot;-&quot;)" office:value-type="string" office:string-value="-" calcext:value-type="string">
            <text:p>-</text:p>
          </table:table-cell>
          <table:table-cell table:style-name="ce147" table:formula="of:=IFERROR(VLOOKUP([$Masterlist.$P157];[$Datasheet.$B$1:.$AV$9809];3;FALSE());&quot;-&quot;)" office:value-type="string" office:string-value="-" calcext:value-type="string">
            <text:p>-</text:p>
          </table:table-cell>
          <table:table-cell table:style-name="ce147" table:formula="of:=IFERROR(VLOOKUP([$Masterlist.$P157];[$Datasheet.$B$1:.$AV$9809];4;FALSE());&quot;-&quot;)" office:value-type="string" office:string-value="-" calcext:value-type="string">
            <text:p>-</text:p>
          </table:table-cell>
          <table:table-cell table:style-name="ce147" table:formula="of:=IFERROR(VLOOKUP([$Masterlist.$P157];[$Datasheet.$B$1:.$AV$9809];5;FALSE());&quot;-&quot;)" office:value-type="string" office:string-value="-" calcext:value-type="string">
            <text:p>-</text:p>
          </table:table-cell>
          <table:table-cell table:style-name="ce195" table:formula="of:=IFERROR(VLOOKUP([$Masterlist.$P157];[$Datasheet.$B$1:.$AV$9809];6;FALSE());&quot;-&quot;)" office:value-type="string" office:string-value="-" calcext:value-type="string">
            <text:p>-</text:p>
          </table:table-cell>
          <table:table-cell table:style-name="ce147" table:formula="of:=IFERROR(VLOOKUP([$Masterlist.$P157];[$Datasheet.$B$1:.$AV$9809];7;FALSE());&quot;-&quot;)" office:value-type="string" office:string-value="-" calcext:value-type="string">
            <text:p>-</text:p>
          </table:table-cell>
          <table:table-cell table:style-name="ce147" table:formula="of:=IFERROR(VLOOKUP([$Masterlist.$P157];[$Datasheet.$B$1:.$AV$9809];8;FALSE());&quot;-&quot;)" office:value-type="string" office:string-value="-" calcext:value-type="string">
            <text:p>-</text:p>
          </table:table-cell>
          <table:table-cell table:style-name="ce147" table:formula="of:=IFERROR(VLOOKUP([$Masterlist.$P157];[$Datasheet.$B$1:.$AV$9809];9;FALSE());&quot;-&quot;)" office:value-type="string" office:string-value="-" calcext:value-type="string">
            <text:p>-</text:p>
          </table:table-cell>
          <table:table-cell table:style-name="ce147" table:formula="of:=IFERROR(VLOOKUP([$Masterlist.$P157];[$Datasheet.$B$1:.$AV$9809];10;FALSE());&quot;-&quot;)" office:value-type="string" office:string-value="-" calcext:value-type="string">
            <text:p>-</text:p>
          </table:table-cell>
          <table:table-cell table:style-name="ce147" table:formula="of:=IFERROR(VLOOKUP([$Masterlist.$P157];[$Datasheet.$B$1:.$AV$9809];11;FALSE());&quot;-&quot;)" office:value-type="string" office:string-value="-" calcext:value-type="string">
            <text:p>-</text:p>
          </table:table-cell>
          <table:table-cell table:style-name="ce147" table:formula="of:=IFERROR(VLOOKUP([$Masterlist.$P157];[$Datasheet.$B$1:.$AV$9809];12;FALSE());&quot;-&quot;)" office:value-type="string" office:string-value="-" calcext:value-type="string">
            <text:p>-</text:p>
          </table:table-cell>
          <table:table-cell table:style-name="ce147" table:formula="of:=IFERROR(VLOOKUP([$Masterlist.$P157];[$Datasheet.$B$1:.$AV$9809];13;FALSE());&quot;-&quot;)" office:value-type="string" office:string-value="-" calcext:value-type="string">
            <text:p>-</text:p>
          </table:table-cell>
          <table:table-cell table:style-name="ce147" table:formula="of:=IFERROR(VLOOKUP([$Masterlist.$P157];[$Datasheet.$B$1:.$AV$9809];14;FALSE());&quot;-&quot;)" office:value-type="string" office:string-value="-" calcext:value-type="string">
            <text:p>-</text:p>
          </table:table-cell>
          <table:table-cell table:style-name="ce147" table:formula="of:=IFERROR(VLOOKUP([$Masterlist.$P157];[$Datasheet.$B$1:.$AV$9809];15;FALSE());&quot;-&quot;)" office:value-type="string" office:string-value="-" calcext:value-type="string">
            <text:p>-</text:p>
          </table:table-cell>
          <table:table-cell table:style-name="ce147" table:formula="of:=IFERROR(VLOOKUP([$Masterlist.$P157];[$Datasheet.$B$1:.$AV$9809];16;FALSE());&quot;-&quot;)" office:value-type="string" office:string-value="-" calcext:value-type="string">
            <text:p>-</text:p>
          </table:table-cell>
          <table:table-cell table:style-name="ce147" table:formula="of:=IFERROR(VLOOKUP([$Masterlist.$P157];[$Datasheet.$B$1:.$AV$9809];17;FALSE());&quot;-&quot;)" office:value-type="string" office:string-value="-" calcext:value-type="string">
            <text:p>-</text:p>
          </table:table-cell>
          <table:table-cell table:style-name="ce147" table:formula="of:=IFERROR(VLOOKUP([$Masterlist.$P157];[$Datasheet.$B$1:.$AV$9809];18;FALSE());&quot;-&quot;)" office:value-type="string" office:string-value="-" calcext:value-type="string">
            <text:p>-</text:p>
          </table:table-cell>
          <table:table-cell table:style-name="ce147" table:formula="of:=IFERROR(VLOOKUP([$Masterlist.$P157];[$Datasheet.$B$1:.$AV$9809];19;FALSE());&quot;-&quot;)" office:value-type="string" office:string-value="-" calcext:value-type="string">
            <text:p>-</text:p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office:value-type="string" calcext:value-type="string">
            <text:p>yes</text:p>
          </table:table-cell>
          <table:table-cell table:style-name="ce50" table:number-columns-repeated="11"/>
          <table:table-cell table:style-name="ce92" office:value-type="string" calcext:value-type="string">
            <text:p>ProPresenter / Resi</text:p>
          </table:table-cell>
          <table:table-cell table:style-name="ce8" office:value-type="string" calcext:value-type="string">
            <text:p>Vanessa Botsime</text:p>
          </table:table-cell>
          <table:table-cell table:style-name="ce13" table:formula="of:=IF(ISNUMBER(MATCH([.P158];[$Datasheet.$B$1:.$B$9809];0));&quot;✓&quot;;&quot;x&quot;)" office:value-type="string" office:string-value="✓" calcext:value-type="string">
            <text:p>✓</text:p>
          </table:table-cell>
          <table:table-cell table:style-name="ce147" table:formula="of:=IFERROR(VLOOKUP([$Masterlist.$P158];[$Datasheet.$B$1:.$AV$9809];2;FALSE());&quot;-&quot;)" office:value-type="float" office:value="0" calcext:value-type="float">
            <text:p>0</text:p>
          </table:table-cell>
          <table:table-cell table:style-name="ce147" table:formula="of:=IFERROR(VLOOKUP([$Masterlist.$P158];[$Datasheet.$B$1:.$AV$9809];3;FALSE());&quot;-&quot;)" office:value-type="float" office:value="0" calcext:value-type="float">
            <text:p>0</text:p>
          </table:table-cell>
          <table:table-cell table:style-name="ce147" table:formula="of:=IFERROR(VLOOKUP([$Masterlist.$P158];[$Datasheet.$B$1:.$AV$9809];4;FALSE());&quot;-&quot;)" office:value-type="float" office:value="0" calcext:value-type="float">
            <text:p>0</text:p>
          </table:table-cell>
          <table:table-cell table:style-name="ce147" table:formula="of:=IFERROR(VLOOKUP([$Masterlist.$P158];[$Datasheet.$B$1:.$AV$9809];5;FALSE());&quot;-&quot;)" office:value-type="float" office:value="1" calcext:value-type="float">
            <text:p>1</text:p>
          </table:table-cell>
          <table:table-cell table:style-name="ce195" table:formula="of:=IFERROR(VLOOKUP([$Masterlist.$P158];[$Datasheet.$B$1:.$AV$9809];6;FALSE());&quot;-&quot;)" office:value-type="float" office:value="0" calcext:value-type="float">
            <text:p>0</text:p>
          </table:table-cell>
          <table:table-cell table:style-name="ce147" table:formula="of:=IFERROR(VLOOKUP([$Masterlist.$P158];[$Datasheet.$B$1:.$AV$9809];7;FALSE());&quot;-&quot;)" office:value-type="float" office:value="1" calcext:value-type="float">
            <text:p>1</text:p>
          </table:table-cell>
          <table:table-cell table:style-name="ce147" table:formula="of:=IFERROR(VLOOKUP([$Masterlist.$P158];[$Datasheet.$B$1:.$AV$9809];8;FALSE());&quot;-&quot;)" office:value-type="float" office:value="0" calcext:value-type="float">
            <text:p>0</text:p>
          </table:table-cell>
          <table:table-cell table:style-name="ce147" table:formula="of:=IFERROR(VLOOKUP([$Masterlist.$P158];[$Datasheet.$B$1:.$AV$9809];9;FALSE());&quot;-&quot;)" office:value-type="float" office:value="0" calcext:value-type="float">
            <text:p>0</text:p>
          </table:table-cell>
          <table:table-cell table:style-name="ce147" table:formula="of:=IFERROR(VLOOKUP([$Masterlist.$P158];[$Datasheet.$B$1:.$AV$9809];10;FALSE());&quot;-&quot;)" office:value-type="float" office:value="0" calcext:value-type="float">
            <text:p>0</text:p>
          </table:table-cell>
          <table:table-cell table:style-name="ce147" table:formula="of:=IFERROR(VLOOKUP([$Masterlist.$P158];[$Datasheet.$B$1:.$AV$9809];11;FALSE());&quot;-&quot;)" office:value-type="float" office:value="1" calcext:value-type="float">
            <text:p>1</text:p>
          </table:table-cell>
          <table:table-cell table:style-name="ce147" table:formula="of:=IFERROR(VLOOKUP([$Masterlist.$P158];[$Datasheet.$B$1:.$AV$9809];12;FALSE());&quot;-&quot;)" office:value-type="float" office:value="0" calcext:value-type="float">
            <text:p>0</text:p>
          </table:table-cell>
          <table:table-cell table:style-name="ce147" table:formula="of:=IFERROR(VLOOKUP([$Masterlist.$P158];[$Datasheet.$B$1:.$AV$9809];13;FALSE());&quot;-&quot;)" office:value-type="float" office:value="1" calcext:value-type="float">
            <text:p>1</text:p>
          </table:table-cell>
          <table:table-cell table:style-name="ce147" table:formula="of:=IFERROR(VLOOKUP([$Masterlist.$P158];[$Datasheet.$B$1:.$AV$9809];14;FALSE());&quot;-&quot;)" office:value-type="float" office:value="0" calcext:value-type="float">
            <text:p>0</text:p>
          </table:table-cell>
          <table:table-cell table:style-name="ce147" table:formula="of:=IFERROR(VLOOKUP([$Masterlist.$P158];[$Datasheet.$B$1:.$AV$9809];15;FALSE());&quot;-&quot;)" office:value-type="float" office:value="0" calcext:value-type="float">
            <text:p>0</text:p>
          </table:table-cell>
          <table:table-cell table:style-name="ce147" table:formula="of:=IFERROR(VLOOKUP([$Masterlist.$P158];[$Datasheet.$B$1:.$AV$9809];16;FALSE());&quot;-&quot;)" office:value-type="float" office:value="0" calcext:value-type="float">
            <text:p/>
          </table:table-cell>
          <table:table-cell table:style-name="ce147" table:formula="of:=IFERROR(VLOOKUP([$Masterlist.$P158];[$Datasheet.$B$1:.$AV$9809];17;FALSE());&quot;-&quot;)" office:value-type="float" office:value="0" calcext:value-type="float">
            <text:p/>
          </table:table-cell>
          <table:table-cell table:style-name="ce147" table:formula="of:=IFERROR(VLOOKUP([$Masterlist.$P158];[$Datasheet.$B$1:.$AV$9809];18;FALSE());&quot;-&quot;)" office:value-type="float" office:value="0" calcext:value-type="float">
            <text:p/>
          </table:table-cell>
          <table:table-cell table:style-name="ce147" table:formula="of:=IFERROR(VLOOKUP([$Masterlist.$P158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number-columns-repeated="3" table:style-name="ce50" office:value-type="string" calcext:value-type="string">
            <text:p>yes</text:p>
          </table:table-cell>
          <table:table-cell table:style-name="ce50"/>
          <table:table-cell table:style-name="ce71"/>
          <table:table-cell table:style-name="ce50" table:number-columns-repeated="7"/>
          <table:table-cell table:style-name="ce92" office:value-type="string" calcext:value-type="string">
            <text:p>ProPresenter / Resi</text:p>
          </table:table-cell>
          <table:table-cell table:style-name="ce8" office:value-type="string" calcext:value-type="string">
            <text:p>Danielle Rossouw</text:p>
          </table:table-cell>
          <table:table-cell table:style-name="ce13" table:formula="of:=IF(ISNUMBER(MATCH([.P159];[$Datasheet.$B$1:.$B$9809];0));&quot;✓&quot;;&quot;x&quot;)" office:value-type="string" office:string-value="✓" calcext:value-type="string">
            <text:p>✓</text:p>
          </table:table-cell>
          <table:table-cell table:style-name="ce147" table:formula="of:=IFERROR(VLOOKUP([$Masterlist.$P159];[$Datasheet.$B$1:.$AV$9809];2;FALSE());&quot;-&quot;)" office:value-type="float" office:value="0" calcext:value-type="float">
            <text:p>0</text:p>
          </table:table-cell>
          <table:table-cell table:style-name="ce147" table:formula="of:=IFERROR(VLOOKUP([$Masterlist.$P159];[$Datasheet.$B$1:.$AV$9809];3;FALSE());&quot;-&quot;)" office:value-type="float" office:value="1" calcext:value-type="float">
            <text:p>1</text:p>
          </table:table-cell>
          <table:table-cell table:style-name="ce147" table:formula="of:=IFERROR(VLOOKUP([$Masterlist.$P159];[$Datasheet.$B$1:.$AV$9809];4;FALSE());&quot;-&quot;)" office:value-type="float" office:value="0" calcext:value-type="float">
            <text:p>0</text:p>
          </table:table-cell>
          <table:table-cell table:style-name="ce147" table:formula="of:=IFERROR(VLOOKUP([$Masterlist.$P159];[$Datasheet.$B$1:.$AV$9809];5;FALSE());&quot;-&quot;)" office:value-type="float" office:value="0" calcext:value-type="float">
            <text:p>0</text:p>
          </table:table-cell>
          <table:table-cell table:style-name="ce195" table:formula="of:=IFERROR(VLOOKUP([$Masterlist.$P159];[$Datasheet.$B$1:.$AV$9809];6;FALSE());&quot;-&quot;)" office:value-type="float" office:value="0" calcext:value-type="float">
            <text:p>0</text:p>
          </table:table-cell>
          <table:table-cell table:style-name="ce147" table:formula="of:=IFERROR(VLOOKUP([$Masterlist.$P159];[$Datasheet.$B$1:.$AV$9809];7;FALSE());&quot;-&quot;)" office:value-type="float" office:value="0" calcext:value-type="float">
            <text:p>0</text:p>
          </table:table-cell>
          <table:table-cell table:style-name="ce147" table:formula="of:=IFERROR(VLOOKUP([$Masterlist.$P159];[$Datasheet.$B$1:.$AV$9809];8;FALSE());&quot;-&quot;)" office:value-type="float" office:value="0" calcext:value-type="float">
            <text:p>0</text:p>
          </table:table-cell>
          <table:table-cell table:style-name="ce147" table:formula="of:=IFERROR(VLOOKUP([$Masterlist.$P159];[$Datasheet.$B$1:.$AV$9809];9;FALSE());&quot;-&quot;)" office:value-type="float" office:value="1" calcext:value-type="float">
            <text:p>1</text:p>
          </table:table-cell>
          <table:table-cell table:style-name="ce147" table:formula="of:=IFERROR(VLOOKUP([$Masterlist.$P159];[$Datasheet.$B$1:.$AV$9809];10;FALSE());&quot;-&quot;)" office:value-type="float" office:value="0" calcext:value-type="float">
            <text:p>0</text:p>
          </table:table-cell>
          <table:table-cell table:style-name="ce147" table:formula="of:=IFERROR(VLOOKUP([$Masterlist.$P159];[$Datasheet.$B$1:.$AV$9809];11;FALSE());&quot;-&quot;)" office:value-type="float" office:value="1" calcext:value-type="float">
            <text:p>1</text:p>
          </table:table-cell>
          <table:table-cell table:style-name="ce147" table:formula="of:=IFERROR(VLOOKUP([$Masterlist.$P159];[$Datasheet.$B$1:.$AV$9809];12;FALSE());&quot;-&quot;)" office:value-type="float" office:value="0" calcext:value-type="float">
            <text:p>0</text:p>
          </table:table-cell>
          <table:table-cell table:style-name="ce147" table:formula="of:=IFERROR(VLOOKUP([$Masterlist.$P159];[$Datasheet.$B$1:.$AV$9809];13;FALSE());&quot;-&quot;)" office:value-type="float" office:value="0" calcext:value-type="float">
            <text:p>0</text:p>
          </table:table-cell>
          <table:table-cell table:style-name="ce147" table:formula="of:=IFERROR(VLOOKUP([$Masterlist.$P159];[$Datasheet.$B$1:.$AV$9809];14;FALSE());&quot;-&quot;)" office:value-type="float" office:value="0" calcext:value-type="float">
            <text:p>0</text:p>
          </table:table-cell>
          <table:table-cell table:style-name="ce147" table:formula="of:=IFERROR(VLOOKUP([$Masterlist.$P159];[$Datasheet.$B$1:.$AV$9809];15;FALSE());&quot;-&quot;)" office:value-type="float" office:value="1" calcext:value-type="float">
            <text:p>1</text:p>
          </table:table-cell>
          <table:table-cell table:style-name="ce147" table:formula="of:=IFERROR(VLOOKUP([$Masterlist.$P159];[$Datasheet.$B$1:.$AV$9809];16;FALSE());&quot;-&quot;)" office:value-type="float" office:value="0" calcext:value-type="float">
            <text:p/>
          </table:table-cell>
          <table:table-cell table:style-name="ce147" table:formula="of:=IFERROR(VLOOKUP([$Masterlist.$P159];[$Datasheet.$B$1:.$AV$9809];17;FALSE());&quot;-&quot;)" office:value-type="float" office:value="0" calcext:value-type="float">
            <text:p/>
          </table:table-cell>
          <table:table-cell table:style-name="ce147" table:formula="of:=IFERROR(VLOOKUP([$Masterlist.$P159];[$Datasheet.$B$1:.$AV$9809];18;FALSE());&quot;-&quot;)" office:value-type="float" office:value="0" calcext:value-type="float">
            <text:p/>
          </table:table-cell>
          <table:table-cell table:style-name="ce147" table:formula="of:=IFERROR(VLOOKUP([$Masterlist.$P159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table:number-columns-repeated="4"/>
          <table:table-cell table:style-name="ce71" office:value-type="string" calcext:value-type="string">
            <text:p>yes</text:p>
          </table:table-cell>
          <table:table-cell table:style-name="ce50" table:number-columns-repeated="7"/>
          <table:table-cell table:style-name="ce92" office:value-type="string" calcext:value-type="string">
            <text:p>ProPresenter / Resi</text:p>
          </table:table-cell>
          <table:table-cell table:style-name="ce8" office:value-type="string" calcext:value-type="string">
            <text:p>Jaco Bezuidenhout</text:p>
          </table:table-cell>
          <table:table-cell table:style-name="ce13" table:formula="of:=IF(ISNUMBER(MATCH([.P160];[$Datasheet.$B$1:.$B$9809];0));&quot;✓&quot;;&quot;x&quot;)" office:value-type="string" office:string-value="✓" calcext:value-type="string">
            <text:p>✓</text:p>
          </table:table-cell>
          <table:table-cell table:style-name="ce147" table:formula="of:=IFERROR(VLOOKUP([$Masterlist.$P160];[$Datasheet.$B$1:.$AV$9809];2;FALSE());&quot;-&quot;)" office:value-type="float" office:value="1" calcext:value-type="float">
            <text:p>1</text:p>
          </table:table-cell>
          <table:table-cell table:style-name="ce147" table:formula="of:=IFERROR(VLOOKUP([$Masterlist.$P160];[$Datasheet.$B$1:.$AV$9809];3;FALSE());&quot;-&quot;)" office:value-type="float" office:value="1" calcext:value-type="float">
            <text:p>1</text:p>
          </table:table-cell>
          <table:table-cell table:style-name="ce147" table:formula="of:=IFERROR(VLOOKUP([$Masterlist.$P160];[$Datasheet.$B$1:.$AV$9809];4;FALSE());&quot;-&quot;)" office:value-type="float" office:value="1" calcext:value-type="float">
            <text:p>1</text:p>
          </table:table-cell>
          <table:table-cell table:style-name="ce147" table:formula="of:=IFERROR(VLOOKUP([$Masterlist.$P160];[$Datasheet.$B$1:.$AV$9809];5;FALSE());&quot;-&quot;)" office:value-type="float" office:value="1" calcext:value-type="float">
            <text:p>1</text:p>
          </table:table-cell>
          <table:table-cell table:style-name="ce195" table:formula="of:=IFERROR(VLOOKUP([$Masterlist.$P160];[$Datasheet.$B$1:.$AV$9809];6;FALSE());&quot;-&quot;)" office:value-type="float" office:value="1" calcext:value-type="float">
            <text:p>1</text:p>
          </table:table-cell>
          <table:table-cell table:style-name="ce147" table:formula="of:=IFERROR(VLOOKUP([$Masterlist.$P160];[$Datasheet.$B$1:.$AV$9809];7;FALSE());&quot;-&quot;)" office:value-type="float" office:value="1" calcext:value-type="float">
            <text:p>1</text:p>
          </table:table-cell>
          <table:table-cell table:style-name="ce147" table:formula="of:=IFERROR(VLOOKUP([$Masterlist.$P160];[$Datasheet.$B$1:.$AV$9809];8;FALSE());&quot;-&quot;)" office:value-type="float" office:value="1" calcext:value-type="float">
            <text:p>1</text:p>
          </table:table-cell>
          <table:table-cell table:style-name="ce147" table:formula="of:=IFERROR(VLOOKUP([$Masterlist.$P160];[$Datasheet.$B$1:.$AV$9809];9;FALSE());&quot;-&quot;)" office:value-type="float" office:value="1" calcext:value-type="float">
            <text:p>1</text:p>
          </table:table-cell>
          <table:table-cell table:style-name="ce147" table:formula="of:=IFERROR(VLOOKUP([$Masterlist.$P160];[$Datasheet.$B$1:.$AV$9809];10;FALSE());&quot;-&quot;)" office:value-type="float" office:value="1" calcext:value-type="float">
            <text:p>1</text:p>
          </table:table-cell>
          <table:table-cell table:style-name="ce147" table:formula="of:=IFERROR(VLOOKUP([$Masterlist.$P160];[$Datasheet.$B$1:.$AV$9809];11;FALSE());&quot;-&quot;)" office:value-type="float" office:value="1" calcext:value-type="float">
            <text:p>1</text:p>
          </table:table-cell>
          <table:table-cell table:style-name="ce147" table:formula="of:=IFERROR(VLOOKUP([$Masterlist.$P160];[$Datasheet.$B$1:.$AV$9809];12;FALSE());&quot;-&quot;)" office:value-type="float" office:value="1" calcext:value-type="float">
            <text:p>1</text:p>
          </table:table-cell>
          <table:table-cell table:style-name="ce147" table:formula="of:=IFERROR(VLOOKUP([$Masterlist.$P160];[$Datasheet.$B$1:.$AV$9809];13;FALSE());&quot;-&quot;)" office:value-type="float" office:value="1" calcext:value-type="float">
            <text:p>1</text:p>
          </table:table-cell>
          <table:table-cell table:style-name="ce147" table:formula="of:=IFERROR(VLOOKUP([$Masterlist.$P160];[$Datasheet.$B$1:.$AV$9809];14;FALSE());&quot;-&quot;)" office:value-type="float" office:value="1" calcext:value-type="float">
            <text:p>1</text:p>
          </table:table-cell>
          <table:table-cell table:style-name="ce147" table:formula="of:=IFERROR(VLOOKUP([$Masterlist.$P160];[$Datasheet.$B$1:.$AV$9809];15;FALSE());&quot;-&quot;)" office:value-type="float" office:value="1" calcext:value-type="float">
            <text:p>1</text:p>
          </table:table-cell>
          <table:table-cell table:style-name="ce147" table:formula="of:=IFERROR(VLOOKUP([$Masterlist.$P160];[$Datasheet.$B$1:.$AV$9809];16;FALSE());&quot;-&quot;)" office:value-type="float" office:value="0" calcext:value-type="float">
            <text:p/>
          </table:table-cell>
          <table:table-cell table:style-name="ce147" table:formula="of:=IFERROR(VLOOKUP([$Masterlist.$P160];[$Datasheet.$B$1:.$AV$9809];17;FALSE());&quot;-&quot;)" office:value-type="float" office:value="0" calcext:value-type="float">
            <text:p/>
          </table:table-cell>
          <table:table-cell table:style-name="ce147" table:formula="of:=IFERROR(VLOOKUP([$Masterlist.$P160];[$Datasheet.$B$1:.$AV$9809];18;FALSE());&quot;-&quot;)" office:value-type="float" office:value="0" calcext:value-type="float">
            <text:p/>
          </table:table-cell>
          <table:table-cell table:style-name="ce147" table:formula="of:=IFERROR(VLOOKUP([$Masterlist.$P160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table:number-columns-repeated="4"/>
          <table:table-cell table:style-name="ce71" office:value-type="string" calcext:value-type="string">
            <text:p>yes</text:p>
          </table:table-cell>
          <table:table-cell table:style-name="ce50" table:number-columns-repeated="7"/>
          <table:table-cell table:style-name="ce92" office:value-type="string" calcext:value-type="string">
            <text:p>ProPresenter / Resi</text:p>
          </table:table-cell>
          <table:table-cell table:style-name="ce12" office:value-type="string" calcext:value-type="string">
            <text:p>Zioné Pretorius</text:p>
          </table:table-cell>
          <table:table-cell table:style-name="ce13" table:formula="of:=IF(ISNUMBER(MATCH([.P161];[$Datasheet.$B$1:.$B$9809];0));&quot;✓&quot;;&quot;x&quot;)" office:value-type="string" office:string-value="✓" calcext:value-type="string">
            <text:p>✓</text:p>
          </table:table-cell>
          <table:table-cell table:style-name="ce147" table:formula="of:=IFERROR(VLOOKUP([$Masterlist.$P161];[$Datasheet.$B$1:.$AV$9809];2;FALSE());&quot;-&quot;)" office:value-type="float" office:value="0" calcext:value-type="float">
            <text:p>0</text:p>
          </table:table-cell>
          <table:table-cell table:style-name="ce147" table:formula="of:=IFERROR(VLOOKUP([$Masterlist.$P161];[$Datasheet.$B$1:.$AV$9809];3;FALSE());&quot;-&quot;)" office:value-type="float" office:value="0" calcext:value-type="float">
            <text:p>0</text:p>
          </table:table-cell>
          <table:table-cell table:style-name="ce147" table:formula="of:=IFERROR(VLOOKUP([$Masterlist.$P161];[$Datasheet.$B$1:.$AV$9809];4;FALSE());&quot;-&quot;)" office:value-type="float" office:value="1" calcext:value-type="float">
            <text:p>1</text:p>
          </table:table-cell>
          <table:table-cell table:style-name="ce147" table:formula="of:=IFERROR(VLOOKUP([$Masterlist.$P161];[$Datasheet.$B$1:.$AV$9809];5;FALSE());&quot;-&quot;)" office:value-type="float" office:value="1" calcext:value-type="float">
            <text:p>1</text:p>
          </table:table-cell>
          <table:table-cell table:style-name="ce195" table:formula="of:=IFERROR(VLOOKUP([$Masterlist.$P161];[$Datasheet.$B$1:.$AV$9809];6;FALSE());&quot;-&quot;)" office:value-type="float" office:value="1" calcext:value-type="float">
            <text:p>1</text:p>
          </table:table-cell>
          <table:table-cell table:style-name="ce147" table:formula="of:=IFERROR(VLOOKUP([$Masterlist.$P161];[$Datasheet.$B$1:.$AV$9809];7;FALSE());&quot;-&quot;)" office:value-type="float" office:value="1" calcext:value-type="float">
            <text:p>1</text:p>
          </table:table-cell>
          <table:table-cell table:style-name="ce147" table:formula="of:=IFERROR(VLOOKUP([$Masterlist.$P161];[$Datasheet.$B$1:.$AV$9809];8;FALSE());&quot;-&quot;)" office:value-type="float" office:value="1" calcext:value-type="float">
            <text:p>1</text:p>
          </table:table-cell>
          <table:table-cell table:style-name="ce147" table:formula="of:=IFERROR(VLOOKUP([$Masterlist.$P161];[$Datasheet.$B$1:.$AV$9809];9;FALSE());&quot;-&quot;)" office:value-type="float" office:value="1" calcext:value-type="float">
            <text:p>1</text:p>
          </table:table-cell>
          <table:table-cell table:style-name="ce147" table:formula="of:=IFERROR(VLOOKUP([$Masterlist.$P161];[$Datasheet.$B$1:.$AV$9809];10;FALSE());&quot;-&quot;)" office:value-type="float" office:value="1" calcext:value-type="float">
            <text:p>1</text:p>
          </table:table-cell>
          <table:table-cell table:style-name="ce147" table:formula="of:=IFERROR(VLOOKUP([$Masterlist.$P161];[$Datasheet.$B$1:.$AV$9809];11;FALSE());&quot;-&quot;)" office:value-type="float" office:value="1" calcext:value-type="float">
            <text:p>1</text:p>
          </table:table-cell>
          <table:table-cell table:style-name="ce147" table:formula="of:=IFERROR(VLOOKUP([$Masterlist.$P161];[$Datasheet.$B$1:.$AV$9809];12;FALSE());&quot;-&quot;)" office:value-type="float" office:value="1" calcext:value-type="float">
            <text:p>1</text:p>
          </table:table-cell>
          <table:table-cell table:style-name="ce147" table:formula="of:=IFERROR(VLOOKUP([$Masterlist.$P161];[$Datasheet.$B$1:.$AV$9809];13;FALSE());&quot;-&quot;)" office:value-type="float" office:value="1" calcext:value-type="float">
            <text:p>1</text:p>
          </table:table-cell>
          <table:table-cell table:style-name="ce147" table:formula="of:=IFERROR(VLOOKUP([$Masterlist.$P161];[$Datasheet.$B$1:.$AV$9809];14;FALSE());&quot;-&quot;)" office:value-type="float" office:value="1" calcext:value-type="float">
            <text:p>1</text:p>
          </table:table-cell>
          <table:table-cell table:style-name="ce147" table:formula="of:=IFERROR(VLOOKUP([$Masterlist.$P161];[$Datasheet.$B$1:.$AV$9809];15;FALSE());&quot;-&quot;)" office:value-type="float" office:value="1" calcext:value-type="float">
            <text:p>1</text:p>
          </table:table-cell>
          <table:table-cell table:style-name="ce147" table:formula="of:=IFERROR(VLOOKUP([$Masterlist.$P161];[$Datasheet.$B$1:.$AV$9809];16;FALSE());&quot;-&quot;)" office:value-type="float" office:value="0" calcext:value-type="float">
            <text:p/>
          </table:table-cell>
          <table:table-cell table:style-name="ce147" table:formula="of:=IFERROR(VLOOKUP([$Masterlist.$P161];[$Datasheet.$B$1:.$AV$9809];17;FALSE());&quot;-&quot;)" office:value-type="float" office:value="0" calcext:value-type="float">
            <text:p/>
          </table:table-cell>
          <table:table-cell table:style-name="ce147" table:formula="of:=IFERROR(VLOOKUP([$Masterlist.$P161];[$Datasheet.$B$1:.$AV$9809];18;FALSE());&quot;-&quot;)" office:value-type="float" office:value="0" calcext:value-type="float">
            <text:p/>
          </table:table-cell>
          <table:table-cell table:style-name="ce147" table:formula="of:=IFERROR(VLOOKUP([$Masterlist.$P161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table:number-columns-repeated="4"/>
          <table:table-cell table:style-name="ce71" office:value-type="string" calcext:value-type="string">
            <text:p>yes</text:p>
          </table:table-cell>
          <table:table-cell table:style-name="ce50" table:number-columns-repeated="7"/>
          <table:table-cell table:style-name="ce92" office:value-type="string" calcext:value-type="string">
            <text:p>ProPresenter / Resi</text:p>
          </table:table-cell>
          <table:table-cell table:style-name="ce8" office:value-type="string" calcext:value-type="string">
            <text:p>Zandri Urquhart</text:p>
          </table:table-cell>
          <table:table-cell table:style-name="ce13" table:formula="of:=IF(ISNUMBER(MATCH([.P162];[$Datasheet.$B$1:.$B$9809];0));&quot;✓&quot;;&quot;x&quot;)" office:value-type="string" office:string-value="✓" calcext:value-type="string">
            <text:p>✓</text:p>
          </table:table-cell>
          <table:table-cell table:style-name="ce147" table:formula="of:=IFERROR(VLOOKUP([$Masterlist.$P162];[$Datasheet.$B$1:.$AV$9809];2;FALSE());&quot;-&quot;)" office:value-type="float" office:value="0" calcext:value-type="float">
            <text:p>0</text:p>
          </table:table-cell>
          <table:table-cell table:style-name="ce147" table:formula="of:=IFERROR(VLOOKUP([$Masterlist.$P162];[$Datasheet.$B$1:.$AV$9809];3;FALSE());&quot;-&quot;)" office:value-type="float" office:value="0" calcext:value-type="float">
            <text:p>0</text:p>
          </table:table-cell>
          <table:table-cell table:style-name="ce147" table:formula="of:=IFERROR(VLOOKUP([$Masterlist.$P162];[$Datasheet.$B$1:.$AV$9809];4;FALSE());&quot;-&quot;)" office:value-type="float" office:value="1" calcext:value-type="float">
            <text:p>1</text:p>
          </table:table-cell>
          <table:table-cell table:style-name="ce147" table:formula="of:=IFERROR(VLOOKUP([$Masterlist.$P162];[$Datasheet.$B$1:.$AV$9809];5;FALSE());&quot;-&quot;)" office:value-type="float" office:value="1" calcext:value-type="float">
            <text:p>1</text:p>
          </table:table-cell>
          <table:table-cell table:style-name="ce195" table:formula="of:=IFERROR(VLOOKUP([$Masterlist.$P162];[$Datasheet.$B$1:.$AV$9809];6;FALSE());&quot;-&quot;)" office:value-type="float" office:value="1" calcext:value-type="float">
            <text:p>1</text:p>
          </table:table-cell>
          <table:table-cell table:style-name="ce147" table:formula="of:=IFERROR(VLOOKUP([$Masterlist.$P162];[$Datasheet.$B$1:.$AV$9809];7;FALSE());&quot;-&quot;)" office:value-type="float" office:value="1" calcext:value-type="float">
            <text:p>1</text:p>
          </table:table-cell>
          <table:table-cell table:style-name="ce147" table:formula="of:=IFERROR(VLOOKUP([$Masterlist.$P162];[$Datasheet.$B$1:.$AV$9809];8;FALSE());&quot;-&quot;)" office:value-type="float" office:value="0" calcext:value-type="float">
            <text:p>0</text:p>
          </table:table-cell>
          <table:table-cell table:style-name="ce147" table:formula="of:=IFERROR(VLOOKUP([$Masterlist.$P162];[$Datasheet.$B$1:.$AV$9809];9;FALSE());&quot;-&quot;)" office:value-type="float" office:value="0" calcext:value-type="float">
            <text:p>0</text:p>
          </table:table-cell>
          <table:table-cell table:style-name="ce147" table:formula="of:=IFERROR(VLOOKUP([$Masterlist.$P162];[$Datasheet.$B$1:.$AV$9809];10;FALSE());&quot;-&quot;)" office:value-type="float" office:value="1" calcext:value-type="float">
            <text:p>1</text:p>
          </table:table-cell>
          <table:table-cell table:style-name="ce147" table:formula="of:=IFERROR(VLOOKUP([$Masterlist.$P162];[$Datasheet.$B$1:.$AV$9809];11;FALSE());&quot;-&quot;)" office:value-type="float" office:value="1" calcext:value-type="float">
            <text:p>1</text:p>
          </table:table-cell>
          <table:table-cell table:style-name="ce147" table:formula="of:=IFERROR(VLOOKUP([$Masterlist.$P162];[$Datasheet.$B$1:.$AV$9809];12;FALSE());&quot;-&quot;)" office:value-type="float" office:value="1" calcext:value-type="float">
            <text:p>1</text:p>
          </table:table-cell>
          <table:table-cell table:style-name="ce147" table:formula="of:=IFERROR(VLOOKUP([$Masterlist.$P162];[$Datasheet.$B$1:.$AV$9809];13;FALSE());&quot;-&quot;)" office:value-type="float" office:value="1" calcext:value-type="float">
            <text:p>1</text:p>
          </table:table-cell>
          <table:table-cell table:style-name="ce147" table:formula="of:=IFERROR(VLOOKUP([$Masterlist.$P162];[$Datasheet.$B$1:.$AV$9809];14;FALSE());&quot;-&quot;)" office:value-type="float" office:value="1" calcext:value-type="float">
            <text:p>1</text:p>
          </table:table-cell>
          <table:table-cell table:style-name="ce147" table:formula="of:=IFERROR(VLOOKUP([$Masterlist.$P162];[$Datasheet.$B$1:.$AV$9809];15;FALSE());&quot;-&quot;)" office:value-type="float" office:value="1" calcext:value-type="float">
            <text:p>1</text:p>
          </table:table-cell>
          <table:table-cell table:style-name="ce147" table:formula="of:=IFERROR(VLOOKUP([$Masterlist.$P162];[$Datasheet.$B$1:.$AV$9809];16;FALSE());&quot;-&quot;)" office:value-type="float" office:value="0" calcext:value-type="float">
            <text:p/>
          </table:table-cell>
          <table:table-cell table:style-name="ce147" table:formula="of:=IFERROR(VLOOKUP([$Masterlist.$P162];[$Datasheet.$B$1:.$AV$9809];17;FALSE());&quot;-&quot;)" office:value-type="float" office:value="0" calcext:value-type="float">
            <text:p/>
          </table:table-cell>
          <table:table-cell table:style-name="ce147" table:formula="of:=IFERROR(VLOOKUP([$Masterlist.$P162];[$Datasheet.$B$1:.$AV$9809];18;FALSE());&quot;-&quot;)" office:value-type="float" office:value="0" calcext:value-type="float">
            <text:p/>
          </table:table-cell>
          <table:table-cell table:style-name="ce147" table:formula="of:=IFERROR(VLOOKUP([$Masterlist.$P162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table:number-columns-repeated="4"/>
          <table:table-cell table:style-name="ce71" office:value-type="string" calcext:value-type="string">
            <text:p>yes</text:p>
          </table:table-cell>
          <table:table-cell table:style-name="ce50" table:number-columns-repeated="7"/>
          <table:table-cell table:style-name="ce92" office:value-type="string" calcext:value-type="string">
            <text:p>ProPresenter / Resi</text:p>
          </table:table-cell>
          <table:table-cell table:style-name="ce8" office:value-type="string" calcext:value-type="string">
            <text:p>Shevonne Dick</text:p>
          </table:table-cell>
          <table:table-cell table:style-name="ce13" table:formula="of:=IF(ISNUMBER(MATCH([.P163];[$Datasheet.$B$1:.$B$9809];0));&quot;✓&quot;;&quot;x&quot;)" office:value-type="string" office:string-value="✓" calcext:value-type="string">
            <text:p>✓</text:p>
          </table:table-cell>
          <table:table-cell table:style-name="ce147" table:formula="of:=IFERROR(VLOOKUP([$Masterlist.$P163];[$Datasheet.$B$1:.$AV$9809];2;FALSE());&quot;-&quot;)" office:value-type="float" office:value="0" calcext:value-type="float">
            <text:p>0</text:p>
          </table:table-cell>
          <table:table-cell table:style-name="ce147" table:formula="of:=IFERROR(VLOOKUP([$Masterlist.$P163];[$Datasheet.$B$1:.$AV$9809];3;FALSE());&quot;-&quot;)" office:value-type="float" office:value="0" calcext:value-type="float">
            <text:p>0</text:p>
          </table:table-cell>
          <table:table-cell table:style-name="ce147" table:formula="of:=IFERROR(VLOOKUP([$Masterlist.$P163];[$Datasheet.$B$1:.$AV$9809];4;FALSE());&quot;-&quot;)" office:value-type="float" office:value="1" calcext:value-type="float">
            <text:p>1</text:p>
          </table:table-cell>
          <table:table-cell table:style-name="ce147" table:formula="of:=IFERROR(VLOOKUP([$Masterlist.$P163];[$Datasheet.$B$1:.$AV$9809];5;FALSE());&quot;-&quot;)" office:value-type="float" office:value="1" calcext:value-type="float">
            <text:p>1</text:p>
          </table:table-cell>
          <table:table-cell table:style-name="ce195" table:formula="of:=IFERROR(VLOOKUP([$Masterlist.$P163];[$Datasheet.$B$1:.$AV$9809];6;FALSE());&quot;-&quot;)" office:value-type="float" office:value="1" calcext:value-type="float">
            <text:p>1</text:p>
          </table:table-cell>
          <table:table-cell table:style-name="ce147" table:formula="of:=IFERROR(VLOOKUP([$Masterlist.$P163];[$Datasheet.$B$1:.$AV$9809];7;FALSE());&quot;-&quot;)" office:value-type="float" office:value="1" calcext:value-type="float">
            <text:p>1</text:p>
          </table:table-cell>
          <table:table-cell table:style-name="ce147" table:formula="of:=IFERROR(VLOOKUP([$Masterlist.$P163];[$Datasheet.$B$1:.$AV$9809];8;FALSE());&quot;-&quot;)" office:value-type="float" office:value="0" calcext:value-type="float">
            <text:p>0</text:p>
          </table:table-cell>
          <table:table-cell table:style-name="ce147" table:formula="of:=IFERROR(VLOOKUP([$Masterlist.$P163];[$Datasheet.$B$1:.$AV$9809];9;FALSE());&quot;-&quot;)" office:value-type="float" office:value="0" calcext:value-type="float">
            <text:p>0</text:p>
          </table:table-cell>
          <table:table-cell table:style-name="ce147" table:formula="of:=IFERROR(VLOOKUP([$Masterlist.$P163];[$Datasheet.$B$1:.$AV$9809];10;FALSE());&quot;-&quot;)" office:value-type="float" office:value="0" calcext:value-type="float">
            <text:p>0</text:p>
          </table:table-cell>
          <table:table-cell table:style-name="ce147" table:formula="of:=IFERROR(VLOOKUP([$Masterlist.$P163];[$Datasheet.$B$1:.$AV$9809];11;FALSE());&quot;-&quot;)" office:value-type="float" office:value="0" calcext:value-type="float">
            <text:p>0</text:p>
          </table:table-cell>
          <table:table-cell table:style-name="ce147" table:formula="of:=IFERROR(VLOOKUP([$Masterlist.$P163];[$Datasheet.$B$1:.$AV$9809];12;FALSE());&quot;-&quot;)" office:value-type="float" office:value="0" calcext:value-type="float">
            <text:p>0</text:p>
          </table:table-cell>
          <table:table-cell table:style-name="ce147" table:formula="of:=IFERROR(VLOOKUP([$Masterlist.$P163];[$Datasheet.$B$1:.$AV$9809];13;FALSE());&quot;-&quot;)" office:value-type="float" office:value="0" calcext:value-type="float">
            <text:p>0</text:p>
          </table:table-cell>
          <table:table-cell table:style-name="ce147" table:formula="of:=IFERROR(VLOOKUP([$Masterlist.$P163];[$Datasheet.$B$1:.$AV$9809];14;FALSE());&quot;-&quot;)" office:value-type="float" office:value="0" calcext:value-type="float">
            <text:p>0</text:p>
          </table:table-cell>
          <table:table-cell table:style-name="ce147" table:formula="of:=IFERROR(VLOOKUP([$Masterlist.$P163];[$Datasheet.$B$1:.$AV$9809];15;FALSE());&quot;-&quot;)" office:value-type="float" office:value="0" calcext:value-type="float">
            <text:p>0</text:p>
          </table:table-cell>
          <table:table-cell table:style-name="ce147" table:formula="of:=IFERROR(VLOOKUP([$Masterlist.$P163];[$Datasheet.$B$1:.$AV$9809];16;FALSE());&quot;-&quot;)" office:value-type="float" office:value="0" calcext:value-type="float">
            <text:p/>
          </table:table-cell>
          <table:table-cell table:style-name="ce147" table:formula="of:=IFERROR(VLOOKUP([$Masterlist.$P163];[$Datasheet.$B$1:.$AV$9809];17;FALSE());&quot;-&quot;)" office:value-type="float" office:value="0" calcext:value-type="float">
            <text:p/>
          </table:table-cell>
          <table:table-cell table:style-name="ce147" table:formula="of:=IFERROR(VLOOKUP([$Masterlist.$P163];[$Datasheet.$B$1:.$AV$9809];18;FALSE());&quot;-&quot;)" office:value-type="float" office:value="0" calcext:value-type="float">
            <text:p/>
          </table:table-cell>
          <table:table-cell table:style-name="ce147" table:formula="of:=IFERROR(VLOOKUP([$Masterlist.$P163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table:number-columns-repeated="4"/>
          <table:table-cell table:style-name="ce71" office:value-type="string" calcext:value-type="string">
            <text:p>yes</text:p>
          </table:table-cell>
          <table:table-cell table:style-name="ce50" table:number-columns-repeated="7"/>
          <table:table-cell table:style-name="ce92" office:value-type="string" calcext:value-type="string">
            <text:p>ProPresenter / Resi</text:p>
          </table:table-cell>
          <table:table-cell table:style-name="ce8" office:value-type="string" calcext:value-type="string">
            <text:p>Roux-han Basson</text:p>
          </table:table-cell>
          <table:table-cell table:style-name="ce13" table:formula="of:=IF(ISNUMBER(MATCH([.P164];[$Datasheet.$B$1:.$B$9809];0));&quot;✓&quot;;&quot;x&quot;)" office:value-type="string" office:string-value="✓" calcext:value-type="string">
            <text:p>✓</text:p>
          </table:table-cell>
          <table:table-cell table:style-name="ce147" table:formula="of:=IFERROR(VLOOKUP([$Masterlist.$P164];[$Datasheet.$B$1:.$AV$9809];2;FALSE());&quot;-&quot;)" office:value-type="float" office:value="1" calcext:value-type="float">
            <text:p>1</text:p>
          </table:table-cell>
          <table:table-cell table:style-name="ce147" table:formula="of:=IFERROR(VLOOKUP([$Masterlist.$P164];[$Datasheet.$B$1:.$AV$9809];3;FALSE());&quot;-&quot;)" office:value-type="float" office:value="0" calcext:value-type="float">
            <text:p>0</text:p>
          </table:table-cell>
          <table:table-cell table:style-name="ce147" table:formula="of:=IFERROR(VLOOKUP([$Masterlist.$P164];[$Datasheet.$B$1:.$AV$9809];4;FALSE());&quot;-&quot;)" office:value-type="float" office:value="0" calcext:value-type="float">
            <text:p>0</text:p>
          </table:table-cell>
          <table:table-cell table:style-name="ce147" table:formula="of:=IFERROR(VLOOKUP([$Masterlist.$P164];[$Datasheet.$B$1:.$AV$9809];5;FALSE());&quot;-&quot;)" office:value-type="float" office:value="0" calcext:value-type="float">
            <text:p>0</text:p>
          </table:table-cell>
          <table:table-cell table:style-name="ce195" table:formula="of:=IFERROR(VLOOKUP([$Masterlist.$P164];[$Datasheet.$B$1:.$AV$9809];6;FALSE());&quot;-&quot;)" office:value-type="float" office:value="0" calcext:value-type="float">
            <text:p>0</text:p>
          </table:table-cell>
          <table:table-cell table:style-name="ce147" table:formula="of:=IFERROR(VLOOKUP([$Masterlist.$P164];[$Datasheet.$B$1:.$AV$9809];7;FALSE());&quot;-&quot;)" office:value-type="float" office:value="0" calcext:value-type="float">
            <text:p>0</text:p>
          </table:table-cell>
          <table:table-cell table:style-name="ce147" table:formula="of:=IFERROR(VLOOKUP([$Masterlist.$P164];[$Datasheet.$B$1:.$AV$9809];8;FALSE());&quot;-&quot;)" office:value-type="float" office:value="1" calcext:value-type="float">
            <text:p>1</text:p>
          </table:table-cell>
          <table:table-cell table:style-name="ce147" table:formula="of:=IFERROR(VLOOKUP([$Masterlist.$P164];[$Datasheet.$B$1:.$AV$9809];9;FALSE());&quot;-&quot;)" office:value-type="float" office:value="0" calcext:value-type="float">
            <text:p>0</text:p>
          </table:table-cell>
          <table:table-cell table:style-name="ce147" table:formula="of:=IFERROR(VLOOKUP([$Masterlist.$P164];[$Datasheet.$B$1:.$AV$9809];10;FALSE());&quot;-&quot;)" office:value-type="float" office:value="0" calcext:value-type="float">
            <text:p>0</text:p>
          </table:table-cell>
          <table:table-cell table:style-name="ce147" table:formula="of:=IFERROR(VLOOKUP([$Masterlist.$P164];[$Datasheet.$B$1:.$AV$9809];11;FALSE());&quot;-&quot;)" office:value-type="float" office:value="0" calcext:value-type="float">
            <text:p>0</text:p>
          </table:table-cell>
          <table:table-cell table:style-name="ce147" table:formula="of:=IFERROR(VLOOKUP([$Masterlist.$P164];[$Datasheet.$B$1:.$AV$9809];12;FALSE());&quot;-&quot;)" office:value-type="float" office:value="0" calcext:value-type="float">
            <text:p>0</text:p>
          </table:table-cell>
          <table:table-cell table:style-name="ce147" table:formula="of:=IFERROR(VLOOKUP([$Masterlist.$P164];[$Datasheet.$B$1:.$AV$9809];13;FALSE());&quot;-&quot;)" office:value-type="float" office:value="0" calcext:value-type="float">
            <text:p>0</text:p>
          </table:table-cell>
          <table:table-cell table:style-name="ce147" table:formula="of:=IFERROR(VLOOKUP([$Masterlist.$P164];[$Datasheet.$B$1:.$AV$9809];14;FALSE());&quot;-&quot;)" office:value-type="float" office:value="0" calcext:value-type="float">
            <text:p>0</text:p>
          </table:table-cell>
          <table:table-cell table:style-name="ce147" table:formula="of:=IFERROR(VLOOKUP([$Masterlist.$P164];[$Datasheet.$B$1:.$AV$9809];15;FALSE());&quot;-&quot;)" office:value-type="float" office:value="0" calcext:value-type="float">
            <text:p>0</text:p>
          </table:table-cell>
          <table:table-cell table:style-name="ce147" table:formula="of:=IFERROR(VLOOKUP([$Masterlist.$P164];[$Datasheet.$B$1:.$AV$9809];16;FALSE());&quot;-&quot;)" office:value-type="float" office:value="0" calcext:value-type="float">
            <text:p/>
          </table:table-cell>
          <table:table-cell table:style-name="ce147" table:formula="of:=IFERROR(VLOOKUP([$Masterlist.$P164];[$Datasheet.$B$1:.$AV$9809];17;FALSE());&quot;-&quot;)" office:value-type="float" office:value="0" calcext:value-type="float">
            <text:p/>
          </table:table-cell>
          <table:table-cell table:style-name="ce147" table:formula="of:=IFERROR(VLOOKUP([$Masterlist.$P164];[$Datasheet.$B$1:.$AV$9809];18;FALSE());&quot;-&quot;)" office:value-type="float" office:value="0" calcext:value-type="float">
            <text:p/>
          </table:table-cell>
          <table:table-cell table:style-name="ce147" table:formula="of:=IFERROR(VLOOKUP([$Masterlist.$P164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table:number-columns-repeated="4"/>
          <table:table-cell table:style-name="ce72" office:value-type="string" calcext:value-type="string">
            <text:p>Yes</text:p>
          </table:table-cell>
          <table:table-cell table:style-name="ce50" table:number-columns-repeated="7"/>
          <table:table-cell table:style-name="ce91" office:value-type="string" calcext:value-type="string">
            <text:p>ProPresenter / Resi</text:p>
          </table:table-cell>
          <table:table-cell table:style-name="ce8" office:value-type="string" calcext:value-type="string">
            <text:p>Zené Willemse</text:p>
          </table:table-cell>
          <table:table-cell table:style-name="ce13" table:formula="of:=IF(ISNUMBER(MATCH([.P165];[$Datasheet.$B$1:.$B$9809];0));&quot;✓&quot;;&quot;x&quot;)" office:value-type="string" office:string-value="✓" calcext:value-type="string">
            <text:p>✓</text:p>
          </table:table-cell>
          <table:table-cell table:style-name="ce148" table:formula="of:=IFERROR(VLOOKUP([$Masterlist.$P165];[$Datasheet.$B$1:.$AV$9809];2;FALSE());&quot;-&quot;)" office:value-type="float" office:value="0" calcext:value-type="float">
            <text:p>0</text:p>
          </table:table-cell>
          <table:table-cell table:style-name="ce148" table:formula="of:=IFERROR(VLOOKUP([$Masterlist.$P165];[$Datasheet.$B$1:.$AV$9809];3;FALSE());&quot;-&quot;)" office:value-type="float" office:value="0" calcext:value-type="float">
            <text:p>0</text:p>
          </table:table-cell>
          <table:table-cell table:style-name="ce148" table:formula="of:=IFERROR(VLOOKUP([$Masterlist.$P165];[$Datasheet.$B$1:.$AV$9809];4;FALSE());&quot;-&quot;)" office:value-type="float" office:value="1" calcext:value-type="float">
            <text:p>1</text:p>
          </table:table-cell>
          <table:table-cell table:style-name="ce148" table:formula="of:=IFERROR(VLOOKUP([$Masterlist.$P165];[$Datasheet.$B$1:.$AV$9809];5;FALSE());&quot;-&quot;)" office:value-type="float" office:value="1" calcext:value-type="float">
            <text:p>1</text:p>
          </table:table-cell>
          <table:table-cell table:style-name="ce196" table:formula="of:=IFERROR(VLOOKUP([$Masterlist.$P165];[$Datasheet.$B$1:.$AV$9809];6;FALSE());&quot;-&quot;)" office:value-type="float" office:value="1" calcext:value-type="float">
            <text:p>1</text:p>
          </table:table-cell>
          <table:table-cell table:style-name="ce148" table:formula="of:=IFERROR(VLOOKUP([$Masterlist.$P165];[$Datasheet.$B$1:.$AV$9809];7;FALSE());&quot;-&quot;)" office:value-type="float" office:value="1" calcext:value-type="float">
            <text:p>1</text:p>
          </table:table-cell>
          <table:table-cell table:style-name="ce148" table:formula="of:=IFERROR(VLOOKUP([$Masterlist.$P165];[$Datasheet.$B$1:.$AV$9809];8;FALSE());&quot;-&quot;)" office:value-type="float" office:value="0" calcext:value-type="float">
            <text:p>0</text:p>
          </table:table-cell>
          <table:table-cell table:style-name="ce148" table:formula="of:=IFERROR(VLOOKUP([$Masterlist.$P165];[$Datasheet.$B$1:.$AV$9809];9;FALSE());&quot;-&quot;)" office:value-type="float" office:value="0" calcext:value-type="float">
            <text:p>0</text:p>
          </table:table-cell>
          <table:table-cell table:style-name="ce148" table:formula="of:=IFERROR(VLOOKUP([$Masterlist.$P165];[$Datasheet.$B$1:.$AV$9809];10;FALSE());&quot;-&quot;)" office:value-type="float" office:value="1" calcext:value-type="float">
            <text:p>1</text:p>
          </table:table-cell>
          <table:table-cell table:style-name="ce148" table:formula="of:=IFERROR(VLOOKUP([$Masterlist.$P165];[$Datasheet.$B$1:.$AV$9809];11;FALSE());&quot;-&quot;)" office:value-type="float" office:value="1" calcext:value-type="float">
            <text:p>1</text:p>
          </table:table-cell>
          <table:table-cell table:style-name="ce148" table:formula="of:=IFERROR(VLOOKUP([$Masterlist.$P165];[$Datasheet.$B$1:.$AV$9809];12;FALSE());&quot;-&quot;)" office:value-type="float" office:value="1" calcext:value-type="float">
            <text:p>1</text:p>
          </table:table-cell>
          <table:table-cell table:style-name="ce148" table:formula="of:=IFERROR(VLOOKUP([$Masterlist.$P165];[$Datasheet.$B$1:.$AV$9809];13;FALSE());&quot;-&quot;)" office:value-type="float" office:value="1" calcext:value-type="float">
            <text:p>1</text:p>
          </table:table-cell>
          <table:table-cell table:style-name="ce148" table:formula="of:=IFERROR(VLOOKUP([$Masterlist.$P165];[$Datasheet.$B$1:.$AV$9809];14;FALSE());&quot;-&quot;)" office:value-type="float" office:value="1" calcext:value-type="float">
            <text:p>1</text:p>
          </table:table-cell>
          <table:table-cell table:style-name="ce148" table:formula="of:=IFERROR(VLOOKUP([$Masterlist.$P165];[$Datasheet.$B$1:.$AV$9809];15;FALSE());&quot;-&quot;)" office:value-type="float" office:value="1" calcext:value-type="float">
            <text:p>1</text:p>
          </table:table-cell>
          <table:table-cell table:style-name="ce148" table:formula="of:=IFERROR(VLOOKUP([$Masterlist.$P165];[$Datasheet.$B$1:.$AV$9809];16;FALSE());&quot;-&quot;)" office:value-type="float" office:value="0" calcext:value-type="float">
            <text:p/>
          </table:table-cell>
          <table:table-cell table:style-name="ce148" table:formula="of:=IFERROR(VLOOKUP([$Masterlist.$P165];[$Datasheet.$B$1:.$AV$9809];17;FALSE());&quot;-&quot;)" office:value-type="float" office:value="0" calcext:value-type="float">
            <text:p/>
          </table:table-cell>
          <table:table-cell table:style-name="ce148" table:formula="of:=IFERROR(VLOOKUP([$Masterlist.$P165];[$Datasheet.$B$1:.$AV$9809];18;FALSE());&quot;-&quot;)" office:value-type="float" office:value="0" calcext:value-type="float">
            <text:p/>
          </table:table-cell>
          <table:table-cell table:style-name="ce148" table:formula="of:=IFERROR(VLOOKUP([$Masterlist.$P165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/>
          <table:table-cell table:style-name="ce50" table:number-columns-repeated="4"/>
          <table:table-cell table:style-name="ce72" office:value-type="string" calcext:value-type="string">
            <text:p>Yes</text:p>
          </table:table-cell>
          <table:table-cell table:style-name="ce50" table:number-columns-repeated="7"/>
          <table:table-cell table:style-name="ce91" office:value-type="string" calcext:value-type="string">
            <text:p><text:span text:style-name="T1">ProPresenter / Resi - </text:span><text:span text:style-name="T2">Training</text:span></text:p>
          </table:table-cell>
          <table:table-cell table:style-name="ce8" office:value-type="string" calcext:value-type="string">
            <text:p>Walco Mathewson</text:p>
          </table:table-cell>
          <table:table-cell table:style-name="ce13" table:formula="of:=IF(ISNUMBER(MATCH([.P166];[$Datasheet.$B$1:.$B$9809];0));&quot;✓&quot;;&quot;x&quot;)" office:value-type="string" office:string-value="✓" calcext:value-type="string">
            <text:p>✓</text:p>
          </table:table-cell>
          <table:table-cell table:style-name="ce147" table:formula="of:=IFERROR(VLOOKUP([$Masterlist.$P166];[$Datasheet.$B$1:.$AV$9809];2;FALSE());&quot;-&quot;)" office:value-type="float" office:value="0" calcext:value-type="float">
            <text:p>0</text:p>
          </table:table-cell>
          <table:table-cell table:style-name="ce147" table:formula="of:=IFERROR(VLOOKUP([$Masterlist.$P166];[$Datasheet.$B$1:.$AV$9809];3;FALSE());&quot;-&quot;)" office:value-type="float" office:value="0" calcext:value-type="float">
            <text:p>0</text:p>
          </table:table-cell>
          <table:table-cell table:style-name="ce147" table:formula="of:=IFERROR(VLOOKUP([$Masterlist.$P166];[$Datasheet.$B$1:.$AV$9809];4;FALSE());&quot;-&quot;)" office:value-type="float" office:value="1" calcext:value-type="float">
            <text:p>1</text:p>
          </table:table-cell>
          <table:table-cell table:style-name="ce147" table:formula="of:=IFERROR(VLOOKUP([$Masterlist.$P166];[$Datasheet.$B$1:.$AV$9809];5;FALSE());&quot;-&quot;)" office:value-type="float" office:value="1" calcext:value-type="float">
            <text:p>1</text:p>
          </table:table-cell>
          <table:table-cell table:style-name="ce195" table:formula="of:=IFERROR(VLOOKUP([$Masterlist.$P166];[$Datasheet.$B$1:.$AV$9809];6;FALSE());&quot;-&quot;)" office:value-type="float" office:value="1" calcext:value-type="float">
            <text:p>1</text:p>
          </table:table-cell>
          <table:table-cell table:style-name="ce147" table:formula="of:=IFERROR(VLOOKUP([$Masterlist.$P166];[$Datasheet.$B$1:.$AV$9809];7;FALSE());&quot;-&quot;)" office:value-type="float" office:value="1" calcext:value-type="float">
            <text:p>1</text:p>
          </table:table-cell>
          <table:table-cell table:style-name="ce147" table:formula="of:=IFERROR(VLOOKUP([$Masterlist.$P166];[$Datasheet.$B$1:.$AV$9809];8;FALSE());&quot;-&quot;)" office:value-type="float" office:value="1" calcext:value-type="float">
            <text:p>1</text:p>
          </table:table-cell>
          <table:table-cell table:style-name="ce147" table:formula="of:=IFERROR(VLOOKUP([$Masterlist.$P166];[$Datasheet.$B$1:.$AV$9809];9;FALSE());&quot;-&quot;)" office:value-type="float" office:value="1" calcext:value-type="float">
            <text:p>1</text:p>
          </table:table-cell>
          <table:table-cell table:style-name="ce147" table:formula="of:=IFERROR(VLOOKUP([$Masterlist.$P166];[$Datasheet.$B$1:.$AV$9809];10;FALSE());&quot;-&quot;)" office:value-type="float" office:value="0" calcext:value-type="float">
            <text:p>0</text:p>
          </table:table-cell>
          <table:table-cell table:style-name="ce147" table:formula="of:=IFERROR(VLOOKUP([$Masterlist.$P166];[$Datasheet.$B$1:.$AV$9809];11;FALSE());&quot;-&quot;)" office:value-type="float" office:value="0" calcext:value-type="float">
            <text:p>0</text:p>
          </table:table-cell>
          <table:table-cell table:style-name="ce147" table:formula="of:=IFERROR(VLOOKUP([$Masterlist.$P166];[$Datasheet.$B$1:.$AV$9809];12;FALSE());&quot;-&quot;)" office:value-type="float" office:value="0" calcext:value-type="float">
            <text:p>0</text:p>
          </table:table-cell>
          <table:table-cell table:style-name="ce147" table:formula="of:=IFERROR(VLOOKUP([$Masterlist.$P166];[$Datasheet.$B$1:.$AV$9809];13;FALSE());&quot;-&quot;)" office:value-type="float" office:value="0" calcext:value-type="float">
            <text:p>0</text:p>
          </table:table-cell>
          <table:table-cell table:style-name="ce147" table:formula="of:=IFERROR(VLOOKUP([$Masterlist.$P166];[$Datasheet.$B$1:.$AV$9809];14;FALSE());&quot;-&quot;)" office:value-type="float" office:value="1" calcext:value-type="float">
            <text:p>1</text:p>
          </table:table-cell>
          <table:table-cell table:style-name="ce147" table:formula="of:=IFERROR(VLOOKUP([$Masterlist.$P166];[$Datasheet.$B$1:.$AV$9809];15;FALSE());&quot;-&quot;)" office:value-type="float" office:value="1" calcext:value-type="float">
            <text:p>1</text:p>
          </table:table-cell>
          <table:table-cell table:style-name="ce147" table:formula="of:=IFERROR(VLOOKUP([$Masterlist.$P166];[$Datasheet.$B$1:.$AV$9809];16;FALSE());&quot;-&quot;)" office:value-type="float" office:value="0" calcext:value-type="float">
            <text:p/>
          </table:table-cell>
          <table:table-cell table:style-name="ce147" table:formula="of:=IFERROR(VLOOKUP([$Masterlist.$P166];[$Datasheet.$B$1:.$AV$9809];17;FALSE());&quot;-&quot;)" office:value-type="float" office:value="0" calcext:value-type="float">
            <text:p/>
          </table:table-cell>
          <table:table-cell table:style-name="ce147" table:formula="of:=IFERROR(VLOOKUP([$Masterlist.$P166];[$Datasheet.$B$1:.$AV$9809];18;FALSE());&quot;-&quot;)" office:value-type="float" office:value="0" calcext:value-type="float">
            <text:p/>
          </table:table-cell>
          <table:table-cell table:style-name="ce147" table:formula="of:=IFERROR(VLOOKUP([$Masterlist.$P166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table:number-columns-repeated="4"/>
          <table:table-cell table:style-name="ce71" office:value-type="string" calcext:value-type="string">
            <text:p>yes</text:p>
          </table:table-cell>
          <table:table-cell table:style-name="ce50" table:number-columns-repeated="7"/>
          <table:table-cell table:style-name="ce92" office:value-type="string" calcext:value-type="string">
            <text:p>Resi</text:p>
          </table:table-cell>
          <table:table-cell table:style-name="ce8" office:value-type="string" calcext:value-type="string">
            <text:p>Jaco Kriek</text:p>
          </table:table-cell>
          <table:table-cell table:style-name="ce13" table:formula="of:=IF(ISNUMBER(MATCH([.P167];[$Datasheet.$B$1:.$B$9809];0));&quot;✓&quot;;&quot;x&quot;)" office:value-type="string" office:string-value="✓" calcext:value-type="string">
            <text:p>✓</text:p>
          </table:table-cell>
          <table:table-cell table:style-name="ce147" table:formula="of:=IFERROR(VLOOKUP([$Masterlist.$P167];[$Datasheet.$B$1:.$AV$9809];2;FALSE());&quot;-&quot;)" office:value-type="float" office:value="0" calcext:value-type="float">
            <text:p>0</text:p>
          </table:table-cell>
          <table:table-cell table:style-name="ce147" table:formula="of:=IFERROR(VLOOKUP([$Masterlist.$P167];[$Datasheet.$B$1:.$AV$9809];3;FALSE());&quot;-&quot;)" office:value-type="float" office:value="0" calcext:value-type="float">
            <text:p>0</text:p>
          </table:table-cell>
          <table:table-cell table:style-name="ce147" table:formula="of:=IFERROR(VLOOKUP([$Masterlist.$P167];[$Datasheet.$B$1:.$AV$9809];4;FALSE());&quot;-&quot;)" office:value-type="float" office:value="0" calcext:value-type="float">
            <text:p>0</text:p>
          </table:table-cell>
          <table:table-cell table:style-name="ce147" table:formula="of:=IFERROR(VLOOKUP([$Masterlist.$P167];[$Datasheet.$B$1:.$AV$9809];5;FALSE());&quot;-&quot;)" office:value-type="float" office:value="0" calcext:value-type="float">
            <text:p>0</text:p>
          </table:table-cell>
          <table:table-cell table:style-name="ce195" table:formula="of:=IFERROR(VLOOKUP([$Masterlist.$P167];[$Datasheet.$B$1:.$AV$9809];6;FALSE());&quot;-&quot;)" office:value-type="float" office:value="1" calcext:value-type="float">
            <text:p>1</text:p>
          </table:table-cell>
          <table:table-cell table:style-name="ce147" table:formula="of:=IFERROR(VLOOKUP([$Masterlist.$P167];[$Datasheet.$B$1:.$AV$9809];7;FALSE());&quot;-&quot;)" office:value-type="float" office:value="1" calcext:value-type="float">
            <text:p>1</text:p>
          </table:table-cell>
          <table:table-cell table:style-name="ce147" table:formula="of:=IFERROR(VLOOKUP([$Masterlist.$P167];[$Datasheet.$B$1:.$AV$9809];8;FALSE());&quot;-&quot;)" office:value-type="float" office:value="1" calcext:value-type="float">
            <text:p>1</text:p>
          </table:table-cell>
          <table:table-cell table:style-name="ce147" table:formula="of:=IFERROR(VLOOKUP([$Masterlist.$P167];[$Datasheet.$B$1:.$AV$9809];9;FALSE());&quot;-&quot;)" office:value-type="float" office:value="0" calcext:value-type="float">
            <text:p>0</text:p>
          </table:table-cell>
          <table:table-cell table:style-name="ce147" table:formula="of:=IFERROR(VLOOKUP([$Masterlist.$P167];[$Datasheet.$B$1:.$AV$9809];10;FALSE());&quot;-&quot;)" office:value-type="float" office:value="0" calcext:value-type="float">
            <text:p>0</text:p>
          </table:table-cell>
          <table:table-cell table:style-name="ce147" table:formula="of:=IFERROR(VLOOKUP([$Masterlist.$P167];[$Datasheet.$B$1:.$AV$9809];11;FALSE());&quot;-&quot;)" office:value-type="float" office:value="0" calcext:value-type="float">
            <text:p>0</text:p>
          </table:table-cell>
          <table:table-cell table:style-name="ce147" table:formula="of:=IFERROR(VLOOKUP([$Masterlist.$P167];[$Datasheet.$B$1:.$AV$9809];12;FALSE());&quot;-&quot;)" office:value-type="float" office:value="0" calcext:value-type="float">
            <text:p>0</text:p>
          </table:table-cell>
          <table:table-cell table:style-name="ce147" table:formula="of:=IFERROR(VLOOKUP([$Masterlist.$P167];[$Datasheet.$B$1:.$AV$9809];13;FALSE());&quot;-&quot;)" office:value-type="float" office:value="0" calcext:value-type="float">
            <text:p>0</text:p>
          </table:table-cell>
          <table:table-cell table:style-name="ce147" table:formula="of:=IFERROR(VLOOKUP([$Masterlist.$P167];[$Datasheet.$B$1:.$AV$9809];14;FALSE());&quot;-&quot;)" office:value-type="float" office:value="0" calcext:value-type="float">
            <text:p>0</text:p>
          </table:table-cell>
          <table:table-cell table:style-name="ce147" table:formula="of:=IFERROR(VLOOKUP([$Masterlist.$P167];[$Datasheet.$B$1:.$AV$9809];15;FALSE());&quot;-&quot;)" office:value-type="float" office:value="0" calcext:value-type="float">
            <text:p>0</text:p>
          </table:table-cell>
          <table:table-cell table:style-name="ce147" table:formula="of:=IFERROR(VLOOKUP([$Masterlist.$P167];[$Datasheet.$B$1:.$AV$9809];16;FALSE());&quot;-&quot;)" office:value-type="float" office:value="0" calcext:value-type="float">
            <text:p/>
          </table:table-cell>
          <table:table-cell table:style-name="ce147" table:formula="of:=IFERROR(VLOOKUP([$Masterlist.$P167];[$Datasheet.$B$1:.$AV$9809];17;FALSE());&quot;-&quot;)" office:value-type="float" office:value="0" calcext:value-type="float">
            <text:p/>
          </table:table-cell>
          <table:table-cell table:style-name="ce147" table:formula="of:=IFERROR(VLOOKUP([$Masterlist.$P167];[$Datasheet.$B$1:.$AV$9809];18;FALSE());&quot;-&quot;)" office:value-type="float" office:value="0" calcext:value-type="float">
            <text:p/>
          </table:table-cell>
          <table:table-cell table:style-name="ce147" table:formula="of:=IFERROR(VLOOKUP([$Masterlist.$P167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AL</text:p>
          </table:table-cell>
          <table:table-cell table:style-name="ce50" table:number-columns-repeated="5"/>
          <table:table-cell table:number-columns-repeated="2" table:style-name="ce50" office:value-type="string" calcext:value-type="string">
            <text:p>yes</text:p>
          </table:table-cell>
          <table:table-cell table:style-name="ce50" table:number-columns-repeated="5"/>
          <table:table-cell table:style-name="ce92" office:value-type="string" calcext:value-type="string">
            <text:p>Resi</text:p>
          </table:table-cell>
          <table:table-cell table:style-name="ce8" office:value-type="string" calcext:value-type="string">
            <text:p>Kevin Emslie</text:p>
          </table:table-cell>
          <table:table-cell table:style-name="ce13" table:formula="of:=IF(ISNUMBER(MATCH([.P168];[$Datasheet.$B$1:.$B$9809];0));&quot;✓&quot;;&quot;x&quot;)" office:value-type="string" office:string-value="✓" calcext:value-type="string">
            <text:p>✓</text:p>
          </table:table-cell>
          <table:table-cell table:style-name="ce147" table:formula="of:=IFERROR(VLOOKUP([$Masterlist.$P168];[$Datasheet.$B$1:.$AV$9809];2;FALSE());&quot;-&quot;)" office:value-type="float" office:value="0" calcext:value-type="float">
            <text:p>0</text:p>
          </table:table-cell>
          <table:table-cell table:style-name="ce147" table:formula="of:=IFERROR(VLOOKUP([$Masterlist.$P168];[$Datasheet.$B$1:.$AV$9809];3;FALSE());&quot;-&quot;)" office:value-type="float" office:value="0" calcext:value-type="float">
            <text:p>0</text:p>
          </table:table-cell>
          <table:table-cell table:style-name="ce147" table:formula="of:=IFERROR(VLOOKUP([$Masterlist.$P168];[$Datasheet.$B$1:.$AV$9809];4;FALSE());&quot;-&quot;)" office:value-type="float" office:value="1" calcext:value-type="float">
            <text:p>1</text:p>
          </table:table-cell>
          <table:table-cell table:style-name="ce147" table:formula="of:=IFERROR(VLOOKUP([$Masterlist.$P168];[$Datasheet.$B$1:.$AV$9809];5;FALSE());&quot;-&quot;)" office:value-type="float" office:value="1" calcext:value-type="float">
            <text:p>1</text:p>
          </table:table-cell>
          <table:table-cell table:style-name="ce195" table:formula="of:=IFERROR(VLOOKUP([$Masterlist.$P168];[$Datasheet.$B$1:.$AV$9809];6;FALSE());&quot;-&quot;)" office:value-type="float" office:value="1" calcext:value-type="float">
            <text:p>1</text:p>
          </table:table-cell>
          <table:table-cell table:style-name="ce147" table:formula="of:=IFERROR(VLOOKUP([$Masterlist.$P168];[$Datasheet.$B$1:.$AV$9809];7;FALSE());&quot;-&quot;)" office:value-type="float" office:value="1" calcext:value-type="float">
            <text:p>1</text:p>
          </table:table-cell>
          <table:table-cell table:style-name="ce147" table:formula="of:=IFERROR(VLOOKUP([$Masterlist.$P168];[$Datasheet.$B$1:.$AV$9809];8;FALSE());&quot;-&quot;)" office:value-type="float" office:value="1" calcext:value-type="float">
            <text:p>1</text:p>
          </table:table-cell>
          <table:table-cell table:style-name="ce147" table:formula="of:=IFERROR(VLOOKUP([$Masterlist.$P168];[$Datasheet.$B$1:.$AV$9809];9;FALSE());&quot;-&quot;)" office:value-type="float" office:value="1" calcext:value-type="float">
            <text:p>1</text:p>
          </table:table-cell>
          <table:table-cell table:style-name="ce147" table:formula="of:=IFERROR(VLOOKUP([$Masterlist.$P168];[$Datasheet.$B$1:.$AV$9809];10;FALSE());&quot;-&quot;)" office:value-type="float" office:value="1" calcext:value-type="float">
            <text:p>1</text:p>
          </table:table-cell>
          <table:table-cell table:style-name="ce147" table:formula="of:=IFERROR(VLOOKUP([$Masterlist.$P168];[$Datasheet.$B$1:.$AV$9809];11;FALSE());&quot;-&quot;)" office:value-type="float" office:value="1" calcext:value-type="float">
            <text:p>1</text:p>
          </table:table-cell>
          <table:table-cell table:style-name="ce147" table:formula="of:=IFERROR(VLOOKUP([$Masterlist.$P168];[$Datasheet.$B$1:.$AV$9809];12;FALSE());&quot;-&quot;)" office:value-type="float" office:value="1" calcext:value-type="float">
            <text:p>1</text:p>
          </table:table-cell>
          <table:table-cell table:style-name="ce147" table:formula="of:=IFERROR(VLOOKUP([$Masterlist.$P168];[$Datasheet.$B$1:.$AV$9809];13;FALSE());&quot;-&quot;)" office:value-type="float" office:value="1" calcext:value-type="float">
            <text:p>1</text:p>
          </table:table-cell>
          <table:table-cell table:style-name="ce147" table:formula="of:=IFERROR(VLOOKUP([$Masterlist.$P168];[$Datasheet.$B$1:.$AV$9809];14;FALSE());&quot;-&quot;)" office:value-type="float" office:value="1" calcext:value-type="float">
            <text:p>1</text:p>
          </table:table-cell>
          <table:table-cell table:style-name="ce147" table:formula="of:=IFERROR(VLOOKUP([$Masterlist.$P168];[$Datasheet.$B$1:.$AV$9809];15;FALSE());&quot;-&quot;)" office:value-type="float" office:value="1" calcext:value-type="float">
            <text:p>1</text:p>
          </table:table-cell>
          <table:table-cell table:style-name="ce147" table:formula="of:=IFERROR(VLOOKUP([$Masterlist.$P168];[$Datasheet.$B$1:.$AV$9809];16;FALSE());&quot;-&quot;)" office:value-type="float" office:value="0" calcext:value-type="float">
            <text:p/>
          </table:table-cell>
          <table:table-cell table:style-name="ce147" table:formula="of:=IFERROR(VLOOKUP([$Masterlist.$P168];[$Datasheet.$B$1:.$AV$9809];17;FALSE());&quot;-&quot;)" office:value-type="float" office:value="0" calcext:value-type="float">
            <text:p/>
          </table:table-cell>
          <table:table-cell table:style-name="ce147" table:formula="of:=IFERROR(VLOOKUP([$Masterlist.$P168];[$Datasheet.$B$1:.$AV$9809];18;FALSE());&quot;-&quot;)" office:value-type="float" office:value="0" calcext:value-type="float">
            <text:p/>
          </table:table-cell>
          <table:table-cell table:style-name="ce147" table:formula="of:=IFERROR(VLOOKUP([$Masterlist.$P168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AL</text:p>
          </table:table-cell>
          <table:table-cell table:style-name="ce50" table:number-columns-repeated="5"/>
          <table:table-cell table:number-columns-repeated="2" table:style-name="ce50" office:value-type="string" calcext:value-type="string">
            <text:p>yes</text:p>
          </table:table-cell>
          <table:table-cell table:style-name="ce50" table:number-columns-repeated="5"/>
          <table:table-cell table:style-name="ce92" office:value-type="string" calcext:value-type="string">
            <text:p>Resi</text:p>
          </table:table-cell>
          <table:table-cell table:style-name="ce8" office:value-type="string" calcext:value-type="string">
            <text:p>JP Marais</text:p>
          </table:table-cell>
          <table:table-cell table:style-name="ce13" table:formula="of:=IF(ISNUMBER(MATCH([.P169];[$Datasheet.$B$1:.$B$9809];0));&quot;✓&quot;;&quot;x&quot;)" office:value-type="string" office:string-value="✓" calcext:value-type="string">
            <text:p>✓</text:p>
          </table:table-cell>
          <table:table-cell table:style-name="ce147" table:formula="of:=IFERROR(VLOOKUP([$Masterlist.$P169];[$Datasheet.$B$1:.$AV$9809];2;FALSE());&quot;-&quot;)" office:value-type="float" office:value="1" calcext:value-type="float">
            <text:p>1</text:p>
          </table:table-cell>
          <table:table-cell table:style-name="ce147" table:formula="of:=IFERROR(VLOOKUP([$Masterlist.$P169];[$Datasheet.$B$1:.$AV$9809];3;FALSE());&quot;-&quot;)" office:value-type="float" office:value="1" calcext:value-type="float">
            <text:p>1</text:p>
          </table:table-cell>
          <table:table-cell table:style-name="ce147" table:formula="of:=IFERROR(VLOOKUP([$Masterlist.$P169];[$Datasheet.$B$1:.$AV$9809];4;FALSE());&quot;-&quot;)" office:value-type="float" office:value="0" calcext:value-type="float">
            <text:p>0</text:p>
          </table:table-cell>
          <table:table-cell table:style-name="ce147" table:formula="of:=IFERROR(VLOOKUP([$Masterlist.$P169];[$Datasheet.$B$1:.$AV$9809];5;FALSE());&quot;-&quot;)" office:value-type="float" office:value="0" calcext:value-type="float">
            <text:p>0</text:p>
          </table:table-cell>
          <table:table-cell table:style-name="ce195" table:formula="of:=IFERROR(VLOOKUP([$Masterlist.$P169];[$Datasheet.$B$1:.$AV$9809];6;FALSE());&quot;-&quot;)" office:value-type="float" office:value="1" calcext:value-type="float">
            <text:p>1</text:p>
          </table:table-cell>
          <table:table-cell table:style-name="ce147" table:formula="of:=IFERROR(VLOOKUP([$Masterlist.$P169];[$Datasheet.$B$1:.$AV$9809];7;FALSE());&quot;-&quot;)" office:value-type="float" office:value="1" calcext:value-type="float">
            <text:p>1</text:p>
          </table:table-cell>
          <table:table-cell table:style-name="ce147" table:formula="of:=IFERROR(VLOOKUP([$Masterlist.$P169];[$Datasheet.$B$1:.$AV$9809];8;FALSE());&quot;-&quot;)" office:value-type="float" office:value="1" calcext:value-type="float">
            <text:p>1</text:p>
          </table:table-cell>
          <table:table-cell table:style-name="ce147" table:formula="of:=IFERROR(VLOOKUP([$Masterlist.$P169];[$Datasheet.$B$1:.$AV$9809];9;FALSE());&quot;-&quot;)" office:value-type="float" office:value="1" calcext:value-type="float">
            <text:p>1</text:p>
          </table:table-cell>
          <table:table-cell table:style-name="ce147" table:formula="of:=IFERROR(VLOOKUP([$Masterlist.$P169];[$Datasheet.$B$1:.$AV$9809];10;FALSE());&quot;-&quot;)" office:value-type="float" office:value="0" calcext:value-type="float">
            <text:p>0</text:p>
          </table:table-cell>
          <table:table-cell table:style-name="ce147" table:formula="of:=IFERROR(VLOOKUP([$Masterlist.$P169];[$Datasheet.$B$1:.$AV$9809];11;FALSE());&quot;-&quot;)" office:value-type="float" office:value="0" calcext:value-type="float">
            <text:p>0</text:p>
          </table:table-cell>
          <table:table-cell table:style-name="ce147" table:formula="of:=IFERROR(VLOOKUP([$Masterlist.$P169];[$Datasheet.$B$1:.$AV$9809];12;FALSE());&quot;-&quot;)" office:value-type="float" office:value="1" calcext:value-type="float">
            <text:p>1</text:p>
          </table:table-cell>
          <table:table-cell table:style-name="ce147" table:formula="of:=IFERROR(VLOOKUP([$Masterlist.$P169];[$Datasheet.$B$1:.$AV$9809];13;FALSE());&quot;-&quot;)" office:value-type="float" office:value="1" calcext:value-type="float">
            <text:p>1</text:p>
          </table:table-cell>
          <table:table-cell table:style-name="ce147" table:formula="of:=IFERROR(VLOOKUP([$Masterlist.$P169];[$Datasheet.$B$1:.$AV$9809];14;FALSE());&quot;-&quot;)" office:value-type="float" office:value="1" calcext:value-type="float">
            <text:p>1</text:p>
          </table:table-cell>
          <table:table-cell table:style-name="ce147" table:formula="of:=IFERROR(VLOOKUP([$Masterlist.$P169];[$Datasheet.$B$1:.$AV$9809];15;FALSE());&quot;-&quot;)" office:value-type="float" office:value="1" calcext:value-type="float">
            <text:p>1</text:p>
          </table:table-cell>
          <table:table-cell table:style-name="ce147" table:formula="of:=IFERROR(VLOOKUP([$Masterlist.$P169];[$Datasheet.$B$1:.$AV$9809];16;FALSE());&quot;-&quot;)" office:value-type="float" office:value="0" calcext:value-type="float">
            <text:p/>
          </table:table-cell>
          <table:table-cell table:style-name="ce147" table:formula="of:=IFERROR(VLOOKUP([$Masterlist.$P169];[$Datasheet.$B$1:.$AV$9809];17;FALSE());&quot;-&quot;)" office:value-type="float" office:value="0" calcext:value-type="float">
            <text:p/>
          </table:table-cell>
          <table:table-cell table:style-name="ce147" table:formula="of:=IFERROR(VLOOKUP([$Masterlist.$P169];[$Datasheet.$B$1:.$AV$9809];18;FALSE());&quot;-&quot;)" office:value-type="float" office:value="0" calcext:value-type="float">
            <text:p/>
          </table:table-cell>
          <table:table-cell table:style-name="ce147" table:formula="of:=IFERROR(VLOOKUP([$Masterlist.$P169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table:number-columns-repeated="5"/>
          <table:table-cell table:number-columns-repeated="2" table:style-name="ce50" office:value-type="string" calcext:value-type="string">
            <text:p>yes</text:p>
          </table:table-cell>
          <table:table-cell table:style-name="ce50" table:number-columns-repeated="5"/>
          <table:table-cell table:style-name="ce92" office:value-type="string" calcext:value-type="string">
            <text:p>Resi</text:p>
          </table:table-cell>
          <table:table-cell table:style-name="ce8" office:value-type="string" calcext:value-type="string">
            <text:p>Laenita de Jonge</text:p>
          </table:table-cell>
          <table:table-cell table:style-name="ce13" table:formula="of:=IF(ISNUMBER(MATCH([.P170];[$Datasheet.$B$1:.$B$9809];0));&quot;✓&quot;;&quot;x&quot;)" office:value-type="string" office:string-value="✓" calcext:value-type="string">
            <text:p>✓</text:p>
          </table:table-cell>
          <table:table-cell table:style-name="ce147" table:formula="of:=IFERROR(VLOOKUP([$Masterlist.$P170];[$Datasheet.$B$1:.$AV$9809];2;FALSE());&quot;-&quot;)" office:value-type="float" office:value="1" calcext:value-type="float">
            <text:p>1</text:p>
          </table:table-cell>
          <table:table-cell table:style-name="ce147" table:formula="of:=IFERROR(VLOOKUP([$Masterlist.$P170];[$Datasheet.$B$1:.$AV$9809];3;FALSE());&quot;-&quot;)" office:value-type="float" office:value="1" calcext:value-type="float">
            <text:p>1</text:p>
          </table:table-cell>
          <table:table-cell table:style-name="ce147" table:formula="of:=IFERROR(VLOOKUP([$Masterlist.$P170];[$Datasheet.$B$1:.$AV$9809];4;FALSE());&quot;-&quot;)" office:value-type="float" office:value="0" calcext:value-type="float">
            <text:p>0</text:p>
          </table:table-cell>
          <table:table-cell table:style-name="ce147" table:formula="of:=IFERROR(VLOOKUP([$Masterlist.$P170];[$Datasheet.$B$1:.$AV$9809];5;FALSE());&quot;-&quot;)" office:value-type="float" office:value="0" calcext:value-type="float">
            <text:p>0</text:p>
          </table:table-cell>
          <table:table-cell table:style-name="ce195" table:formula="of:=IFERROR(VLOOKUP([$Masterlist.$P170];[$Datasheet.$B$1:.$AV$9809];6;FALSE());&quot;-&quot;)" office:value-type="float" office:value="0" calcext:value-type="float">
            <text:p>0</text:p>
          </table:table-cell>
          <table:table-cell table:style-name="ce147" table:formula="of:=IFERROR(VLOOKUP([$Masterlist.$P170];[$Datasheet.$B$1:.$AV$9809];7;FALSE());&quot;-&quot;)" office:value-type="float" office:value="0" calcext:value-type="float">
            <text:p>0</text:p>
          </table:table-cell>
          <table:table-cell table:style-name="ce147" table:formula="of:=IFERROR(VLOOKUP([$Masterlist.$P170];[$Datasheet.$B$1:.$AV$9809];8;FALSE());&quot;-&quot;)" office:value-type="float" office:value="1" calcext:value-type="float">
            <text:p>1</text:p>
          </table:table-cell>
          <table:table-cell table:style-name="ce147" table:formula="of:=IFERROR(VLOOKUP([$Masterlist.$P170];[$Datasheet.$B$1:.$AV$9809];9;FALSE());&quot;-&quot;)" office:value-type="float" office:value="1" calcext:value-type="float">
            <text:p>1</text:p>
          </table:table-cell>
          <table:table-cell table:style-name="ce147" table:formula="of:=IFERROR(VLOOKUP([$Masterlist.$P170];[$Datasheet.$B$1:.$AV$9809];10;FALSE());&quot;-&quot;)" office:value-type="float" office:value="0" calcext:value-type="float">
            <text:p>0</text:p>
          </table:table-cell>
          <table:table-cell table:style-name="ce147" table:formula="of:=IFERROR(VLOOKUP([$Masterlist.$P170];[$Datasheet.$B$1:.$AV$9809];11;FALSE());&quot;-&quot;)" office:value-type="float" office:value="0" calcext:value-type="float">
            <text:p>0</text:p>
          </table:table-cell>
          <table:table-cell table:style-name="ce147" table:formula="of:=IFERROR(VLOOKUP([$Masterlist.$P170];[$Datasheet.$B$1:.$AV$9809];12;FALSE());&quot;-&quot;)" office:value-type="float" office:value="1" calcext:value-type="float">
            <text:p>1</text:p>
          </table:table-cell>
          <table:table-cell table:style-name="ce147" table:formula="of:=IFERROR(VLOOKUP([$Masterlist.$P170];[$Datasheet.$B$1:.$AV$9809];13;FALSE());&quot;-&quot;)" office:value-type="float" office:value="1" calcext:value-type="float">
            <text:p>1</text:p>
          </table:table-cell>
          <table:table-cell table:style-name="ce147" table:formula="of:=IFERROR(VLOOKUP([$Masterlist.$P170];[$Datasheet.$B$1:.$AV$9809];14;FALSE());&quot;-&quot;)" office:value-type="float" office:value="0" calcext:value-type="float">
            <text:p>0</text:p>
          </table:table-cell>
          <table:table-cell table:style-name="ce147" table:formula="of:=IFERROR(VLOOKUP([$Masterlist.$P170];[$Datasheet.$B$1:.$AV$9809];15;FALSE());&quot;-&quot;)" office:value-type="float" office:value="0" calcext:value-type="float">
            <text:p>0</text:p>
          </table:table-cell>
          <table:table-cell table:style-name="ce147" table:formula="of:=IFERROR(VLOOKUP([$Masterlist.$P170];[$Datasheet.$B$1:.$AV$9809];16;FALSE());&quot;-&quot;)" office:value-type="float" office:value="0" calcext:value-type="float">
            <text:p/>
          </table:table-cell>
          <table:table-cell table:style-name="ce147" table:formula="of:=IFERROR(VLOOKUP([$Masterlist.$P170];[$Datasheet.$B$1:.$AV$9809];17;FALSE());&quot;-&quot;)" office:value-type="float" office:value="0" calcext:value-type="float">
            <text:p/>
          </table:table-cell>
          <table:table-cell table:style-name="ce147" table:formula="of:=IFERROR(VLOOKUP([$Masterlist.$P170];[$Datasheet.$B$1:.$AV$9809];18;FALSE());&quot;-&quot;)" office:value-type="float" office:value="0" calcext:value-type="float">
            <text:p/>
          </table:table-cell>
          <table:table-cell table:style-name="ce147" table:formula="of:=IFERROR(VLOOKUP([$Masterlist.$P170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table:number-columns-repeated="5"/>
          <table:table-cell table:number-columns-repeated="2" table:style-name="ce50" office:value-type="string" calcext:value-type="string">
            <text:p>yes</text:p>
          </table:table-cell>
          <table:table-cell table:style-name="ce50" table:number-columns-repeated="2"/>
          <table:table-cell table:style-name="ce70"/>
          <table:table-cell table:style-name="ce50" table:number-columns-repeated="2"/>
          <table:table-cell table:style-name="ce92" office:value-type="string" calcext:value-type="string">
            <text:p>Resi</text:p>
          </table:table-cell>
          <table:table-cell table:style-name="ce8" office:value-type="string" calcext:value-type="string">
            <text:p>Saskia Marais</text:p>
          </table:table-cell>
          <table:table-cell table:style-name="ce13" table:formula="of:=IF(ISNUMBER(MATCH([.P171];[$Datasheet.$B$1:.$B$9809];0));&quot;✓&quot;;&quot;x&quot;)" office:value-type="string" office:string-value="✓" calcext:value-type="string">
            <text:p>✓</text:p>
          </table:table-cell>
          <table:table-cell table:style-name="ce147" table:formula="of:=IFERROR(VLOOKUP([$Masterlist.$P171];[$Datasheet.$B$1:.$AV$9809];2;FALSE());&quot;-&quot;)" office:value-type="float" office:value="0" calcext:value-type="float">
            <text:p>0</text:p>
          </table:table-cell>
          <table:table-cell table:style-name="ce147" table:formula="of:=IFERROR(VLOOKUP([$Masterlist.$P171];[$Datasheet.$B$1:.$AV$9809];3;FALSE());&quot;-&quot;)" office:value-type="float" office:value="0" calcext:value-type="float">
            <text:p>0</text:p>
          </table:table-cell>
          <table:table-cell table:style-name="ce147" table:formula="of:=IFERROR(VLOOKUP([$Masterlist.$P171];[$Datasheet.$B$1:.$AV$9809];4;FALSE());&quot;-&quot;)" office:value-type="float" office:value="0" calcext:value-type="float">
            <text:p>0</text:p>
          </table:table-cell>
          <table:table-cell table:style-name="ce147" table:formula="of:=IFERROR(VLOOKUP([$Masterlist.$P171];[$Datasheet.$B$1:.$AV$9809];5;FALSE());&quot;-&quot;)" office:value-type="float" office:value="1" calcext:value-type="float">
            <text:p>1</text:p>
          </table:table-cell>
          <table:table-cell table:style-name="ce195" table:formula="of:=IFERROR(VLOOKUP([$Masterlist.$P171];[$Datasheet.$B$1:.$AV$9809];6;FALSE());&quot;-&quot;)" office:value-type="float" office:value="0" calcext:value-type="float">
            <text:p>0</text:p>
          </table:table-cell>
          <table:table-cell table:style-name="ce147" table:formula="of:=IFERROR(VLOOKUP([$Masterlist.$P171];[$Datasheet.$B$1:.$AV$9809];7;FALSE());&quot;-&quot;)" office:value-type="float" office:value="1" calcext:value-type="float">
            <text:p>1</text:p>
          </table:table-cell>
          <table:table-cell table:style-name="ce147" table:formula="of:=IFERROR(VLOOKUP([$Masterlist.$P171];[$Datasheet.$B$1:.$AV$9809];8;FALSE());&quot;-&quot;)" office:value-type="float" office:value="0" calcext:value-type="float">
            <text:p>0</text:p>
          </table:table-cell>
          <table:table-cell table:style-name="ce147" table:formula="of:=IFERROR(VLOOKUP([$Masterlist.$P171];[$Datasheet.$B$1:.$AV$9809];9;FALSE());&quot;-&quot;)" office:value-type="float" office:value="1" calcext:value-type="float">
            <text:p>1</text:p>
          </table:table-cell>
          <table:table-cell table:style-name="ce147" table:formula="of:=IFERROR(VLOOKUP([$Masterlist.$P171];[$Datasheet.$B$1:.$AV$9809];10;FALSE());&quot;-&quot;)" office:value-type="float" office:value="0" calcext:value-type="float">
            <text:p>0</text:p>
          </table:table-cell>
          <table:table-cell table:style-name="ce147" table:formula="of:=IFERROR(VLOOKUP([$Masterlist.$P171];[$Datasheet.$B$1:.$AV$9809];11;FALSE());&quot;-&quot;)" office:value-type="float" office:value="0" calcext:value-type="float">
            <text:p>0</text:p>
          </table:table-cell>
          <table:table-cell table:style-name="ce147" table:formula="of:=IFERROR(VLOOKUP([$Masterlist.$P171];[$Datasheet.$B$1:.$AV$9809];12;FALSE());&quot;-&quot;)" office:value-type="float" office:value="0" calcext:value-type="float">
            <text:p>0</text:p>
          </table:table-cell>
          <table:table-cell table:style-name="ce147" table:formula="of:=IFERROR(VLOOKUP([$Masterlist.$P171];[$Datasheet.$B$1:.$AV$9809];13;FALSE());&quot;-&quot;)" office:value-type="float" office:value="1" calcext:value-type="float">
            <text:p>1</text:p>
          </table:table-cell>
          <table:table-cell table:style-name="ce147" table:formula="of:=IFERROR(VLOOKUP([$Masterlist.$P171];[$Datasheet.$B$1:.$AV$9809];14;FALSE());&quot;-&quot;)" office:value-type="float" office:value="0" calcext:value-type="float">
            <text:p>0</text:p>
          </table:table-cell>
          <table:table-cell table:style-name="ce147" table:formula="of:=IFERROR(VLOOKUP([$Masterlist.$P171];[$Datasheet.$B$1:.$AV$9809];15;FALSE());&quot;-&quot;)" office:value-type="float" office:value="1" calcext:value-type="float">
            <text:p>1</text:p>
          </table:table-cell>
          <table:table-cell table:style-name="ce147" table:formula="of:=IFERROR(VLOOKUP([$Masterlist.$P171];[$Datasheet.$B$1:.$AV$9809];16;FALSE());&quot;-&quot;)" office:value-type="float" office:value="0" calcext:value-type="float">
            <text:p/>
          </table:table-cell>
          <table:table-cell table:style-name="ce147" table:formula="of:=IFERROR(VLOOKUP([$Masterlist.$P171];[$Datasheet.$B$1:.$AV$9809];17;FALSE());&quot;-&quot;)" office:value-type="float" office:value="0" calcext:value-type="float">
            <text:p/>
          </table:table-cell>
          <table:table-cell table:style-name="ce147" table:formula="of:=IFERROR(VLOOKUP([$Masterlist.$P171];[$Datasheet.$B$1:.$AV$9809];18;FALSE());&quot;-&quot;)" office:value-type="float" office:value="0" calcext:value-type="float">
            <text:p/>
          </table:table-cell>
          <table:table-cell table:style-name="ce147" table:formula="of:=IFERROR(VLOOKUP([$Masterlist.$P171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M</text:p>
          </table:table-cell>
          <table:table-cell table:style-name="ce50" table:number-columns-repeated="5"/>
          <table:table-cell table:number-columns-repeated="2" table:style-name="ce50" office:value-type="string" calcext:value-type="string">
            <text:p>yes</text:p>
          </table:table-cell>
          <table:table-cell table:style-name="ce50" table:number-columns-repeated="5"/>
          <table:table-cell table:style-name="ce92" office:value-type="string" calcext:value-type="string">
            <text:p>Resi</text:p>
          </table:table-cell>
          <table:table-cell table:style-name="ce8" office:value-type="string" calcext:value-type="string">
            <text:p>Jarryd Sevenoaks</text:p>
          </table:table-cell>
          <table:table-cell table:style-name="ce13" table:formula="of:=IF(ISNUMBER(MATCH([.P172];[$Datasheet.$B$1:.$B$9809];0));&quot;✓&quot;;&quot;x&quot;)" office:value-type="string" office:string-value="✓" calcext:value-type="string">
            <text:p>✓</text:p>
          </table:table-cell>
          <table:table-cell table:style-name="ce147" table:formula="of:=IFERROR(VLOOKUP([$Masterlist.$P172];[$Datasheet.$B$1:.$AV$9809];2;FALSE());&quot;-&quot;)" office:value-type="float" office:value="1" calcext:value-type="float">
            <text:p>1</text:p>
          </table:table-cell>
          <table:table-cell table:style-name="ce147" table:formula="of:=IFERROR(VLOOKUP([$Masterlist.$P172];[$Datasheet.$B$1:.$AV$9809];3;FALSE());&quot;-&quot;)" office:value-type="float" office:value="1" calcext:value-type="float">
            <text:p>1</text:p>
          </table:table-cell>
          <table:table-cell table:style-name="ce147" table:formula="of:=IFERROR(VLOOKUP([$Masterlist.$P172];[$Datasheet.$B$1:.$AV$9809];4;FALSE());&quot;-&quot;)" office:value-type="float" office:value="1" calcext:value-type="float">
            <text:p>1</text:p>
          </table:table-cell>
          <table:table-cell table:style-name="ce147" table:formula="of:=IFERROR(VLOOKUP([$Masterlist.$P172];[$Datasheet.$B$1:.$AV$9809];5;FALSE());&quot;-&quot;)" office:value-type="float" office:value="1" calcext:value-type="float">
            <text:p>1</text:p>
          </table:table-cell>
          <table:table-cell table:style-name="ce195" table:formula="of:=IFERROR(VLOOKUP([$Masterlist.$P172];[$Datasheet.$B$1:.$AV$9809];6;FALSE());&quot;-&quot;)" office:value-type="float" office:value="1" calcext:value-type="float">
            <text:p>1</text:p>
          </table:table-cell>
          <table:table-cell table:style-name="ce147" table:formula="of:=IFERROR(VLOOKUP([$Masterlist.$P172];[$Datasheet.$B$1:.$AV$9809];7;FALSE());&quot;-&quot;)" office:value-type="float" office:value="1" calcext:value-type="float">
            <text:p>1</text:p>
          </table:table-cell>
          <table:table-cell table:style-name="ce147" table:formula="of:=IFERROR(VLOOKUP([$Masterlist.$P172];[$Datasheet.$B$1:.$AV$9809];8;FALSE());&quot;-&quot;)" office:value-type="float" office:value="1" calcext:value-type="float">
            <text:p>1</text:p>
          </table:table-cell>
          <table:table-cell table:style-name="ce147" table:formula="of:=IFERROR(VLOOKUP([$Masterlist.$P172];[$Datasheet.$B$1:.$AV$9809];9;FALSE());&quot;-&quot;)" office:value-type="float" office:value="1" calcext:value-type="float">
            <text:p>1</text:p>
          </table:table-cell>
          <table:table-cell table:style-name="ce147" table:formula="of:=IFERROR(VLOOKUP([$Masterlist.$P172];[$Datasheet.$B$1:.$AV$9809];10;FALSE());&quot;-&quot;)" office:value-type="float" office:value="1" calcext:value-type="float">
            <text:p>1</text:p>
          </table:table-cell>
          <table:table-cell table:style-name="ce147" table:formula="of:=IFERROR(VLOOKUP([$Masterlist.$P172];[$Datasheet.$B$1:.$AV$9809];11;FALSE());&quot;-&quot;)" office:value-type="float" office:value="1" calcext:value-type="float">
            <text:p>1</text:p>
          </table:table-cell>
          <table:table-cell table:style-name="ce147" table:formula="of:=IFERROR(VLOOKUP([$Masterlist.$P172];[$Datasheet.$B$1:.$AV$9809];12;FALSE());&quot;-&quot;)" office:value-type="float" office:value="1" calcext:value-type="float">
            <text:p>1</text:p>
          </table:table-cell>
          <table:table-cell table:style-name="ce147" table:formula="of:=IFERROR(VLOOKUP([$Masterlist.$P172];[$Datasheet.$B$1:.$AV$9809];13;FALSE());&quot;-&quot;)" office:value-type="float" office:value="1" calcext:value-type="float">
            <text:p>1</text:p>
          </table:table-cell>
          <table:table-cell table:style-name="ce147" table:formula="of:=IFERROR(VLOOKUP([$Masterlist.$P172];[$Datasheet.$B$1:.$AV$9809];14;FALSE());&quot;-&quot;)" office:value-type="float" office:value="1" calcext:value-type="float">
            <text:p>1</text:p>
          </table:table-cell>
          <table:table-cell table:style-name="ce147" table:formula="of:=IFERROR(VLOOKUP([$Masterlist.$P172];[$Datasheet.$B$1:.$AV$9809];15;FALSE());&quot;-&quot;)" office:value-type="float" office:value="1" calcext:value-type="float">
            <text:p>1</text:p>
          </table:table-cell>
          <table:table-cell table:style-name="ce147" table:formula="of:=IFERROR(VLOOKUP([$Masterlist.$P172];[$Datasheet.$B$1:.$AV$9809];16;FALSE());&quot;-&quot;)" office:value-type="float" office:value="0" calcext:value-type="float">
            <text:p/>
          </table:table-cell>
          <table:table-cell table:style-name="ce147" table:formula="of:=IFERROR(VLOOKUP([$Masterlist.$P172];[$Datasheet.$B$1:.$AV$9809];17;FALSE());&quot;-&quot;)" office:value-type="float" office:value="0" calcext:value-type="float">
            <text:p/>
          </table:table-cell>
          <table:table-cell table:style-name="ce147" table:formula="of:=IFERROR(VLOOKUP([$Masterlist.$P172];[$Datasheet.$B$1:.$AV$9809];18;FALSE());&quot;-&quot;)" office:value-type="float" office:value="0" calcext:value-type="float">
            <text:p/>
          </table:table-cell>
          <table:table-cell table:style-name="ce147" table:formula="of:=IFERROR(VLOOKUP([$Masterlist.$P172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table:number-columns-repeated="5"/>
          <table:table-cell table:number-columns-repeated="2" table:style-name="ce50" office:value-type="string" calcext:value-type="string">
            <text:p>yes</text:p>
          </table:table-cell>
          <table:table-cell table:style-name="ce50" table:number-columns-repeated="5"/>
          <table:table-cell table:style-name="ce92" office:value-type="string" calcext:value-type="string">
            <text:p>Resi</text:p>
          </table:table-cell>
          <table:table-cell table:style-name="ce8" office:value-type="string" calcext:value-type="string">
            <text:p>Rupert Bothma</text:p>
          </table:table-cell>
          <table:table-cell table:style-name="ce13" table:formula="of:=IF(ISNUMBER(MATCH([.P173];[$Datasheet.$B$1:.$B$9809];0));&quot;✓&quot;;&quot;x&quot;)" office:value-type="string" office:string-value="x" calcext:value-type="string">
            <text:p>x</text:p>
          </table:table-cell>
          <table:table-cell table:style-name="ce147" table:formula="of:=IFERROR(VLOOKUP([$Masterlist.$P173];[$Datasheet.$B$1:.$AV$9809];2;FALSE());&quot;-&quot;)" office:value-type="string" office:string-value="-" calcext:value-type="string">
            <text:p>-</text:p>
          </table:table-cell>
          <table:table-cell table:style-name="ce147" table:formula="of:=IFERROR(VLOOKUP([$Masterlist.$P173];[$Datasheet.$B$1:.$AV$9809];3;FALSE());&quot;-&quot;)" office:value-type="string" office:string-value="-" calcext:value-type="string">
            <text:p>-</text:p>
          </table:table-cell>
          <table:table-cell table:style-name="ce147" table:formula="of:=IFERROR(VLOOKUP([$Masterlist.$P173];[$Datasheet.$B$1:.$AV$9809];4;FALSE());&quot;-&quot;)" office:value-type="string" office:string-value="-" calcext:value-type="string">
            <text:p>-</text:p>
          </table:table-cell>
          <table:table-cell table:style-name="ce147" table:formula="of:=IFERROR(VLOOKUP([$Masterlist.$P173];[$Datasheet.$B$1:.$AV$9809];5;FALSE());&quot;-&quot;)" office:value-type="string" office:string-value="-" calcext:value-type="string">
            <text:p>-</text:p>
          </table:table-cell>
          <table:table-cell table:style-name="ce195" table:formula="of:=IFERROR(VLOOKUP([$Masterlist.$P173];[$Datasheet.$B$1:.$AV$9809];6;FALSE());&quot;-&quot;)" office:value-type="string" office:string-value="-" calcext:value-type="string">
            <text:p>-</text:p>
          </table:table-cell>
          <table:table-cell table:style-name="ce147" table:formula="of:=IFERROR(VLOOKUP([$Masterlist.$P173];[$Datasheet.$B$1:.$AV$9809];7;FALSE());&quot;-&quot;)" office:value-type="string" office:string-value="-" calcext:value-type="string">
            <text:p>-</text:p>
          </table:table-cell>
          <table:table-cell table:style-name="ce147" table:formula="of:=IFERROR(VLOOKUP([$Masterlist.$P173];[$Datasheet.$B$1:.$AV$9809];8;FALSE());&quot;-&quot;)" office:value-type="string" office:string-value="-" calcext:value-type="string">
            <text:p>-</text:p>
          </table:table-cell>
          <table:table-cell table:style-name="ce147" table:formula="of:=IFERROR(VLOOKUP([$Masterlist.$P173];[$Datasheet.$B$1:.$AV$9809];9;FALSE());&quot;-&quot;)" office:value-type="string" office:string-value="-" calcext:value-type="string">
            <text:p>-</text:p>
          </table:table-cell>
          <table:table-cell table:style-name="ce147" table:formula="of:=IFERROR(VLOOKUP([$Masterlist.$P173];[$Datasheet.$B$1:.$AV$9809];10;FALSE());&quot;-&quot;)" office:value-type="string" office:string-value="-" calcext:value-type="string">
            <text:p>-</text:p>
          </table:table-cell>
          <table:table-cell table:style-name="ce147" table:formula="of:=IFERROR(VLOOKUP([$Masterlist.$P173];[$Datasheet.$B$1:.$AV$9809];11;FALSE());&quot;-&quot;)" office:value-type="string" office:string-value="-" calcext:value-type="string">
            <text:p>-</text:p>
          </table:table-cell>
          <table:table-cell table:style-name="ce147" table:formula="of:=IFERROR(VLOOKUP([$Masterlist.$P173];[$Datasheet.$B$1:.$AV$9809];12;FALSE());&quot;-&quot;)" office:value-type="string" office:string-value="-" calcext:value-type="string">
            <text:p>-</text:p>
          </table:table-cell>
          <table:table-cell table:style-name="ce147" table:formula="of:=IFERROR(VLOOKUP([$Masterlist.$P173];[$Datasheet.$B$1:.$AV$9809];13;FALSE());&quot;-&quot;)" office:value-type="string" office:string-value="-" calcext:value-type="string">
            <text:p>-</text:p>
          </table:table-cell>
          <table:table-cell table:style-name="ce147" table:formula="of:=IFERROR(VLOOKUP([$Masterlist.$P173];[$Datasheet.$B$1:.$AV$9809];14;FALSE());&quot;-&quot;)" office:value-type="string" office:string-value="-" calcext:value-type="string">
            <text:p>-</text:p>
          </table:table-cell>
          <table:table-cell table:style-name="ce147" table:formula="of:=IFERROR(VLOOKUP([$Masterlist.$P173];[$Datasheet.$B$1:.$AV$9809];15;FALSE());&quot;-&quot;)" office:value-type="string" office:string-value="-" calcext:value-type="string">
            <text:p>-</text:p>
          </table:table-cell>
          <table:table-cell table:style-name="ce147" table:formula="of:=IFERROR(VLOOKUP([$Masterlist.$P173];[$Datasheet.$B$1:.$AV$9809];16;FALSE());&quot;-&quot;)" office:value-type="string" office:string-value="-" calcext:value-type="string">
            <text:p>-</text:p>
          </table:table-cell>
          <table:table-cell table:style-name="ce147" table:formula="of:=IFERROR(VLOOKUP([$Masterlist.$P173];[$Datasheet.$B$1:.$AV$9809];17;FALSE());&quot;-&quot;)" office:value-type="string" office:string-value="-" calcext:value-type="string">
            <text:p>-</text:p>
          </table:table-cell>
          <table:table-cell table:style-name="ce147" table:formula="of:=IFERROR(VLOOKUP([$Masterlist.$P173];[$Datasheet.$B$1:.$AV$9809];18;FALSE());&quot;-&quot;)" office:value-type="string" office:string-value="-" calcext:value-type="string">
            <text:p>-</text:p>
          </table:table-cell>
          <table:table-cell table:style-name="ce147" table:formula="of:=IFERROR(VLOOKUP([$Masterlist.$P173];[$Datasheet.$B$1:.$AV$9809];19;FALSE());&quot;-&quot;)" office:value-type="string" office:string-value="-" calcext:value-type="string">
            <text:p>-</text:p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table:number-columns-repeated="5"/>
          <table:table-cell table:number-columns-repeated="2" table:style-name="ce50" office:value-type="string" calcext:value-type="string">
            <text:p>yes</text:p>
          </table:table-cell>
          <table:table-cell table:style-name="ce50" table:number-columns-repeated="5"/>
          <table:table-cell table:style-name="ce92" office:value-type="string" calcext:value-type="string">
            <text:p>Resi</text:p>
          </table:table-cell>
          <table:table-cell table:style-name="ce8" office:value-type="string" calcext:value-type="string">
            <text:p>Wian Laing</text:p>
          </table:table-cell>
          <table:table-cell table:style-name="ce13" table:formula="of:=IF(ISNUMBER(MATCH([.P174];[$Datasheet.$B$1:.$B$9809];0));&quot;✓&quot;;&quot;x&quot;)" office:value-type="string" office:string-value="✓" calcext:value-type="string">
            <text:p>✓</text:p>
          </table:table-cell>
          <table:table-cell table:style-name="ce147" table:formula="of:=IFERROR(VLOOKUP([$Masterlist.$P174];[$Datasheet.$B$1:.$AV$9809];2;FALSE());&quot;-&quot;)" office:value-type="float" office:value="0" calcext:value-type="float">
            <text:p>0</text:p>
          </table:table-cell>
          <table:table-cell table:style-name="ce147" table:formula="of:=IFERROR(VLOOKUP([$Masterlist.$P174];[$Datasheet.$B$1:.$AV$9809];3;FALSE());&quot;-&quot;)" office:value-type="float" office:value="0" calcext:value-type="float">
            <text:p>0</text:p>
          </table:table-cell>
          <table:table-cell table:style-name="ce147" table:formula="of:=IFERROR(VLOOKUP([$Masterlist.$P174];[$Datasheet.$B$1:.$AV$9809];4;FALSE());&quot;-&quot;)" office:value-type="float" office:value="1" calcext:value-type="float">
            <text:p>1</text:p>
          </table:table-cell>
          <table:table-cell table:style-name="ce147" table:formula="of:=IFERROR(VLOOKUP([$Masterlist.$P174];[$Datasheet.$B$1:.$AV$9809];5;FALSE());&quot;-&quot;)" office:value-type="float" office:value="1" calcext:value-type="float">
            <text:p>1</text:p>
          </table:table-cell>
          <table:table-cell table:style-name="ce195" table:formula="of:=IFERROR(VLOOKUP([$Masterlist.$P174];[$Datasheet.$B$1:.$AV$9809];6;FALSE());&quot;-&quot;)" office:value-type="float" office:value="1" calcext:value-type="float">
            <text:p>1</text:p>
          </table:table-cell>
          <table:table-cell table:style-name="ce147" table:formula="of:=IFERROR(VLOOKUP([$Masterlist.$P174];[$Datasheet.$B$1:.$AV$9809];7;FALSE());&quot;-&quot;)" office:value-type="float" office:value="1" calcext:value-type="float">
            <text:p>1</text:p>
          </table:table-cell>
          <table:table-cell table:style-name="ce147" table:formula="of:=IFERROR(VLOOKUP([$Masterlist.$P174];[$Datasheet.$B$1:.$AV$9809];8;FALSE());&quot;-&quot;)" office:value-type="float" office:value="1" calcext:value-type="float">
            <text:p>1</text:p>
          </table:table-cell>
          <table:table-cell table:style-name="ce147" table:formula="of:=IFERROR(VLOOKUP([$Masterlist.$P174];[$Datasheet.$B$1:.$AV$9809];9;FALSE());&quot;-&quot;)" office:value-type="float" office:value="1" calcext:value-type="float">
            <text:p>1</text:p>
          </table:table-cell>
          <table:table-cell table:style-name="ce147" table:formula="of:=IFERROR(VLOOKUP([$Masterlist.$P174];[$Datasheet.$B$1:.$AV$9809];10;FALSE());&quot;-&quot;)" office:value-type="float" office:value="1" calcext:value-type="float">
            <text:p>1</text:p>
          </table:table-cell>
          <table:table-cell table:style-name="ce147" table:formula="of:=IFERROR(VLOOKUP([$Masterlist.$P174];[$Datasheet.$B$1:.$AV$9809];11;FALSE());&quot;-&quot;)" office:value-type="float" office:value="1" calcext:value-type="float">
            <text:p>1</text:p>
          </table:table-cell>
          <table:table-cell table:style-name="ce147" table:formula="of:=IFERROR(VLOOKUP([$Masterlist.$P174];[$Datasheet.$B$1:.$AV$9809];12;FALSE());&quot;-&quot;)" office:value-type="float" office:value="1" calcext:value-type="float">
            <text:p>1</text:p>
          </table:table-cell>
          <table:table-cell table:style-name="ce147" table:formula="of:=IFERROR(VLOOKUP([$Masterlist.$P174];[$Datasheet.$B$1:.$AV$9809];13;FALSE());&quot;-&quot;)" office:value-type="float" office:value="1" calcext:value-type="float">
            <text:p>1</text:p>
          </table:table-cell>
          <table:table-cell table:style-name="ce147" table:formula="of:=IFERROR(VLOOKUP([$Masterlist.$P174];[$Datasheet.$B$1:.$AV$9809];14;FALSE());&quot;-&quot;)" office:value-type="float" office:value="1" calcext:value-type="float">
            <text:p>1</text:p>
          </table:table-cell>
          <table:table-cell table:style-name="ce147" table:formula="of:=IFERROR(VLOOKUP([$Masterlist.$P174];[$Datasheet.$B$1:.$AV$9809];15;FALSE());&quot;-&quot;)" office:value-type="float" office:value="1" calcext:value-type="float">
            <text:p>1</text:p>
          </table:table-cell>
          <table:table-cell table:style-name="ce147" table:formula="of:=IFERROR(VLOOKUP([$Masterlist.$P174];[$Datasheet.$B$1:.$AV$9809];16;FALSE());&quot;-&quot;)" office:value-type="float" office:value="0" calcext:value-type="float">
            <text:p/>
          </table:table-cell>
          <table:table-cell table:style-name="ce147" table:formula="of:=IFERROR(VLOOKUP([$Masterlist.$P174];[$Datasheet.$B$1:.$AV$9809];17;FALSE());&quot;-&quot;)" office:value-type="float" office:value="0" calcext:value-type="float">
            <text:p/>
          </table:table-cell>
          <table:table-cell table:style-name="ce147" table:formula="of:=IFERROR(VLOOKUP([$Masterlist.$P174];[$Datasheet.$B$1:.$AV$9809];18;FALSE());&quot;-&quot;)" office:value-type="float" office:value="0" calcext:value-type="float">
            <text:p/>
          </table:table-cell>
          <table:table-cell table:style-name="ce147" table:formula="of:=IFERROR(VLOOKUP([$Masterlist.$P174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table:number-columns-repeated="5"/>
          <table:table-cell table:number-columns-repeated="2" table:style-name="ce50" office:value-type="string" calcext:value-type="string">
            <text:p>yes</text:p>
          </table:table-cell>
          <table:table-cell table:style-name="ce50" table:number-columns-repeated="5"/>
          <table:table-cell table:style-name="ce92" office:value-type="string" calcext:value-type="string">
            <text:p>Resi</text:p>
          </table:table-cell>
          <table:table-cell table:style-name="ce8" office:value-type="string" calcext:value-type="string">
            <text:p>Sarnia Schoeman</text:p>
          </table:table-cell>
          <table:table-cell table:style-name="ce13" table:formula="of:=IF(ISNUMBER(MATCH([.P175];[$Datasheet.$B$1:.$B$9809];0));&quot;✓&quot;;&quot;x&quot;)" office:value-type="string" office:string-value="✓" calcext:value-type="string">
            <text:p>✓</text:p>
          </table:table-cell>
          <table:table-cell table:style-name="ce147" table:formula="of:=IFERROR(VLOOKUP([$Masterlist.$P175];[$Datasheet.$B$1:.$AV$9809];2;FALSE());&quot;-&quot;)" office:value-type="float" office:value="1" calcext:value-type="float">
            <text:p>1</text:p>
          </table:table-cell>
          <table:table-cell table:style-name="ce147" table:formula="of:=IFERROR(VLOOKUP([$Masterlist.$P175];[$Datasheet.$B$1:.$AV$9809];3;FALSE());&quot;-&quot;)" office:value-type="float" office:value="1" calcext:value-type="float">
            <text:p>1</text:p>
          </table:table-cell>
          <table:table-cell table:style-name="ce147" table:formula="of:=IFERROR(VLOOKUP([$Masterlist.$P175];[$Datasheet.$B$1:.$AV$9809];4;FALSE());&quot;-&quot;)" office:value-type="float" office:value="1" calcext:value-type="float">
            <text:p>1</text:p>
          </table:table-cell>
          <table:table-cell table:style-name="ce147" table:formula="of:=IFERROR(VLOOKUP([$Masterlist.$P175];[$Datasheet.$B$1:.$AV$9809];5;FALSE());&quot;-&quot;)" office:value-type="float" office:value="1" calcext:value-type="float">
            <text:p>1</text:p>
          </table:table-cell>
          <table:table-cell table:style-name="ce195" table:formula="of:=IFERROR(VLOOKUP([$Masterlist.$P175];[$Datasheet.$B$1:.$AV$9809];6;FALSE());&quot;-&quot;)" office:value-type="float" office:value="1" calcext:value-type="float">
            <text:p>1</text:p>
          </table:table-cell>
          <table:table-cell table:style-name="ce147" table:formula="of:=IFERROR(VLOOKUP([$Masterlist.$P175];[$Datasheet.$B$1:.$AV$9809];7;FALSE());&quot;-&quot;)" office:value-type="float" office:value="1" calcext:value-type="float">
            <text:p>1</text:p>
          </table:table-cell>
          <table:table-cell table:style-name="ce147" table:formula="of:=IFERROR(VLOOKUP([$Masterlist.$P175];[$Datasheet.$B$1:.$AV$9809];8;FALSE());&quot;-&quot;)" office:value-type="float" office:value="1" calcext:value-type="float">
            <text:p>1</text:p>
          </table:table-cell>
          <table:table-cell table:style-name="ce147" table:formula="of:=IFERROR(VLOOKUP([$Masterlist.$P175];[$Datasheet.$B$1:.$AV$9809];9;FALSE());&quot;-&quot;)" office:value-type="float" office:value="1" calcext:value-type="float">
            <text:p>1</text:p>
          </table:table-cell>
          <table:table-cell table:style-name="ce147" table:formula="of:=IFERROR(VLOOKUP([$Masterlist.$P175];[$Datasheet.$B$1:.$AV$9809];10;FALSE());&quot;-&quot;)" office:value-type="float" office:value="1" calcext:value-type="float">
            <text:p>1</text:p>
          </table:table-cell>
          <table:table-cell table:style-name="ce147" table:formula="of:=IFERROR(VLOOKUP([$Masterlist.$P175];[$Datasheet.$B$1:.$AV$9809];11;FALSE());&quot;-&quot;)" office:value-type="float" office:value="1" calcext:value-type="float">
            <text:p>1</text:p>
          </table:table-cell>
          <table:table-cell table:style-name="ce147" table:formula="of:=IFERROR(VLOOKUP([$Masterlist.$P175];[$Datasheet.$B$1:.$AV$9809];12;FALSE());&quot;-&quot;)" office:value-type="float" office:value="1" calcext:value-type="float">
            <text:p>1</text:p>
          </table:table-cell>
          <table:table-cell table:style-name="ce147" table:formula="of:=IFERROR(VLOOKUP([$Masterlist.$P175];[$Datasheet.$B$1:.$AV$9809];13;FALSE());&quot;-&quot;)" office:value-type="float" office:value="1" calcext:value-type="float">
            <text:p>1</text:p>
          </table:table-cell>
          <table:table-cell table:style-name="ce147" table:formula="of:=IFERROR(VLOOKUP([$Masterlist.$P175];[$Datasheet.$B$1:.$AV$9809];14;FALSE());&quot;-&quot;)" office:value-type="float" office:value="0" calcext:value-type="float">
            <text:p>0</text:p>
          </table:table-cell>
          <table:table-cell table:style-name="ce147" table:formula="of:=IFERROR(VLOOKUP([$Masterlist.$P175];[$Datasheet.$B$1:.$AV$9809];15;FALSE());&quot;-&quot;)" office:value-type="float" office:value="0" calcext:value-type="float">
            <text:p>0</text:p>
          </table:table-cell>
          <table:table-cell table:style-name="ce147" table:formula="of:=IFERROR(VLOOKUP([$Masterlist.$P175];[$Datasheet.$B$1:.$AV$9809];16;FALSE());&quot;-&quot;)" office:value-type="float" office:value="0" calcext:value-type="float">
            <text:p/>
          </table:table-cell>
          <table:table-cell table:style-name="ce147" table:formula="of:=IFERROR(VLOOKUP([$Masterlist.$P175];[$Datasheet.$B$1:.$AV$9809];17;FALSE());&quot;-&quot;)" office:value-type="float" office:value="0" calcext:value-type="float">
            <text:p/>
          </table:table-cell>
          <table:table-cell table:style-name="ce147" table:formula="of:=IFERROR(VLOOKUP([$Masterlist.$P175];[$Datasheet.$B$1:.$AV$9809];18;FALSE());&quot;-&quot;)" office:value-type="float" office:value="0" calcext:value-type="float">
            <text:p/>
          </table:table-cell>
          <table:table-cell table:style-name="ce147" table:formula="of:=IFERROR(VLOOKUP([$Masterlist.$P175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table:number-columns-repeated="5"/>
          <table:table-cell table:number-columns-repeated="2" table:style-name="ce50" office:value-type="string" calcext:value-type="string">
            <text:p>yes</text:p>
          </table:table-cell>
          <table:table-cell table:style-name="ce50" table:number-columns-repeated="5"/>
          <table:table-cell table:style-name="ce92" office:value-type="string" calcext:value-type="string">
            <text:p>Resi</text:p>
          </table:table-cell>
          <table:table-cell table:style-name="ce8" office:value-type="string" calcext:value-type="string">
            <text:p>Xavier Nunes</text:p>
          </table:table-cell>
          <table:table-cell table:style-name="ce13" table:formula="of:=IF(ISNUMBER(MATCH([.P176];[$Datasheet.$B$1:.$B$9809];0));&quot;✓&quot;;&quot;x&quot;)" office:value-type="string" office:string-value="✓" calcext:value-type="string">
            <text:p>✓</text:p>
          </table:table-cell>
          <table:table-cell table:style-name="ce147" table:formula="of:=IFERROR(VLOOKUP([$Masterlist.$P176];[$Datasheet.$B$1:.$AV$9809];2;FALSE());&quot;-&quot;)" office:value-type="float" office:value="1" calcext:value-type="float">
            <text:p>1</text:p>
          </table:table-cell>
          <table:table-cell table:style-name="ce147" table:formula="of:=IFERROR(VLOOKUP([$Masterlist.$P176];[$Datasheet.$B$1:.$AV$9809];3;FALSE());&quot;-&quot;)" office:value-type="float" office:value="1" calcext:value-type="float">
            <text:p>1</text:p>
          </table:table-cell>
          <table:table-cell table:style-name="ce147" table:formula="of:=IFERROR(VLOOKUP([$Masterlist.$P176];[$Datasheet.$B$1:.$AV$9809];4;FALSE());&quot;-&quot;)" office:value-type="float" office:value="1" calcext:value-type="float">
            <text:p>1</text:p>
          </table:table-cell>
          <table:table-cell table:style-name="ce147" table:formula="of:=IFERROR(VLOOKUP([$Masterlist.$P176];[$Datasheet.$B$1:.$AV$9809];5;FALSE());&quot;-&quot;)" office:value-type="float" office:value="1" calcext:value-type="float">
            <text:p>1</text:p>
          </table:table-cell>
          <table:table-cell table:style-name="ce195" table:formula="of:=IFERROR(VLOOKUP([$Masterlist.$P176];[$Datasheet.$B$1:.$AV$9809];6;FALSE());&quot;-&quot;)" office:value-type="float" office:value="1" calcext:value-type="float">
            <text:p>1</text:p>
          </table:table-cell>
          <table:table-cell table:style-name="ce147" table:formula="of:=IFERROR(VLOOKUP([$Masterlist.$P176];[$Datasheet.$B$1:.$AV$9809];7;FALSE());&quot;-&quot;)" office:value-type="float" office:value="1" calcext:value-type="float">
            <text:p>1</text:p>
          </table:table-cell>
          <table:table-cell table:style-name="ce147" table:formula="of:=IFERROR(VLOOKUP([$Masterlist.$P176];[$Datasheet.$B$1:.$AV$9809];8;FALSE());&quot;-&quot;)" office:value-type="float" office:value="1" calcext:value-type="float">
            <text:p>1</text:p>
          </table:table-cell>
          <table:table-cell table:style-name="ce147" table:formula="of:=IFERROR(VLOOKUP([$Masterlist.$P176];[$Datasheet.$B$1:.$AV$9809];9;FALSE());&quot;-&quot;)" office:value-type="float" office:value="1" calcext:value-type="float">
            <text:p>1</text:p>
          </table:table-cell>
          <table:table-cell table:style-name="ce147" table:formula="of:=IFERROR(VLOOKUP([$Masterlist.$P176];[$Datasheet.$B$1:.$AV$9809];10;FALSE());&quot;-&quot;)" office:value-type="float" office:value="1" calcext:value-type="float">
            <text:p>1</text:p>
          </table:table-cell>
          <table:table-cell table:style-name="ce147" table:formula="of:=IFERROR(VLOOKUP([$Masterlist.$P176];[$Datasheet.$B$1:.$AV$9809];11;FALSE());&quot;-&quot;)" office:value-type="float" office:value="1" calcext:value-type="float">
            <text:p>1</text:p>
          </table:table-cell>
          <table:table-cell table:style-name="ce147" table:formula="of:=IFERROR(VLOOKUP([$Masterlist.$P176];[$Datasheet.$B$1:.$AV$9809];12;FALSE());&quot;-&quot;)" office:value-type="float" office:value="1" calcext:value-type="float">
            <text:p>1</text:p>
          </table:table-cell>
          <table:table-cell table:style-name="ce147" table:formula="of:=IFERROR(VLOOKUP([$Masterlist.$P176];[$Datasheet.$B$1:.$AV$9809];13;FALSE());&quot;-&quot;)" office:value-type="float" office:value="1" calcext:value-type="float">
            <text:p>1</text:p>
          </table:table-cell>
          <table:table-cell table:style-name="ce147" table:formula="of:=IFERROR(VLOOKUP([$Masterlist.$P176];[$Datasheet.$B$1:.$AV$9809];14;FALSE());&quot;-&quot;)" office:value-type="float" office:value="1" calcext:value-type="float">
            <text:p>1</text:p>
          </table:table-cell>
          <table:table-cell table:style-name="ce147" table:formula="of:=IFERROR(VLOOKUP([$Masterlist.$P176];[$Datasheet.$B$1:.$AV$9809];15;FALSE());&quot;-&quot;)" office:value-type="float" office:value="1" calcext:value-type="float">
            <text:p>1</text:p>
          </table:table-cell>
          <table:table-cell table:style-name="ce147" table:formula="of:=IFERROR(VLOOKUP([$Masterlist.$P176];[$Datasheet.$B$1:.$AV$9809];16;FALSE());&quot;-&quot;)" office:value-type="float" office:value="0" calcext:value-type="float">
            <text:p/>
          </table:table-cell>
          <table:table-cell table:style-name="ce147" table:formula="of:=IFERROR(VLOOKUP([$Masterlist.$P176];[$Datasheet.$B$1:.$AV$9809];17;FALSE());&quot;-&quot;)" office:value-type="float" office:value="0" calcext:value-type="float">
            <text:p/>
          </table:table-cell>
          <table:table-cell table:style-name="ce147" table:formula="of:=IFERROR(VLOOKUP([$Masterlist.$P176];[$Datasheet.$B$1:.$AV$9809];18;FALSE());&quot;-&quot;)" office:value-type="float" office:value="0" calcext:value-type="float">
            <text:p/>
          </table:table-cell>
          <table:table-cell table:style-name="ce147" table:formula="of:=IFERROR(VLOOKUP([$Masterlist.$P176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/>
          <table:table-cell table:style-name="ce50" table:number-columns-repeated="5"/>
          <table:table-cell table:number-columns-repeated="2" table:style-name="ce50" office:value-type="string" calcext:value-type="string">
            <text:p>yes</text:p>
          </table:table-cell>
          <table:table-cell table:style-name="ce50" table:number-columns-repeated="5"/>
          <table:table-cell table:style-name="ce92" office:value-type="string" calcext:value-type="string">
            <text:p>Resi</text:p>
          </table:table-cell>
          <table:table-cell table:style-name="ce8" office:value-type="string" calcext:value-type="string">
            <text:p>Nadette Norris</text:p>
          </table:table-cell>
          <table:table-cell table:style-name="ce13" table:formula="of:=IF(ISNUMBER(MATCH([.P177];[$Datasheet.$B$1:.$B$9809];0));&quot;✓&quot;;&quot;x&quot;)" office:value-type="string" office:string-value="✓" calcext:value-type="string">
            <text:p>✓</text:p>
          </table:table-cell>
          <table:table-cell table:style-name="ce147" table:number-columns-repeated="4"/>
          <table:table-cell table:style-name="ce195" table:formula="of:=IFERROR(VLOOKUP([$Masterlist.$P177];[$Datasheet.$B$1:.$AV$9809];6;FALSE());&quot;-&quot;)" office:value-type="float" office:value="1" calcext:value-type="float">
            <text:p>1</text:p>
          </table:table-cell>
          <table:table-cell table:style-name="ce147" table:formula="of:=IFERROR(VLOOKUP([$Masterlist.$P177];[$Datasheet.$B$1:.$AV$9809];7;FALSE());&quot;-&quot;)" office:value-type="float" office:value="1" calcext:value-type="float">
            <text:p>1</text:p>
          </table:table-cell>
          <table:table-cell table:style-name="ce147" table:formula="of:=IFERROR(VLOOKUP([$Masterlist.$P177];[$Datasheet.$B$1:.$AV$9809];8;FALSE());&quot;-&quot;)" office:value-type="float" office:value="0" calcext:value-type="float">
            <text:p>0</text:p>
          </table:table-cell>
          <table:table-cell table:style-name="ce147" table:formula="of:=IFERROR(VLOOKUP([$Masterlist.$P177];[$Datasheet.$B$1:.$AV$9809];9;FALSE());&quot;-&quot;)" office:value-type="float" office:value="0" calcext:value-type="float">
            <text:p>0</text:p>
          </table:table-cell>
          <table:table-cell table:style-name="ce147" table:formula="of:=IFERROR(VLOOKUP([$Masterlist.$P177];[$Datasheet.$B$1:.$AV$9809];10;FALSE());&quot;-&quot;)" office:value-type="float" office:value="1" calcext:value-type="float">
            <text:p>1</text:p>
          </table:table-cell>
          <table:table-cell table:style-name="ce147" table:formula="of:=IFERROR(VLOOKUP([$Masterlist.$P177];[$Datasheet.$B$1:.$AV$9809];11;FALSE());&quot;-&quot;)" office:value-type="float" office:value="1" calcext:value-type="float">
            <text:p>1</text:p>
          </table:table-cell>
          <table:table-cell table:style-name="ce147" table:formula="of:=IFERROR(VLOOKUP([$Masterlist.$P177];[$Datasheet.$B$1:.$AV$9809];12;FALSE());&quot;-&quot;)" office:value-type="float" office:value="0" calcext:value-type="float">
            <text:p>0</text:p>
          </table:table-cell>
          <table:table-cell table:style-name="ce147" table:formula="of:=IFERROR(VLOOKUP([$Masterlist.$P177];[$Datasheet.$B$1:.$AV$9809];13;FALSE());&quot;-&quot;)" office:value-type="float" office:value="1" calcext:value-type="float">
            <text:p>1</text:p>
          </table:table-cell>
          <table:table-cell table:style-name="ce147" table:formula="of:=IFERROR(VLOOKUP([$Masterlist.$P177];[$Datasheet.$B$1:.$AV$9809];14;FALSE());&quot;-&quot;)" office:value-type="float" office:value="0" calcext:value-type="float">
            <text:p>0</text:p>
          </table:table-cell>
          <table:table-cell table:style-name="ce147" table:formula="of:=IFERROR(VLOOKUP([$Masterlist.$P177];[$Datasheet.$B$1:.$AV$9809];15;FALSE());&quot;-&quot;)" office:value-type="float" office:value="1" calcext:value-type="float">
            <text:p>1</text:p>
          </table:table-cell>
          <table:table-cell table:style-name="ce147" table:formula="of:=IFERROR(VLOOKUP([$Masterlist.$P177];[$Datasheet.$B$1:.$AV$9809];16;FALSE());&quot;-&quot;)" office:value-type="float" office:value="0" calcext:value-type="float">
            <text:p/>
          </table:table-cell>
          <table:table-cell table:style-name="ce147" table:formula="of:=IFERROR(VLOOKUP([$Masterlist.$P177];[$Datasheet.$B$1:.$AV$9809];17;FALSE());&quot;-&quot;)" office:value-type="float" office:value="0" calcext:value-type="float">
            <text:p/>
          </table:table-cell>
          <table:table-cell table:style-name="ce147" table:formula="of:=IFERROR(VLOOKUP([$Masterlist.$P177];[$Datasheet.$B$1:.$AV$9809];18;FALSE());&quot;-&quot;)" office:value-type="float" office:value="0" calcext:value-type="float">
            <text:p/>
          </table:table-cell>
          <table:table-cell table:style-name="ce147" table:formula="of:=IFERROR(VLOOKUP([$Masterlist.$P177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table:number-columns-repeated="9"/>
          <table:table-cell table:style-name="ce50" office:value-type="string" calcext:value-type="string">
            <text:p>yes</text:p>
          </table:table-cell>
          <table:table-cell table:style-name="ce50" table:number-columns-repeated="2"/>
          <table:table-cell table:style-name="ce92" office:value-type="string" calcext:value-type="string">
            <text:p>Resi</text:p>
          </table:table-cell>
          <table:table-cell table:style-name="ce8" office:value-type="string" calcext:value-type="string">
            <text:p>Danika Oosthuizen</text:p>
          </table:table-cell>
          <table:table-cell table:style-name="ce13" table:formula="of:=IF(ISNUMBER(MATCH([.P178];[$Datasheet.$B$1:.$B$9809];0));&quot;✓&quot;;&quot;x&quot;)" office:value-type="string" office:string-value="✓" calcext:value-type="string">
            <text:p>✓</text:p>
          </table:table-cell>
          <table:table-cell table:style-name="ce147" table:formula="of:=IFERROR(VLOOKUP([$Masterlist.$P178];[$Datasheet.$B$1:.$AV$9809];2;FALSE());&quot;-&quot;)" office:value-type="float" office:value="0" calcext:value-type="float">
            <text:p>0</text:p>
          </table:table-cell>
          <table:table-cell table:style-name="ce147" table:formula="of:=IFERROR(VLOOKUP([$Masterlist.$P178];[$Datasheet.$B$1:.$AV$9809];3;FALSE());&quot;-&quot;)" office:value-type="float" office:value="0" calcext:value-type="float">
            <text:p>0</text:p>
          </table:table-cell>
          <table:table-cell table:style-name="ce147" table:formula="of:=IFERROR(VLOOKUP([$Masterlist.$P178];[$Datasheet.$B$1:.$AV$9809];4;FALSE());&quot;-&quot;)" office:value-type="float" office:value="0" calcext:value-type="float">
            <text:p>0</text:p>
          </table:table-cell>
          <table:table-cell table:style-name="ce147" table:formula="of:=IFERROR(VLOOKUP([$Masterlist.$P178];[$Datasheet.$B$1:.$AV$9809];5;FALSE());&quot;-&quot;)" office:value-type="float" office:value="1" calcext:value-type="float">
            <text:p>1</text:p>
          </table:table-cell>
          <table:table-cell table:style-name="ce195" table:formula="of:=IFERROR(VLOOKUP([$Masterlist.$P178];[$Datasheet.$B$1:.$AV$9809];6;FALSE());&quot;-&quot;)" office:value-type="float" office:value="1" calcext:value-type="float">
            <text:p>1</text:p>
          </table:table-cell>
          <table:table-cell table:style-name="ce147" table:formula="of:=IFERROR(VLOOKUP([$Masterlist.$P178];[$Datasheet.$B$1:.$AV$9809];7;FALSE());&quot;-&quot;)" office:value-type="float" office:value="1" calcext:value-type="float">
            <text:p>1</text:p>
          </table:table-cell>
          <table:table-cell table:style-name="ce147" table:formula="of:=IFERROR(VLOOKUP([$Masterlist.$P178];[$Datasheet.$B$1:.$AV$9809];8;FALSE());&quot;-&quot;)" office:value-type="float" office:value="0" calcext:value-type="float">
            <text:p>0</text:p>
          </table:table-cell>
          <table:table-cell table:style-name="ce147" table:formula="of:=IFERROR(VLOOKUP([$Masterlist.$P178];[$Datasheet.$B$1:.$AV$9809];9;FALSE());&quot;-&quot;)" office:value-type="float" office:value="0" calcext:value-type="float">
            <text:p>0</text:p>
          </table:table-cell>
          <table:table-cell table:style-name="ce147" table:formula="of:=IFERROR(VLOOKUP([$Masterlist.$P178];[$Datasheet.$B$1:.$AV$9809];10;FALSE());&quot;-&quot;)" office:value-type="float" office:value="0" calcext:value-type="float">
            <text:p>0</text:p>
          </table:table-cell>
          <table:table-cell table:style-name="ce147" table:formula="of:=IFERROR(VLOOKUP([$Masterlist.$P178];[$Datasheet.$B$1:.$AV$9809];11;FALSE());&quot;-&quot;)" office:value-type="float" office:value="1" calcext:value-type="float">
            <text:p>1</text:p>
          </table:table-cell>
          <table:table-cell table:style-name="ce147" table:formula="of:=IFERROR(VLOOKUP([$Masterlist.$P178];[$Datasheet.$B$1:.$AV$9809];12;FALSE());&quot;-&quot;)" office:value-type="float" office:value="0" calcext:value-type="float">
            <text:p>0</text:p>
          </table:table-cell>
          <table:table-cell table:style-name="ce147" table:formula="of:=IFERROR(VLOOKUP([$Masterlist.$P178];[$Datasheet.$B$1:.$AV$9809];13;FALSE());&quot;-&quot;)" office:value-type="float" office:value="0" calcext:value-type="float">
            <text:p>0</text:p>
          </table:table-cell>
          <table:table-cell table:style-name="ce147" table:formula="of:=IFERROR(VLOOKUP([$Masterlist.$P178];[$Datasheet.$B$1:.$AV$9809];14;FALSE());&quot;-&quot;)" office:value-type="float" office:value="1" calcext:value-type="float">
            <text:p>1</text:p>
          </table:table-cell>
          <table:table-cell table:style-name="ce147" table:formula="of:=IFERROR(VLOOKUP([$Masterlist.$P178];[$Datasheet.$B$1:.$AV$9809];15;FALSE());&quot;-&quot;)" office:value-type="float" office:value="1" calcext:value-type="float">
            <text:p>1</text:p>
          </table:table-cell>
          <table:table-cell table:style-name="ce147" table:formula="of:=IFERROR(VLOOKUP([$Masterlist.$P178];[$Datasheet.$B$1:.$AV$9809];16;FALSE());&quot;-&quot;)" office:value-type="float" office:value="0" calcext:value-type="float">
            <text:p/>
          </table:table-cell>
          <table:table-cell table:style-name="ce147" table:formula="of:=IFERROR(VLOOKUP([$Masterlist.$P178];[$Datasheet.$B$1:.$AV$9809];17;FALSE());&quot;-&quot;)" office:value-type="float" office:value="0" calcext:value-type="float">
            <text:p/>
          </table:table-cell>
          <table:table-cell table:style-name="ce147" table:formula="of:=IFERROR(VLOOKUP([$Masterlist.$P178];[$Datasheet.$B$1:.$AV$9809];18;FALSE());&quot;-&quot;)" office:value-type="float" office:value="0" calcext:value-type="float">
            <text:p/>
          </table:table-cell>
          <table:table-cell table:style-name="ce147" table:formula="of:=IFERROR(VLOOKUP([$Masterlist.$P178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table:number-columns-repeated="9"/>
          <table:table-cell table:style-name="ce50" office:value-type="string" calcext:value-type="string">
            <text:p>yes</text:p>
          </table:table-cell>
          <table:table-cell table:style-name="ce50" table:number-columns-repeated="2"/>
          <table:table-cell table:style-name="ce92" office:value-type="string" calcext:value-type="string">
            <text:p>Resi</text:p>
          </table:table-cell>
          <table:table-cell table:style-name="ce8" office:value-type="string" calcext:value-type="string">
            <text:p>Martin Oosthuizen</text:p>
          </table:table-cell>
          <table:table-cell table:style-name="ce13" table:formula="of:=IF(ISNUMBER(MATCH([.P179];[$Datasheet.$B$1:.$B$9809];0));&quot;✓&quot;;&quot;x&quot;)" office:value-type="string" office:string-value="✓" calcext:value-type="string">
            <text:p>✓</text:p>
          </table:table-cell>
          <table:table-cell table:style-name="ce147" table:formula="of:=IFERROR(VLOOKUP([$Masterlist.$P179];[$Datasheet.$B$1:.$AV$9809];2;FALSE());&quot;-&quot;)" office:value-type="float" office:value="0" calcext:value-type="float">
            <text:p>0</text:p>
          </table:table-cell>
          <table:table-cell table:style-name="ce147" table:formula="of:=IFERROR(VLOOKUP([$Masterlist.$P179];[$Datasheet.$B$1:.$AV$9809];3;FALSE());&quot;-&quot;)" office:value-type="float" office:value="0" calcext:value-type="float">
            <text:p>0</text:p>
          </table:table-cell>
          <table:table-cell table:style-name="ce147" table:formula="of:=IFERROR(VLOOKUP([$Masterlist.$P179];[$Datasheet.$B$1:.$AV$9809];4;FALSE());&quot;-&quot;)" office:value-type="float" office:value="1" calcext:value-type="float">
            <text:p>1</text:p>
          </table:table-cell>
          <table:table-cell table:style-name="ce147" table:formula="of:=IFERROR(VLOOKUP([$Masterlist.$P179];[$Datasheet.$B$1:.$AV$9809];5;FALSE());&quot;-&quot;)" office:value-type="float" office:value="1" calcext:value-type="float">
            <text:p>1</text:p>
          </table:table-cell>
          <table:table-cell table:style-name="ce195" table:formula="of:=IFERROR(VLOOKUP([$Masterlist.$P179];[$Datasheet.$B$1:.$AV$9809];6;FALSE());&quot;-&quot;)" office:value-type="float" office:value="0" calcext:value-type="float">
            <text:p>0</text:p>
          </table:table-cell>
          <table:table-cell table:style-name="ce147" table:formula="of:=IFERROR(VLOOKUP([$Masterlist.$P179];[$Datasheet.$B$1:.$AV$9809];7;FALSE());&quot;-&quot;)" office:value-type="float" office:value="1" calcext:value-type="float">
            <text:p>1</text:p>
          </table:table-cell>
          <table:table-cell table:style-name="ce147" table:formula="of:=IFERROR(VLOOKUP([$Masterlist.$P179];[$Datasheet.$B$1:.$AV$9809];8;FALSE());&quot;-&quot;)" office:value-type="float" office:value="0" calcext:value-type="float">
            <text:p>0</text:p>
          </table:table-cell>
          <table:table-cell table:style-name="ce147" table:formula="of:=IFERROR(VLOOKUP([$Masterlist.$P179];[$Datasheet.$B$1:.$AV$9809];9;FALSE());&quot;-&quot;)" office:value-type="float" office:value="0" calcext:value-type="float">
            <text:p>0</text:p>
          </table:table-cell>
          <table:table-cell table:style-name="ce147" table:formula="of:=IFERROR(VLOOKUP([$Masterlist.$P179];[$Datasheet.$B$1:.$AV$9809];10;FALSE());&quot;-&quot;)" office:value-type="float" office:value="1" calcext:value-type="float">
            <text:p>1</text:p>
          </table:table-cell>
          <table:table-cell table:style-name="ce147" table:formula="of:=IFERROR(VLOOKUP([$Masterlist.$P179];[$Datasheet.$B$1:.$AV$9809];11;FALSE());&quot;-&quot;)" office:value-type="float" office:value="1" calcext:value-type="float">
            <text:p>1</text:p>
          </table:table-cell>
          <table:table-cell table:style-name="ce147" table:formula="of:=IFERROR(VLOOKUP([$Masterlist.$P179];[$Datasheet.$B$1:.$AV$9809];12;FALSE());&quot;-&quot;)" office:value-type="float" office:value="0" calcext:value-type="float">
            <text:p>0</text:p>
          </table:table-cell>
          <table:table-cell table:style-name="ce147" table:formula="of:=IFERROR(VLOOKUP([$Masterlist.$P179];[$Datasheet.$B$1:.$AV$9809];13;FALSE());&quot;-&quot;)" office:value-type="float" office:value="0" calcext:value-type="float">
            <text:p>0</text:p>
          </table:table-cell>
          <table:table-cell table:style-name="ce147" table:formula="of:=IFERROR(VLOOKUP([$Masterlist.$P179];[$Datasheet.$B$1:.$AV$9809];14;FALSE());&quot;-&quot;)" office:value-type="float" office:value="0" calcext:value-type="float">
            <text:p>0</text:p>
          </table:table-cell>
          <table:table-cell table:style-name="ce147" table:formula="of:=IFERROR(VLOOKUP([$Masterlist.$P179];[$Datasheet.$B$1:.$AV$9809];15;FALSE());&quot;-&quot;)" office:value-type="float" office:value="1" calcext:value-type="float">
            <text:p>1</text:p>
          </table:table-cell>
          <table:table-cell table:style-name="ce147" table:formula="of:=IFERROR(VLOOKUP([$Masterlist.$P179];[$Datasheet.$B$1:.$AV$9809];16;FALSE());&quot;-&quot;)" office:value-type="float" office:value="0" calcext:value-type="float">
            <text:p/>
          </table:table-cell>
          <table:table-cell table:style-name="ce147" table:formula="of:=IFERROR(VLOOKUP([$Masterlist.$P179];[$Datasheet.$B$1:.$AV$9809];17;FALSE());&quot;-&quot;)" office:value-type="float" office:value="0" calcext:value-type="float">
            <text:p/>
          </table:table-cell>
          <table:table-cell table:style-name="ce147" table:formula="of:=IFERROR(VLOOKUP([$Masterlist.$P179];[$Datasheet.$B$1:.$AV$9809];18;FALSE());&quot;-&quot;)" office:value-type="float" office:value="0" calcext:value-type="float">
            <text:p/>
          </table:table-cell>
          <table:table-cell table:style-name="ce147" table:formula="of:=IFERROR(VLOOKUP([$Masterlist.$P179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A</text:p>
          </table:table-cell>
          <table:table-cell table:style-name="ce50" table:number-columns-repeated="9"/>
          <table:table-cell table:style-name="ce50" office:value-type="string" calcext:value-type="string">
            <text:p>yes</text:p>
          </table:table-cell>
          <table:table-cell table:style-name="ce50" table:number-columns-repeated="2"/>
          <table:table-cell table:style-name="ce92" office:value-type="string" calcext:value-type="string">
            <text:p>Resi</text:p>
          </table:table-cell>
          <table:table-cell table:style-name="ce8" office:value-type="string" calcext:value-type="string">
            <text:p>Greg Moore</text:p>
          </table:table-cell>
          <table:table-cell table:style-name="ce13" table:formula="of:=IF(ISNUMBER(MATCH([.P180];[$Datasheet.$B$1:.$B$9809];0));&quot;✓&quot;;&quot;x&quot;)" office:value-type="string" office:string-value="x" calcext:value-type="string">
            <text:p>x</text:p>
          </table:table-cell>
          <table:table-cell table:style-name="ce147" table:formula="of:=IFERROR(VLOOKUP([$Masterlist.$P180];[$Datasheet.$B$1:.$AV$9809];2;FALSE());&quot;-&quot;)" office:value-type="string" office:string-value="-" calcext:value-type="string">
            <text:p>-</text:p>
          </table:table-cell>
          <table:table-cell table:style-name="ce147" table:formula="of:=IFERROR(VLOOKUP([$Masterlist.$P180];[$Datasheet.$B$1:.$AV$9809];3;FALSE());&quot;-&quot;)" office:value-type="string" office:string-value="-" calcext:value-type="string">
            <text:p>-</text:p>
          </table:table-cell>
          <table:table-cell table:style-name="ce147" table:formula="of:=IFERROR(VLOOKUP([$Masterlist.$P180];[$Datasheet.$B$1:.$AV$9809];4;FALSE());&quot;-&quot;)" office:value-type="string" office:string-value="-" calcext:value-type="string">
            <text:p>-</text:p>
          </table:table-cell>
          <table:table-cell table:style-name="ce147" table:formula="of:=IFERROR(VLOOKUP([$Masterlist.$P180];[$Datasheet.$B$1:.$AV$9809];5;FALSE());&quot;-&quot;)" office:value-type="string" office:string-value="-" calcext:value-type="string">
            <text:p>-</text:p>
          </table:table-cell>
          <table:table-cell table:style-name="ce195" table:formula="of:=IFERROR(VLOOKUP([$Masterlist.$P180];[$Datasheet.$B$1:.$AV$9809];6;FALSE());&quot;-&quot;)" office:value-type="string" office:string-value="-" calcext:value-type="string">
            <text:p>-</text:p>
          </table:table-cell>
          <table:table-cell table:style-name="ce147" table:formula="of:=IFERROR(VLOOKUP([$Masterlist.$P180];[$Datasheet.$B$1:.$AV$9809];7;FALSE());&quot;-&quot;)" office:value-type="string" office:string-value="-" calcext:value-type="string">
            <text:p>-</text:p>
          </table:table-cell>
          <table:table-cell table:style-name="ce147" table:formula="of:=IFERROR(VLOOKUP([$Masterlist.$P180];[$Datasheet.$B$1:.$AV$9809];8;FALSE());&quot;-&quot;)" office:value-type="string" office:string-value="-" calcext:value-type="string">
            <text:p>-</text:p>
          </table:table-cell>
          <table:table-cell table:style-name="ce147" table:formula="of:=IFERROR(VLOOKUP([$Masterlist.$P180];[$Datasheet.$B$1:.$AV$9809];9;FALSE());&quot;-&quot;)" office:value-type="string" office:string-value="-" calcext:value-type="string">
            <text:p>-</text:p>
          </table:table-cell>
          <table:table-cell table:style-name="ce147" table:formula="of:=IFERROR(VLOOKUP([$Masterlist.$P180];[$Datasheet.$B$1:.$AV$9809];10;FALSE());&quot;-&quot;)" office:value-type="string" office:string-value="-" calcext:value-type="string">
            <text:p>-</text:p>
          </table:table-cell>
          <table:table-cell table:style-name="ce147" table:formula="of:=IFERROR(VLOOKUP([$Masterlist.$P180];[$Datasheet.$B$1:.$AV$9809];11;FALSE());&quot;-&quot;)" office:value-type="string" office:string-value="-" calcext:value-type="string">
            <text:p>-</text:p>
          </table:table-cell>
          <table:table-cell table:style-name="ce147" table:formula="of:=IFERROR(VLOOKUP([$Masterlist.$P180];[$Datasheet.$B$1:.$AV$9809];12;FALSE());&quot;-&quot;)" office:value-type="string" office:string-value="-" calcext:value-type="string">
            <text:p>-</text:p>
          </table:table-cell>
          <table:table-cell table:style-name="ce147" table:formula="of:=IFERROR(VLOOKUP([$Masterlist.$P180];[$Datasheet.$B$1:.$AV$9809];13;FALSE());&quot;-&quot;)" office:value-type="string" office:string-value="-" calcext:value-type="string">
            <text:p>-</text:p>
          </table:table-cell>
          <table:table-cell table:style-name="ce147" table:formula="of:=IFERROR(VLOOKUP([$Masterlist.$P180];[$Datasheet.$B$1:.$AV$9809];14;FALSE());&quot;-&quot;)" office:value-type="string" office:string-value="-" calcext:value-type="string">
            <text:p>-</text:p>
          </table:table-cell>
          <table:table-cell table:style-name="ce147" table:formula="of:=IFERROR(VLOOKUP([$Masterlist.$P180];[$Datasheet.$B$1:.$AV$9809];15;FALSE());&quot;-&quot;)" office:value-type="string" office:string-value="-" calcext:value-type="string">
            <text:p>-</text:p>
          </table:table-cell>
          <table:table-cell table:style-name="ce147" table:formula="of:=IFERROR(VLOOKUP([$Masterlist.$P180];[$Datasheet.$B$1:.$AV$9809];16;FALSE());&quot;-&quot;)" office:value-type="string" office:string-value="-" calcext:value-type="string">
            <text:p>-</text:p>
          </table:table-cell>
          <table:table-cell table:style-name="ce147" table:formula="of:=IFERROR(VLOOKUP([$Masterlist.$P180];[$Datasheet.$B$1:.$AV$9809];17;FALSE());&quot;-&quot;)" office:value-type="string" office:string-value="-" calcext:value-type="string">
            <text:p>-</text:p>
          </table:table-cell>
          <table:table-cell table:style-name="ce147" table:formula="of:=IFERROR(VLOOKUP([$Masterlist.$P180];[$Datasheet.$B$1:.$AV$9809];18;FALSE());&quot;-&quot;)" office:value-type="string" office:string-value="-" calcext:value-type="string">
            <text:p>-</text:p>
          </table:table-cell>
          <table:table-cell table:style-name="ce147" table:formula="of:=IFERROR(VLOOKUP([$Masterlist.$P180];[$Datasheet.$B$1:.$AV$9809];19;FALSE());&quot;-&quot;)" office:value-type="string" office:string-value="-" calcext:value-type="string">
            <text:p>-</text:p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table:number-columns-repeated="9"/>
          <table:table-cell table:style-name="ce50" office:value-type="string" calcext:value-type="string">
            <text:p>yes</text:p>
          </table:table-cell>
          <table:table-cell table:style-name="ce50" table:number-columns-repeated="2"/>
          <table:table-cell table:style-name="ce92" office:value-type="string" calcext:value-type="string">
            <text:p>Resi</text:p>
          </table:table-cell>
          <table:table-cell table:style-name="ce8" office:value-type="string" calcext:value-type="string">
            <text:p>Rudolph Bezuidenhout</text:p>
          </table:table-cell>
          <table:table-cell table:style-name="ce13" table:formula="of:=IF(ISNUMBER(MATCH([.P181];[$Datasheet.$B$1:.$B$9809];0));&quot;✓&quot;;&quot;x&quot;)" office:value-type="string" office:string-value="✓" calcext:value-type="string">
            <text:p>✓</text:p>
          </table:table-cell>
          <table:table-cell table:style-name="ce147" table:formula="of:=IFERROR(VLOOKUP([$Masterlist.$P181];[$Datasheet.$B$1:.$AV$9809];2;FALSE());&quot;-&quot;)" office:value-type="float" office:value="0" calcext:value-type="float">
            <text:p>0</text:p>
          </table:table-cell>
          <table:table-cell table:style-name="ce147" table:formula="of:=IFERROR(VLOOKUP([$Masterlist.$P181];[$Datasheet.$B$1:.$AV$9809];3;FALSE());&quot;-&quot;)" office:value-type="float" office:value="0" calcext:value-type="float">
            <text:p>0</text:p>
          </table:table-cell>
          <table:table-cell table:style-name="ce147" table:formula="of:=IFERROR(VLOOKUP([$Masterlist.$P181];[$Datasheet.$B$1:.$AV$9809];4;FALSE());&quot;-&quot;)" office:value-type="float" office:value="1" calcext:value-type="float">
            <text:p>1</text:p>
          </table:table-cell>
          <table:table-cell table:style-name="ce147" table:formula="of:=IFERROR(VLOOKUP([$Masterlist.$P181];[$Datasheet.$B$1:.$AV$9809];5;FALSE());&quot;-&quot;)" office:value-type="float" office:value="1" calcext:value-type="float">
            <text:p>1</text:p>
          </table:table-cell>
          <table:table-cell table:style-name="ce195" table:formula="of:=IFERROR(VLOOKUP([$Masterlist.$P181];[$Datasheet.$B$1:.$AV$9809];6;FALSE());&quot;-&quot;)" office:value-type="float" office:value="0" calcext:value-type="float">
            <text:p>0</text:p>
          </table:table-cell>
          <table:table-cell table:style-name="ce147" table:formula="of:=IFERROR(VLOOKUP([$Masterlist.$P181];[$Datasheet.$B$1:.$AV$9809];7;FALSE());&quot;-&quot;)" office:value-type="float" office:value="0" calcext:value-type="float">
            <text:p>0</text:p>
          </table:table-cell>
          <table:table-cell table:style-name="ce147" table:formula="of:=IFERROR(VLOOKUP([$Masterlist.$P181];[$Datasheet.$B$1:.$AV$9809];8;FALSE());&quot;-&quot;)" office:value-type="float" office:value="1" calcext:value-type="float">
            <text:p>1</text:p>
          </table:table-cell>
          <table:table-cell table:style-name="ce147" table:formula="of:=IFERROR(VLOOKUP([$Masterlist.$P181];[$Datasheet.$B$1:.$AV$9809];9;FALSE());&quot;-&quot;)" office:value-type="float" office:value="1" calcext:value-type="float">
            <text:p>1</text:p>
          </table:table-cell>
          <table:table-cell table:style-name="ce147" table:formula="of:=IFERROR(VLOOKUP([$Masterlist.$P181];[$Datasheet.$B$1:.$AV$9809];10;FALSE());&quot;-&quot;)" office:value-type="float" office:value="1" calcext:value-type="float">
            <text:p>1</text:p>
          </table:table-cell>
          <table:table-cell table:style-name="ce147" table:formula="of:=IFERROR(VLOOKUP([$Masterlist.$P181];[$Datasheet.$B$1:.$AV$9809];11;FALSE());&quot;-&quot;)" office:value-type="float" office:value="1" calcext:value-type="float">
            <text:p>1</text:p>
          </table:table-cell>
          <table:table-cell table:style-name="ce147" table:formula="of:=IFERROR(VLOOKUP([$Masterlist.$P181];[$Datasheet.$B$1:.$AV$9809];12;FALSE());&quot;-&quot;)" office:value-type="float" office:value="1" calcext:value-type="float">
            <text:p>1</text:p>
          </table:table-cell>
          <table:table-cell table:style-name="ce147" table:formula="of:=IFERROR(VLOOKUP([$Masterlist.$P181];[$Datasheet.$B$1:.$AV$9809];13;FALSE());&quot;-&quot;)" office:value-type="float" office:value="1" calcext:value-type="float">
            <text:p>1</text:p>
          </table:table-cell>
          <table:table-cell table:style-name="ce147" table:formula="of:=IFERROR(VLOOKUP([$Masterlist.$P181];[$Datasheet.$B$1:.$AV$9809];14;FALSE());&quot;-&quot;)" office:value-type="float" office:value="0" calcext:value-type="float">
            <text:p>0</text:p>
          </table:table-cell>
          <table:table-cell table:style-name="ce147" table:formula="of:=IFERROR(VLOOKUP([$Masterlist.$P181];[$Datasheet.$B$1:.$AV$9809];15;FALSE());&quot;-&quot;)" office:value-type="float" office:value="0" calcext:value-type="float">
            <text:p>0</text:p>
          </table:table-cell>
          <table:table-cell table:style-name="ce147" table:formula="of:=IFERROR(VLOOKUP([$Masterlist.$P181];[$Datasheet.$B$1:.$AV$9809];16;FALSE());&quot;-&quot;)" office:value-type="float" office:value="0" calcext:value-type="float">
            <text:p/>
          </table:table-cell>
          <table:table-cell table:style-name="ce147" table:formula="of:=IFERROR(VLOOKUP([$Masterlist.$P181];[$Datasheet.$B$1:.$AV$9809];17;FALSE());&quot;-&quot;)" office:value-type="float" office:value="0" calcext:value-type="float">
            <text:p/>
          </table:table-cell>
          <table:table-cell table:style-name="ce147" table:formula="of:=IFERROR(VLOOKUP([$Masterlist.$P181];[$Datasheet.$B$1:.$AV$9809];18;FALSE());&quot;-&quot;)" office:value-type="float" office:value="0" calcext:value-type="float">
            <text:p/>
          </table:table-cell>
          <table:table-cell table:style-name="ce147" table:formula="of:=IFERROR(VLOOKUP([$Masterlist.$P181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table:number-columns-repeated="10"/>
          <table:table-cell table:style-name="ce50" office:value-type="string" calcext:value-type="string">
            <text:p>yes</text:p>
          </table:table-cell>
          <table:table-cell table:style-name="ce50"/>
          <table:table-cell table:style-name="ce92" office:value-type="string" calcext:value-type="string">
            <text:p>Resi</text:p>
          </table:table-cell>
          <table:table-cell table:style-name="ce8" office:value-type="string" calcext:value-type="string">
            <text:p>Thato Phahlane</text:p>
          </table:table-cell>
          <table:table-cell table:style-name="ce13" table:formula="of:=IF(ISNUMBER(MATCH([.P182];[$Datasheet.$B$1:.$B$9809];0));&quot;✓&quot;;&quot;x&quot;)" office:value-type="string" office:string-value="x" calcext:value-type="string">
            <text:p>x</text:p>
          </table:table-cell>
          <table:table-cell table:style-name="ce147" table:formula="of:=IFERROR(VLOOKUP([$Masterlist.$P182];[$Datasheet.$B$1:.$AV$9809];2;FALSE());&quot;-&quot;)" office:value-type="string" office:string-value="-" calcext:value-type="string">
            <text:p>-</text:p>
          </table:table-cell>
          <table:table-cell table:style-name="ce147" table:formula="of:=IFERROR(VLOOKUP([$Masterlist.$P182];[$Datasheet.$B$1:.$AV$9809];3;FALSE());&quot;-&quot;)" office:value-type="string" office:string-value="-" calcext:value-type="string">
            <text:p>-</text:p>
          </table:table-cell>
          <table:table-cell table:style-name="ce147" table:formula="of:=IFERROR(VLOOKUP([$Masterlist.$P182];[$Datasheet.$B$1:.$AV$9809];4;FALSE());&quot;-&quot;)" office:value-type="string" office:string-value="-" calcext:value-type="string">
            <text:p>-</text:p>
          </table:table-cell>
          <table:table-cell table:style-name="ce147" table:formula="of:=IFERROR(VLOOKUP([$Masterlist.$P182];[$Datasheet.$B$1:.$AV$9809];5;FALSE());&quot;-&quot;)" office:value-type="string" office:string-value="-" calcext:value-type="string">
            <text:p>-</text:p>
          </table:table-cell>
          <table:table-cell table:style-name="ce195" table:formula="of:=IFERROR(VLOOKUP([$Masterlist.$P182];[$Datasheet.$B$1:.$AV$9809];6;FALSE());&quot;-&quot;)" office:value-type="string" office:string-value="-" calcext:value-type="string">
            <text:p>-</text:p>
          </table:table-cell>
          <table:table-cell table:style-name="ce147" table:formula="of:=IFERROR(VLOOKUP([$Masterlist.$P182];[$Datasheet.$B$1:.$AV$9809];7;FALSE());&quot;-&quot;)" office:value-type="string" office:string-value="-" calcext:value-type="string">
            <text:p>-</text:p>
          </table:table-cell>
          <table:table-cell table:style-name="ce147" table:formula="of:=IFERROR(VLOOKUP([$Masterlist.$P182];[$Datasheet.$B$1:.$AV$9809];8;FALSE());&quot;-&quot;)" office:value-type="string" office:string-value="-" calcext:value-type="string">
            <text:p>-</text:p>
          </table:table-cell>
          <table:table-cell table:style-name="ce147" table:formula="of:=IFERROR(VLOOKUP([$Masterlist.$P182];[$Datasheet.$B$1:.$AV$9809];9;FALSE());&quot;-&quot;)" office:value-type="string" office:string-value="-" calcext:value-type="string">
            <text:p>-</text:p>
          </table:table-cell>
          <table:table-cell table:style-name="ce147" table:formula="of:=IFERROR(VLOOKUP([$Masterlist.$P182];[$Datasheet.$B$1:.$AV$9809];10;FALSE());&quot;-&quot;)" office:value-type="string" office:string-value="-" calcext:value-type="string">
            <text:p>-</text:p>
          </table:table-cell>
          <table:table-cell table:style-name="ce147" table:formula="of:=IFERROR(VLOOKUP([$Masterlist.$P182];[$Datasheet.$B$1:.$AV$9809];11;FALSE());&quot;-&quot;)" office:value-type="string" office:string-value="-" calcext:value-type="string">
            <text:p>-</text:p>
          </table:table-cell>
          <table:table-cell table:style-name="ce147" table:formula="of:=IFERROR(VLOOKUP([$Masterlist.$P182];[$Datasheet.$B$1:.$AV$9809];12;FALSE());&quot;-&quot;)" office:value-type="string" office:string-value="-" calcext:value-type="string">
            <text:p>-</text:p>
          </table:table-cell>
          <table:table-cell table:style-name="ce147" table:formula="of:=IFERROR(VLOOKUP([$Masterlist.$P182];[$Datasheet.$B$1:.$AV$9809];13;FALSE());&quot;-&quot;)" office:value-type="string" office:string-value="-" calcext:value-type="string">
            <text:p>-</text:p>
          </table:table-cell>
          <table:table-cell table:style-name="ce147" table:formula="of:=IFERROR(VLOOKUP([$Masterlist.$P182];[$Datasheet.$B$1:.$AV$9809];14;FALSE());&quot;-&quot;)" office:value-type="string" office:string-value="-" calcext:value-type="string">
            <text:p>-</text:p>
          </table:table-cell>
          <table:table-cell table:style-name="ce147" table:formula="of:=IFERROR(VLOOKUP([$Masterlist.$P182];[$Datasheet.$B$1:.$AV$9809];15;FALSE());&quot;-&quot;)" office:value-type="string" office:string-value="-" calcext:value-type="string">
            <text:p>-</text:p>
          </table:table-cell>
          <table:table-cell table:style-name="ce147" table:formula="of:=IFERROR(VLOOKUP([$Masterlist.$P182];[$Datasheet.$B$1:.$AV$9809];16;FALSE());&quot;-&quot;)" office:value-type="string" office:string-value="-" calcext:value-type="string">
            <text:p>-</text:p>
          </table:table-cell>
          <table:table-cell table:style-name="ce147" table:formula="of:=IFERROR(VLOOKUP([$Masterlist.$P182];[$Datasheet.$B$1:.$AV$9809];17;FALSE());&quot;-&quot;)" office:value-type="string" office:string-value="-" calcext:value-type="string">
            <text:p>-</text:p>
          </table:table-cell>
          <table:table-cell table:style-name="ce147" table:formula="of:=IFERROR(VLOOKUP([$Masterlist.$P182];[$Datasheet.$B$1:.$AV$9809];18;FALSE());&quot;-&quot;)" office:value-type="string" office:string-value="-" calcext:value-type="string">
            <text:p>-</text:p>
          </table:table-cell>
          <table:table-cell table:style-name="ce147" table:formula="of:=IFERROR(VLOOKUP([$Masterlist.$P182];[$Datasheet.$B$1:.$AV$9809];19;FALSE());&quot;-&quot;)" office:value-type="string" office:string-value="-" calcext:value-type="string">
            <text:p>-</text:p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table:number-columns-repeated="10"/>
          <table:table-cell table:style-name="ce50" office:value-type="string" calcext:value-type="string">
            <text:p>yes</text:p>
          </table:table-cell>
          <table:table-cell table:style-name="ce50"/>
          <table:table-cell table:style-name="ce92" office:value-type="string" calcext:value-type="string">
            <text:p>Resi</text:p>
          </table:table-cell>
          <table:table-cell table:style-name="ce8" office:value-type="string" calcext:value-type="string">
            <text:p>Andre Kleynhans</text:p>
          </table:table-cell>
          <table:table-cell table:style-name="ce13" table:formula="of:=IF(ISNUMBER(MATCH([.P183];[$Datasheet.$B$1:.$B$9809];0));&quot;✓&quot;;&quot;x&quot;)" office:value-type="string" office:string-value="x" calcext:value-type="string">
            <text:p>x</text:p>
          </table:table-cell>
          <table:table-cell table:style-name="ce147" table:formula="of:=IFERROR(VLOOKUP([$Masterlist.$P183];[$Datasheet.$B$1:.$AV$9809];2;FALSE());&quot;-&quot;)" office:value-type="string" office:string-value="-" calcext:value-type="string">
            <text:p>-</text:p>
          </table:table-cell>
          <table:table-cell table:style-name="ce147" table:formula="of:=IFERROR(VLOOKUP([$Masterlist.$P183];[$Datasheet.$B$1:.$AV$9809];3;FALSE());&quot;-&quot;)" office:value-type="string" office:string-value="-" calcext:value-type="string">
            <text:p>-</text:p>
          </table:table-cell>
          <table:table-cell table:style-name="ce147" table:formula="of:=IFERROR(VLOOKUP([$Masterlist.$P183];[$Datasheet.$B$1:.$AV$9809];4;FALSE());&quot;-&quot;)" office:value-type="string" office:string-value="-" calcext:value-type="string">
            <text:p>-</text:p>
          </table:table-cell>
          <table:table-cell table:style-name="ce147" table:formula="of:=IFERROR(VLOOKUP([$Masterlist.$P183];[$Datasheet.$B$1:.$AV$9809];5;FALSE());&quot;-&quot;)" office:value-type="string" office:string-value="-" calcext:value-type="string">
            <text:p>-</text:p>
          </table:table-cell>
          <table:table-cell table:style-name="ce195" table:formula="of:=IFERROR(VLOOKUP([$Masterlist.$P183];[$Datasheet.$B$1:.$AV$9809];6;FALSE());&quot;-&quot;)" office:value-type="string" office:string-value="-" calcext:value-type="string">
            <text:p>-</text:p>
          </table:table-cell>
          <table:table-cell table:style-name="ce147" table:formula="of:=IFERROR(VLOOKUP([$Masterlist.$P183];[$Datasheet.$B$1:.$AV$9809];7;FALSE());&quot;-&quot;)" office:value-type="string" office:string-value="-" calcext:value-type="string">
            <text:p>-</text:p>
          </table:table-cell>
          <table:table-cell table:style-name="ce147" table:formula="of:=IFERROR(VLOOKUP([$Masterlist.$P183];[$Datasheet.$B$1:.$AV$9809];8;FALSE());&quot;-&quot;)" office:value-type="string" office:string-value="-" calcext:value-type="string">
            <text:p>-</text:p>
          </table:table-cell>
          <table:table-cell table:style-name="ce147" table:formula="of:=IFERROR(VLOOKUP([$Masterlist.$P183];[$Datasheet.$B$1:.$AV$9809];9;FALSE());&quot;-&quot;)" office:value-type="string" office:string-value="-" calcext:value-type="string">
            <text:p>-</text:p>
          </table:table-cell>
          <table:table-cell table:style-name="ce147" table:formula="of:=IFERROR(VLOOKUP([$Masterlist.$P183];[$Datasheet.$B$1:.$AV$9809];10;FALSE());&quot;-&quot;)" office:value-type="string" office:string-value="-" calcext:value-type="string">
            <text:p>-</text:p>
          </table:table-cell>
          <table:table-cell table:style-name="ce147" table:formula="of:=IFERROR(VLOOKUP([$Masterlist.$P183];[$Datasheet.$B$1:.$AV$9809];11;FALSE());&quot;-&quot;)" office:value-type="string" office:string-value="-" calcext:value-type="string">
            <text:p>-</text:p>
          </table:table-cell>
          <table:table-cell table:style-name="ce147" table:formula="of:=IFERROR(VLOOKUP([$Masterlist.$P183];[$Datasheet.$B$1:.$AV$9809];12;FALSE());&quot;-&quot;)" office:value-type="string" office:string-value="-" calcext:value-type="string">
            <text:p>-</text:p>
          </table:table-cell>
          <table:table-cell table:style-name="ce147" table:formula="of:=IFERROR(VLOOKUP([$Masterlist.$P183];[$Datasheet.$B$1:.$AV$9809];13;FALSE());&quot;-&quot;)" office:value-type="string" office:string-value="-" calcext:value-type="string">
            <text:p>-</text:p>
          </table:table-cell>
          <table:table-cell table:style-name="ce147" table:formula="of:=IFERROR(VLOOKUP([$Masterlist.$P183];[$Datasheet.$B$1:.$AV$9809];14;FALSE());&quot;-&quot;)" office:value-type="string" office:string-value="-" calcext:value-type="string">
            <text:p>-</text:p>
          </table:table-cell>
          <table:table-cell table:style-name="ce147" table:formula="of:=IFERROR(VLOOKUP([$Masterlist.$P183];[$Datasheet.$B$1:.$AV$9809];15;FALSE());&quot;-&quot;)" office:value-type="string" office:string-value="-" calcext:value-type="string">
            <text:p>-</text:p>
          </table:table-cell>
          <table:table-cell table:style-name="ce147" table:formula="of:=IFERROR(VLOOKUP([$Masterlist.$P183];[$Datasheet.$B$1:.$AV$9809];16;FALSE());&quot;-&quot;)" office:value-type="string" office:string-value="-" calcext:value-type="string">
            <text:p>-</text:p>
          </table:table-cell>
          <table:table-cell table:style-name="ce147" table:formula="of:=IFERROR(VLOOKUP([$Masterlist.$P183];[$Datasheet.$B$1:.$AV$9809];17;FALSE());&quot;-&quot;)" office:value-type="string" office:string-value="-" calcext:value-type="string">
            <text:p>-</text:p>
          </table:table-cell>
          <table:table-cell table:style-name="ce147" table:formula="of:=IFERROR(VLOOKUP([$Masterlist.$P183];[$Datasheet.$B$1:.$AV$9809];18;FALSE());&quot;-&quot;)" office:value-type="string" office:string-value="-" calcext:value-type="string">
            <text:p>-</text:p>
          </table:table-cell>
          <table:table-cell table:style-name="ce147" table:formula="of:=IFERROR(VLOOKUP([$Masterlist.$P183];[$Datasheet.$B$1:.$AV$9809];19;FALSE());&quot;-&quot;)" office:value-type="string" office:string-value="-" calcext:value-type="string">
            <text:p>-</text:p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table:number-columns-repeated="10"/>
          <table:table-cell table:style-name="ce50" office:value-type="string" calcext:value-type="string">
            <text:p>yes</text:p>
          </table:table-cell>
          <table:table-cell table:style-name="ce50"/>
          <table:table-cell table:style-name="ce92" office:value-type="string" calcext:value-type="string">
            <text:p>Resi</text:p>
          </table:table-cell>
          <table:table-cell table:style-name="ce8" office:value-type="string" calcext:value-type="string">
            <text:p>Tiaan Pienaar</text:p>
          </table:table-cell>
          <table:table-cell table:style-name="ce13" table:formula="of:=IF(ISNUMBER(MATCH([.P184];[$Datasheet.$B$1:.$B$9809];0));&quot;✓&quot;;&quot;x&quot;)" office:value-type="string" office:string-value="x" calcext:value-type="string">
            <text:p>x</text:p>
          </table:table-cell>
          <table:table-cell table:style-name="ce147" table:formula="of:=IFERROR(VLOOKUP([$Masterlist.$P184];[$Datasheet.$B$1:.$AV$9809];2;FALSE());&quot;-&quot;)" office:value-type="string" office:string-value="-" calcext:value-type="string">
            <text:p>-</text:p>
          </table:table-cell>
          <table:table-cell table:style-name="ce147" table:formula="of:=IFERROR(VLOOKUP([$Masterlist.$P184];[$Datasheet.$B$1:.$AV$9809];3;FALSE());&quot;-&quot;)" office:value-type="string" office:string-value="-" calcext:value-type="string">
            <text:p>-</text:p>
          </table:table-cell>
          <table:table-cell table:style-name="ce147" table:formula="of:=IFERROR(VLOOKUP([$Masterlist.$P184];[$Datasheet.$B$1:.$AV$9809];4;FALSE());&quot;-&quot;)" office:value-type="string" office:string-value="-" calcext:value-type="string">
            <text:p>-</text:p>
          </table:table-cell>
          <table:table-cell table:style-name="ce147" table:formula="of:=IFERROR(VLOOKUP([$Masterlist.$P184];[$Datasheet.$B$1:.$AV$9809];5;FALSE());&quot;-&quot;)" office:value-type="string" office:string-value="-" calcext:value-type="string">
            <text:p>-</text:p>
          </table:table-cell>
          <table:table-cell table:style-name="ce195" table:formula="of:=IFERROR(VLOOKUP([$Masterlist.$P184];[$Datasheet.$B$1:.$AV$9809];6;FALSE());&quot;-&quot;)" office:value-type="string" office:string-value="-" calcext:value-type="string">
            <text:p>-</text:p>
          </table:table-cell>
          <table:table-cell table:style-name="ce147" table:formula="of:=IFERROR(VLOOKUP([$Masterlist.$P184];[$Datasheet.$B$1:.$AV$9809];7;FALSE());&quot;-&quot;)" office:value-type="string" office:string-value="-" calcext:value-type="string">
            <text:p>-</text:p>
          </table:table-cell>
          <table:table-cell table:style-name="ce147" table:formula="of:=IFERROR(VLOOKUP([$Masterlist.$P184];[$Datasheet.$B$1:.$AV$9809];8;FALSE());&quot;-&quot;)" office:value-type="string" office:string-value="-" calcext:value-type="string">
            <text:p>-</text:p>
          </table:table-cell>
          <table:table-cell table:style-name="ce147" table:formula="of:=IFERROR(VLOOKUP([$Masterlist.$P184];[$Datasheet.$B$1:.$AV$9809];9;FALSE());&quot;-&quot;)" office:value-type="string" office:string-value="-" calcext:value-type="string">
            <text:p>-</text:p>
          </table:table-cell>
          <table:table-cell table:style-name="ce147" table:formula="of:=IFERROR(VLOOKUP([$Masterlist.$P184];[$Datasheet.$B$1:.$AV$9809];10;FALSE());&quot;-&quot;)" office:value-type="string" office:string-value="-" calcext:value-type="string">
            <text:p>-</text:p>
          </table:table-cell>
          <table:table-cell table:style-name="ce147" table:formula="of:=IFERROR(VLOOKUP([$Masterlist.$P184];[$Datasheet.$B$1:.$AV$9809];11;FALSE());&quot;-&quot;)" office:value-type="string" office:string-value="-" calcext:value-type="string">
            <text:p>-</text:p>
          </table:table-cell>
          <table:table-cell table:style-name="ce147" table:formula="of:=IFERROR(VLOOKUP([$Masterlist.$P184];[$Datasheet.$B$1:.$AV$9809];12;FALSE());&quot;-&quot;)" office:value-type="string" office:string-value="-" calcext:value-type="string">
            <text:p>-</text:p>
          </table:table-cell>
          <table:table-cell table:style-name="ce147" table:formula="of:=IFERROR(VLOOKUP([$Masterlist.$P184];[$Datasheet.$B$1:.$AV$9809];13;FALSE());&quot;-&quot;)" office:value-type="string" office:string-value="-" calcext:value-type="string">
            <text:p>-</text:p>
          </table:table-cell>
          <table:table-cell table:style-name="ce147" table:formula="of:=IFERROR(VLOOKUP([$Masterlist.$P184];[$Datasheet.$B$1:.$AV$9809];14;FALSE());&quot;-&quot;)" office:value-type="string" office:string-value="-" calcext:value-type="string">
            <text:p>-</text:p>
          </table:table-cell>
          <table:table-cell table:style-name="ce147" table:formula="of:=IFERROR(VLOOKUP([$Masterlist.$P184];[$Datasheet.$B$1:.$AV$9809];15;FALSE());&quot;-&quot;)" office:value-type="string" office:string-value="-" calcext:value-type="string">
            <text:p>-</text:p>
          </table:table-cell>
          <table:table-cell table:style-name="ce147" table:formula="of:=IFERROR(VLOOKUP([$Masterlist.$P184];[$Datasheet.$B$1:.$AV$9809];16;FALSE());&quot;-&quot;)" office:value-type="string" office:string-value="-" calcext:value-type="string">
            <text:p>-</text:p>
          </table:table-cell>
          <table:table-cell table:style-name="ce147" table:formula="of:=IFERROR(VLOOKUP([$Masterlist.$P184];[$Datasheet.$B$1:.$AV$9809];17;FALSE());&quot;-&quot;)" office:value-type="string" office:string-value="-" calcext:value-type="string">
            <text:p>-</text:p>
          </table:table-cell>
          <table:table-cell table:style-name="ce147" table:formula="of:=IFERROR(VLOOKUP([$Masterlist.$P184];[$Datasheet.$B$1:.$AV$9809];18;FALSE());&quot;-&quot;)" office:value-type="string" office:string-value="-" calcext:value-type="string">
            <text:p>-</text:p>
          </table:table-cell>
          <table:table-cell table:style-name="ce147" table:formula="of:=IFERROR(VLOOKUP([$Masterlist.$P184];[$Datasheet.$B$1:.$AV$9809];19;FALSE());&quot;-&quot;)" office:value-type="string" office:string-value="-" calcext:value-type="string">
            <text:p>-</text:p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table:number-columns-repeated="10"/>
          <table:table-cell table:style-name="ce50" office:value-type="string" calcext:value-type="string">
            <text:p>yes</text:p>
          </table:table-cell>
          <table:table-cell table:style-name="ce50"/>
          <table:table-cell table:style-name="ce92" office:value-type="string" calcext:value-type="string">
            <text:p>Resi</text:p>
          </table:table-cell>
          <table:table-cell table:style-name="ce8" office:value-type="string" calcext:value-type="string">
            <text:p>Wayne Ferreira</text:p>
          </table:table-cell>
          <table:table-cell table:style-name="ce13" table:formula="of:=IF(ISNUMBER(MATCH([.P185];[$Datasheet.$B$1:.$B$9809];0));&quot;✓&quot;;&quot;x&quot;)" office:value-type="string" office:string-value="✓" calcext:value-type="string">
            <text:p>✓</text:p>
          </table:table-cell>
          <table:table-cell table:style-name="ce147" table:formula="of:=IFERROR(VLOOKUP([$Masterlist.$P185];[$Datasheet.$B$1:.$AV$9809];2;FALSE());&quot;-&quot;)" office:value-type="float" office:value="0" calcext:value-type="float">
            <text:p>0</text:p>
          </table:table-cell>
          <table:table-cell table:style-name="ce147" table:formula="of:=IFERROR(VLOOKUP([$Masterlist.$P185];[$Datasheet.$B$1:.$AV$9809];3;FALSE());&quot;-&quot;)" office:value-type="float" office:value="1" calcext:value-type="float">
            <text:p>1</text:p>
          </table:table-cell>
          <table:table-cell table:style-name="ce147" table:formula="of:=IFERROR(VLOOKUP([$Masterlist.$P185];[$Datasheet.$B$1:.$AV$9809];4;FALSE());&quot;-&quot;)" office:value-type="float" office:value="0" calcext:value-type="float">
            <text:p>0</text:p>
          </table:table-cell>
          <table:table-cell table:style-name="ce147" table:formula="of:=IFERROR(VLOOKUP([$Masterlist.$P185];[$Datasheet.$B$1:.$AV$9809];5;FALSE());&quot;-&quot;)" office:value-type="float" office:value="1" calcext:value-type="float">
            <text:p>1</text:p>
          </table:table-cell>
          <table:table-cell table:style-name="ce195" table:formula="of:=IFERROR(VLOOKUP([$Masterlist.$P185];[$Datasheet.$B$1:.$AV$9809];6;FALSE());&quot;-&quot;)" office:value-type="float" office:value="0" calcext:value-type="float">
            <text:p>0</text:p>
          </table:table-cell>
          <table:table-cell table:style-name="ce147" table:formula="of:=IFERROR(VLOOKUP([$Masterlist.$P185];[$Datasheet.$B$1:.$AV$9809];7;FALSE());&quot;-&quot;)" office:value-type="float" office:value="0" calcext:value-type="float">
            <text:p>0</text:p>
          </table:table-cell>
          <table:table-cell table:style-name="ce147" table:formula="of:=IFERROR(VLOOKUP([$Masterlist.$P185];[$Datasheet.$B$1:.$AV$9809];8;FALSE());&quot;-&quot;)" office:value-type="float" office:value="0" calcext:value-type="float">
            <text:p>0</text:p>
          </table:table-cell>
          <table:table-cell table:style-name="ce147" table:formula="of:=IFERROR(VLOOKUP([$Masterlist.$P185];[$Datasheet.$B$1:.$AV$9809];9;FALSE());&quot;-&quot;)" office:value-type="float" office:value="0" calcext:value-type="float">
            <text:p>0</text:p>
          </table:table-cell>
          <table:table-cell table:style-name="ce147" table:formula="of:=IFERROR(VLOOKUP([$Masterlist.$P185];[$Datasheet.$B$1:.$AV$9809];10;FALSE());&quot;-&quot;)" office:value-type="float" office:value="0" calcext:value-type="float">
            <text:p>0</text:p>
          </table:table-cell>
          <table:table-cell table:style-name="ce147" table:formula="of:=IFERROR(VLOOKUP([$Masterlist.$P185];[$Datasheet.$B$1:.$AV$9809];11;FALSE());&quot;-&quot;)" office:value-type="float" office:value="1" calcext:value-type="float">
            <text:p>1</text:p>
          </table:table-cell>
          <table:table-cell table:style-name="ce147" table:formula="of:=IFERROR(VLOOKUP([$Masterlist.$P185];[$Datasheet.$B$1:.$AV$9809];12;FALSE());&quot;-&quot;)" office:value-type="float" office:value="0" calcext:value-type="float">
            <text:p>0</text:p>
          </table:table-cell>
          <table:table-cell table:style-name="ce147" table:formula="of:=IFERROR(VLOOKUP([$Masterlist.$P185];[$Datasheet.$B$1:.$AV$9809];13;FALSE());&quot;-&quot;)" office:value-type="float" office:value="1" calcext:value-type="float">
            <text:p>1</text:p>
          </table:table-cell>
          <table:table-cell table:style-name="ce147" table:formula="of:=IFERROR(VLOOKUP([$Masterlist.$P185];[$Datasheet.$B$1:.$AV$9809];14;FALSE());&quot;-&quot;)" office:value-type="float" office:value="0" calcext:value-type="float">
            <text:p>0</text:p>
          </table:table-cell>
          <table:table-cell table:style-name="ce147" table:formula="of:=IFERROR(VLOOKUP([$Masterlist.$P185];[$Datasheet.$B$1:.$AV$9809];15;FALSE());&quot;-&quot;)" office:value-type="float" office:value="1" calcext:value-type="float">
            <text:p>1</text:p>
          </table:table-cell>
          <table:table-cell table:style-name="ce147" table:formula="of:=IFERROR(VLOOKUP([$Masterlist.$P185];[$Datasheet.$B$1:.$AV$9809];16;FALSE());&quot;-&quot;)" office:value-type="float" office:value="0" calcext:value-type="float">
            <text:p/>
          </table:table-cell>
          <table:table-cell table:style-name="ce147" table:formula="of:=IFERROR(VLOOKUP([$Masterlist.$P185];[$Datasheet.$B$1:.$AV$9809];17;FALSE());&quot;-&quot;)" office:value-type="float" office:value="0" calcext:value-type="float">
            <text:p/>
          </table:table-cell>
          <table:table-cell table:style-name="ce147" table:formula="of:=IFERROR(VLOOKUP([$Masterlist.$P185];[$Datasheet.$B$1:.$AV$9809];18;FALSE());&quot;-&quot;)" office:value-type="float" office:value="0" calcext:value-type="float">
            <text:p/>
          </table:table-cell>
          <table:table-cell table:style-name="ce147" table:formula="of:=IFERROR(VLOOKUP([$Masterlist.$P185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AL</text:p>
          </table:table-cell>
          <table:table-cell table:style-name="ce50" table:number-columns-repeated="11"/>
          <table:table-cell table:style-name="ce50" office:value-type="string" calcext:value-type="string">
            <text:p>yes</text:p>
          </table:table-cell>
          <table:table-cell table:style-name="ce92" office:value-type="string" calcext:value-type="string">
            <text:p>Resi</text:p>
          </table:table-cell>
          <table:table-cell table:style-name="ce8" office:value-type="string" calcext:value-type="string">
            <text:p>Jason Pretorius</text:p>
          </table:table-cell>
          <table:table-cell table:style-name="ce13" table:formula="of:=IF(ISNUMBER(MATCH([.P186];[$Datasheet.$B$1:.$B$9809];0));&quot;✓&quot;;&quot;x&quot;)" office:value-type="string" office:string-value="x" calcext:value-type="string">
            <text:p>x</text:p>
          </table:table-cell>
          <table:table-cell table:style-name="ce147" table:formula="of:=IFERROR(VLOOKUP([$Masterlist.$P186];[$Datasheet.$B$1:.$AV$9809];2;FALSE());&quot;-&quot;)" office:value-type="string" office:string-value="-" calcext:value-type="string">
            <text:p>-</text:p>
          </table:table-cell>
          <table:table-cell table:style-name="ce147" table:formula="of:=IFERROR(VLOOKUP([$Masterlist.$P186];[$Datasheet.$B$1:.$AV$9809];3;FALSE());&quot;-&quot;)" office:value-type="string" office:string-value="-" calcext:value-type="string">
            <text:p>-</text:p>
          </table:table-cell>
          <table:table-cell table:style-name="ce147" table:formula="of:=IFERROR(VLOOKUP([$Masterlist.$P186];[$Datasheet.$B$1:.$AV$9809];4;FALSE());&quot;-&quot;)" office:value-type="string" office:string-value="-" calcext:value-type="string">
            <text:p>-</text:p>
          </table:table-cell>
          <table:table-cell table:style-name="ce147" table:formula="of:=IFERROR(VLOOKUP([$Masterlist.$P186];[$Datasheet.$B$1:.$AV$9809];5;FALSE());&quot;-&quot;)" office:value-type="string" office:string-value="-" calcext:value-type="string">
            <text:p>-</text:p>
          </table:table-cell>
          <table:table-cell table:style-name="ce195" table:formula="of:=IFERROR(VLOOKUP([$Masterlist.$P186];[$Datasheet.$B$1:.$AV$9809];6;FALSE());&quot;-&quot;)" office:value-type="string" office:string-value="-" calcext:value-type="string">
            <text:p>-</text:p>
          </table:table-cell>
          <table:table-cell table:style-name="ce147" table:formula="of:=IFERROR(VLOOKUP([$Masterlist.$P186];[$Datasheet.$B$1:.$AV$9809];7;FALSE());&quot;-&quot;)" office:value-type="string" office:string-value="-" calcext:value-type="string">
            <text:p>-</text:p>
          </table:table-cell>
          <table:table-cell table:style-name="ce147" table:formula="of:=IFERROR(VLOOKUP([$Masterlist.$P186];[$Datasheet.$B$1:.$AV$9809];8;FALSE());&quot;-&quot;)" office:value-type="string" office:string-value="-" calcext:value-type="string">
            <text:p>-</text:p>
          </table:table-cell>
          <table:table-cell table:style-name="ce147" table:formula="of:=IFERROR(VLOOKUP([$Masterlist.$P186];[$Datasheet.$B$1:.$AV$9809];9;FALSE());&quot;-&quot;)" office:value-type="string" office:string-value="-" calcext:value-type="string">
            <text:p>-</text:p>
          </table:table-cell>
          <table:table-cell table:style-name="ce147" table:formula="of:=IFERROR(VLOOKUP([$Masterlist.$P186];[$Datasheet.$B$1:.$AV$9809];10;FALSE());&quot;-&quot;)" office:value-type="string" office:string-value="-" calcext:value-type="string">
            <text:p>-</text:p>
          </table:table-cell>
          <table:table-cell table:style-name="ce147" table:formula="of:=IFERROR(VLOOKUP([$Masterlist.$P186];[$Datasheet.$B$1:.$AV$9809];11;FALSE());&quot;-&quot;)" office:value-type="string" office:string-value="-" calcext:value-type="string">
            <text:p>-</text:p>
          </table:table-cell>
          <table:table-cell table:style-name="ce147" table:formula="of:=IFERROR(VLOOKUP([$Masterlist.$P186];[$Datasheet.$B$1:.$AV$9809];12;FALSE());&quot;-&quot;)" office:value-type="string" office:string-value="-" calcext:value-type="string">
            <text:p>-</text:p>
          </table:table-cell>
          <table:table-cell table:style-name="ce147" table:formula="of:=IFERROR(VLOOKUP([$Masterlist.$P186];[$Datasheet.$B$1:.$AV$9809];13;FALSE());&quot;-&quot;)" office:value-type="string" office:string-value="-" calcext:value-type="string">
            <text:p>-</text:p>
          </table:table-cell>
          <table:table-cell table:style-name="ce147" table:formula="of:=IFERROR(VLOOKUP([$Masterlist.$P186];[$Datasheet.$B$1:.$AV$9809];14;FALSE());&quot;-&quot;)" office:value-type="string" office:string-value="-" calcext:value-type="string">
            <text:p>-</text:p>
          </table:table-cell>
          <table:table-cell table:style-name="ce147" table:formula="of:=IFERROR(VLOOKUP([$Masterlist.$P186];[$Datasheet.$B$1:.$AV$9809];15;FALSE());&quot;-&quot;)" office:value-type="string" office:string-value="-" calcext:value-type="string">
            <text:p>-</text:p>
          </table:table-cell>
          <table:table-cell table:style-name="ce147" table:formula="of:=IFERROR(VLOOKUP([$Masterlist.$P186];[$Datasheet.$B$1:.$AV$9809];16;FALSE());&quot;-&quot;)" office:value-type="string" office:string-value="-" calcext:value-type="string">
            <text:p>-</text:p>
          </table:table-cell>
          <table:table-cell table:style-name="ce147" table:formula="of:=IFERROR(VLOOKUP([$Masterlist.$P186];[$Datasheet.$B$1:.$AV$9809];17;FALSE());&quot;-&quot;)" office:value-type="string" office:string-value="-" calcext:value-type="string">
            <text:p>-</text:p>
          </table:table-cell>
          <table:table-cell table:style-name="ce147" table:formula="of:=IFERROR(VLOOKUP([$Masterlist.$P186];[$Datasheet.$B$1:.$AV$9809];18;FALSE());&quot;-&quot;)" office:value-type="string" office:string-value="-" calcext:value-type="string">
            <text:p>-</text:p>
          </table:table-cell>
          <table:table-cell table:style-name="ce147" table:formula="of:=IFERROR(VLOOKUP([$Masterlist.$P186];[$Datasheet.$B$1:.$AV$9809];19;FALSE());&quot;-&quot;)" office:value-type="string" office:string-value="-" calcext:value-type="string">
            <text:p>-</text:p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table:number-columns-repeated="11"/>
          <table:table-cell table:style-name="ce50" office:value-type="string" calcext:value-type="string">
            <text:p>yes</text:p>
          </table:table-cell>
          <table:table-cell table:style-name="ce92" office:value-type="string" calcext:value-type="string">
            <text:p>Resi</text:p>
          </table:table-cell>
          <table:table-cell table:style-name="ce8" office:value-type="string" calcext:value-type="string">
            <text:p>Christo Swanepoel</text:p>
          </table:table-cell>
          <table:table-cell table:style-name="ce13" table:formula="of:=IF(ISNUMBER(MATCH([.P187];[$Datasheet.$B$1:.$B$9809];0));&quot;✓&quot;;&quot;x&quot;)" office:value-type="string" office:string-value="✓" calcext:value-type="string">
            <text:p>✓</text:p>
          </table:table-cell>
          <table:table-cell table:style-name="ce147" table:formula="of:=IFERROR(VLOOKUP([$Masterlist.$P187];[$Datasheet.$B$1:.$AV$9809];2;FALSE());&quot;-&quot;)" office:value-type="float" office:value="1" calcext:value-type="float">
            <text:p>1</text:p>
          </table:table-cell>
          <table:table-cell table:style-name="ce147" table:formula="of:=IFERROR(VLOOKUP([$Masterlist.$P187];[$Datasheet.$B$1:.$AV$9809];3;FALSE());&quot;-&quot;)" office:value-type="float" office:value="1" calcext:value-type="float">
            <text:p>1</text:p>
          </table:table-cell>
          <table:table-cell table:style-name="ce147" table:formula="of:=IFERROR(VLOOKUP([$Masterlist.$P187];[$Datasheet.$B$1:.$AV$9809];4;FALSE());&quot;-&quot;)" office:value-type="float" office:value="1" calcext:value-type="float">
            <text:p>1</text:p>
          </table:table-cell>
          <table:table-cell table:style-name="ce147" table:formula="of:=IFERROR(VLOOKUP([$Masterlist.$P187];[$Datasheet.$B$1:.$AV$9809];5;FALSE());&quot;-&quot;)" office:value-type="float" office:value="1" calcext:value-type="float">
            <text:p>1</text:p>
          </table:table-cell>
          <table:table-cell table:style-name="ce195" table:formula="of:=IFERROR(VLOOKUP([$Masterlist.$P187];[$Datasheet.$B$1:.$AV$9809];6;FALSE());&quot;-&quot;)" office:value-type="float" office:value="1" calcext:value-type="float">
            <text:p>1</text:p>
          </table:table-cell>
          <table:table-cell table:style-name="ce147" table:formula="of:=IFERROR(VLOOKUP([$Masterlist.$P187];[$Datasheet.$B$1:.$AV$9809];7;FALSE());&quot;-&quot;)" office:value-type="float" office:value="1" calcext:value-type="float">
            <text:p>1</text:p>
          </table:table-cell>
          <table:table-cell table:style-name="ce147" table:formula="of:=IFERROR(VLOOKUP([$Masterlist.$P187];[$Datasheet.$B$1:.$AV$9809];8;FALSE());&quot;-&quot;)" office:value-type="float" office:value="1" calcext:value-type="float">
            <text:p>1</text:p>
          </table:table-cell>
          <table:table-cell table:style-name="ce147" table:formula="of:=IFERROR(VLOOKUP([$Masterlist.$P187];[$Datasheet.$B$1:.$AV$9809];9;FALSE());&quot;-&quot;)" office:value-type="float" office:value="1" calcext:value-type="float">
            <text:p>1</text:p>
          </table:table-cell>
          <table:table-cell table:style-name="ce147" table:formula="of:=IFERROR(VLOOKUP([$Masterlist.$P187];[$Datasheet.$B$1:.$AV$9809];10;FALSE());&quot;-&quot;)" office:value-type="float" office:value="1" calcext:value-type="float">
            <text:p>1</text:p>
          </table:table-cell>
          <table:table-cell table:style-name="ce147" table:formula="of:=IFERROR(VLOOKUP([$Masterlist.$P187];[$Datasheet.$B$1:.$AV$9809];11;FALSE());&quot;-&quot;)" office:value-type="float" office:value="1" calcext:value-type="float">
            <text:p>1</text:p>
          </table:table-cell>
          <table:table-cell table:style-name="ce147" table:formula="of:=IFERROR(VLOOKUP([$Masterlist.$P187];[$Datasheet.$B$1:.$AV$9809];12;FALSE());&quot;-&quot;)" office:value-type="float" office:value="1" calcext:value-type="float">
            <text:p>1</text:p>
          </table:table-cell>
          <table:table-cell table:style-name="ce147" table:formula="of:=IFERROR(VLOOKUP([$Masterlist.$P187];[$Datasheet.$B$1:.$AV$9809];13;FALSE());&quot;-&quot;)" office:value-type="float" office:value="1" calcext:value-type="float">
            <text:p>1</text:p>
          </table:table-cell>
          <table:table-cell table:style-name="ce147" table:formula="of:=IFERROR(VLOOKUP([$Masterlist.$P187];[$Datasheet.$B$1:.$AV$9809];14;FALSE());&quot;-&quot;)" office:value-type="float" office:value="1" calcext:value-type="float">
            <text:p>1</text:p>
          </table:table-cell>
          <table:table-cell table:style-name="ce147" table:formula="of:=IFERROR(VLOOKUP([$Masterlist.$P187];[$Datasheet.$B$1:.$AV$9809];15;FALSE());&quot;-&quot;)" office:value-type="float" office:value="1" calcext:value-type="float">
            <text:p>1</text:p>
          </table:table-cell>
          <table:table-cell table:style-name="ce147" table:formula="of:=IFERROR(VLOOKUP([$Masterlist.$P187];[$Datasheet.$B$1:.$AV$9809];16;FALSE());&quot;-&quot;)" office:value-type="float" office:value="0" calcext:value-type="float">
            <text:p/>
          </table:table-cell>
          <table:table-cell table:style-name="ce147" table:formula="of:=IFERROR(VLOOKUP([$Masterlist.$P187];[$Datasheet.$B$1:.$AV$9809];17;FALSE());&quot;-&quot;)" office:value-type="float" office:value="0" calcext:value-type="float">
            <text:p/>
          </table:table-cell>
          <table:table-cell table:style-name="ce147" table:formula="of:=IFERROR(VLOOKUP([$Masterlist.$P187];[$Datasheet.$B$1:.$AV$9809];18;FALSE());&quot;-&quot;)" office:value-type="float" office:value="0" calcext:value-type="float">
            <text:p/>
          </table:table-cell>
          <table:table-cell table:style-name="ce147" table:formula="of:=IFERROR(VLOOKUP([$Masterlist.$P187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A</text:p>
          </table:table-cell>
          <table:table-cell table:style-name="ce50" table:number-columns-repeated="11"/>
          <table:table-cell table:style-name="ce50" office:value-type="string" calcext:value-type="string">
            <text:p>yes</text:p>
          </table:table-cell>
          <table:table-cell table:style-name="ce92" office:value-type="string" calcext:value-type="string">
            <text:p>Resi</text:p>
          </table:table-cell>
          <table:table-cell table:style-name="ce8" office:value-type="string" calcext:value-type="string">
            <text:p>Isabel Robberts</text:p>
          </table:table-cell>
          <table:table-cell table:style-name="ce13" table:formula="of:=IF(ISNUMBER(MATCH([.P188];[$Datasheet.$B$1:.$B$9809];0));&quot;✓&quot;;&quot;x&quot;)" office:value-type="string" office:string-value="✓" calcext:value-type="string">
            <text:p>✓</text:p>
          </table:table-cell>
          <table:table-cell table:style-name="ce147" table:formula="of:=IFERROR(VLOOKUP([$Masterlist.$P188];[$Datasheet.$B$1:.$AV$9809];2;FALSE());&quot;-&quot;)" office:value-type="float" office:value="1" calcext:value-type="float">
            <text:p>1</text:p>
          </table:table-cell>
          <table:table-cell table:style-name="ce147" table:formula="of:=IFERROR(VLOOKUP([$Masterlist.$P188];[$Datasheet.$B$1:.$AV$9809];3;FALSE());&quot;-&quot;)" office:value-type="float" office:value="1" calcext:value-type="float">
            <text:p>1</text:p>
          </table:table-cell>
          <table:table-cell table:style-name="ce147" table:formula="of:=IFERROR(VLOOKUP([$Masterlist.$P188];[$Datasheet.$B$1:.$AV$9809];4;FALSE());&quot;-&quot;)" office:value-type="float" office:value="0" calcext:value-type="float">
            <text:p>0</text:p>
          </table:table-cell>
          <table:table-cell table:style-name="ce147" table:formula="of:=IFERROR(VLOOKUP([$Masterlist.$P188];[$Datasheet.$B$1:.$AV$9809];5;FALSE());&quot;-&quot;)" office:value-type="float" office:value="1" calcext:value-type="float">
            <text:p>1</text:p>
          </table:table-cell>
          <table:table-cell table:style-name="ce195" table:formula="of:=IFERROR(VLOOKUP([$Masterlist.$P188];[$Datasheet.$B$1:.$AV$9809];6;FALSE());&quot;-&quot;)" office:value-type="float" office:value="1" calcext:value-type="float">
            <text:p>1</text:p>
          </table:table-cell>
          <table:table-cell table:style-name="ce147" table:formula="of:=IFERROR(VLOOKUP([$Masterlist.$P188];[$Datasheet.$B$1:.$AV$9809];7;FALSE());&quot;-&quot;)" office:value-type="float" office:value="1" calcext:value-type="float">
            <text:p>1</text:p>
          </table:table-cell>
          <table:table-cell table:style-name="ce147" table:formula="of:=IFERROR(VLOOKUP([$Masterlist.$P188];[$Datasheet.$B$1:.$AV$9809];8;FALSE());&quot;-&quot;)" office:value-type="float" office:value="0" calcext:value-type="float">
            <text:p>0</text:p>
          </table:table-cell>
          <table:table-cell table:style-name="ce147" table:formula="of:=IFERROR(VLOOKUP([$Masterlist.$P188];[$Datasheet.$B$1:.$AV$9809];9;FALSE());&quot;-&quot;)" office:value-type="float" office:value="1" calcext:value-type="float">
            <text:p>1</text:p>
          </table:table-cell>
          <table:table-cell table:style-name="ce147" table:formula="of:=IFERROR(VLOOKUP([$Masterlist.$P188];[$Datasheet.$B$1:.$AV$9809];10;FALSE());&quot;-&quot;)" office:value-type="float" office:value="0" calcext:value-type="float">
            <text:p>0</text:p>
          </table:table-cell>
          <table:table-cell table:style-name="ce147" table:formula="of:=IFERROR(VLOOKUP([$Masterlist.$P188];[$Datasheet.$B$1:.$AV$9809];11;FALSE());&quot;-&quot;)" office:value-type="float" office:value="0" calcext:value-type="float">
            <text:p>0</text:p>
          </table:table-cell>
          <table:table-cell table:style-name="ce147" table:formula="of:=IFERROR(VLOOKUP([$Masterlist.$P188];[$Datasheet.$B$1:.$AV$9809];12;FALSE());&quot;-&quot;)" office:value-type="float" office:value="0" calcext:value-type="float">
            <text:p>0</text:p>
          </table:table-cell>
          <table:table-cell table:style-name="ce147" table:formula="of:=IFERROR(VLOOKUP([$Masterlist.$P188];[$Datasheet.$B$1:.$AV$9809];13;FALSE());&quot;-&quot;)" office:value-type="float" office:value="0" calcext:value-type="float">
            <text:p>0</text:p>
          </table:table-cell>
          <table:table-cell table:style-name="ce147" table:formula="of:=IFERROR(VLOOKUP([$Masterlist.$P188];[$Datasheet.$B$1:.$AV$9809];14;FALSE());&quot;-&quot;)" office:value-type="float" office:value="0" calcext:value-type="float">
            <text:p>0</text:p>
          </table:table-cell>
          <table:table-cell table:style-name="ce147" table:formula="of:=IFERROR(VLOOKUP([$Masterlist.$P188];[$Datasheet.$B$1:.$AV$9809];15;FALSE());&quot;-&quot;)" office:value-type="float" office:value="0" calcext:value-type="float">
            <text:p>0</text:p>
          </table:table-cell>
          <table:table-cell table:style-name="ce147" table:formula="of:=IFERROR(VLOOKUP([$Masterlist.$P188];[$Datasheet.$B$1:.$AV$9809];16;FALSE());&quot;-&quot;)" office:value-type="float" office:value="0" calcext:value-type="float">
            <text:p/>
          </table:table-cell>
          <table:table-cell table:style-name="ce147" table:formula="of:=IFERROR(VLOOKUP([$Masterlist.$P188];[$Datasheet.$B$1:.$AV$9809];17;FALSE());&quot;-&quot;)" office:value-type="float" office:value="0" calcext:value-type="float">
            <text:p/>
          </table:table-cell>
          <table:table-cell table:style-name="ce147" table:formula="of:=IFERROR(VLOOKUP([$Masterlist.$P188];[$Datasheet.$B$1:.$AV$9809];18;FALSE());&quot;-&quot;)" office:value-type="float" office:value="0" calcext:value-type="float">
            <text:p/>
          </table:table-cell>
          <table:table-cell table:style-name="ce147" table:formula="of:=IFERROR(VLOOKUP([$Masterlist.$P188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table:number-columns-repeated="11"/>
          <table:table-cell table:style-name="ce50" office:value-type="string" calcext:value-type="string">
            <text:p>yes</text:p>
          </table:table-cell>
          <table:table-cell table:style-name="ce92" office:value-type="string" calcext:value-type="string">
            <text:p>Resi</text:p>
          </table:table-cell>
          <table:table-cell table:style-name="ce8" office:value-type="string" calcext:value-type="string">
            <text:p>Jayden Cloete</text:p>
          </table:table-cell>
          <table:table-cell table:style-name="ce13" table:formula="of:=IF(ISNUMBER(MATCH([.P189];[$Datasheet.$B$1:.$B$9809];0));&quot;✓&quot;;&quot;x&quot;)" office:value-type="string" office:string-value="x" calcext:value-type="string">
            <text:p>x</text:p>
          </table:table-cell>
          <table:table-cell table:style-name="ce147" table:formula="of:=IFERROR(VLOOKUP([$Masterlist.$P189];[$Datasheet.$B$1:.$AV$9809];2;FALSE());&quot;-&quot;)" office:value-type="string" office:string-value="-" calcext:value-type="string">
            <text:p>-</text:p>
          </table:table-cell>
          <table:table-cell table:style-name="ce147" table:formula="of:=IFERROR(VLOOKUP([$Masterlist.$P189];[$Datasheet.$B$1:.$AV$9809];3;FALSE());&quot;-&quot;)" office:value-type="string" office:string-value="-" calcext:value-type="string">
            <text:p>-</text:p>
          </table:table-cell>
          <table:table-cell table:style-name="ce147" table:formula="of:=IFERROR(VLOOKUP([$Masterlist.$P189];[$Datasheet.$B$1:.$AV$9809];4;FALSE());&quot;-&quot;)" office:value-type="string" office:string-value="-" calcext:value-type="string">
            <text:p>-</text:p>
          </table:table-cell>
          <table:table-cell table:style-name="ce147" table:formula="of:=IFERROR(VLOOKUP([$Masterlist.$P189];[$Datasheet.$B$1:.$AV$9809];5;FALSE());&quot;-&quot;)" office:value-type="string" office:string-value="-" calcext:value-type="string">
            <text:p>-</text:p>
          </table:table-cell>
          <table:table-cell table:style-name="ce195" table:formula="of:=IFERROR(VLOOKUP([$Masterlist.$P189];[$Datasheet.$B$1:.$AV$9809];6;FALSE());&quot;-&quot;)" office:value-type="string" office:string-value="-" calcext:value-type="string">
            <text:p>-</text:p>
          </table:table-cell>
          <table:table-cell table:style-name="ce147" table:formula="of:=IFERROR(VLOOKUP([$Masterlist.$P189];[$Datasheet.$B$1:.$AV$9809];7;FALSE());&quot;-&quot;)" office:value-type="string" office:string-value="-" calcext:value-type="string">
            <text:p>-</text:p>
          </table:table-cell>
          <table:table-cell table:style-name="ce147" table:formula="of:=IFERROR(VLOOKUP([$Masterlist.$P189];[$Datasheet.$B$1:.$AV$9809];8;FALSE());&quot;-&quot;)" office:value-type="string" office:string-value="-" calcext:value-type="string">
            <text:p>-</text:p>
          </table:table-cell>
          <table:table-cell table:style-name="ce147" table:formula="of:=IFERROR(VLOOKUP([$Masterlist.$P189];[$Datasheet.$B$1:.$AV$9809];9;FALSE());&quot;-&quot;)" office:value-type="string" office:string-value="-" calcext:value-type="string">
            <text:p>-</text:p>
          </table:table-cell>
          <table:table-cell table:style-name="ce147" table:formula="of:=IFERROR(VLOOKUP([$Masterlist.$P189];[$Datasheet.$B$1:.$AV$9809];10;FALSE());&quot;-&quot;)" office:value-type="string" office:string-value="-" calcext:value-type="string">
            <text:p>-</text:p>
          </table:table-cell>
          <table:table-cell table:style-name="ce147" table:formula="of:=IFERROR(VLOOKUP([$Masterlist.$P189];[$Datasheet.$B$1:.$AV$9809];11;FALSE());&quot;-&quot;)" office:value-type="string" office:string-value="-" calcext:value-type="string">
            <text:p>-</text:p>
          </table:table-cell>
          <table:table-cell table:style-name="ce147" table:formula="of:=IFERROR(VLOOKUP([$Masterlist.$P189];[$Datasheet.$B$1:.$AV$9809];12;FALSE());&quot;-&quot;)" office:value-type="string" office:string-value="-" calcext:value-type="string">
            <text:p>-</text:p>
          </table:table-cell>
          <table:table-cell table:style-name="ce147" table:formula="of:=IFERROR(VLOOKUP([$Masterlist.$P189];[$Datasheet.$B$1:.$AV$9809];13;FALSE());&quot;-&quot;)" office:value-type="string" office:string-value="-" calcext:value-type="string">
            <text:p>-</text:p>
          </table:table-cell>
          <table:table-cell table:style-name="ce147" table:formula="of:=IFERROR(VLOOKUP([$Masterlist.$P189];[$Datasheet.$B$1:.$AV$9809];14;FALSE());&quot;-&quot;)" office:value-type="string" office:string-value="-" calcext:value-type="string">
            <text:p>-</text:p>
          </table:table-cell>
          <table:table-cell table:style-name="ce147" table:formula="of:=IFERROR(VLOOKUP([$Masterlist.$P189];[$Datasheet.$B$1:.$AV$9809];15;FALSE());&quot;-&quot;)" office:value-type="string" office:string-value="-" calcext:value-type="string">
            <text:p>-</text:p>
          </table:table-cell>
          <table:table-cell table:style-name="ce147" table:formula="of:=IFERROR(VLOOKUP([$Masterlist.$P189];[$Datasheet.$B$1:.$AV$9809];16;FALSE());&quot;-&quot;)" office:value-type="string" office:string-value="-" calcext:value-type="string">
            <text:p>-</text:p>
          </table:table-cell>
          <table:table-cell table:style-name="ce147" table:formula="of:=IFERROR(VLOOKUP([$Masterlist.$P189];[$Datasheet.$B$1:.$AV$9809];17;FALSE());&quot;-&quot;)" office:value-type="string" office:string-value="-" calcext:value-type="string">
            <text:p>-</text:p>
          </table:table-cell>
          <table:table-cell table:style-name="ce147" table:formula="of:=IFERROR(VLOOKUP([$Masterlist.$P189];[$Datasheet.$B$1:.$AV$9809];18;FALSE());&quot;-&quot;)" office:value-type="string" office:string-value="-" calcext:value-type="string">
            <text:p>-</text:p>
          </table:table-cell>
          <table:table-cell table:style-name="ce147" table:formula="of:=IFERROR(VLOOKUP([$Masterlist.$P189];[$Datasheet.$B$1:.$AV$9809];19;FALSE());&quot;-&quot;)" office:value-type="string" office:string-value="-" calcext:value-type="string">
            <text:p>-</text:p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table:number-columns-repeated="11"/>
          <table:table-cell table:style-name="ce50" office:value-type="string" calcext:value-type="string">
            <text:p>yes</text:p>
          </table:table-cell>
          <table:table-cell table:style-name="ce92" office:value-type="string" calcext:value-type="string">
            <text:p>Resi</text:p>
          </table:table-cell>
          <table:table-cell table:style-name="ce8" office:value-type="string" calcext:value-type="string">
            <text:p>Kayla Mouton</text:p>
          </table:table-cell>
          <table:table-cell table:style-name="ce13" table:formula="of:=IF(ISNUMBER(MATCH([.P190];[$Datasheet.$B$1:.$B$9809];0));&quot;✓&quot;;&quot;x&quot;)" office:value-type="string" office:string-value="✓" calcext:value-type="string">
            <text:p>✓</text:p>
          </table:table-cell>
          <table:table-cell table:style-name="ce147" table:formula="of:=IFERROR(VLOOKUP([$Masterlist.$P190];[$Datasheet.$B$1:.$AV$9809];2;FALSE());&quot;-&quot;)" office:value-type="float" office:value="1" calcext:value-type="float">
            <text:p>1</text:p>
          </table:table-cell>
          <table:table-cell table:style-name="ce147" table:formula="of:=IFERROR(VLOOKUP([$Masterlist.$P190];[$Datasheet.$B$1:.$AV$9809];3;FALSE());&quot;-&quot;)" office:value-type="float" office:value="1" calcext:value-type="float">
            <text:p>1</text:p>
          </table:table-cell>
          <table:table-cell table:style-name="ce147" table:formula="of:=IFERROR(VLOOKUP([$Masterlist.$P190];[$Datasheet.$B$1:.$AV$9809];4;FALSE());&quot;-&quot;)" office:value-type="float" office:value="0" calcext:value-type="float">
            <text:p>0</text:p>
          </table:table-cell>
          <table:table-cell table:style-name="ce147" table:formula="of:=IFERROR(VLOOKUP([$Masterlist.$P190];[$Datasheet.$B$1:.$AV$9809];5;FALSE());&quot;-&quot;)" office:value-type="float" office:value="0" calcext:value-type="float">
            <text:p>0</text:p>
          </table:table-cell>
          <table:table-cell table:style-name="ce195" table:formula="of:=IFERROR(VLOOKUP([$Masterlist.$P190];[$Datasheet.$B$1:.$AV$9809];6;FALSE());&quot;-&quot;)" office:value-type="float" office:value="1" calcext:value-type="float">
            <text:p>1</text:p>
          </table:table-cell>
          <table:table-cell table:style-name="ce147" table:formula="of:=IFERROR(VLOOKUP([$Masterlist.$P190];[$Datasheet.$B$1:.$AV$9809];7;FALSE());&quot;-&quot;)" office:value-type="float" office:value="1" calcext:value-type="float">
            <text:p>1</text:p>
          </table:table-cell>
          <table:table-cell table:style-name="ce147" table:formula="of:=IFERROR(VLOOKUP([$Masterlist.$P190];[$Datasheet.$B$1:.$AV$9809];8;FALSE());&quot;-&quot;)" office:value-type="float" office:value="0" calcext:value-type="float">
            <text:p>0</text:p>
          </table:table-cell>
          <table:table-cell table:style-name="ce147" table:formula="of:=IFERROR(VLOOKUP([$Masterlist.$P190];[$Datasheet.$B$1:.$AV$9809];9;FALSE());&quot;-&quot;)" office:value-type="float" office:value="0" calcext:value-type="float">
            <text:p>0</text:p>
          </table:table-cell>
          <table:table-cell table:style-name="ce147" table:formula="of:=IFERROR(VLOOKUP([$Masterlist.$P190];[$Datasheet.$B$1:.$AV$9809];10;FALSE());&quot;-&quot;)" office:value-type="float" office:value="1" calcext:value-type="float">
            <text:p>1</text:p>
          </table:table-cell>
          <table:table-cell table:style-name="ce147" table:formula="of:=IFERROR(VLOOKUP([$Masterlist.$P190];[$Datasheet.$B$1:.$AV$9809];11;FALSE());&quot;-&quot;)" office:value-type="float" office:value="1" calcext:value-type="float">
            <text:p>1</text:p>
          </table:table-cell>
          <table:table-cell table:style-name="ce147" table:formula="of:=IFERROR(VLOOKUP([$Masterlist.$P190];[$Datasheet.$B$1:.$AV$9809];12;FALSE());&quot;-&quot;)" office:value-type="float" office:value="0" calcext:value-type="float">
            <text:p>0</text:p>
          </table:table-cell>
          <table:table-cell table:style-name="ce147" table:formula="of:=IFERROR(VLOOKUP([$Masterlist.$P190];[$Datasheet.$B$1:.$AV$9809];13;FALSE());&quot;-&quot;)" office:value-type="float" office:value="0" calcext:value-type="float">
            <text:p>0</text:p>
          </table:table-cell>
          <table:table-cell table:style-name="ce147" table:formula="of:=IFERROR(VLOOKUP([$Masterlist.$P190];[$Datasheet.$B$1:.$AV$9809];14;FALSE());&quot;-&quot;)" office:value-type="float" office:value="1" calcext:value-type="float">
            <text:p>1</text:p>
          </table:table-cell>
          <table:table-cell table:style-name="ce147" table:formula="of:=IFERROR(VLOOKUP([$Masterlist.$P190];[$Datasheet.$B$1:.$AV$9809];15;FALSE());&quot;-&quot;)" office:value-type="float" office:value="1" calcext:value-type="float">
            <text:p>1</text:p>
          </table:table-cell>
          <table:table-cell table:style-name="ce147" table:formula="of:=IFERROR(VLOOKUP([$Masterlist.$P190];[$Datasheet.$B$1:.$AV$9809];16;FALSE());&quot;-&quot;)" office:value-type="float" office:value="0" calcext:value-type="float">
            <text:p/>
          </table:table-cell>
          <table:table-cell table:style-name="ce147" table:formula="of:=IFERROR(VLOOKUP([$Masterlist.$P190];[$Datasheet.$B$1:.$AV$9809];17;FALSE());&quot;-&quot;)" office:value-type="float" office:value="0" calcext:value-type="float">
            <text:p/>
          </table:table-cell>
          <table:table-cell table:style-name="ce147" table:formula="of:=IFERROR(VLOOKUP([$Masterlist.$P190];[$Datasheet.$B$1:.$AV$9809];18;FALSE());&quot;-&quot;)" office:value-type="float" office:value="0" calcext:value-type="float">
            <text:p/>
          </table:table-cell>
          <table:table-cell table:style-name="ce147" table:formula="of:=IFERROR(VLOOKUP([$Masterlist.$P190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table:number-columns-repeated="11"/>
          <table:table-cell table:style-name="ce50" office:value-type="string" calcext:value-type="string">
            <text:p>yes</text:p>
          </table:table-cell>
          <table:table-cell table:style-name="ce92" office:value-type="string" calcext:value-type="string">
            <text:p>Resi</text:p>
          </table:table-cell>
          <table:table-cell table:style-name="ce8" office:value-type="string" calcext:value-type="string">
            <text:p>Lida-Marie Huysamen</text:p>
          </table:table-cell>
          <table:table-cell table:style-name="ce13" table:formula="of:=IF(ISNUMBER(MATCH([.P191];[$Datasheet.$B$1:.$B$9809];0));&quot;✓&quot;;&quot;x&quot;)" office:value-type="string" office:string-value="✓" calcext:value-type="string">
            <text:p>✓</text:p>
          </table:table-cell>
          <table:table-cell table:style-name="ce147" table:formula="of:=IFERROR(VLOOKUP([$Masterlist.$P191];[$Datasheet.$B$1:.$AV$9809];2;FALSE());&quot;-&quot;)" office:value-type="float" office:value="0" calcext:value-type="float">
            <text:p>0</text:p>
          </table:table-cell>
          <table:table-cell table:style-name="ce147" table:formula="of:=IFERROR(VLOOKUP([$Masterlist.$P191];[$Datasheet.$B$1:.$AV$9809];3;FALSE());&quot;-&quot;)" office:value-type="float" office:value="0" calcext:value-type="float">
            <text:p>0</text:p>
          </table:table-cell>
          <table:table-cell table:style-name="ce147" table:formula="of:=IFERROR(VLOOKUP([$Masterlist.$P191];[$Datasheet.$B$1:.$AV$9809];4;FALSE());&quot;-&quot;)" office:value-type="float" office:value="0" calcext:value-type="float">
            <text:p>0</text:p>
          </table:table-cell>
          <table:table-cell table:style-name="ce147" table:formula="of:=IFERROR(VLOOKUP([$Masterlist.$P191];[$Datasheet.$B$1:.$AV$9809];5;FALSE());&quot;-&quot;)" office:value-type="float" office:value="0" calcext:value-type="float">
            <text:p>0</text:p>
          </table:table-cell>
          <table:table-cell table:style-name="ce195" table:formula="of:=IFERROR(VLOOKUP([$Masterlist.$P191];[$Datasheet.$B$1:.$AV$9809];6;FALSE());&quot;-&quot;)" office:value-type="float" office:value="0" calcext:value-type="float">
            <text:p>0</text:p>
          </table:table-cell>
          <table:table-cell table:style-name="ce147" table:formula="of:=IFERROR(VLOOKUP([$Masterlist.$P191];[$Datasheet.$B$1:.$AV$9809];7;FALSE());&quot;-&quot;)" office:value-type="float" office:value="0" calcext:value-type="float">
            <text:p>0</text:p>
          </table:table-cell>
          <table:table-cell table:style-name="ce147" table:formula="of:=IFERROR(VLOOKUP([$Masterlist.$P191];[$Datasheet.$B$1:.$AV$9809];8;FALSE());&quot;-&quot;)" office:value-type="float" office:value="0" calcext:value-type="float">
            <text:p>0</text:p>
          </table:table-cell>
          <table:table-cell table:style-name="ce147" table:formula="of:=IFERROR(VLOOKUP([$Masterlist.$P191];[$Datasheet.$B$1:.$AV$9809];9;FALSE());&quot;-&quot;)" office:value-type="float" office:value="1" calcext:value-type="float">
            <text:p>1</text:p>
          </table:table-cell>
          <table:table-cell table:style-name="ce147" table:formula="of:=IFERROR(VLOOKUP([$Masterlist.$P191];[$Datasheet.$B$1:.$AV$9809];10;FALSE());&quot;-&quot;)" office:value-type="float" office:value="1" calcext:value-type="float">
            <text:p>1</text:p>
          </table:table-cell>
          <table:table-cell table:style-name="ce147" table:formula="of:=IFERROR(VLOOKUP([$Masterlist.$P191];[$Datasheet.$B$1:.$AV$9809];11;FALSE());&quot;-&quot;)" office:value-type="float" office:value="0" calcext:value-type="float">
            <text:p>0</text:p>
          </table:table-cell>
          <table:table-cell table:style-name="ce147" table:formula="of:=IFERROR(VLOOKUP([$Masterlist.$P191];[$Datasheet.$B$1:.$AV$9809];12;FALSE());&quot;-&quot;)" office:value-type="float" office:value="0" calcext:value-type="float">
            <text:p>0</text:p>
          </table:table-cell>
          <table:table-cell table:style-name="ce147" table:formula="of:=IFERROR(VLOOKUP([$Masterlist.$P191];[$Datasheet.$B$1:.$AV$9809];13;FALSE());&quot;-&quot;)" office:value-type="float" office:value="0" calcext:value-type="float">
            <text:p>0</text:p>
          </table:table-cell>
          <table:table-cell table:style-name="ce147" table:formula="of:=IFERROR(VLOOKUP([$Masterlist.$P191];[$Datasheet.$B$1:.$AV$9809];14;FALSE());&quot;-&quot;)" office:value-type="float" office:value="1" calcext:value-type="float">
            <text:p>1</text:p>
          </table:table-cell>
          <table:table-cell table:style-name="ce147" table:formula="of:=IFERROR(VLOOKUP([$Masterlist.$P191];[$Datasheet.$B$1:.$AV$9809];15;FALSE());&quot;-&quot;)" office:value-type="float" office:value="1" calcext:value-type="float">
            <text:p>1</text:p>
          </table:table-cell>
          <table:table-cell table:style-name="ce147" table:formula="of:=IFERROR(VLOOKUP([$Masterlist.$P191];[$Datasheet.$B$1:.$AV$9809];16;FALSE());&quot;-&quot;)" office:value-type="float" office:value="0" calcext:value-type="float">
            <text:p/>
          </table:table-cell>
          <table:table-cell table:style-name="ce147" table:formula="of:=IFERROR(VLOOKUP([$Masterlist.$P191];[$Datasheet.$B$1:.$AV$9809];17;FALSE());&quot;-&quot;)" office:value-type="float" office:value="0" calcext:value-type="float">
            <text:p/>
          </table:table-cell>
          <table:table-cell table:style-name="ce147" table:formula="of:=IFERROR(VLOOKUP([$Masterlist.$P191];[$Datasheet.$B$1:.$AV$9809];18;FALSE());&quot;-&quot;)" office:value-type="float" office:value="0" calcext:value-type="float">
            <text:p/>
          </table:table-cell>
          <table:table-cell table:style-name="ce147" table:formula="of:=IFERROR(VLOOKUP([$Masterlist.$P191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6"/>
          <table:table-cell table:style-name="ce26" office:value-type="string" calcext:value-type="string">
            <text:p>L</text:p>
          </table:table-cell>
          <table:table-cell table:style-name="ce50" table:number-columns-repeated="11"/>
          <table:table-cell table:style-name="ce50" office:value-type="string" calcext:value-type="string">
            <text:p>yes</text:p>
          </table:table-cell>
          <table:table-cell table:style-name="ce92" office:value-type="string" calcext:value-type="string">
            <text:p>Resi</text:p>
          </table:table-cell>
          <table:table-cell table:style-name="ce8" office:value-type="string" calcext:value-type="string">
            <text:p>Kira Kriessbach</text:p>
          </table:table-cell>
          <table:table-cell table:style-name="ce16" table:formula="of:=IF(ISNUMBER(MATCH([.P192];[$Datasheet.$B$1:.$B$9809];0));&quot;✓&quot;;&quot;x&quot;)" office:value-type="string" office:string-value="✓" calcext:value-type="string">
            <text:p>✓</text:p>
          </table:table-cell>
          <table:table-cell table:style-name="ce149" table:formula="of:=IFERROR(VLOOKUP([$Masterlist.$P192];[$Datasheet.$B$1:.$AV$9809];2;FALSE());&quot;-&quot;)" office:value-type="float" office:value="0" calcext:value-type="float">
            <text:p>0</text:p>
          </table:table-cell>
          <table:table-cell table:style-name="ce149" table:formula="of:=IFERROR(VLOOKUP([$Masterlist.$P192];[$Datasheet.$B$1:.$AV$9809];3;FALSE());&quot;-&quot;)" office:value-type="float" office:value="0" calcext:value-type="float">
            <text:p>0</text:p>
          </table:table-cell>
          <table:table-cell table:style-name="ce149" table:formula="of:=IFERROR(VLOOKUP([$Masterlist.$P192];[$Datasheet.$B$1:.$AV$9809];4;FALSE());&quot;-&quot;)" office:value-type="float" office:value="1" calcext:value-type="float">
            <text:p>1</text:p>
          </table:table-cell>
          <table:table-cell table:style-name="ce149" table:formula="of:=IFERROR(VLOOKUP([$Masterlist.$P192];[$Datasheet.$B$1:.$AV$9809];5;FALSE());&quot;-&quot;)" office:value-type="float" office:value="1" calcext:value-type="float">
            <text:p>1</text:p>
          </table:table-cell>
          <table:table-cell table:style-name="ce197" table:formula="of:=IFERROR(VLOOKUP([$Masterlist.$P192];[$Datasheet.$B$1:.$AV$9809];6;FALSE());&quot;-&quot;)" office:value-type="float" office:value="0" calcext:value-type="float">
            <text:p>0</text:p>
          </table:table-cell>
          <table:table-cell table:style-name="ce149" table:formula="of:=IFERROR(VLOOKUP([$Masterlist.$P192];[$Datasheet.$B$1:.$AV$9809];7;FALSE());&quot;-&quot;)" office:value-type="float" office:value="1" calcext:value-type="float">
            <text:p>1</text:p>
          </table:table-cell>
          <table:table-cell table:style-name="ce149" table:formula="of:=IFERROR(VLOOKUP([$Masterlist.$P192];[$Datasheet.$B$1:.$AV$9809];8;FALSE());&quot;-&quot;)" office:value-type="float" office:value="1" calcext:value-type="float">
            <text:p>1</text:p>
          </table:table-cell>
          <table:table-cell table:style-name="ce149" table:formula="of:=IFERROR(VLOOKUP([$Masterlist.$P192];[$Datasheet.$B$1:.$AV$9809];9;FALSE());&quot;-&quot;)" office:value-type="float" office:value="1" calcext:value-type="float">
            <text:p>1</text:p>
          </table:table-cell>
          <table:table-cell table:style-name="ce149" table:formula="of:=IFERROR(VLOOKUP([$Masterlist.$P192];[$Datasheet.$B$1:.$AV$9809];10;FALSE());&quot;-&quot;)" office:value-type="float" office:value="0" calcext:value-type="float">
            <text:p>0</text:p>
          </table:table-cell>
          <table:table-cell table:style-name="ce149" table:formula="of:=IFERROR(VLOOKUP([$Masterlist.$P192];[$Datasheet.$B$1:.$AV$9809];11;FALSE());&quot;-&quot;)" office:value-type="float" office:value="1" calcext:value-type="float">
            <text:p>1</text:p>
          </table:table-cell>
          <table:table-cell table:style-name="ce149" table:formula="of:=IFERROR(VLOOKUP([$Masterlist.$P192];[$Datasheet.$B$1:.$AV$9809];12;FALSE());&quot;-&quot;)" office:value-type="float" office:value="1" calcext:value-type="float">
            <text:p>1</text:p>
          </table:table-cell>
          <table:table-cell table:style-name="ce149" table:formula="of:=IFERROR(VLOOKUP([$Masterlist.$P192];[$Datasheet.$B$1:.$AV$9809];13;FALSE());&quot;-&quot;)" office:value-type="float" office:value="1" calcext:value-type="float">
            <text:p>1</text:p>
          </table:table-cell>
          <table:table-cell table:style-name="ce149" table:formula="of:=IFERROR(VLOOKUP([$Masterlist.$P192];[$Datasheet.$B$1:.$AV$9809];14;FALSE());&quot;-&quot;)" office:value-type="float" office:value="0" calcext:value-type="float">
            <text:p>0</text:p>
          </table:table-cell>
          <table:table-cell table:style-name="ce149" table:formula="of:=IFERROR(VLOOKUP([$Masterlist.$P192];[$Datasheet.$B$1:.$AV$9809];15;FALSE());&quot;-&quot;)" office:value-type="float" office:value="1" calcext:value-type="float">
            <text:p>1</text:p>
          </table:table-cell>
          <table:table-cell table:style-name="ce149" table:formula="of:=IFERROR(VLOOKUP([$Masterlist.$P192];[$Datasheet.$B$1:.$AV$9809];16;FALSE());&quot;-&quot;)" office:value-type="float" office:value="0" calcext:value-type="float">
            <text:p/>
          </table:table-cell>
          <table:table-cell table:style-name="ce149" table:formula="of:=IFERROR(VLOOKUP([$Masterlist.$P192];[$Datasheet.$B$1:.$AV$9809];17;FALSE());&quot;-&quot;)" office:value-type="float" office:value="0" calcext:value-type="float">
            <text:p/>
          </table:table-cell>
          <table:table-cell table:style-name="ce149" table:formula="of:=IFERROR(VLOOKUP([$Masterlist.$P192];[$Datasheet.$B$1:.$AV$9809];18;FALSE());&quot;-&quot;)" office:value-type="float" office:value="0" calcext:value-type="float">
            <text:p/>
          </table:table-cell>
          <table:table-cell table:style-name="ce149" table:formula="of:=IFERROR(VLOOKUP([$Masterlist.$P192];[$Datasheet.$B$1:.$AV$9809];19;FALSE());&quot;-&quot;)" office:value-type="float" office:value="0" calcext:value-type="float">
            <text:p/>
          </table:table-cell>
          <table:table-cell table:style-name="ce16" table:number-columns-repeated="2"/>
          <table:table-cell table:number-columns-repeated="16347"/>
        </table:table-row>
        <table:table-row table:style-name="ro1">
          <table:table-cell table:style-name="ce18"/>
          <table:table-cell table:style-name="ce30" office:value-type="string" calcext:value-type="string">
            <text:p>L</text:p>
          </table:table-cell>
          <table:table-cell table:style-name="ce53" table:number-columns-repeated="8"/>
          <table:table-cell table:style-name="ce52"/>
          <table:table-cell table:style-name="ce53" table:number-columns-repeated="2"/>
          <table:table-cell table:style-name="ce74" office:value-type="string" calcext:value-type="string">
            <text:p>yes</text:p>
          </table:table-cell>
          <table:table-cell table:style-name="ce17" office:value-type="string" calcext:value-type="string">
            <text:p>Resi</text:p>
          </table:table-cell>
          <table:table-cell table:style-name="ce17" office:value-type="string" calcext:value-type="string">
            <text:p>Marianka Jacobs</text:p>
          </table:table-cell>
          <table:table-cell table:style-name="ce118" table:formula="of:=IF(ISNUMBER(MATCH([.P193];[$Datasheet.$B$1:.$B$9809];0));&quot;✓&quot;;&quot;x&quot;)" office:value-type="string" office:string-value="✓" calcext:value-type="string">
            <text:p>✓</text:p>
          </table:table-cell>
          <table:table-cell table:style-name="ce150" table:formula="of:=IFERROR(VLOOKUP([$Masterlist.$P193];[$Datasheet.$B$1:.$AV$9809];2;FALSE());&quot;-&quot;)" office:value-type="float" office:value="0" calcext:value-type="float">
            <text:p>0</text:p>
          </table:table-cell>
          <table:table-cell table:style-name="ce150" table:formula="of:=IFERROR(VLOOKUP([$Masterlist.$P193];[$Datasheet.$B$1:.$AV$9809];3;FALSE());&quot;-&quot;)" office:value-type="float" office:value="0" calcext:value-type="float">
            <text:p>0</text:p>
          </table:table-cell>
          <table:table-cell table:style-name="ce179" table:formula="of:=IFERROR(VLOOKUP([$Masterlist.$P193];[$Datasheet.$B$1:.$AV$9809];4;FALSE());&quot;-&quot;)" office:value-type="float" office:value="1" calcext:value-type="float">
            <text:p>1</text:p>
          </table:table-cell>
          <table:table-cell table:style-name="ce179" table:formula="of:=IFERROR(VLOOKUP([$Masterlist.$P193];[$Datasheet.$B$1:.$AV$9809];5;FALSE());&quot;-&quot;)" office:value-type="float" office:value="1" calcext:value-type="float">
            <text:p>1</text:p>
          </table:table-cell>
          <table:table-cell table:style-name="ce198" table:formula="of:=IFERROR(VLOOKUP([$Masterlist.$P193];[$Datasheet.$B$1:.$AV$9809];6;FALSE());&quot;-&quot;)" office:value-type="float" office:value="1" calcext:value-type="float">
            <text:p>1</text:p>
          </table:table-cell>
          <table:table-cell table:style-name="ce179" table:formula="of:=IFERROR(VLOOKUP([$Masterlist.$P193];[$Datasheet.$B$1:.$AV$9809];7;FALSE());&quot;-&quot;)" office:value-type="float" office:value="1" calcext:value-type="float">
            <text:p>1</text:p>
          </table:table-cell>
          <table:table-cell table:style-name="ce179" table:formula="of:=IFERROR(VLOOKUP([$Masterlist.$P193];[$Datasheet.$B$1:.$AV$9809];8;FALSE());&quot;-&quot;)" office:value-type="float" office:value="1" calcext:value-type="float">
            <text:p>1</text:p>
          </table:table-cell>
          <table:table-cell table:style-name="ce179" table:formula="of:=IFERROR(VLOOKUP([$Masterlist.$P193];[$Datasheet.$B$1:.$AV$9809];9;FALSE());&quot;-&quot;)" office:value-type="float" office:value="1" calcext:value-type="float">
            <text:p>1</text:p>
          </table:table-cell>
          <table:table-cell table:style-name="ce179" table:formula="of:=IFERROR(VLOOKUP([$Masterlist.$P193];[$Datasheet.$B$1:.$AV$9809];10;FALSE());&quot;-&quot;)" office:value-type="float" office:value="1" calcext:value-type="float">
            <text:p>1</text:p>
          </table:table-cell>
          <table:table-cell table:style-name="ce179" table:formula="of:=IFERROR(VLOOKUP([$Masterlist.$P193];[$Datasheet.$B$1:.$AV$9809];11;FALSE());&quot;-&quot;)" office:value-type="float" office:value="1" calcext:value-type="float">
            <text:p>1</text:p>
          </table:table-cell>
          <table:table-cell table:style-name="ce179" table:formula="of:=IFERROR(VLOOKUP([$Masterlist.$P193];[$Datasheet.$B$1:.$AV$9809];12;FALSE());&quot;-&quot;)" office:value-type="float" office:value="1" calcext:value-type="float">
            <text:p>1</text:p>
          </table:table-cell>
          <table:table-cell table:style-name="ce179" table:formula="of:=IFERROR(VLOOKUP([$Masterlist.$P193];[$Datasheet.$B$1:.$AV$9809];13;FALSE());&quot;-&quot;)" office:value-type="float" office:value="1" calcext:value-type="float">
            <text:p>1</text:p>
          </table:table-cell>
          <table:table-cell table:style-name="ce179" table:formula="of:=IFERROR(VLOOKUP([$Masterlist.$P193];[$Datasheet.$B$1:.$AV$9809];14;FALSE());&quot;-&quot;)" office:value-type="float" office:value="1" calcext:value-type="float">
            <text:p>1</text:p>
          </table:table-cell>
          <table:table-cell table:style-name="ce179" table:formula="of:=IFERROR(VLOOKUP([$Masterlist.$P193];[$Datasheet.$B$1:.$AV$9809];15;FALSE());&quot;-&quot;)" office:value-type="float" office:value="1" calcext:value-type="float">
            <text:p>1</text:p>
          </table:table-cell>
          <table:table-cell table:style-name="ce179" table:formula="of:=IFERROR(VLOOKUP([$Masterlist.$P193];[$Datasheet.$B$1:.$AV$9809];16;FALSE());&quot;-&quot;)" office:value-type="float" office:value="0" calcext:value-type="float">
            <text:p/>
          </table:table-cell>
          <table:table-cell table:style-name="ce179" table:formula="of:=IFERROR(VLOOKUP([$Masterlist.$P193];[$Datasheet.$B$1:.$AV$9809];17;FALSE());&quot;-&quot;)" office:value-type="float" office:value="0" calcext:value-type="float">
            <text:p/>
          </table:table-cell>
          <table:table-cell table:style-name="ce179" table:formula="of:=IFERROR(VLOOKUP([$Masterlist.$P193];[$Datasheet.$B$1:.$AV$9809];18;FALSE());&quot;-&quot;)" office:value-type="float" office:value="0" calcext:value-type="float">
            <text:p/>
          </table:table-cell>
          <table:table-cell table:style-name="ce179" table:formula="of:=IFERROR(VLOOKUP([$Masterlist.$P193];[$Datasheet.$B$1:.$AV$9809];19;FALSE());&quot;-&quot;)" office:value-type="float" office:value="0" calcext:value-type="float">
            <text:p/>
          </table:table-cell>
          <table:table-cell table:style-name="ce18" table:number-columns-repeated="2"/>
          <table:table-cell table:number-columns-repeated="16347"/>
        </table:table-row>
        <table:table-row table:style-name="ro1">
          <table:table-cell table:style-name="ce18"/>
          <table:table-cell table:style-name="ce38" office:value-type="string" calcext:value-type="string">
            <text:p>M</text:p>
          </table:table-cell>
          <table:table-cell table:style-name="ce53" table:number-columns-repeated="11"/>
          <table:table-cell table:style-name="ce74" office:value-type="string" calcext:value-type="string">
            <text:p>yes</text:p>
          </table:table-cell>
          <table:table-cell table:style-name="ce17" office:value-type="string" calcext:value-type="string">
            <text:p>Resi</text:p>
          </table:table-cell>
          <table:table-cell table:style-name="ce17" office:value-type="string" calcext:value-type="string">
            <text:p>Jeandre Jacobs</text:p>
          </table:table-cell>
          <table:table-cell table:style-name="ce118" table:formula="of:=IF(ISNUMBER(MATCH([.P194];[$Datasheet.$B$1:.$B$9809];0));&quot;✓&quot;;&quot;x&quot;)" office:value-type="string" office:string-value="✓" calcext:value-type="string">
            <text:p>✓</text:p>
          </table:table-cell>
          <table:table-cell table:style-name="ce150" table:formula="of:=IFERROR(VLOOKUP([$Masterlist.$P194];[$Datasheet.$B$1:.$AV$9809];2;FALSE());&quot;-&quot;)" office:value-type="float" office:value="0" calcext:value-type="float">
            <text:p>0</text:p>
          </table:table-cell>
          <table:table-cell table:style-name="ce150" table:formula="of:=IFERROR(VLOOKUP([$Masterlist.$P194];[$Datasheet.$B$1:.$AV$9809];3;FALSE());&quot;-&quot;)" office:value-type="float" office:value="0" calcext:value-type="float">
            <text:p>0</text:p>
          </table:table-cell>
          <table:table-cell table:style-name="ce150" table:formula="of:=IFERROR(VLOOKUP([$Masterlist.$P194];[$Datasheet.$B$1:.$AV$9809];4;FALSE());&quot;-&quot;)" office:value-type="float" office:value="1" calcext:value-type="float">
            <text:p>1</text:p>
          </table:table-cell>
          <table:table-cell table:style-name="ce150" table:formula="of:=IFERROR(VLOOKUP([$Masterlist.$P194];[$Datasheet.$B$1:.$AV$9809];5;FALSE());&quot;-&quot;)" office:value-type="float" office:value="1" calcext:value-type="float">
            <text:p>1</text:p>
          </table:table-cell>
          <table:table-cell table:style-name="ce198" table:formula="of:=IFERROR(VLOOKUP([$Masterlist.$P194];[$Datasheet.$B$1:.$AV$9809];6;FALSE());&quot;-&quot;)" office:value-type="float" office:value="1" calcext:value-type="float">
            <text:p>1</text:p>
          </table:table-cell>
          <table:table-cell table:style-name="ce179" table:formula="of:=IFERROR(VLOOKUP([$Masterlist.$P194];[$Datasheet.$B$1:.$AV$9809];7;FALSE());&quot;-&quot;)" office:value-type="float" office:value="1" calcext:value-type="float">
            <text:p>1</text:p>
          </table:table-cell>
          <table:table-cell table:style-name="ce179" table:formula="of:=IFERROR(VLOOKUP([$Masterlist.$P194];[$Datasheet.$B$1:.$AV$9809];8;FALSE());&quot;-&quot;)" office:value-type="float" office:value="1" calcext:value-type="float">
            <text:p>1</text:p>
          </table:table-cell>
          <table:table-cell table:style-name="ce179" table:formula="of:=IFERROR(VLOOKUP([$Masterlist.$P194];[$Datasheet.$B$1:.$AV$9809];9;FALSE());&quot;-&quot;)" office:value-type="float" office:value="1" calcext:value-type="float">
            <text:p>1</text:p>
          </table:table-cell>
          <table:table-cell table:style-name="ce179" table:formula="of:=IFERROR(VLOOKUP([$Masterlist.$P194];[$Datasheet.$B$1:.$AV$9809];10;FALSE());&quot;-&quot;)" office:value-type="float" office:value="1" calcext:value-type="float">
            <text:p>1</text:p>
          </table:table-cell>
          <table:table-cell table:style-name="ce179" table:formula="of:=IFERROR(VLOOKUP([$Masterlist.$P194];[$Datasheet.$B$1:.$AV$9809];11;FALSE());&quot;-&quot;)" office:value-type="float" office:value="1" calcext:value-type="float">
            <text:p>1</text:p>
          </table:table-cell>
          <table:table-cell table:style-name="ce179" table:formula="of:=IFERROR(VLOOKUP([$Masterlist.$P194];[$Datasheet.$B$1:.$AV$9809];12;FALSE());&quot;-&quot;)" office:value-type="float" office:value="1" calcext:value-type="float">
            <text:p>1</text:p>
          </table:table-cell>
          <table:table-cell table:style-name="ce179" table:formula="of:=IFERROR(VLOOKUP([$Masterlist.$P194];[$Datasheet.$B$1:.$AV$9809];13;FALSE());&quot;-&quot;)" office:value-type="float" office:value="1" calcext:value-type="float">
            <text:p>1</text:p>
          </table:table-cell>
          <table:table-cell table:style-name="ce179" table:formula="of:=IFERROR(VLOOKUP([$Masterlist.$P194];[$Datasheet.$B$1:.$AV$9809];14;FALSE());&quot;-&quot;)" office:value-type="float" office:value="1" calcext:value-type="float">
            <text:p>1</text:p>
          </table:table-cell>
          <table:table-cell table:style-name="ce179" table:formula="of:=IFERROR(VLOOKUP([$Masterlist.$P194];[$Datasheet.$B$1:.$AV$9809];15;FALSE());&quot;-&quot;)" office:value-type="float" office:value="1" calcext:value-type="float">
            <text:p>1</text:p>
          </table:table-cell>
          <table:table-cell table:style-name="ce179" table:formula="of:=IFERROR(VLOOKUP([$Masterlist.$P194];[$Datasheet.$B$1:.$AV$9809];16;FALSE());&quot;-&quot;)" office:value-type="float" office:value="0" calcext:value-type="float">
            <text:p/>
          </table:table-cell>
          <table:table-cell table:style-name="ce179" table:formula="of:=IFERROR(VLOOKUP([$Masterlist.$P194];[$Datasheet.$B$1:.$AV$9809];17;FALSE());&quot;-&quot;)" office:value-type="float" office:value="0" calcext:value-type="float">
            <text:p/>
          </table:table-cell>
          <table:table-cell table:style-name="ce179" table:formula="of:=IFERROR(VLOOKUP([$Masterlist.$P194];[$Datasheet.$B$1:.$AV$9809];18;FALSE());&quot;-&quot;)" office:value-type="float" office:value="0" calcext:value-type="float">
            <text:p/>
          </table:table-cell>
          <table:table-cell table:style-name="ce179" table:formula="of:=IFERROR(VLOOKUP([$Masterlist.$P194];[$Datasheet.$B$1:.$AV$9809];19;FALSE());&quot;-&quot;)" office:value-type="float" office:value="0" calcext:value-type="float">
            <text:p/>
          </table:table-cell>
          <table:table-cell table:style-name="ce18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39" office:value-type="string" calcext:value-type="string" table:number-columns-spanned="15" table:number-rows-spanned="1">
            <text:p>STREAMERS - REINOLD BRINK</text:p>
          </table:table-cell>
          <table:covered-table-cell table:number-columns-repeated="13" table:style-name="ce45"/>
          <table:covered-table-cell table:style-name="ce99"/>
          <table:table-cell table:style-name="ce124"/>
          <table:table-cell table:style-name="ce151" office:value-type="string" calcext:value-type="string" table:number-columns-spanned="18" table:number-rows-spanned="1">
            <text:p>STREAMERS - REINOLD BRINK</text:p>
          </table:table-cell>
          <table:covered-table-cell table:number-columns-repeated="16" table:style-name="ce45"/>
          <table:covered-table-cell table:style-name="ce99"/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5" office:value-type="string" calcext:value-type="string">
            <text:p>AL</text:p>
          </table:table-cell>
          <table:table-cell table:style-name="ce49" office:value-type="string" calcext:value-type="string">
            <text:p>yes</text:p>
          </table:table-cell>
          <table:table-cell table:style-name="ce49" table:number-columns-repeated="11"/>
          <table:table-cell table:style-name="ce91" office:value-type="string" calcext:value-type="string">
            <text:p>Streamer</text:p>
          </table:table-cell>
          <table:table-cell table:style-name="ce100" office:value-type="string" calcext:value-type="string">
            <text:p>Louis Jacobs</text:p>
          </table:table-cell>
          <table:table-cell table:style-name="ce13" table:formula="of:=IF(ISNUMBER(MATCH([.P196];[$Datasheet.$B$1:.$B$9809];0));&quot;✓&quot;;&quot;x&quot;)" office:value-type="string" office:string-value="x" calcext:value-type="string">
            <text:p>x</text:p>
          </table:table-cell>
          <table:table-cell table:style-name="ce152" table:formula="of:=IFERROR(VLOOKUP([$Masterlist.$P196];[$Datasheet.$B$1:.$AV$9809];2;FALSE());&quot;-&quot;)" office:value-type="string" office:string-value="-" calcext:value-type="string">
            <text:p>-</text:p>
          </table:table-cell>
          <table:table-cell table:style-name="ce152" table:formula="of:=IFERROR(VLOOKUP([$Masterlist.$P196];[$Datasheet.$B$1:.$AV$9809];3;FALSE());&quot;-&quot;)" office:value-type="string" office:string-value="-" calcext:value-type="string">
            <text:p>-</text:p>
          </table:table-cell>
          <table:table-cell table:style-name="ce152" table:formula="of:=IFERROR(VLOOKUP([$Masterlist.$P196];[$Datasheet.$B$1:.$AV$9809];4;FALSE());&quot;-&quot;)" office:value-type="string" office:string-value="-" calcext:value-type="string">
            <text:p>-</text:p>
          </table:table-cell>
          <table:table-cell table:style-name="ce152" table:formula="of:=IFERROR(VLOOKUP([$Masterlist.$P196];[$Datasheet.$B$1:.$AV$9809];5;FALSE());&quot;-&quot;)" office:value-type="string" office:string-value="-" calcext:value-type="string">
            <text:p>-</text:p>
          </table:table-cell>
          <table:table-cell table:style-name="ce199" table:formula="of:=IFERROR(VLOOKUP([$Masterlist.$P196];[$Datasheet.$B$1:.$AV$9809];6;FALSE());&quot;-&quot;)" office:value-type="string" office:string-value="-" calcext:value-type="string">
            <text:p>-</text:p>
          </table:table-cell>
          <table:table-cell table:style-name="ce152" table:formula="of:=IFERROR(VLOOKUP([$Masterlist.$P196];[$Datasheet.$B$1:.$AV$9809];7;FALSE());&quot;-&quot;)" office:value-type="string" office:string-value="-" calcext:value-type="string">
            <text:p>-</text:p>
          </table:table-cell>
          <table:table-cell table:style-name="ce152" table:formula="of:=IFERROR(VLOOKUP([$Masterlist.$P196];[$Datasheet.$B$1:.$AV$9809];8;FALSE());&quot;-&quot;)" office:value-type="string" office:string-value="-" calcext:value-type="string">
            <text:p>-</text:p>
          </table:table-cell>
          <table:table-cell table:style-name="ce152" table:formula="of:=IFERROR(VLOOKUP([$Masterlist.$P196];[$Datasheet.$B$1:.$AV$9809];9;FALSE());&quot;-&quot;)" office:value-type="string" office:string-value="-" calcext:value-type="string">
            <text:p>-</text:p>
          </table:table-cell>
          <table:table-cell table:style-name="ce152" table:formula="of:=IFERROR(VLOOKUP([$Masterlist.$P196];[$Datasheet.$B$1:.$AV$9809];10;FALSE());&quot;-&quot;)" office:value-type="string" office:string-value="-" calcext:value-type="string">
            <text:p>-</text:p>
          </table:table-cell>
          <table:table-cell table:style-name="ce223" table:formula="of:=IFERROR(VLOOKUP([$Masterlist.$P196];[$Datasheet.$B$1:.$AV$9809];11;FALSE());&quot;-&quot;)" office:value-type="string" office:string-value="-" calcext:value-type="string">
            <text:p>-</text:p>
          </table:table-cell>
          <table:table-cell table:style-name="ce223" table:formula="of:=IFERROR(VLOOKUP([$Masterlist.$P196];[$Datasheet.$B$1:.$AV$9809];12;FALSE());&quot;-&quot;)" office:value-type="string" office:string-value="-" calcext:value-type="string">
            <text:p>-</text:p>
          </table:table-cell>
          <table:table-cell table:style-name="ce223" table:formula="of:=IFERROR(VLOOKUP([$Masterlist.$P196];[$Datasheet.$B$1:.$AV$9809];13;FALSE());&quot;-&quot;)" office:value-type="string" office:string-value="-" calcext:value-type="string">
            <text:p>-</text:p>
          </table:table-cell>
          <table:table-cell table:style-name="ce223" table:formula="of:=IFERROR(VLOOKUP([$Masterlist.$P196];[$Datasheet.$B$1:.$AV$9809];14;FALSE());&quot;-&quot;)" office:value-type="string" office:string-value="-" calcext:value-type="string">
            <text:p>-</text:p>
          </table:table-cell>
          <table:table-cell table:style-name="ce223" table:formula="of:=IFERROR(VLOOKUP([$Masterlist.$P196];[$Datasheet.$B$1:.$AV$9809];15;FALSE());&quot;-&quot;)" office:value-type="string" office:string-value="-" calcext:value-type="string">
            <text:p>-</text:p>
          </table:table-cell>
          <table:table-cell table:style-name="ce223" table:formula="of:=IFERROR(VLOOKUP([$Masterlist.$P196];[$Datasheet.$B$1:.$AV$9809];16;FALSE());&quot;-&quot;)" office:value-type="string" office:string-value="-" calcext:value-type="string">
            <text:p>-</text:p>
          </table:table-cell>
          <table:table-cell table:style-name="ce223" table:formula="of:=IFERROR(VLOOKUP([$Masterlist.$P196];[$Datasheet.$B$1:.$AV$9809];17;FALSE());&quot;-&quot;)" office:value-type="string" office:string-value="-" calcext:value-type="string">
            <text:p>-</text:p>
          </table:table-cell>
          <table:table-cell table:style-name="ce223" table:formula="of:=IFERROR(VLOOKUP([$Masterlist.$P196];[$Datasheet.$B$1:.$AV$9809];18;FALSE());&quot;-&quot;)" office:value-type="string" office:string-value="-" calcext:value-type="string">
            <text:p>-</text:p>
          </table:table-cell>
          <table:table-cell table:style-name="ce223" table:formula="of:=IFERROR(VLOOKUP([$Masterlist.$P196];[$Datasheet.$B$1:.$AV$9809];19;FALSE());&quot;-&quot;)" office:value-type="string" office:string-value="-" calcext:value-type="string">
            <text:p>-</text:p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office:value-type="string" calcext:value-type="string">
            <text:p>yes</text:p>
          </table:table-cell>
          <table:table-cell table:style-name="ce50" table:number-columns-repeated="11"/>
          <table:table-cell table:style-name="ce92" office:value-type="string" calcext:value-type="string">
            <text:p>Streamer</text:p>
          </table:table-cell>
          <table:table-cell table:style-name="ce8" office:value-type="string" calcext:value-type="string">
            <text:p>Erastus Heystek</text:p>
          </table:table-cell>
          <table:table-cell table:style-name="ce13" table:formula="of:=IF(ISNUMBER(MATCH([.P197];[$Datasheet.$B$1:.$B$9809];0));&quot;✓&quot;;&quot;x&quot;)" office:value-type="string" office:string-value="✓" calcext:value-type="string">
            <text:p>✓</text:p>
          </table:table-cell>
          <table:table-cell table:style-name="ce152" table:formula="of:=IFERROR(VLOOKUP([$Masterlist.$P197];[$Datasheet.$B$1:.$AV$9809];2;FALSE());&quot;-&quot;)" office:value-type="float" office:value="1" calcext:value-type="float">
            <text:p>1</text:p>
          </table:table-cell>
          <table:table-cell table:style-name="ce152" table:formula="of:=IFERROR(VLOOKUP([$Masterlist.$P197];[$Datasheet.$B$1:.$AV$9809];3;FALSE());&quot;-&quot;)" office:value-type="float" office:value="1" calcext:value-type="float">
            <text:p>1</text:p>
          </table:table-cell>
          <table:table-cell table:style-name="ce152" table:formula="of:=IFERROR(VLOOKUP([$Masterlist.$P197];[$Datasheet.$B$1:.$AV$9809];4;FALSE());&quot;-&quot;)" office:value-type="float" office:value="1" calcext:value-type="float">
            <text:p>1</text:p>
          </table:table-cell>
          <table:table-cell table:style-name="ce152" table:formula="of:=IFERROR(VLOOKUP([$Masterlist.$P197];[$Datasheet.$B$1:.$AV$9809];5;FALSE());&quot;-&quot;)" office:value-type="float" office:value="1" calcext:value-type="float">
            <text:p>1</text:p>
          </table:table-cell>
          <table:table-cell table:style-name="ce199" table:formula="of:=IFERROR(VLOOKUP([$Masterlist.$P197];[$Datasheet.$B$1:.$AV$9809];6;FALSE());&quot;-&quot;)" office:value-type="float" office:value="1" calcext:value-type="float">
            <text:p>1</text:p>
          </table:table-cell>
          <table:table-cell table:style-name="ce152" table:formula="of:=IFERROR(VLOOKUP([$Masterlist.$P197];[$Datasheet.$B$1:.$AV$9809];7;FALSE());&quot;-&quot;)" office:value-type="float" office:value="1" calcext:value-type="float">
            <text:p>1</text:p>
          </table:table-cell>
          <table:table-cell table:style-name="ce152" table:formula="of:=IFERROR(VLOOKUP([$Masterlist.$P197];[$Datasheet.$B$1:.$AV$9809];8;FALSE());&quot;-&quot;)" office:value-type="float" office:value="1" calcext:value-type="float">
            <text:p>1</text:p>
          </table:table-cell>
          <table:table-cell table:style-name="ce152" table:formula="of:=IFERROR(VLOOKUP([$Masterlist.$P197];[$Datasheet.$B$1:.$AV$9809];9;FALSE());&quot;-&quot;)" office:value-type="float" office:value="1" calcext:value-type="float">
            <text:p>1</text:p>
          </table:table-cell>
          <table:table-cell table:style-name="ce152" table:formula="of:=IFERROR(VLOOKUP([$Masterlist.$P197];[$Datasheet.$B$1:.$AV$9809];10;FALSE());&quot;-&quot;)" office:value-type="float" office:value="0" calcext:value-type="float">
            <text:p>0</text:p>
          </table:table-cell>
          <table:table-cell table:style-name="ce223" table:formula="of:=IFERROR(VLOOKUP([$Masterlist.$P197];[$Datasheet.$B$1:.$AV$9809];11;FALSE());&quot;-&quot;)" office:value-type="float" office:value="0" calcext:value-type="float">
            <text:p>0</text:p>
          </table:table-cell>
          <table:table-cell table:style-name="ce223" table:formula="of:=IFERROR(VLOOKUP([$Masterlist.$P197];[$Datasheet.$B$1:.$AV$9809];12;FALSE());&quot;-&quot;)" office:value-type="float" office:value="1" calcext:value-type="float">
            <text:p>1</text:p>
          </table:table-cell>
          <table:table-cell table:style-name="ce223" table:formula="of:=IFERROR(VLOOKUP([$Masterlist.$P197];[$Datasheet.$B$1:.$AV$9809];13;FALSE());&quot;-&quot;)" office:value-type="float" office:value="1" calcext:value-type="float">
            <text:p>1</text:p>
          </table:table-cell>
          <table:table-cell table:style-name="ce223" table:formula="of:=IFERROR(VLOOKUP([$Masterlist.$P197];[$Datasheet.$B$1:.$AV$9809];14;FALSE());&quot;-&quot;)" office:value-type="float" office:value="1" calcext:value-type="float">
            <text:p>1</text:p>
          </table:table-cell>
          <table:table-cell table:style-name="ce223" table:formula="of:=IFERROR(VLOOKUP([$Masterlist.$P197];[$Datasheet.$B$1:.$AV$9809];15;FALSE());&quot;-&quot;)" office:value-type="float" office:value="1" calcext:value-type="float">
            <text:p>1</text:p>
          </table:table-cell>
          <table:table-cell table:style-name="ce223" table:formula="of:=IFERROR(VLOOKUP([$Masterlist.$P197];[$Datasheet.$B$1:.$AV$9809];16;FALSE());&quot;-&quot;)" office:value-type="float" office:value="0" calcext:value-type="float">
            <text:p/>
          </table:table-cell>
          <table:table-cell table:style-name="ce223" table:formula="of:=IFERROR(VLOOKUP([$Masterlist.$P197];[$Datasheet.$B$1:.$AV$9809];17;FALSE());&quot;-&quot;)" office:value-type="float" office:value="0" calcext:value-type="float">
            <text:p/>
          </table:table-cell>
          <table:table-cell table:style-name="ce223" table:formula="of:=IFERROR(VLOOKUP([$Masterlist.$P197];[$Datasheet.$B$1:.$AV$9809];18;FALSE());&quot;-&quot;)" office:value-type="float" office:value="0" calcext:value-type="float">
            <text:p/>
          </table:table-cell>
          <table:table-cell table:style-name="ce223" table:formula="of:=IFERROR(VLOOKUP([$Masterlist.$P197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office:value-type="string" calcext:value-type="string">
            <text:p>yes</text:p>
          </table:table-cell>
          <table:table-cell table:style-name="ce50" table:number-columns-repeated="11"/>
          <table:table-cell table:style-name="ce92" office:value-type="string" calcext:value-type="string">
            <text:p>Streamer</text:p>
          </table:table-cell>
          <table:table-cell table:style-name="ce8" office:value-type="string" calcext:value-type="string">
            <text:p>Stefan Smuts</text:p>
          </table:table-cell>
          <table:table-cell table:style-name="ce13" table:formula="of:=IF(ISNUMBER(MATCH([.P198];[$Datasheet.$B$1:.$B$9809];0));&quot;✓&quot;;&quot;x&quot;)" office:value-type="string" office:string-value="✓" calcext:value-type="string">
            <text:p>✓</text:p>
          </table:table-cell>
          <table:table-cell table:style-name="ce152" table:formula="of:=IFERROR(VLOOKUP([$Masterlist.$P198];[$Datasheet.$B$1:.$AV$9809];2;FALSE());&quot;-&quot;)" office:value-type="float" office:value="0" calcext:value-type="float">
            <text:p>0</text:p>
          </table:table-cell>
          <table:table-cell table:style-name="ce152" table:formula="of:=IFERROR(VLOOKUP([$Masterlist.$P198];[$Datasheet.$B$1:.$AV$9809];3;FALSE());&quot;-&quot;)" office:value-type="float" office:value="1" calcext:value-type="float">
            <text:p>1</text:p>
          </table:table-cell>
          <table:table-cell table:style-name="ce152" table:formula="of:=IFERROR(VLOOKUP([$Masterlist.$P198];[$Datasheet.$B$1:.$AV$9809];4;FALSE());&quot;-&quot;)" office:value-type="float" office:value="0" calcext:value-type="float">
            <text:p>0</text:p>
          </table:table-cell>
          <table:table-cell table:style-name="ce152" table:formula="of:=IFERROR(VLOOKUP([$Masterlist.$P198];[$Datasheet.$B$1:.$AV$9809];5;FALSE());&quot;-&quot;)" office:value-type="float" office:value="0" calcext:value-type="float">
            <text:p>0</text:p>
          </table:table-cell>
          <table:table-cell table:style-name="ce199" table:formula="of:=IFERROR(VLOOKUP([$Masterlist.$P198];[$Datasheet.$B$1:.$AV$9809];6;FALSE());&quot;-&quot;)" office:value-type="float" office:value="1" calcext:value-type="float">
            <text:p>1</text:p>
          </table:table-cell>
          <table:table-cell table:style-name="ce152" table:formula="of:=IFERROR(VLOOKUP([$Masterlist.$P198];[$Datasheet.$B$1:.$AV$9809];7;FALSE());&quot;-&quot;)" office:value-type="float" office:value="1" calcext:value-type="float">
            <text:p>1</text:p>
          </table:table-cell>
          <table:table-cell table:style-name="ce152" table:formula="of:=IFERROR(VLOOKUP([$Masterlist.$P198];[$Datasheet.$B$1:.$AV$9809];8;FALSE());&quot;-&quot;)" office:value-type="float" office:value="1" calcext:value-type="float">
            <text:p>1</text:p>
          </table:table-cell>
          <table:table-cell table:style-name="ce152" table:formula="of:=IFERROR(VLOOKUP([$Masterlist.$P198];[$Datasheet.$B$1:.$AV$9809];9;FALSE());&quot;-&quot;)" office:value-type="float" office:value="1" calcext:value-type="float">
            <text:p>1</text:p>
          </table:table-cell>
          <table:table-cell table:style-name="ce152" table:formula="of:=IFERROR(VLOOKUP([$Masterlist.$P198];[$Datasheet.$B$1:.$AV$9809];10;FALSE());&quot;-&quot;)" office:value-type="float" office:value="0" calcext:value-type="float">
            <text:p>0</text:p>
          </table:table-cell>
          <table:table-cell table:style-name="ce223" table:formula="of:=IFERROR(VLOOKUP([$Masterlist.$P198];[$Datasheet.$B$1:.$AV$9809];11;FALSE());&quot;-&quot;)" office:value-type="float" office:value="0" calcext:value-type="float">
            <text:p>0</text:p>
          </table:table-cell>
          <table:table-cell table:style-name="ce223" table:formula="of:=IFERROR(VLOOKUP([$Masterlist.$P198];[$Datasheet.$B$1:.$AV$9809];12;FALSE());&quot;-&quot;)" office:value-type="float" office:value="1" calcext:value-type="float">
            <text:p>1</text:p>
          </table:table-cell>
          <table:table-cell table:style-name="ce223" table:formula="of:=IFERROR(VLOOKUP([$Masterlist.$P198];[$Datasheet.$B$1:.$AV$9809];13;FALSE());&quot;-&quot;)" office:value-type="float" office:value="1" calcext:value-type="float">
            <text:p>1</text:p>
          </table:table-cell>
          <table:table-cell table:style-name="ce223" table:formula="of:=IFERROR(VLOOKUP([$Masterlist.$P198];[$Datasheet.$B$1:.$AV$9809];14;FALSE());&quot;-&quot;)" office:value-type="float" office:value="0" calcext:value-type="float">
            <text:p>0</text:p>
          </table:table-cell>
          <table:table-cell table:style-name="ce223" table:formula="of:=IFERROR(VLOOKUP([$Masterlist.$P198];[$Datasheet.$B$1:.$AV$9809];15;FALSE());&quot;-&quot;)" office:value-type="float" office:value="0" calcext:value-type="float">
            <text:p>0</text:p>
          </table:table-cell>
          <table:table-cell table:style-name="ce223" table:formula="of:=IFERROR(VLOOKUP([$Masterlist.$P198];[$Datasheet.$B$1:.$AV$9809];16;FALSE());&quot;-&quot;)" office:value-type="float" office:value="0" calcext:value-type="float">
            <text:p/>
          </table:table-cell>
          <table:table-cell table:style-name="ce223" table:formula="of:=IFERROR(VLOOKUP([$Masterlist.$P198];[$Datasheet.$B$1:.$AV$9809];17;FALSE());&quot;-&quot;)" office:value-type="float" office:value="0" calcext:value-type="float">
            <text:p/>
          </table:table-cell>
          <table:table-cell table:style-name="ce223" table:formula="of:=IFERROR(VLOOKUP([$Masterlist.$P198];[$Datasheet.$B$1:.$AV$9809];18;FALSE());&quot;-&quot;)" office:value-type="float" office:value="0" calcext:value-type="float">
            <text:p/>
          </table:table-cell>
          <table:table-cell table:style-name="ce223" table:formula="of:=IFERROR(VLOOKUP([$Masterlist.$P198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7">
          <table:table-cell table:style-name="ce15"/>
          <table:table-cell table:style-name="ce26" office:value-type="string" calcext:value-type="string">
            <text:p>AL</text:p>
          </table:table-cell>
          <table:table-cell table:style-name="ce50" office:value-type="string" calcext:value-type="string">
            <text:p>yes</text:p>
          </table:table-cell>
          <table:table-cell table:style-name="ce50" table:number-columns-repeated="11"/>
          <table:table-cell table:style-name="ce92" office:value-type="string" calcext:value-type="string">
            <text:p>Streamer</text:p>
          </table:table-cell>
          <table:table-cell table:style-name="ce8" office:value-type="string" calcext:value-type="string">
            <text:p>Marco Delport</text:p>
          </table:table-cell>
          <table:table-cell table:style-name="ce13" table:formula="of:=IF(ISNUMBER(MATCH([.P199];[$Datasheet.$B$1:.$B$9809];0));&quot;✓&quot;;&quot;x&quot;)" office:value-type="string" office:string-value="✓" calcext:value-type="string">
            <text:p>✓</text:p>
          </table:table-cell>
          <table:table-cell table:style-name="ce134" table:formula="of:=IFERROR(VLOOKUP([$Masterlist.$P199];[$Datasheet.$B$1:.$AV$9809];2;FALSE());&quot;-&quot;)" office:value-type="float" office:value="0" calcext:value-type="float">
            <text:p>0</text:p>
          </table:table-cell>
          <table:table-cell table:style-name="ce134" table:formula="of:=IFERROR(VLOOKUP([$Masterlist.$P199];[$Datasheet.$B$1:.$AV$9809];3;FALSE());&quot;-&quot;)" office:value-type="float" office:value="0" calcext:value-type="float">
            <text:p>0</text:p>
          </table:table-cell>
          <table:table-cell table:style-name="ce134" table:formula="of:=IFERROR(VLOOKUP([$Masterlist.$P199];[$Datasheet.$B$1:.$AV$9809];4;FALSE());&quot;-&quot;)" office:value-type="float" office:value="0" calcext:value-type="float">
            <text:p>0</text:p>
          </table:table-cell>
          <table:table-cell table:style-name="ce134" table:formula="of:=IFERROR(VLOOKUP([$Masterlist.$P199];[$Datasheet.$B$1:.$AV$9809];5;FALSE());&quot;-&quot;)" office:value-type="float" office:value="0" calcext:value-type="float">
            <text:p>0</text:p>
          </table:table-cell>
          <table:table-cell table:style-name="ce186" table:formula="of:=IFERROR(VLOOKUP([$Masterlist.$P199];[$Datasheet.$B$1:.$AV$9809];6;FALSE());&quot;-&quot;)" office:value-type="float" office:value="0" calcext:value-type="float">
            <text:p>0</text:p>
          </table:table-cell>
          <table:table-cell table:style-name="ce152" table:formula="of:=IFERROR(VLOOKUP([$Masterlist.$P199];[$Datasheet.$B$1:.$AV$9809];7;FALSE());&quot;-&quot;)" office:value-type="float" office:value="1" calcext:value-type="float">
            <text:p>1</text:p>
          </table:table-cell>
          <table:table-cell table:style-name="ce152" table:formula="of:=IFERROR(VLOOKUP([$Masterlist.$P199];[$Datasheet.$B$1:.$AV$9809];8;FALSE());&quot;-&quot;)" office:value-type="float" office:value="0" calcext:value-type="float">
            <text:p>0</text:p>
          </table:table-cell>
          <table:table-cell table:style-name="ce152" table:formula="of:=IFERROR(VLOOKUP([$Masterlist.$P199];[$Datasheet.$B$1:.$AV$9809];9;FALSE());&quot;-&quot;)" office:value-type="float" office:value="0" calcext:value-type="float">
            <text:p>0</text:p>
          </table:table-cell>
          <table:table-cell table:style-name="ce152" table:formula="of:=IFERROR(VLOOKUP([$Masterlist.$P199];[$Datasheet.$B$1:.$AV$9809];10;FALSE());&quot;-&quot;)" office:value-type="float" office:value="0" calcext:value-type="float">
            <text:p>0</text:p>
          </table:table-cell>
          <table:table-cell table:style-name="ce223" table:formula="of:=IFERROR(VLOOKUP([$Masterlist.$P199];[$Datasheet.$B$1:.$AV$9809];11;FALSE());&quot;-&quot;)" office:value-type="float" office:value="0" calcext:value-type="float">
            <text:p>0</text:p>
          </table:table-cell>
          <table:table-cell table:style-name="ce223" table:formula="of:=IFERROR(VLOOKUP([$Masterlist.$P199];[$Datasheet.$B$1:.$AV$9809];12;FALSE());&quot;-&quot;)" office:value-type="float" office:value="0" calcext:value-type="float">
            <text:p>0</text:p>
          </table:table-cell>
          <table:table-cell table:style-name="ce223" table:formula="of:=IFERROR(VLOOKUP([$Masterlist.$P199];[$Datasheet.$B$1:.$AV$9809];13;FALSE());&quot;-&quot;)" office:value-type="float" office:value="0" calcext:value-type="float">
            <text:p>0</text:p>
          </table:table-cell>
          <table:table-cell table:style-name="ce223" table:formula="of:=IFERROR(VLOOKUP([$Masterlist.$P199];[$Datasheet.$B$1:.$AV$9809];14;FALSE());&quot;-&quot;)" office:value-type="float" office:value="1" calcext:value-type="float">
            <text:p>1</text:p>
          </table:table-cell>
          <table:table-cell table:style-name="ce223" table:formula="of:=IFERROR(VLOOKUP([$Masterlist.$P199];[$Datasheet.$B$1:.$AV$9809];15;FALSE());&quot;-&quot;)" office:value-type="float" office:value="1" calcext:value-type="float">
            <text:p>1</text:p>
          </table:table-cell>
          <table:table-cell table:style-name="ce223" table:formula="of:=IFERROR(VLOOKUP([$Masterlist.$P199];[$Datasheet.$B$1:.$AV$9809];16;FALSE());&quot;-&quot;)" office:value-type="float" office:value="0" calcext:value-type="float">
            <text:p/>
          </table:table-cell>
          <table:table-cell table:style-name="ce223" table:formula="of:=IFERROR(VLOOKUP([$Masterlist.$P199];[$Datasheet.$B$1:.$AV$9809];17;FALSE());&quot;-&quot;)" office:value-type="float" office:value="0" calcext:value-type="float">
            <text:p/>
          </table:table-cell>
          <table:table-cell table:style-name="ce223" table:formula="of:=IFERROR(VLOOKUP([$Masterlist.$P199];[$Datasheet.$B$1:.$AV$9809];18;FALSE());&quot;-&quot;)" office:value-type="float" office:value="0" calcext:value-type="float">
            <text:p/>
          </table:table-cell>
          <table:table-cell table:style-name="ce223" table:formula="of:=IFERROR(VLOOKUP([$Masterlist.$P199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7">
          <table:table-cell table:style-name="ce15"/>
          <table:table-cell table:style-name="ce26" office:value-type="string" calcext:value-type="string">
            <text:p>L</text:p>
          </table:table-cell>
          <table:table-cell table:style-name="ce51" office:value-type="string" calcext:value-type="string">
            <text:p>yes</text:p>
          </table:table-cell>
          <table:table-cell table:style-name="ce51" table:number-columns-repeated="11"/>
          <table:table-cell table:style-name="ce93" office:value-type="string" calcext:value-type="string">
            <text:p>Streamer</text:p>
          </table:table-cell>
          <table:table-cell table:style-name="ce102" office:value-type="string" calcext:value-type="string">
            <text:p>Martin Leipoldt</text:p>
          </table:table-cell>
          <table:table-cell table:style-name="ce13" table:formula="of:=IF(ISNUMBER(MATCH([.P200];[$Datasheet.$B$1:.$B$9809];0));&quot;✓&quot;;&quot;x&quot;)" office:value-type="string" office:string-value="x" calcext:value-type="string">
            <text:p>x</text:p>
          </table:table-cell>
          <table:table-cell table:style-name="ce134" table:formula="of:=IFERROR(VLOOKUP([$Masterlist.$P200];[$Datasheet.$B$1:.$AV$9809];2;FALSE());&quot;-&quot;)" office:value-type="string" office:string-value="-" calcext:value-type="string">
            <text:p>-</text:p>
          </table:table-cell>
          <table:table-cell table:style-name="ce134" table:formula="of:=IFERROR(VLOOKUP([$Masterlist.$P200];[$Datasheet.$B$1:.$AV$9809];3;FALSE());&quot;-&quot;)" office:value-type="string" office:string-value="-" calcext:value-type="string">
            <text:p>-</text:p>
          </table:table-cell>
          <table:table-cell table:style-name="ce134" table:formula="of:=IFERROR(VLOOKUP([$Masterlist.$P200];[$Datasheet.$B$1:.$AV$9809];4;FALSE());&quot;-&quot;)" office:value-type="string" office:string-value="-" calcext:value-type="string">
            <text:p>-</text:p>
          </table:table-cell>
          <table:table-cell table:style-name="ce134" table:formula="of:=IFERROR(VLOOKUP([$Masterlist.$P200];[$Datasheet.$B$1:.$AV$9809];5;FALSE());&quot;-&quot;)" office:value-type="string" office:string-value="-" calcext:value-type="string">
            <text:p>-</text:p>
          </table:table-cell>
          <table:table-cell table:style-name="ce186" table:formula="of:=IFERROR(VLOOKUP([$Masterlist.$P200];[$Datasheet.$B$1:.$AV$9809];6;FALSE());&quot;-&quot;)" office:value-type="string" office:string-value="-" calcext:value-type="string">
            <text:p>-</text:p>
          </table:table-cell>
          <table:table-cell table:style-name="ce152" table:formula="of:=IFERROR(VLOOKUP([$Masterlist.$P200];[$Datasheet.$B$1:.$AV$9809];7;FALSE());&quot;-&quot;)" office:value-type="string" office:string-value="-" calcext:value-type="string">
            <text:p>-</text:p>
          </table:table-cell>
          <table:table-cell table:style-name="ce152" table:formula="of:=IFERROR(VLOOKUP([$Masterlist.$P200];[$Datasheet.$B$1:.$AV$9809];8;FALSE());&quot;-&quot;)" office:value-type="string" office:string-value="-" calcext:value-type="string">
            <text:p>-</text:p>
          </table:table-cell>
          <table:table-cell table:style-name="ce152" table:formula="of:=IFERROR(VLOOKUP([$Masterlist.$P200];[$Datasheet.$B$1:.$AV$9809];9;FALSE());&quot;-&quot;)" office:value-type="string" office:string-value="-" calcext:value-type="string">
            <text:p>-</text:p>
          </table:table-cell>
          <table:table-cell table:style-name="ce152" table:formula="of:=IFERROR(VLOOKUP([$Masterlist.$P200];[$Datasheet.$B$1:.$AV$9809];10;FALSE());&quot;-&quot;)" office:value-type="string" office:string-value="-" calcext:value-type="string">
            <text:p>-</text:p>
          </table:table-cell>
          <table:table-cell table:style-name="ce223" table:formula="of:=IFERROR(VLOOKUP([$Masterlist.$P200];[$Datasheet.$B$1:.$AV$9809];11;FALSE());&quot;-&quot;)" office:value-type="string" office:string-value="-" calcext:value-type="string">
            <text:p>-</text:p>
          </table:table-cell>
          <table:table-cell table:style-name="ce223" table:formula="of:=IFERROR(VLOOKUP([$Masterlist.$P200];[$Datasheet.$B$1:.$AV$9809];12;FALSE());&quot;-&quot;)" office:value-type="string" office:string-value="-" calcext:value-type="string">
            <text:p>-</text:p>
          </table:table-cell>
          <table:table-cell table:style-name="ce223" table:formula="of:=IFERROR(VLOOKUP([$Masterlist.$P200];[$Datasheet.$B$1:.$AV$9809];13;FALSE());&quot;-&quot;)" office:value-type="string" office:string-value="-" calcext:value-type="string">
            <text:p>-</text:p>
          </table:table-cell>
          <table:table-cell table:style-name="ce223" table:formula="of:=IFERROR(VLOOKUP([$Masterlist.$P200];[$Datasheet.$B$1:.$AV$9809];14;FALSE());&quot;-&quot;)" office:value-type="string" office:string-value="-" calcext:value-type="string">
            <text:p>-</text:p>
          </table:table-cell>
          <table:table-cell table:style-name="ce223" table:formula="of:=IFERROR(VLOOKUP([$Masterlist.$P200];[$Datasheet.$B$1:.$AV$9809];15;FALSE());&quot;-&quot;)" office:value-type="string" office:string-value="-" calcext:value-type="string">
            <text:p>-</text:p>
          </table:table-cell>
          <table:table-cell table:style-name="ce223" table:formula="of:=IFERROR(VLOOKUP([$Masterlist.$P200];[$Datasheet.$B$1:.$AV$9809];16;FALSE());&quot;-&quot;)" office:value-type="string" office:string-value="-" calcext:value-type="string">
            <text:p>-</text:p>
          </table:table-cell>
          <table:table-cell table:style-name="ce223" table:formula="of:=IFERROR(VLOOKUP([$Masterlist.$P200];[$Datasheet.$B$1:.$AV$9809];17;FALSE());&quot;-&quot;)" office:value-type="string" office:string-value="-" calcext:value-type="string">
            <text:p>-</text:p>
          </table:table-cell>
          <table:table-cell table:style-name="ce223" table:formula="of:=IFERROR(VLOOKUP([$Masterlist.$P200];[$Datasheet.$B$1:.$AV$9809];18;FALSE());&quot;-&quot;)" office:value-type="string" office:string-value="-" calcext:value-type="string">
            <text:p>-</text:p>
          </table:table-cell>
          <table:table-cell table:style-name="ce223" table:formula="of:=IFERROR(VLOOKUP([$Masterlist.$P200];[$Datasheet.$B$1:.$AV$9809];19;FALSE());&quot;-&quot;)" office:value-type="string" office:string-value="-" calcext:value-type="string">
            <text:p>-</text:p>
          </table:table-cell>
          <table:table-cell table:style-name="ce15" table:number-columns-repeated="2"/>
          <table:table-cell table:number-columns-repeated="16347"/>
        </table:table-row>
        <table:table-row table:style-name="ro7">
          <table:table-cell table:style-name="ce15"/>
          <table:table-cell table:style-name="ce27" office:value-type="string" calcext:value-type="string">
            <text:p>L</text:p>
          </table:table-cell>
          <table:table-cell table:style-name="ce51" office:value-type="string" calcext:value-type="string">
            <text:p>yes</text:p>
          </table:table-cell>
          <table:table-cell table:style-name="ce51" table:number-columns-repeated="11"/>
          <table:table-cell table:style-name="ce93" office:value-type="string" calcext:value-type="string">
            <text:p>Streamer</text:p>
          </table:table-cell>
          <table:table-cell table:style-name="ce102" office:value-type="string" calcext:value-type="string">
            <text:p>Renier Gerber</text:p>
          </table:table-cell>
          <table:table-cell table:style-name="ce116" table:formula="of:=IF(ISNUMBER(MATCH([.P201];[$Datasheet.$B$1:.$B$9809];0));&quot;✓&quot;;&quot;x&quot;)" office:value-type="string" office:string-value="✓" calcext:value-type="string">
            <text:p>✓</text:p>
          </table:table-cell>
          <table:table-cell table:style-name="ce153" table:formula="of:=IFERROR(VLOOKUP([$Masterlist.$P201];[$Datasheet.$B$1:.$AV$9809];2;FALSE());&quot;-&quot;)" office:value-type="float" office:value="1" calcext:value-type="float">
            <text:p>1</text:p>
          </table:table-cell>
          <table:table-cell table:style-name="ce153" table:formula="of:=IFERROR(VLOOKUP([$Masterlist.$P201];[$Datasheet.$B$1:.$AV$9809];3;FALSE());&quot;-&quot;)" office:value-type="float" office:value="1" calcext:value-type="float">
            <text:p>1</text:p>
          </table:table-cell>
          <table:table-cell table:style-name="ce153" table:formula="of:=IFERROR(VLOOKUP([$Masterlist.$P201];[$Datasheet.$B$1:.$AV$9809];4;FALSE());&quot;-&quot;)" office:value-type="float" office:value="0" calcext:value-type="float">
            <text:p>0</text:p>
          </table:table-cell>
          <table:table-cell table:style-name="ce153" table:formula="of:=IFERROR(VLOOKUP([$Masterlist.$P201];[$Datasheet.$B$1:.$AV$9809];5;FALSE());&quot;-&quot;)" office:value-type="float" office:value="0" calcext:value-type="float">
            <text:p>0</text:p>
          </table:table-cell>
          <table:table-cell table:style-name="ce200" table:formula="of:=IFERROR(VLOOKUP([$Masterlist.$P201];[$Datasheet.$B$1:.$AV$9809];6;FALSE());&quot;-&quot;)" office:value-type="float" office:value="1" calcext:value-type="float">
            <text:p>1</text:p>
          </table:table-cell>
          <table:table-cell table:style-name="ce214" table:formula="of:=IFERROR(VLOOKUP([$Masterlist.$P201];[$Datasheet.$B$1:.$AV$9809];7;FALSE());&quot;-&quot;)" office:value-type="float" office:value="1" calcext:value-type="float">
            <text:p>1</text:p>
          </table:table-cell>
          <table:table-cell table:style-name="ce214" table:formula="of:=IFERROR(VLOOKUP([$Masterlist.$P201];[$Datasheet.$B$1:.$AV$9809];8;FALSE());&quot;-&quot;)" office:value-type="float" office:value="0" calcext:value-type="float">
            <text:p>0</text:p>
          </table:table-cell>
          <table:table-cell table:style-name="ce214" table:formula="of:=IFERROR(VLOOKUP([$Masterlist.$P201];[$Datasheet.$B$1:.$AV$9809];9;FALSE());&quot;-&quot;)" office:value-type="float" office:value="0" calcext:value-type="float">
            <text:p>0</text:p>
          </table:table-cell>
          <table:table-cell table:style-name="ce214" table:formula="of:=IFERROR(VLOOKUP([$Masterlist.$P201];[$Datasheet.$B$1:.$AV$9809];10;FALSE());&quot;-&quot;)" office:value-type="float" office:value="1" calcext:value-type="float">
            <text:p>1</text:p>
          </table:table-cell>
          <table:table-cell table:style-name="ce224" table:formula="of:=IFERROR(VLOOKUP([$Masterlist.$P201];[$Datasheet.$B$1:.$AV$9809];11;FALSE());&quot;-&quot;)" office:value-type="float" office:value="1" calcext:value-type="float">
            <text:p>1</text:p>
          </table:table-cell>
          <table:table-cell table:style-name="ce224" table:formula="of:=IFERROR(VLOOKUP([$Masterlist.$P201];[$Datasheet.$B$1:.$AV$9809];12;FALSE());&quot;-&quot;)" office:value-type="float" office:value="0" calcext:value-type="float">
            <text:p>0</text:p>
          </table:table-cell>
          <table:table-cell table:style-name="ce224" table:formula="of:=IFERROR(VLOOKUP([$Masterlist.$P201];[$Datasheet.$B$1:.$AV$9809];13;FALSE());&quot;-&quot;)" office:value-type="float" office:value="0" calcext:value-type="float">
            <text:p>0</text:p>
          </table:table-cell>
          <table:table-cell table:style-name="ce224" table:formula="of:=IFERROR(VLOOKUP([$Masterlist.$P201];[$Datasheet.$B$1:.$AV$9809];14;FALSE());&quot;-&quot;)" office:value-type="float" office:value="0" calcext:value-type="float">
            <text:p>0</text:p>
          </table:table-cell>
          <table:table-cell table:style-name="ce224" table:formula="of:=IFERROR(VLOOKUP([$Masterlist.$P201];[$Datasheet.$B$1:.$AV$9809];15;FALSE());&quot;-&quot;)" office:value-type="float" office:value="0" calcext:value-type="float">
            <text:p>0</text:p>
          </table:table-cell>
          <table:table-cell table:style-name="ce224" table:formula="of:=IFERROR(VLOOKUP([$Masterlist.$P201];[$Datasheet.$B$1:.$AV$9809];16;FALSE());&quot;-&quot;)" office:value-type="float" office:value="0" calcext:value-type="float">
            <text:p/>
          </table:table-cell>
          <table:table-cell table:style-name="ce224" table:formula="of:=IFERROR(VLOOKUP([$Masterlist.$P201];[$Datasheet.$B$1:.$AV$9809];17;FALSE());&quot;-&quot;)" office:value-type="float" office:value="0" calcext:value-type="float">
            <text:p/>
          </table:table-cell>
          <table:table-cell table:style-name="ce224" table:formula="of:=IFERROR(VLOOKUP([$Masterlist.$P201];[$Datasheet.$B$1:.$AV$9809];18;FALSE());&quot;-&quot;)" office:value-type="float" office:value="0" calcext:value-type="float">
            <text:p/>
          </table:table-cell>
          <table:table-cell table:style-name="ce224" table:formula="of:=IFERROR(VLOOKUP([$Masterlist.$P201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40" office:value-type="string" calcext:value-type="string" table:number-columns-spanned="15" table:number-rows-spanned="1">
            <text:p>SWITCHERS - BERTUS JANSE VAN RENSBURG</text:p>
          </table:table-cell>
          <table:covered-table-cell table:number-columns-repeated="13" table:style-name="ce45"/>
          <table:covered-table-cell table:style-name="ce99"/>
          <table:table-cell table:style-name="ce125"/>
          <table:table-cell table:style-name="ce154" office:value-type="string" calcext:value-type="string" table:number-columns-spanned="18" table:number-rows-spanned="1">
            <text:p>SWITCHERS - BERTUS JANSE VAN RENSBURG</text:p>
          </table:table-cell>
          <table:covered-table-cell table:number-columns-repeated="16" table:style-name="ce45"/>
          <table:covered-table-cell table:style-name="ce99"/>
          <table:table-cell table:style-name="ce18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5" office:value-type="string" calcext:value-type="string">
            <text:p>AL</text:p>
          </table:table-cell>
          <table:table-cell table:number-columns-repeated="3" table:style-name="ce49" office:value-type="string" calcext:value-type="string">
            <text:p>yes</text:p>
          </table:table-cell>
          <table:table-cell table:style-name="ce49" table:number-columns-repeated="9"/>
          <table:table-cell table:style-name="ce91" office:value-type="string" calcext:value-type="string">
            <text:p>Switcher / Broadcast Switcher</text:p>
          </table:table-cell>
          <table:table-cell table:style-name="ce100" office:value-type="string" calcext:value-type="string">
            <office:annotation draw:style-name="gr5" draw:text-style-name="P1" svg:width="8.388cm" svg:height="1.851cm" svg:x="37.038cm" svg:y="105.199cm" draw:caption-point-x="-0.407cm" draw:caption-point-y="-0.758cm">
              <dc:creator>Unknown Author</dc:creator>
              <dc:date>2026-05-18T20:20:00</dc:date>
              <text:p>Dané Robertse:</text:p>
              <text:p>Prayer only once a month. Sundays are fine. </text:p>
              <text:p>Alternate Homerun and uSchool</text:p>
            </office:annotation>
            <text:p>Werner Vermeulen</text:p>
          </table:table-cell>
          <table:table-cell table:style-name="ce13" table:formula="of:=IF(ISNUMBER(MATCH([.P203];[$Datasheet.$B$1:.$B$9809];0));&quot;✓&quot;;&quot;x&quot;)" office:value-type="string" office:string-value="✓" calcext:value-type="string">
            <text:p>✓</text:p>
          </table:table-cell>
          <table:table-cell table:style-name="ce155" table:formula="of:=IFERROR(VLOOKUP([$Masterlist.$P203];[$Datasheet.$B$1:.$AV$9809];2;FALSE());&quot;-&quot;)" office:value-type="float" office:value="1" calcext:value-type="float">
            <text:p>1</text:p>
          </table:table-cell>
          <table:table-cell table:style-name="ce155" table:formula="of:=IFERROR(VLOOKUP([$Masterlist.$P203];[$Datasheet.$B$1:.$AV$9809];3;FALSE());&quot;-&quot;)" office:value-type="float" office:value="1" calcext:value-type="float">
            <text:p>1</text:p>
          </table:table-cell>
          <table:table-cell table:style-name="ce155" table:formula="of:=IFERROR(VLOOKUP([$Masterlist.$P203];[$Datasheet.$B$1:.$AV$9809];4;FALSE());&quot;-&quot;)" office:value-type="float" office:value="1" calcext:value-type="float">
            <text:p>1</text:p>
          </table:table-cell>
          <table:table-cell table:style-name="ce155" table:formula="of:=IFERROR(VLOOKUP([$Masterlist.$P203];[$Datasheet.$B$1:.$AV$9809];5;FALSE());&quot;-&quot;)" office:value-type="float" office:value="1" calcext:value-type="float">
            <text:p>1</text:p>
          </table:table-cell>
          <table:table-cell table:style-name="ce201" table:formula="of:=IFERROR(VLOOKUP([$Masterlist.$P203];[$Datasheet.$B$1:.$AV$9809];6;FALSE());&quot;-&quot;)" office:value-type="float" office:value="1" calcext:value-type="float">
            <text:p>1</text:p>
          </table:table-cell>
          <table:table-cell table:style-name="ce155" table:formula="of:=IFERROR(VLOOKUP([$Masterlist.$P203];[$Datasheet.$B$1:.$AV$9809];7;FALSE());&quot;-&quot;)" office:value-type="float" office:value="1" calcext:value-type="float">
            <text:p>1</text:p>
          </table:table-cell>
          <table:table-cell table:style-name="ce155" table:formula="of:=IFERROR(VLOOKUP([$Masterlist.$P203];[$Datasheet.$B$1:.$AV$9809];8;FALSE());&quot;-&quot;)" office:value-type="float" office:value="1" calcext:value-type="float">
            <text:p>1</text:p>
          </table:table-cell>
          <table:table-cell table:style-name="ce155" table:formula="of:=IFERROR(VLOOKUP([$Masterlist.$P203];[$Datasheet.$B$1:.$AV$9809];9;FALSE());&quot;-&quot;)" office:value-type="float" office:value="1" calcext:value-type="float">
            <text:p>1</text:p>
          </table:table-cell>
          <table:table-cell table:style-name="ce155" table:formula="of:=IFERROR(VLOOKUP([$Masterlist.$P203];[$Datasheet.$B$1:.$AV$9809];10;FALSE());&quot;-&quot;)" office:value-type="float" office:value="1" calcext:value-type="float">
            <text:p>1</text:p>
          </table:table-cell>
          <table:table-cell table:style-name="ce155" table:formula="of:=IFERROR(VLOOKUP([$Masterlist.$P203];[$Datasheet.$B$1:.$AV$9809];11;FALSE());&quot;-&quot;)" office:value-type="float" office:value="1" calcext:value-type="float">
            <text:p>1</text:p>
          </table:table-cell>
          <table:table-cell table:style-name="ce155" table:formula="of:=IFERROR(VLOOKUP([$Masterlist.$P203];[$Datasheet.$B$1:.$AV$9809];12;FALSE());&quot;-&quot;)" office:value-type="float" office:value="1" calcext:value-type="float">
            <text:p>1</text:p>
          </table:table-cell>
          <table:table-cell table:style-name="ce155" table:formula="of:=IFERROR(VLOOKUP([$Masterlist.$P203];[$Datasheet.$B$1:.$AV$9809];13;FALSE());&quot;-&quot;)" office:value-type="float" office:value="1" calcext:value-type="float">
            <text:p>1</text:p>
          </table:table-cell>
          <table:table-cell table:style-name="ce155" table:formula="of:=IFERROR(VLOOKUP([$Masterlist.$P203];[$Datasheet.$B$1:.$AV$9809];14;FALSE());&quot;-&quot;)" office:value-type="float" office:value="0" calcext:value-type="float">
            <text:p>0</text:p>
          </table:table-cell>
          <table:table-cell table:style-name="ce155" table:formula="of:=IFERROR(VLOOKUP([$Masterlist.$P203];[$Datasheet.$B$1:.$AV$9809];15;FALSE());&quot;-&quot;)" office:value-type="float" office:value="0" calcext:value-type="float">
            <text:p>0</text:p>
          </table:table-cell>
          <table:table-cell table:style-name="ce155" table:formula="of:=IFERROR(VLOOKUP([$Masterlist.$P203];[$Datasheet.$B$1:.$AV$9809];16;FALSE());&quot;-&quot;)" office:value-type="float" office:value="0" calcext:value-type="float">
            <text:p/>
          </table:table-cell>
          <table:table-cell table:style-name="ce155" table:formula="of:=IFERROR(VLOOKUP([$Masterlist.$P203];[$Datasheet.$B$1:.$AV$9809];17;FALSE());&quot;-&quot;)" office:value-type="float" office:value="0" calcext:value-type="float">
            <text:p/>
          </table:table-cell>
          <table:table-cell table:style-name="ce237" table:formula="of:=IFERROR(VLOOKUP([$Masterlist.$P203];[$Datasheet.$B$1:.$AV$9809];18;FALSE());&quot;-&quot;)" office:value-type="float" office:value="0" calcext:value-type="float">
            <text:p/>
          </table:table-cell>
          <table:table-cell table:style-name="ce155" table:formula="of:=IFERROR(VLOOKUP([$Masterlist.$P203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AL</text:p>
          </table:table-cell>
          <table:table-cell table:number-columns-repeated="3" table:style-name="ce50" office:value-type="string" calcext:value-type="string">
            <text:p>yes</text:p>
          </table:table-cell>
          <table:table-cell table:style-name="ce50" table:number-columns-repeated="9"/>
          <table:table-cell table:style-name="ce92" office:value-type="string" calcext:value-type="string">
            <text:p>Switcher / Broadcast Switcher</text:p>
          </table:table-cell>
          <table:table-cell table:style-name="ce8" office:value-type="string" calcext:value-type="string">
            <text:p>Bertus Janse van Rensburg</text:p>
          </table:table-cell>
          <table:table-cell table:style-name="ce13" table:formula="of:=IF(ISNUMBER(MATCH([.P204];[$Datasheet.$B$1:.$B$9809];0));&quot;✓&quot;;&quot;x&quot;)" office:value-type="string" office:string-value="✓" calcext:value-type="string">
            <text:p>✓</text:p>
          </table:table-cell>
          <table:table-cell table:style-name="ce155" table:formula="of:=IFERROR(VLOOKUP([$Masterlist.$P204];[$Datasheet.$B$1:.$AV$9809];2;FALSE());&quot;-&quot;)" office:value-type="float" office:value="0" calcext:value-type="float">
            <text:p>0</text:p>
          </table:table-cell>
          <table:table-cell table:style-name="ce155" table:formula="of:=IFERROR(VLOOKUP([$Masterlist.$P204];[$Datasheet.$B$1:.$AV$9809];3;FALSE());&quot;-&quot;)" office:value-type="float" office:value="0" calcext:value-type="float">
            <text:p>0</text:p>
          </table:table-cell>
          <table:table-cell table:style-name="ce155" table:formula="of:=IFERROR(VLOOKUP([$Masterlist.$P204];[$Datasheet.$B$1:.$AV$9809];4;FALSE());&quot;-&quot;)" office:value-type="float" office:value="0" calcext:value-type="float">
            <text:p>0</text:p>
          </table:table-cell>
          <table:table-cell table:style-name="ce155" table:formula="of:=IFERROR(VLOOKUP([$Masterlist.$P204];[$Datasheet.$B$1:.$AV$9809];5;FALSE());&quot;-&quot;)" office:value-type="float" office:value="1" calcext:value-type="float">
            <text:p>1</text:p>
          </table:table-cell>
          <table:table-cell table:style-name="ce201" table:formula="of:=IFERROR(VLOOKUP([$Masterlist.$P204];[$Datasheet.$B$1:.$AV$9809];6;FALSE());&quot;-&quot;)" office:value-type="float" office:value="0" calcext:value-type="float">
            <text:p>0</text:p>
          </table:table-cell>
          <table:table-cell table:style-name="ce155" table:formula="of:=IFERROR(VLOOKUP([$Masterlist.$P204];[$Datasheet.$B$1:.$AV$9809];7;FALSE());&quot;-&quot;)" office:value-type="float" office:value="0" calcext:value-type="float">
            <text:p>0</text:p>
          </table:table-cell>
          <table:table-cell table:style-name="ce155" table:formula="of:=IFERROR(VLOOKUP([$Masterlist.$P204];[$Datasheet.$B$1:.$AV$9809];8;FALSE());&quot;-&quot;)" office:value-type="float" office:value="1" calcext:value-type="float">
            <text:p>1</text:p>
          </table:table-cell>
          <table:table-cell table:style-name="ce155" table:formula="of:=IFERROR(VLOOKUP([$Masterlist.$P204];[$Datasheet.$B$1:.$AV$9809];9;FALSE());&quot;-&quot;)" office:value-type="float" office:value="1" calcext:value-type="float">
            <text:p>1</text:p>
          </table:table-cell>
          <table:table-cell table:style-name="ce155" table:formula="of:=IFERROR(VLOOKUP([$Masterlist.$P204];[$Datasheet.$B$1:.$AV$9809];10;FALSE());&quot;-&quot;)" office:value-type="float" office:value="0" calcext:value-type="float">
            <text:p>0</text:p>
          </table:table-cell>
          <table:table-cell table:style-name="ce155" table:formula="of:=IFERROR(VLOOKUP([$Masterlist.$P204];[$Datasheet.$B$1:.$AV$9809];11;FALSE());&quot;-&quot;)" office:value-type="float" office:value="1" calcext:value-type="float">
            <text:p>1</text:p>
          </table:table-cell>
          <table:table-cell table:style-name="ce155" table:formula="of:=IFERROR(VLOOKUP([$Masterlist.$P204];[$Datasheet.$B$1:.$AV$9809];12;FALSE());&quot;-&quot;)" office:value-type="float" office:value="1" calcext:value-type="float">
            <text:p>1</text:p>
          </table:table-cell>
          <table:table-cell table:style-name="ce155" table:formula="of:=IFERROR(VLOOKUP([$Masterlist.$P204];[$Datasheet.$B$1:.$AV$9809];13;FALSE());&quot;-&quot;)" office:value-type="float" office:value="0" calcext:value-type="float">
            <text:p>0</text:p>
          </table:table-cell>
          <table:table-cell table:style-name="ce155" table:formula="of:=IFERROR(VLOOKUP([$Masterlist.$P204];[$Datasheet.$B$1:.$AV$9809];14;FALSE());&quot;-&quot;)" office:value-type="float" office:value="0" calcext:value-type="float">
            <text:p>0</text:p>
          </table:table-cell>
          <table:table-cell table:style-name="ce155" table:formula="of:=IFERROR(VLOOKUP([$Masterlist.$P204];[$Datasheet.$B$1:.$AV$9809];15;FALSE());&quot;-&quot;)" office:value-type="float" office:value="1" calcext:value-type="float">
            <text:p>1</text:p>
          </table:table-cell>
          <table:table-cell table:style-name="ce155" table:formula="of:=IFERROR(VLOOKUP([$Masterlist.$P204];[$Datasheet.$B$1:.$AV$9809];16;FALSE());&quot;-&quot;)" office:value-type="float" office:value="0" calcext:value-type="float">
            <text:p/>
          </table:table-cell>
          <table:table-cell table:style-name="ce155" table:formula="of:=IFERROR(VLOOKUP([$Masterlist.$P204];[$Datasheet.$B$1:.$AV$9809];17;FALSE());&quot;-&quot;)" office:value-type="float" office:value="0" calcext:value-type="float">
            <text:p/>
          </table:table-cell>
          <table:table-cell table:style-name="ce237" table:formula="of:=IFERROR(VLOOKUP([$Masterlist.$P204];[$Datasheet.$B$1:.$AV$9809];18;FALSE());&quot;-&quot;)" office:value-type="float" office:value="0" calcext:value-type="float">
            <text:p/>
          </table:table-cell>
          <table:table-cell table:style-name="ce156" table:formula="of:=IFERROR(VLOOKUP([$Masterlist.$P204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M</text:p>
          </table:table-cell>
          <table:table-cell table:number-columns-repeated="3" table:style-name="ce50" office:value-type="string" calcext:value-type="string">
            <text:p>yes</text:p>
          </table:table-cell>
          <table:table-cell table:style-name="ce50" table:number-columns-repeated="9"/>
          <table:table-cell table:style-name="ce92" office:value-type="string" calcext:value-type="string">
            <text:p>Switcher (Training) / Broadcast Switcher</text:p>
          </table:table-cell>
          <table:table-cell table:style-name="ce8" office:value-type="string" calcext:value-type="string">
            <text:p>Solett Smuts</text:p>
          </table:table-cell>
          <table:table-cell table:style-name="ce13" table:formula="of:=IF(ISNUMBER(MATCH([.P205];[$Datasheet.$B$1:.$B$9809];0));&quot;✓&quot;;&quot;x&quot;)" office:value-type="string" office:string-value="✓" calcext:value-type="string">
            <text:p>✓</text:p>
          </table:table-cell>
          <table:table-cell table:style-name="ce155" table:formula="of:=IFERROR(VLOOKUP([$Masterlist.$P205];[$Datasheet.$B$1:.$AV$9809];2;FALSE());&quot;-&quot;)" office:value-type="float" office:value="0" calcext:value-type="float">
            <text:p>0</text:p>
          </table:table-cell>
          <table:table-cell table:style-name="ce155" table:formula="of:=IFERROR(VLOOKUP([$Masterlist.$P205];[$Datasheet.$B$1:.$AV$9809];3;FALSE());&quot;-&quot;)" office:value-type="float" office:value="1" calcext:value-type="float">
            <text:p>1</text:p>
          </table:table-cell>
          <table:table-cell table:style-name="ce155" table:formula="of:=IFERROR(VLOOKUP([$Masterlist.$P205];[$Datasheet.$B$1:.$AV$9809];4;FALSE());&quot;-&quot;)" office:value-type="float" office:value="0" calcext:value-type="float">
            <text:p>0</text:p>
          </table:table-cell>
          <table:table-cell table:style-name="ce155" table:formula="of:=IFERROR(VLOOKUP([$Masterlist.$P205];[$Datasheet.$B$1:.$AV$9809];5;FALSE());&quot;-&quot;)" office:value-type="float" office:value="0" calcext:value-type="float">
            <text:p>0</text:p>
          </table:table-cell>
          <table:table-cell table:style-name="ce201" table:formula="of:=IFERROR(VLOOKUP([$Masterlist.$P205];[$Datasheet.$B$1:.$AV$9809];6;FALSE());&quot;-&quot;)" office:value-type="float" office:value="1" calcext:value-type="float">
            <text:p>1</text:p>
          </table:table-cell>
          <table:table-cell table:style-name="ce155" table:formula="of:=IFERROR(VLOOKUP([$Masterlist.$P205];[$Datasheet.$B$1:.$AV$9809];7;FALSE());&quot;-&quot;)" office:value-type="float" office:value="1" calcext:value-type="float">
            <text:p>1</text:p>
          </table:table-cell>
          <table:table-cell table:style-name="ce155" table:formula="of:=IFERROR(VLOOKUP([$Masterlist.$P205];[$Datasheet.$B$1:.$AV$9809];8;FALSE());&quot;-&quot;)" office:value-type="float" office:value="1" calcext:value-type="float">
            <text:p>1</text:p>
          </table:table-cell>
          <table:table-cell table:style-name="ce155" table:formula="of:=IFERROR(VLOOKUP([$Masterlist.$P205];[$Datasheet.$B$1:.$AV$9809];9;FALSE());&quot;-&quot;)" office:value-type="float" office:value="1" calcext:value-type="float">
            <text:p>1</text:p>
          </table:table-cell>
          <table:table-cell table:style-name="ce155" table:formula="of:=IFERROR(VLOOKUP([$Masterlist.$P205];[$Datasheet.$B$1:.$AV$9809];10;FALSE());&quot;-&quot;)" office:value-type="float" office:value="0" calcext:value-type="float">
            <text:p>0</text:p>
          </table:table-cell>
          <table:table-cell table:style-name="ce155" table:formula="of:=IFERROR(VLOOKUP([$Masterlist.$P205];[$Datasheet.$B$1:.$AV$9809];11;FALSE());&quot;-&quot;)" office:value-type="float" office:value="0" calcext:value-type="float">
            <text:p>0</text:p>
          </table:table-cell>
          <table:table-cell table:style-name="ce155" table:formula="of:=IFERROR(VLOOKUP([$Masterlist.$P205];[$Datasheet.$B$1:.$AV$9809];12;FALSE());&quot;-&quot;)" office:value-type="float" office:value="1" calcext:value-type="float">
            <text:p>1</text:p>
          </table:table-cell>
          <table:table-cell table:style-name="ce155" table:formula="of:=IFERROR(VLOOKUP([$Masterlist.$P205];[$Datasheet.$B$1:.$AV$9809];13;FALSE());&quot;-&quot;)" office:value-type="float" office:value="1" calcext:value-type="float">
            <text:p>1</text:p>
          </table:table-cell>
          <table:table-cell table:style-name="ce155" table:formula="of:=IFERROR(VLOOKUP([$Masterlist.$P205];[$Datasheet.$B$1:.$AV$9809];14;FALSE());&quot;-&quot;)" office:value-type="float" office:value="0" calcext:value-type="float">
            <text:p>0</text:p>
          </table:table-cell>
          <table:table-cell table:style-name="ce155" table:formula="of:=IFERROR(VLOOKUP([$Masterlist.$P205];[$Datasheet.$B$1:.$AV$9809];15;FALSE());&quot;-&quot;)" office:value-type="float" office:value="0" calcext:value-type="float">
            <text:p>0</text:p>
          </table:table-cell>
          <table:table-cell table:style-name="ce155" table:formula="of:=IFERROR(VLOOKUP([$Masterlist.$P205];[$Datasheet.$B$1:.$AV$9809];16;FALSE());&quot;-&quot;)" office:value-type="float" office:value="0" calcext:value-type="float">
            <text:p/>
          </table:table-cell>
          <table:table-cell table:style-name="ce155" table:formula="of:=IFERROR(VLOOKUP([$Masterlist.$P205];[$Datasheet.$B$1:.$AV$9809];17;FALSE());&quot;-&quot;)" office:value-type="float" office:value="0" calcext:value-type="float">
            <text:p/>
          </table:table-cell>
          <table:table-cell table:style-name="ce237" table:formula="of:=IFERROR(VLOOKUP([$Masterlist.$P205];[$Datasheet.$B$1:.$AV$9809];18;FALSE());&quot;-&quot;)" office:value-type="float" office:value="0" calcext:value-type="float">
            <text:p/>
          </table:table-cell>
          <table:table-cell table:style-name="ce156" table:formula="of:=IFERROR(VLOOKUP([$Masterlist.$P205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number-columns-repeated="3" table:style-name="ce50" office:value-type="string" calcext:value-type="string">
            <text:p>yes</text:p>
          </table:table-cell>
          <table:table-cell table:style-name="ce50" table:number-columns-repeated="9"/>
          <table:table-cell table:style-name="ce92" office:value-type="string" calcext:value-type="string">
            <text:p>Switcher (Training) / Broadcast Switcher</text:p>
          </table:table-cell>
          <table:table-cell table:style-name="ce8" office:value-type="string" calcext:value-type="string">
            <text:p>Armand Visser</text:p>
          </table:table-cell>
          <table:table-cell table:style-name="ce13" table:formula="of:=IF(ISNUMBER(MATCH([.P206];[$Datasheet.$B$1:.$B$9809];0));&quot;✓&quot;;&quot;x&quot;)" office:value-type="string" office:string-value="✓" calcext:value-type="string">
            <text:p>✓</text:p>
          </table:table-cell>
          <table:table-cell table:style-name="ce155" table:formula="of:=IFERROR(VLOOKUP([$Masterlist.$P206];[$Datasheet.$B$1:.$AV$9809];2;FALSE());&quot;-&quot;)" office:value-type="float" office:value="1" calcext:value-type="float">
            <text:p>1</text:p>
          </table:table-cell>
          <table:table-cell table:style-name="ce155" table:formula="of:=IFERROR(VLOOKUP([$Masterlist.$P206];[$Datasheet.$B$1:.$AV$9809];3;FALSE());&quot;-&quot;)" office:value-type="float" office:value="1" calcext:value-type="float">
            <text:p>1</text:p>
          </table:table-cell>
          <table:table-cell table:style-name="ce155" table:formula="of:=IFERROR(VLOOKUP([$Masterlist.$P206];[$Datasheet.$B$1:.$AV$9809];4;FALSE());&quot;-&quot;)" office:value-type="float" office:value="1" calcext:value-type="float">
            <text:p>1</text:p>
          </table:table-cell>
          <table:table-cell table:style-name="ce155" table:formula="of:=IFERROR(VLOOKUP([$Masterlist.$P206];[$Datasheet.$B$1:.$AV$9809];5;FALSE());&quot;-&quot;)" office:value-type="float" office:value="1" calcext:value-type="float">
            <text:p>1</text:p>
          </table:table-cell>
          <table:table-cell table:style-name="ce201" table:formula="of:=IFERROR(VLOOKUP([$Masterlist.$P206];[$Datasheet.$B$1:.$AV$9809];6;FALSE());&quot;-&quot;)" office:value-type="float" office:value="0" calcext:value-type="float">
            <text:p>0</text:p>
          </table:table-cell>
          <table:table-cell table:style-name="ce155" table:formula="of:=IFERROR(VLOOKUP([$Masterlist.$P206];[$Datasheet.$B$1:.$AV$9809];7;FALSE());&quot;-&quot;)" office:value-type="float" office:value="1" calcext:value-type="float">
            <text:p>1</text:p>
          </table:table-cell>
          <table:table-cell table:style-name="ce155" table:formula="of:=IFERROR(VLOOKUP([$Masterlist.$P206];[$Datasheet.$B$1:.$AV$9809];8;FALSE());&quot;-&quot;)" office:value-type="float" office:value="1" calcext:value-type="float">
            <text:p>1</text:p>
          </table:table-cell>
          <table:table-cell table:style-name="ce155" table:formula="of:=IFERROR(VLOOKUP([$Masterlist.$P206];[$Datasheet.$B$1:.$AV$9809];9;FALSE());&quot;-&quot;)" office:value-type="float" office:value="1" calcext:value-type="float">
            <text:p>1</text:p>
          </table:table-cell>
          <table:table-cell table:style-name="ce155" table:formula="of:=IFERROR(VLOOKUP([$Masterlist.$P206];[$Datasheet.$B$1:.$AV$9809];10;FALSE());&quot;-&quot;)" office:value-type="float" office:value="1" calcext:value-type="float">
            <text:p>1</text:p>
          </table:table-cell>
          <table:table-cell table:style-name="ce155" table:formula="of:=IFERROR(VLOOKUP([$Masterlist.$P206];[$Datasheet.$B$1:.$AV$9809];11;FALSE());&quot;-&quot;)" office:value-type="float" office:value="1" calcext:value-type="float">
            <text:p>1</text:p>
          </table:table-cell>
          <table:table-cell table:style-name="ce155" table:formula="of:=IFERROR(VLOOKUP([$Masterlist.$P206];[$Datasheet.$B$1:.$AV$9809];12;FALSE());&quot;-&quot;)" office:value-type="float" office:value="1" calcext:value-type="float">
            <text:p>1</text:p>
          </table:table-cell>
          <table:table-cell table:style-name="ce155" table:formula="of:=IFERROR(VLOOKUP([$Masterlist.$P206];[$Datasheet.$B$1:.$AV$9809];13;FALSE());&quot;-&quot;)" office:value-type="float" office:value="1" calcext:value-type="float">
            <text:p>1</text:p>
          </table:table-cell>
          <table:table-cell table:style-name="ce155" table:formula="of:=IFERROR(VLOOKUP([$Masterlist.$P206];[$Datasheet.$B$1:.$AV$9809];14;FALSE());&quot;-&quot;)" office:value-type="float" office:value="1" calcext:value-type="float">
            <text:p>1</text:p>
          </table:table-cell>
          <table:table-cell table:style-name="ce155" table:formula="of:=IFERROR(VLOOKUP([$Masterlist.$P206];[$Datasheet.$B$1:.$AV$9809];15;FALSE());&quot;-&quot;)" office:value-type="float" office:value="1" calcext:value-type="float">
            <text:p>1</text:p>
          </table:table-cell>
          <table:table-cell table:style-name="ce155" table:formula="of:=IFERROR(VLOOKUP([$Masterlist.$P206];[$Datasheet.$B$1:.$AV$9809];16;FALSE());&quot;-&quot;)" office:value-type="float" office:value="0" calcext:value-type="float">
            <text:p/>
          </table:table-cell>
          <table:table-cell table:style-name="ce155" table:formula="of:=IFERROR(VLOOKUP([$Masterlist.$P206];[$Datasheet.$B$1:.$AV$9809];17;FALSE());&quot;-&quot;)" office:value-type="float" office:value="0" calcext:value-type="float">
            <text:p/>
          </table:table-cell>
          <table:table-cell table:style-name="ce237" table:formula="of:=IFERROR(VLOOKUP([$Masterlist.$P206];[$Datasheet.$B$1:.$AV$9809];18;FALSE());&quot;-&quot;)" office:value-type="float" office:value="0" calcext:value-type="float">
            <text:p/>
          </table:table-cell>
          <table:table-cell table:style-name="ce156" table:formula="of:=IFERROR(VLOOKUP([$Masterlist.$P206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7" office:value-type="string" calcext:value-type="string">
            <text:p>L</text:p>
          </table:table-cell>
          <table:table-cell table:style-name="ce51" office:value-type="string" calcext:value-type="string">
            <text:p>yes</text:p>
          </table:table-cell>
          <table:table-cell table:number-columns-repeated="2" table:style-name="ce50" office:value-type="string" calcext:value-type="string">
            <text:p>yes</text:p>
          </table:table-cell>
          <table:table-cell table:style-name="ce51" table:number-columns-repeated="9"/>
          <table:table-cell table:style-name="ce93" office:value-type="string" calcext:value-type="string">
            <text:p>Switcher / Broadcast Switcher</text:p>
          </table:table-cell>
          <table:table-cell table:style-name="ce102" office:value-type="string" calcext:value-type="string">
            <text:p>Werner Myburgh</text:p>
          </table:table-cell>
          <table:table-cell table:style-name="ce13" table:formula="of:=IF(ISNUMBER(MATCH([.P207];[$Datasheet.$B$1:.$B$9809];0));&quot;✓&quot;;&quot;x&quot;)" office:value-type="string" office:string-value="✓" calcext:value-type="string">
            <text:p>✓</text:p>
          </table:table-cell>
          <table:table-cell table:style-name="ce156" table:formula="of:=IFERROR(VLOOKUP([$Masterlist.$P207];[$Datasheet.$B$1:.$AV$9809];2;FALSE());&quot;-&quot;)" office:value-type="float" office:value="0" calcext:value-type="float">
            <text:p>0</text:p>
          </table:table-cell>
          <table:table-cell table:style-name="ce156" table:formula="of:=IFERROR(VLOOKUP([$Masterlist.$P207];[$Datasheet.$B$1:.$AV$9809];3;FALSE());&quot;-&quot;)" office:value-type="float" office:value="1" calcext:value-type="float">
            <text:p>1</text:p>
          </table:table-cell>
          <table:table-cell table:style-name="ce156" table:formula="of:=IFERROR(VLOOKUP([$Masterlist.$P207];[$Datasheet.$B$1:.$AV$9809];4;FALSE());&quot;-&quot;)" office:value-type="float" office:value="1" calcext:value-type="float">
            <text:p>1</text:p>
          </table:table-cell>
          <table:table-cell table:style-name="ce156" table:formula="of:=IFERROR(VLOOKUP([$Masterlist.$P207];[$Datasheet.$B$1:.$AV$9809];5;FALSE());&quot;-&quot;)" office:value-type="float" office:value="0" calcext:value-type="float">
            <text:p>0</text:p>
          </table:table-cell>
          <table:table-cell table:style-name="ce202" table:formula="of:=IFERROR(VLOOKUP([$Masterlist.$P207];[$Datasheet.$B$1:.$AV$9809];6;FALSE());&quot;-&quot;)" office:value-type="float" office:value="0" calcext:value-type="float">
            <text:p>0</text:p>
          </table:table-cell>
          <table:table-cell table:style-name="ce156" table:formula="of:=IFERROR(VLOOKUP([$Masterlist.$P207];[$Datasheet.$B$1:.$AV$9809];7;FALSE());&quot;-&quot;)" office:value-type="float" office:value="1" calcext:value-type="float">
            <text:p>1</text:p>
          </table:table-cell>
          <table:table-cell table:style-name="ce156" table:formula="of:=IFERROR(VLOOKUP([$Masterlist.$P207];[$Datasheet.$B$1:.$AV$9809];8;FALSE());&quot;-&quot;)" office:value-type="float" office:value="1" calcext:value-type="float">
            <text:p>1</text:p>
          </table:table-cell>
          <table:table-cell table:style-name="ce156" table:formula="of:=IFERROR(VLOOKUP([$Masterlist.$P207];[$Datasheet.$B$1:.$AV$9809];9;FALSE());&quot;-&quot;)" office:value-type="float" office:value="0" calcext:value-type="float">
            <text:p>0</text:p>
          </table:table-cell>
          <table:table-cell table:style-name="ce156" table:formula="of:=IFERROR(VLOOKUP([$Masterlist.$P207];[$Datasheet.$B$1:.$AV$9809];10;FALSE());&quot;-&quot;)" office:value-type="float" office:value="0" calcext:value-type="float">
            <text:p>0</text:p>
          </table:table-cell>
          <table:table-cell table:style-name="ce156" table:formula="of:=IFERROR(VLOOKUP([$Masterlist.$P207];[$Datasheet.$B$1:.$AV$9809];11;FALSE());&quot;-&quot;)" office:value-type="float" office:value="1" calcext:value-type="float">
            <text:p>1</text:p>
          </table:table-cell>
          <table:table-cell table:style-name="ce156" table:formula="of:=IFERROR(VLOOKUP([$Masterlist.$P207];[$Datasheet.$B$1:.$AV$9809];12;FALSE());&quot;-&quot;)" office:value-type="float" office:value="1" calcext:value-type="float">
            <text:p>1</text:p>
          </table:table-cell>
          <table:table-cell table:style-name="ce156" table:formula="of:=IFERROR(VLOOKUP([$Masterlist.$P207];[$Datasheet.$B$1:.$AV$9809];13;FALSE());&quot;-&quot;)" office:value-type="float" office:value="0" calcext:value-type="float">
            <text:p>0</text:p>
          </table:table-cell>
          <table:table-cell table:style-name="ce156" table:formula="of:=IFERROR(VLOOKUP([$Masterlist.$P207];[$Datasheet.$B$1:.$AV$9809];14;FALSE());&quot;-&quot;)" office:value-type="float" office:value="0" calcext:value-type="float">
            <text:p>0</text:p>
          </table:table-cell>
          <table:table-cell table:style-name="ce156" table:formula="of:=IFERROR(VLOOKUP([$Masterlist.$P207];[$Datasheet.$B$1:.$AV$9809];15;FALSE());&quot;-&quot;)" office:value-type="float" office:value="1" calcext:value-type="float">
            <text:p>1</text:p>
          </table:table-cell>
          <table:table-cell table:style-name="ce156" table:formula="of:=IFERROR(VLOOKUP([$Masterlist.$P207];[$Datasheet.$B$1:.$AV$9809];16;FALSE());&quot;-&quot;)" office:value-type="float" office:value="0" calcext:value-type="float">
            <text:p/>
          </table:table-cell>
          <table:table-cell table:style-name="ce156" table:formula="of:=IFERROR(VLOOKUP([$Masterlist.$P207];[$Datasheet.$B$1:.$AV$9809];17;FALSE());&quot;-&quot;)" office:value-type="float" office:value="0" calcext:value-type="float">
            <text:p/>
          </table:table-cell>
          <table:table-cell table:style-name="ce156" table:formula="of:=IFERROR(VLOOKUP([$Masterlist.$P207];[$Datasheet.$B$1:.$AV$9809];18;FALSE());&quot;-&quot;)" office:value-type="float" office:value="0" calcext:value-type="float">
            <text:p/>
          </table:table-cell>
          <table:table-cell table:style-name="ce156" table:formula="of:=IFERROR(VLOOKUP([$Masterlist.$P207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/>
          <table:table-cell table:number-columns-repeated="3" table:style-name="ce50" office:value-type="string" calcext:value-type="string">
            <text:p>yes</text:p>
          </table:table-cell>
          <table:table-cell table:style-name="ce50" table:number-columns-repeated="9"/>
          <table:table-cell table:style-name="ce92" office:value-type="string" calcext:value-type="string">
            <text:p>Broadcast Switcher (Training)</text:p>
          </table:table-cell>
          <table:table-cell table:style-name="ce8" office:value-type="string" calcext:value-type="string">
            <text:p>Moshidi Mabaso</text:p>
          </table:table-cell>
          <table:table-cell table:style-name="ce13" table:formula="of:=IF(ISNUMBER(MATCH([.P208];[$Datasheet.$B$1:.$B$9809];0));&quot;✓&quot;;&quot;x&quot;)" office:value-type="string" office:string-value="✓" calcext:value-type="string">
            <text:p>✓</text:p>
          </table:table-cell>
          <table:table-cell table:style-name="ce157" table:formula="of:=IFERROR(VLOOKUP([$Masterlist.$P208];[$Datasheet.$B$1:.$AV$9809];2;FALSE());&quot;-&quot;)" office:value-type="float" office:value="0" calcext:value-type="float">
            <text:p>0</text:p>
          </table:table-cell>
          <table:table-cell table:style-name="ce157" table:formula="of:=IFERROR(VLOOKUP([$Masterlist.$P208];[$Datasheet.$B$1:.$AV$9809];3;FALSE());&quot;-&quot;)" office:value-type="float" office:value="1" calcext:value-type="float">
            <text:p>1</text:p>
          </table:table-cell>
          <table:table-cell table:style-name="ce157" table:formula="of:=IFERROR(VLOOKUP([$Masterlist.$P208];[$Datasheet.$B$1:.$AV$9809];4;FALSE());&quot;-&quot;)" office:value-type="float" office:value="0" calcext:value-type="float">
            <text:p>0</text:p>
          </table:table-cell>
          <table:table-cell table:style-name="ce157" table:formula="of:=IFERROR(VLOOKUP([$Masterlist.$P208];[$Datasheet.$B$1:.$AV$9809];5;FALSE());&quot;-&quot;)" office:value-type="float" office:value="1" calcext:value-type="float">
            <text:p>1</text:p>
          </table:table-cell>
          <table:table-cell table:style-name="ce203" table:formula="of:=IFERROR(VLOOKUP([$Masterlist.$P208];[$Datasheet.$B$1:.$AV$9809];6;FALSE());&quot;-&quot;)" office:value-type="float" office:value="0" calcext:value-type="float">
            <text:p>0</text:p>
          </table:table-cell>
          <table:table-cell table:style-name="ce157" table:formula="of:=IFERROR(VLOOKUP([$Masterlist.$P208];[$Datasheet.$B$1:.$AV$9809];7;FALSE());&quot;-&quot;)" office:value-type="float" office:value="0" calcext:value-type="float">
            <text:p>0</text:p>
          </table:table-cell>
          <table:table-cell table:style-name="ce157" table:formula="of:=IFERROR(VLOOKUP([$Masterlist.$P208];[$Datasheet.$B$1:.$AV$9809];8;FALSE());&quot;-&quot;)" office:value-type="float" office:value="0" calcext:value-type="float">
            <text:p>0</text:p>
          </table:table-cell>
          <table:table-cell table:style-name="ce157" table:formula="of:=IFERROR(VLOOKUP([$Masterlist.$P208];[$Datasheet.$B$1:.$AV$9809];9;FALSE());&quot;-&quot;)" office:value-type="float" office:value="0" calcext:value-type="float">
            <text:p>0</text:p>
          </table:table-cell>
          <table:table-cell table:style-name="ce157" table:formula="of:=IFERROR(VLOOKUP([$Masterlist.$P208];[$Datasheet.$B$1:.$AV$9809];10;FALSE());&quot;-&quot;)" office:value-type="float" office:value="0" calcext:value-type="float">
            <text:p>0</text:p>
          </table:table-cell>
          <table:table-cell table:style-name="ce157" table:formula="of:=IFERROR(VLOOKUP([$Masterlist.$P208];[$Datasheet.$B$1:.$AV$9809];11;FALSE());&quot;-&quot;)" office:value-type="float" office:value="1" calcext:value-type="float">
            <text:p>1</text:p>
          </table:table-cell>
          <table:table-cell table:style-name="ce157" table:formula="of:=IFERROR(VLOOKUP([$Masterlist.$P208];[$Datasheet.$B$1:.$AV$9809];12;FALSE());&quot;-&quot;)" office:value-type="float" office:value="0" calcext:value-type="float">
            <text:p>0</text:p>
          </table:table-cell>
          <table:table-cell table:style-name="ce157" table:formula="of:=IFERROR(VLOOKUP([$Masterlist.$P208];[$Datasheet.$B$1:.$AV$9809];13;FALSE());&quot;-&quot;)" office:value-type="float" office:value="1" calcext:value-type="float">
            <text:p>1</text:p>
          </table:table-cell>
          <table:table-cell table:style-name="ce157" table:formula="of:=IFERROR(VLOOKUP([$Masterlist.$P208];[$Datasheet.$B$1:.$AV$9809];14;FALSE());&quot;-&quot;)" office:value-type="float" office:value="0" calcext:value-type="float">
            <text:p>0</text:p>
          </table:table-cell>
          <table:table-cell table:style-name="ce157" table:formula="of:=IFERROR(VLOOKUP([$Masterlist.$P208];[$Datasheet.$B$1:.$AV$9809];15;FALSE());&quot;-&quot;)" office:value-type="float" office:value="0" calcext:value-type="float">
            <text:p>0</text:p>
          </table:table-cell>
          <table:table-cell table:style-name="ce157" table:formula="of:=IFERROR(VLOOKUP([$Masterlist.$P208];[$Datasheet.$B$1:.$AV$9809];16;FALSE());&quot;-&quot;)" office:value-type="float" office:value="0" calcext:value-type="float">
            <text:p/>
          </table:table-cell>
          <table:table-cell table:style-name="ce157" table:formula="of:=IFERROR(VLOOKUP([$Masterlist.$P208];[$Datasheet.$B$1:.$AV$9809];17;FALSE());&quot;-&quot;)" office:value-type="float" office:value="0" calcext:value-type="float">
            <text:p/>
          </table:table-cell>
          <table:table-cell table:style-name="ce157" table:formula="of:=IFERROR(VLOOKUP([$Masterlist.$P208];[$Datasheet.$B$1:.$AV$9809];18;FALSE());&quot;-&quot;)" office:value-type="float" office:value="0" calcext:value-type="float">
            <text:p/>
          </table:table-cell>
          <table:table-cell table:style-name="ce157" table:formula="of:=IFERROR(VLOOKUP([$Masterlist.$P208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/>
          <table:table-cell table:number-columns-repeated="3" table:style-name="ce50" office:value-type="string" calcext:value-type="string">
            <text:p>yes</text:p>
          </table:table-cell>
          <table:table-cell table:style-name="ce50" table:number-columns-repeated="9"/>
          <table:table-cell table:style-name="ce92" office:value-type="string" calcext:value-type="string">
            <text:p>Switcher Training (HR &amp; USM1st)</text:p>
          </table:table-cell>
          <table:table-cell table:style-name="ce8" office:value-type="string" calcext:value-type="string">
            <text:p>Rikus Conradie</text:p>
          </table:table-cell>
          <table:table-cell table:style-name="ce13" table:formula="of:=IF(ISNUMBER(MATCH([.P209];[$Datasheet.$B$1:.$B$9809];0));&quot;✓&quot;;&quot;x&quot;)" office:value-type="string" office:string-value="✓" calcext:value-type="string">
            <text:p>✓</text:p>
          </table:table-cell>
          <table:table-cell table:style-name="ce157" table:formula="of:=IFERROR(VLOOKUP([$Masterlist.$P209];[$Datasheet.$B$1:.$AV$9809];2;FALSE());&quot;-&quot;)" office:value-type="float" office:value="1" calcext:value-type="float">
            <text:p>1</text:p>
          </table:table-cell>
          <table:table-cell table:style-name="ce157" table:formula="of:=IFERROR(VLOOKUP([$Masterlist.$P209];[$Datasheet.$B$1:.$AV$9809];3;FALSE());&quot;-&quot;)" office:value-type="float" office:value="1" calcext:value-type="float">
            <text:p>1</text:p>
          </table:table-cell>
          <table:table-cell table:style-name="ce157" table:formula="of:=IFERROR(VLOOKUP([$Masterlist.$P209];[$Datasheet.$B$1:.$AV$9809];4;FALSE());&quot;-&quot;)" office:value-type="float" office:value="1" calcext:value-type="float">
            <text:p>1</text:p>
          </table:table-cell>
          <table:table-cell table:style-name="ce157" table:formula="of:=IFERROR(VLOOKUP([$Masterlist.$P209];[$Datasheet.$B$1:.$AV$9809];5;FALSE());&quot;-&quot;)" office:value-type="float" office:value="1" calcext:value-type="float">
            <text:p>1</text:p>
          </table:table-cell>
          <table:table-cell table:style-name="ce203" table:formula="of:=IFERROR(VLOOKUP([$Masterlist.$P209];[$Datasheet.$B$1:.$AV$9809];6;FALSE());&quot;-&quot;)" office:value-type="float" office:value="1" calcext:value-type="float">
            <text:p>1</text:p>
          </table:table-cell>
          <table:table-cell table:style-name="ce157" table:formula="of:=IFERROR(VLOOKUP([$Masterlist.$P209];[$Datasheet.$B$1:.$AV$9809];7;FALSE());&quot;-&quot;)" office:value-type="float" office:value="1" calcext:value-type="float">
            <text:p>1</text:p>
          </table:table-cell>
          <table:table-cell table:style-name="ce157" table:formula="of:=IFERROR(VLOOKUP([$Masterlist.$P209];[$Datasheet.$B$1:.$AV$9809];8;FALSE());&quot;-&quot;)" office:value-type="float" office:value="1" calcext:value-type="float">
            <text:p>1</text:p>
          </table:table-cell>
          <table:table-cell table:style-name="ce157" table:formula="of:=IFERROR(VLOOKUP([$Masterlist.$P209];[$Datasheet.$B$1:.$AV$9809];9;FALSE());&quot;-&quot;)" office:value-type="float" office:value="1" calcext:value-type="float">
            <text:p>1</text:p>
          </table:table-cell>
          <table:table-cell table:style-name="ce157" table:formula="of:=IFERROR(VLOOKUP([$Masterlist.$P209];[$Datasheet.$B$1:.$AV$9809];10;FALSE());&quot;-&quot;)" office:value-type="float" office:value="1" calcext:value-type="float">
            <text:p>1</text:p>
          </table:table-cell>
          <table:table-cell table:style-name="ce157" table:formula="of:=IFERROR(VLOOKUP([$Masterlist.$P209];[$Datasheet.$B$1:.$AV$9809];11;FALSE());&quot;-&quot;)" office:value-type="float" office:value="1" calcext:value-type="float">
            <text:p>1</text:p>
          </table:table-cell>
          <table:table-cell table:style-name="ce157" table:formula="of:=IFERROR(VLOOKUP([$Masterlist.$P209];[$Datasheet.$B$1:.$AV$9809];12;FALSE());&quot;-&quot;)" office:value-type="float" office:value="1" calcext:value-type="float">
            <text:p>1</text:p>
          </table:table-cell>
          <table:table-cell table:style-name="ce157" table:formula="of:=IFERROR(VLOOKUP([$Masterlist.$P209];[$Datasheet.$B$1:.$AV$9809];13;FALSE());&quot;-&quot;)" office:value-type="float" office:value="1" calcext:value-type="float">
            <text:p>1</text:p>
          </table:table-cell>
          <table:table-cell table:style-name="ce157" table:formula="of:=IFERROR(VLOOKUP([$Masterlist.$P209];[$Datasheet.$B$1:.$AV$9809];14;FALSE());&quot;-&quot;)" office:value-type="float" office:value="1" calcext:value-type="float">
            <text:p>1</text:p>
          </table:table-cell>
          <table:table-cell table:style-name="ce157" table:formula="of:=IFERROR(VLOOKUP([$Masterlist.$P209];[$Datasheet.$B$1:.$AV$9809];15;FALSE());&quot;-&quot;)" office:value-type="float" office:value="1" calcext:value-type="float">
            <text:p>1</text:p>
          </table:table-cell>
          <table:table-cell table:style-name="ce157" table:formula="of:=IFERROR(VLOOKUP([$Masterlist.$P209];[$Datasheet.$B$1:.$AV$9809];16;FALSE());&quot;-&quot;)" office:value-type="float" office:value="0" calcext:value-type="float">
            <text:p/>
          </table:table-cell>
          <table:table-cell table:style-name="ce157" table:formula="of:=IFERROR(VLOOKUP([$Masterlist.$P209];[$Datasheet.$B$1:.$AV$9809];17;FALSE());&quot;-&quot;)" office:value-type="float" office:value="0" calcext:value-type="float">
            <text:p/>
          </table:table-cell>
          <table:table-cell table:style-name="ce157" table:formula="of:=IFERROR(VLOOKUP([$Masterlist.$P209];[$Datasheet.$B$1:.$AV$9809];18;FALSE());&quot;-&quot;)" office:value-type="float" office:value="0" calcext:value-type="float">
            <text:p/>
          </table:table-cell>
          <table:table-cell table:style-name="ce157" table:formula="of:=IFERROR(VLOOKUP([$Masterlist.$P209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7"/>
          <table:table-cell table:number-columns-repeated="3" table:style-name="ce51" office:value-type="string" calcext:value-type="string">
            <text:p>yes</text:p>
          </table:table-cell>
          <table:table-cell table:style-name="ce51" table:number-columns-repeated="9"/>
          <table:table-cell table:style-name="ce93" office:value-type="string" calcext:value-type="string">
            <text:p>Switcher Training</text:p>
          </table:table-cell>
          <table:table-cell table:style-name="ce102" office:value-type="string" calcext:value-type="string">
            <text:p>Rossouw Venter</text:p>
          </table:table-cell>
          <table:table-cell table:style-name="ce13" table:formula="of:=IF(ISNUMBER(MATCH([.P210];[$Datasheet.$B$1:.$B$9809];0));&quot;✓&quot;;&quot;x&quot;)" office:value-type="string" office:string-value="✓" calcext:value-type="string">
            <text:p>✓</text:p>
          </table:table-cell>
          <table:table-cell table:style-name="ce157" table:formula="of:=IFERROR(VLOOKUP([$Masterlist.$P210];[$Datasheet.$B$1:.$AV$9809];2;FALSE());&quot;-&quot;)" office:value-type="float" office:value="0" calcext:value-type="float">
            <text:p>0</text:p>
          </table:table-cell>
          <table:table-cell table:style-name="ce157" table:formula="of:=IFERROR(VLOOKUP([$Masterlist.$P210];[$Datasheet.$B$1:.$AV$9809];3;FALSE());&quot;-&quot;)" office:value-type="float" office:value="1" calcext:value-type="float">
            <text:p>1</text:p>
          </table:table-cell>
          <table:table-cell table:style-name="ce157" table:formula="of:=IFERROR(VLOOKUP([$Masterlist.$P210];[$Datasheet.$B$1:.$AV$9809];4;FALSE());&quot;-&quot;)" office:value-type="float" office:value="0" calcext:value-type="float">
            <text:p>0</text:p>
          </table:table-cell>
          <table:table-cell table:style-name="ce157" table:formula="of:=IFERROR(VLOOKUP([$Masterlist.$P210];[$Datasheet.$B$1:.$AV$9809];5;FALSE());&quot;-&quot;)" office:value-type="float" office:value="0" calcext:value-type="float">
            <text:p>0</text:p>
          </table:table-cell>
          <table:table-cell table:style-name="ce203" table:formula="of:=IFERROR(VLOOKUP([$Masterlist.$P210];[$Datasheet.$B$1:.$AV$9809];6;FALSE());&quot;-&quot;)" office:value-type="float" office:value="0" calcext:value-type="float">
            <text:p>0</text:p>
          </table:table-cell>
          <table:table-cell table:style-name="ce157" table:formula="of:=IFERROR(VLOOKUP([$Masterlist.$P210];[$Datasheet.$B$1:.$AV$9809];7;FALSE());&quot;-&quot;)" office:value-type="float" office:value="0" calcext:value-type="float">
            <text:p>0</text:p>
          </table:table-cell>
          <table:table-cell table:style-name="ce157" table:formula="of:=IFERROR(VLOOKUP([$Masterlist.$P210];[$Datasheet.$B$1:.$AV$9809];8;FALSE());&quot;-&quot;)" office:value-type="float" office:value="1" calcext:value-type="float">
            <text:p>1</text:p>
          </table:table-cell>
          <table:table-cell table:style-name="ce157" table:formula="of:=IFERROR(VLOOKUP([$Masterlist.$P210];[$Datasheet.$B$1:.$AV$9809];9;FALSE());&quot;-&quot;)" office:value-type="float" office:value="1" calcext:value-type="float">
            <text:p>1</text:p>
          </table:table-cell>
          <table:table-cell table:style-name="ce157" table:formula="of:=IFERROR(VLOOKUP([$Masterlist.$P210];[$Datasheet.$B$1:.$AV$9809];10;FALSE());&quot;-&quot;)" office:value-type="float" office:value="0" calcext:value-type="float">
            <text:p>0</text:p>
          </table:table-cell>
          <table:table-cell table:style-name="ce157" table:formula="of:=IFERROR(VLOOKUP([$Masterlist.$P210];[$Datasheet.$B$1:.$AV$9809];11;FALSE());&quot;-&quot;)" office:value-type="float" office:value="1" calcext:value-type="float">
            <text:p>1</text:p>
          </table:table-cell>
          <table:table-cell table:style-name="ce157" table:formula="of:=IFERROR(VLOOKUP([$Masterlist.$P210];[$Datasheet.$B$1:.$AV$9809];12;FALSE());&quot;-&quot;)" office:value-type="float" office:value="0" calcext:value-type="float">
            <text:p>0</text:p>
          </table:table-cell>
          <table:table-cell table:style-name="ce157" table:formula="of:=IFERROR(VLOOKUP([$Masterlist.$P210];[$Datasheet.$B$1:.$AV$9809];13;FALSE());&quot;-&quot;)" office:value-type="float" office:value="1" calcext:value-type="float">
            <text:p>1</text:p>
          </table:table-cell>
          <table:table-cell table:style-name="ce157" table:formula="of:=IFERROR(VLOOKUP([$Masterlist.$P210];[$Datasheet.$B$1:.$AV$9809];14;FALSE());&quot;-&quot;)" office:value-type="float" office:value="1" calcext:value-type="float">
            <text:p>1</text:p>
          </table:table-cell>
          <table:table-cell table:style-name="ce157" table:formula="of:=IFERROR(VLOOKUP([$Masterlist.$P210];[$Datasheet.$B$1:.$AV$9809];15;FALSE());&quot;-&quot;)" office:value-type="float" office:value="1" calcext:value-type="float">
            <text:p>1</text:p>
          </table:table-cell>
          <table:table-cell table:style-name="ce157" table:formula="of:=IFERROR(VLOOKUP([$Masterlist.$P210];[$Datasheet.$B$1:.$AV$9809];16;FALSE());&quot;-&quot;)" office:value-type="float" office:value="0" calcext:value-type="float">
            <text:p/>
          </table:table-cell>
          <table:table-cell table:style-name="ce157" table:formula="of:=IFERROR(VLOOKUP([$Masterlist.$P210];[$Datasheet.$B$1:.$AV$9809];17;FALSE());&quot;-&quot;)" office:value-type="float" office:value="0" calcext:value-type="float">
            <text:p/>
          </table:table-cell>
          <table:table-cell table:style-name="ce157" table:formula="of:=IFERROR(VLOOKUP([$Masterlist.$P210];[$Datasheet.$B$1:.$AV$9809];18;FALSE());&quot;-&quot;)" office:value-type="float" office:value="0" calcext:value-type="float">
            <text:p/>
          </table:table-cell>
          <table:table-cell table:style-name="ce157" table:formula="of:=IFERROR(VLOOKUP([$Masterlist.$P210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41" office:value-type="string" calcext:value-type="string" table:number-columns-spanned="15" table:number-rows-spanned="1">
            <text:p>CAMERA - JUSTIN ROBERSTE &amp; ZANDRE ROSSOUW</text:p>
          </table:table-cell>
          <table:covered-table-cell table:number-columns-repeated="13" table:style-name="ce45"/>
          <table:covered-table-cell table:style-name="ce99"/>
          <table:table-cell table:style-name="ce126"/>
          <table:table-cell table:style-name="ce158" office:value-type="string" calcext:value-type="string" table:number-columns-spanned="18" table:number-rows-spanned="1">
            <text:p>CAMERA - JUSTIN ROBERSTE &amp; ZANDRE ROSSOUW</text:p>
          </table:table-cell>
          <table:covered-table-cell table:number-columns-repeated="16" table:style-name="ce45"/>
          <table:covered-table-cell table:style-name="ce99"/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5" office:value-type="string" calcext:value-type="string">
            <text:p>AL</text:p>
          </table:table-cell>
          <table:table-cell table:style-name="ce49" office:value-type="string" calcext:value-type="string">
            <text:p>yes</text:p>
          </table:table-cell>
          <table:table-cell table:style-name="ce49" table:number-columns-repeated="11"/>
          <table:table-cell table:style-name="ce91" office:value-type="string" calcext:value-type="string">
            <text:p>Cam 1, Cam 3, Spider Cam</text:p>
          </table:table-cell>
          <table:table-cell table:style-name="ce100" office:value-type="string" calcext:value-type="string">
            <text:p>Zandré Rossouw</text:p>
          </table:table-cell>
          <table:table-cell table:style-name="ce13" table:formula="of:=IF(ISNUMBER(MATCH([.P212];[$Datasheet.$B$1:.$B$9809];0));&quot;✓&quot;;&quot;x&quot;)" office:value-type="string" office:string-value="x" calcext:value-type="string">
            <text:p>x</text:p>
          </table:table-cell>
          <table:table-cell table:style-name="ce159" table:formula="of:=IFERROR(VLOOKUP([$Masterlist.$P212];[$Datasheet.$B$1:.$AV$9809];2;FALSE());&quot;-&quot;)" office:value-type="string" office:string-value="-" calcext:value-type="string">
            <text:p>-</text:p>
          </table:table-cell>
          <table:table-cell table:style-name="ce159" table:formula="of:=IFERROR(VLOOKUP([$Masterlist.$P212];[$Datasheet.$B$1:.$AV$9809];3;FALSE());&quot;-&quot;)" office:value-type="string" office:string-value="-" calcext:value-type="string">
            <text:p>-</text:p>
          </table:table-cell>
          <table:table-cell table:style-name="ce159" table:formula="of:=IFERROR(VLOOKUP([$Masterlist.$P212];[$Datasheet.$B$1:.$AV$9809];4;FALSE());&quot;-&quot;)" office:value-type="string" office:string-value="-" calcext:value-type="string">
            <text:p>-</text:p>
          </table:table-cell>
          <table:table-cell table:style-name="ce159" table:formula="of:=IFERROR(VLOOKUP([$Masterlist.$P212];[$Datasheet.$B$1:.$AV$9809];5;FALSE());&quot;-&quot;)" office:value-type="string" office:string-value="-" calcext:value-type="string">
            <text:p>-</text:p>
          </table:table-cell>
          <table:table-cell table:style-name="ce204" table:formula="of:=IFERROR(VLOOKUP([$Masterlist.$P212];[$Datasheet.$B$1:.$AV$9809];6;FALSE());&quot;-&quot;)" office:value-type="string" office:string-value="-" calcext:value-type="string">
            <text:p>-</text:p>
          </table:table-cell>
          <table:table-cell table:style-name="ce159" table:formula="of:=IFERROR(VLOOKUP([$Masterlist.$P212];[$Datasheet.$B$1:.$AV$9809];7;FALSE());&quot;-&quot;)" office:value-type="string" office:string-value="-" calcext:value-type="string">
            <text:p>-</text:p>
          </table:table-cell>
          <table:table-cell table:style-name="ce159" table:formula="of:=IFERROR(VLOOKUP([$Masterlist.$P212];[$Datasheet.$B$1:.$AV$9809];8;FALSE());&quot;-&quot;)" office:value-type="string" office:string-value="-" calcext:value-type="string">
            <text:p>-</text:p>
          </table:table-cell>
          <table:table-cell table:style-name="ce159" table:formula="of:=IFERROR(VLOOKUP([$Masterlist.$P212];[$Datasheet.$B$1:.$AV$9809];9;FALSE());&quot;-&quot;)" office:value-type="string" office:string-value="-" calcext:value-type="string">
            <text:p>-</text:p>
          </table:table-cell>
          <table:table-cell table:style-name="ce159" table:formula="of:=IFERROR(VLOOKUP([$Masterlist.$P212];[$Datasheet.$B$1:.$AV$9809];10;FALSE());&quot;-&quot;)" office:value-type="string" office:string-value="-" calcext:value-type="string">
            <text:p>-</text:p>
          </table:table-cell>
          <table:table-cell table:style-name="ce159" table:formula="of:=IFERROR(VLOOKUP([$Masterlist.$P212];[$Datasheet.$B$1:.$AV$9809];11;FALSE());&quot;-&quot;)" office:value-type="string" office:string-value="-" calcext:value-type="string">
            <text:p>-</text:p>
          </table:table-cell>
          <table:table-cell table:style-name="ce159" table:formula="of:=IFERROR(VLOOKUP([$Masterlist.$P212];[$Datasheet.$B$1:.$AV$9809];12;FALSE());&quot;-&quot;)" office:value-type="string" office:string-value="-" calcext:value-type="string">
            <text:p>-</text:p>
          </table:table-cell>
          <table:table-cell table:style-name="ce159" table:formula="of:=IFERROR(VLOOKUP([$Masterlist.$P212];[$Datasheet.$B$1:.$AV$9809];13;FALSE());&quot;-&quot;)" office:value-type="string" office:string-value="-" calcext:value-type="string">
            <text:p>-</text:p>
          </table:table-cell>
          <table:table-cell table:style-name="ce159" table:formula="of:=IFERROR(VLOOKUP([$Masterlist.$P212];[$Datasheet.$B$1:.$AV$9809];14;FALSE());&quot;-&quot;)" office:value-type="string" office:string-value="-" calcext:value-type="string">
            <text:p>-</text:p>
          </table:table-cell>
          <table:table-cell table:style-name="ce159" table:formula="of:=IFERROR(VLOOKUP([$Masterlist.$P212];[$Datasheet.$B$1:.$AV$9809];15;FALSE());&quot;-&quot;)" office:value-type="string" office:string-value="-" calcext:value-type="string">
            <text:p>-</text:p>
          </table:table-cell>
          <table:table-cell table:style-name="ce159" table:formula="of:=IFERROR(VLOOKUP([$Masterlist.$P212];[$Datasheet.$B$1:.$AV$9809];16;FALSE());&quot;-&quot;)" office:value-type="string" office:string-value="-" calcext:value-type="string">
            <text:p>-</text:p>
          </table:table-cell>
          <table:table-cell table:style-name="ce159" table:formula="of:=IFERROR(VLOOKUP([$Masterlist.$P212];[$Datasheet.$B$1:.$AV$9809];17;FALSE());&quot;-&quot;)" office:value-type="string" office:string-value="-" calcext:value-type="string">
            <text:p>-</text:p>
          </table:table-cell>
          <table:table-cell table:style-name="ce159" table:formula="of:=IFERROR(VLOOKUP([$Masterlist.$P212];[$Datasheet.$B$1:.$AV$9809];18;FALSE());&quot;-&quot;)" office:value-type="string" office:string-value="-" calcext:value-type="string">
            <text:p>-</text:p>
          </table:table-cell>
          <table:table-cell table:style-name="ce159" table:formula="of:=IFERROR(VLOOKUP([$Masterlist.$P212];[$Datasheet.$B$1:.$AV$9809];19;FALSE());&quot;-&quot;)" office:value-type="string" office:string-value="-" calcext:value-type="string">
            <text:p>-</text:p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9" office:value-type="string" calcext:value-type="string">
            <text:p>L</text:p>
          </table:table-cell>
          <table:table-cell table:style-name="ce50" office:value-type="string" calcext:value-type="string">
            <text:p>yes</text:p>
          </table:table-cell>
          <table:table-cell table:style-name="ce50" table:number-columns-repeated="11"/>
          <table:table-cell table:style-name="ce92" office:value-type="string" calcext:value-type="string">
            <text:p>Cam 1, Cam 3, Static Cam</text:p>
          </table:table-cell>
          <table:table-cell table:style-name="ce8" office:value-type="string" calcext:value-type="string">
            <text:p>Daniel de Kock</text:p>
          </table:table-cell>
          <table:table-cell table:style-name="ce13" table:formula="of:=IF(ISNUMBER(MATCH([.P213];[$Datasheet.$B$1:.$B$9809];0));&quot;✓&quot;;&quot;x&quot;)" office:value-type="string" office:string-value="✓" calcext:value-type="string">
            <text:p>✓</text:p>
          </table:table-cell>
          <table:table-cell table:style-name="ce159" table:formula="of:=IFERROR(VLOOKUP([$Masterlist.$P213];[$Datasheet.$B$1:.$AV$9809];2;FALSE());&quot;-&quot;)" office:value-type="float" office:value="1" calcext:value-type="float">
            <text:p>1</text:p>
          </table:table-cell>
          <table:table-cell table:style-name="ce159" table:formula="of:=IFERROR(VLOOKUP([$Masterlist.$P213];[$Datasheet.$B$1:.$AV$9809];3;FALSE());&quot;-&quot;)" office:value-type="float" office:value="1" calcext:value-type="float">
            <text:p>1</text:p>
          </table:table-cell>
          <table:table-cell table:style-name="ce159" table:formula="of:=IFERROR(VLOOKUP([$Masterlist.$P213];[$Datasheet.$B$1:.$AV$9809];4;FALSE());&quot;-&quot;)" office:value-type="float" office:value="1" calcext:value-type="float">
            <text:p>1</text:p>
          </table:table-cell>
          <table:table-cell table:style-name="ce159" table:formula="of:=IFERROR(VLOOKUP([$Masterlist.$P213];[$Datasheet.$B$1:.$AV$9809];5;FALSE());&quot;-&quot;)" office:value-type="float" office:value="1" calcext:value-type="float">
            <text:p>1</text:p>
          </table:table-cell>
          <table:table-cell table:style-name="ce204" table:formula="of:=IFERROR(VLOOKUP([$Masterlist.$P213];[$Datasheet.$B$1:.$AV$9809];6;FALSE());&quot;-&quot;)" office:value-type="float" office:value="1" calcext:value-type="float">
            <text:p>1</text:p>
          </table:table-cell>
          <table:table-cell table:style-name="ce159" table:formula="of:=IFERROR(VLOOKUP([$Masterlist.$P213];[$Datasheet.$B$1:.$AV$9809];7;FALSE());&quot;-&quot;)" office:value-type="float" office:value="1" calcext:value-type="float">
            <text:p>1</text:p>
          </table:table-cell>
          <table:table-cell table:style-name="ce159" table:formula="of:=IFERROR(VLOOKUP([$Masterlist.$P213];[$Datasheet.$B$1:.$AV$9809];8;FALSE());&quot;-&quot;)" office:value-type="float" office:value="1" calcext:value-type="float">
            <text:p>1</text:p>
          </table:table-cell>
          <table:table-cell table:style-name="ce159" table:formula="of:=IFERROR(VLOOKUP([$Masterlist.$P213];[$Datasheet.$B$1:.$AV$9809];9;FALSE());&quot;-&quot;)" office:value-type="float" office:value="1" calcext:value-type="float">
            <text:p>1</text:p>
          </table:table-cell>
          <table:table-cell table:style-name="ce159" table:formula="of:=IFERROR(VLOOKUP([$Masterlist.$P213];[$Datasheet.$B$1:.$AV$9809];10;FALSE());&quot;-&quot;)" office:value-type="float" office:value="1" calcext:value-type="float">
            <text:p>1</text:p>
          </table:table-cell>
          <table:table-cell table:style-name="ce159" table:formula="of:=IFERROR(VLOOKUP([$Masterlist.$P213];[$Datasheet.$B$1:.$AV$9809];11;FALSE());&quot;-&quot;)" office:value-type="float" office:value="1" calcext:value-type="float">
            <text:p>1</text:p>
          </table:table-cell>
          <table:table-cell table:style-name="ce159" table:formula="of:=IFERROR(VLOOKUP([$Masterlist.$P213];[$Datasheet.$B$1:.$AV$9809];12;FALSE());&quot;-&quot;)" office:value-type="float" office:value="1" calcext:value-type="float">
            <text:p>1</text:p>
          </table:table-cell>
          <table:table-cell table:style-name="ce159" table:formula="of:=IFERROR(VLOOKUP([$Masterlist.$P213];[$Datasheet.$B$1:.$AV$9809];13;FALSE());&quot;-&quot;)" office:value-type="float" office:value="1" calcext:value-type="float">
            <text:p>1</text:p>
          </table:table-cell>
          <table:table-cell table:style-name="ce159" table:formula="of:=IFERROR(VLOOKUP([$Masterlist.$P213];[$Datasheet.$B$1:.$AV$9809];14;FALSE());&quot;-&quot;)" office:value-type="float" office:value="1" calcext:value-type="float">
            <text:p>1</text:p>
          </table:table-cell>
          <table:table-cell table:style-name="ce159" table:formula="of:=IFERROR(VLOOKUP([$Masterlist.$P213];[$Datasheet.$B$1:.$AV$9809];15;FALSE());&quot;-&quot;)" office:value-type="float" office:value="1" calcext:value-type="float">
            <text:p>1</text:p>
          </table:table-cell>
          <table:table-cell table:style-name="ce159" table:formula="of:=IFERROR(VLOOKUP([$Masterlist.$P213];[$Datasheet.$B$1:.$AV$9809];16;FALSE());&quot;-&quot;)" office:value-type="float" office:value="0" calcext:value-type="float">
            <text:p/>
          </table:table-cell>
          <table:table-cell table:style-name="ce159" table:formula="of:=IFERROR(VLOOKUP([$Masterlist.$P213];[$Datasheet.$B$1:.$AV$9809];17;FALSE());&quot;-&quot;)" office:value-type="float" office:value="0" calcext:value-type="float">
            <text:p/>
          </table:table-cell>
          <table:table-cell table:style-name="ce159" table:formula="of:=IFERROR(VLOOKUP([$Masterlist.$P213];[$Datasheet.$B$1:.$AV$9809];18;FALSE());&quot;-&quot;)" office:value-type="float" office:value="0" calcext:value-type="float">
            <text:p/>
          </table:table-cell>
          <table:table-cell table:style-name="ce159" table:formula="of:=IFERROR(VLOOKUP([$Masterlist.$P213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7" office:value-type="string" calcext:value-type="string">
            <text:p>M</text:p>
          </table:table-cell>
          <table:table-cell table:style-name="ce50" office:value-type="string" calcext:value-type="string">
            <text:p>yes</text:p>
          </table:table-cell>
          <table:table-cell table:style-name="ce50" table:number-columns-repeated="11"/>
          <table:table-cell table:style-name="ce92" office:value-type="string" calcext:value-type="string">
            <text:p>Cam 1 / Cam 3 / Spider Cam</text:p>
          </table:table-cell>
          <table:table-cell table:style-name="ce8" office:value-type="string" calcext:value-type="string">
            <text:p>Marco Grobler</text:p>
          </table:table-cell>
          <table:table-cell table:style-name="ce13" table:formula="of:=IF(ISNUMBER(MATCH([.P214];[$Datasheet.$B$1:.$B$9809];0));&quot;✓&quot;;&quot;x&quot;)" office:value-type="string" office:string-value="✓" calcext:value-type="string">
            <text:p>✓</text:p>
          </table:table-cell>
          <table:table-cell table:style-name="ce159" table:formula="of:=IFERROR(VLOOKUP([$Masterlist.$P214];[$Datasheet.$B$1:.$AV$9809];2;FALSE());&quot;-&quot;)" office:value-type="float" office:value="0" calcext:value-type="float">
            <text:p>0</text:p>
          </table:table-cell>
          <table:table-cell table:style-name="ce159" table:formula="of:=IFERROR(VLOOKUP([$Masterlist.$P214];[$Datasheet.$B$1:.$AV$9809];3;FALSE());&quot;-&quot;)" office:value-type="float" office:value="0" calcext:value-type="float">
            <text:p>0</text:p>
          </table:table-cell>
          <table:table-cell table:style-name="ce159" table:formula="of:=IFERROR(VLOOKUP([$Masterlist.$P214];[$Datasheet.$B$1:.$AV$9809];4;FALSE());&quot;-&quot;)" office:value-type="float" office:value="0" calcext:value-type="float">
            <text:p>0</text:p>
          </table:table-cell>
          <table:table-cell table:style-name="ce159" table:formula="of:=IFERROR(VLOOKUP([$Masterlist.$P214];[$Datasheet.$B$1:.$AV$9809];5;FALSE());&quot;-&quot;)" office:value-type="float" office:value="0" calcext:value-type="float">
            <text:p>0</text:p>
          </table:table-cell>
          <table:table-cell table:style-name="ce204" table:formula="of:=IFERROR(VLOOKUP([$Masterlist.$P214];[$Datasheet.$B$1:.$AV$9809];6;FALSE());&quot;-&quot;)" office:value-type="float" office:value="0" calcext:value-type="float">
            <text:p>0</text:p>
          </table:table-cell>
          <table:table-cell table:style-name="ce159" table:formula="of:=IFERROR(VLOOKUP([$Masterlist.$P214];[$Datasheet.$B$1:.$AV$9809];7;FALSE());&quot;-&quot;)" office:value-type="float" office:value="0" calcext:value-type="float">
            <text:p>0</text:p>
          </table:table-cell>
          <table:table-cell table:style-name="ce159" table:formula="of:=IFERROR(VLOOKUP([$Masterlist.$P214];[$Datasheet.$B$1:.$AV$9809];8;FALSE());&quot;-&quot;)" office:value-type="float" office:value="0" calcext:value-type="float">
            <text:p>0</text:p>
          </table:table-cell>
          <table:table-cell table:style-name="ce159" table:formula="of:=IFERROR(VLOOKUP([$Masterlist.$P214];[$Datasheet.$B$1:.$AV$9809];9;FALSE());&quot;-&quot;)" office:value-type="float" office:value="1" calcext:value-type="float">
            <text:p>1</text:p>
          </table:table-cell>
          <table:table-cell table:style-name="ce159" table:formula="of:=IFERROR(VLOOKUP([$Masterlist.$P214];[$Datasheet.$B$1:.$AV$9809];10;FALSE());&quot;-&quot;)" office:value-type="float" office:value="0" calcext:value-type="float">
            <text:p>0</text:p>
          </table:table-cell>
          <table:table-cell table:style-name="ce159" table:formula="of:=IFERROR(VLOOKUP([$Masterlist.$P214];[$Datasheet.$B$1:.$AV$9809];11;FALSE());&quot;-&quot;)" office:value-type="float" office:value="0" calcext:value-type="float">
            <text:p>0</text:p>
          </table:table-cell>
          <table:table-cell table:style-name="ce159" table:formula="of:=IFERROR(VLOOKUP([$Masterlist.$P214];[$Datasheet.$B$1:.$AV$9809];12;FALSE());&quot;-&quot;)" office:value-type="float" office:value="0" calcext:value-type="float">
            <text:p>0</text:p>
          </table:table-cell>
          <table:table-cell table:style-name="ce159" table:formula="of:=IFERROR(VLOOKUP([$Masterlist.$P214];[$Datasheet.$B$1:.$AV$9809];13;FALSE());&quot;-&quot;)" office:value-type="float" office:value="1" calcext:value-type="float">
            <text:p>1</text:p>
          </table:table-cell>
          <table:table-cell table:style-name="ce159" table:formula="of:=IFERROR(VLOOKUP([$Masterlist.$P214];[$Datasheet.$B$1:.$AV$9809];14;FALSE());&quot;-&quot;)" office:value-type="float" office:value="0" calcext:value-type="float">
            <text:p>0</text:p>
          </table:table-cell>
          <table:table-cell table:style-name="ce159" table:formula="of:=IFERROR(VLOOKUP([$Masterlist.$P214];[$Datasheet.$B$1:.$AV$9809];15;FALSE());&quot;-&quot;)" office:value-type="float" office:value="0" calcext:value-type="float">
            <text:p>0</text:p>
          </table:table-cell>
          <table:table-cell table:style-name="ce159" table:formula="of:=IFERROR(VLOOKUP([$Masterlist.$P214];[$Datasheet.$B$1:.$AV$9809];16;FALSE());&quot;-&quot;)" office:value-type="float" office:value="0" calcext:value-type="float">
            <text:p/>
          </table:table-cell>
          <table:table-cell table:style-name="ce159" table:formula="of:=IFERROR(VLOOKUP([$Masterlist.$P214];[$Datasheet.$B$1:.$AV$9809];17;FALSE());&quot;-&quot;)" office:value-type="float" office:value="0" calcext:value-type="float">
            <text:p/>
          </table:table-cell>
          <table:table-cell table:style-name="ce159" table:formula="of:=IFERROR(VLOOKUP([$Masterlist.$P214];[$Datasheet.$B$1:.$AV$9809];18;FALSE());&quot;-&quot;)" office:value-type="float" office:value="0" calcext:value-type="float">
            <text:p/>
          </table:table-cell>
          <table:table-cell table:style-name="ce159" table:formula="of:=IFERROR(VLOOKUP([$Masterlist.$P214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AL</text:p>
          </table:table-cell>
          <table:table-cell table:style-name="ce50" office:value-type="string" calcext:value-type="string">
            <text:p>yes</text:p>
          </table:table-cell>
          <table:table-cell table:style-name="ce50" table:number-columns-repeated="11"/>
          <table:table-cell table:style-name="ce92" office:value-type="string" calcext:value-type="string">
            <text:p>Static Cam / Spider Cam</text:p>
          </table:table-cell>
          <table:table-cell table:style-name="ce8" office:value-type="string" calcext:value-type="string">
            <text:p>Justin Robertse</text:p>
          </table:table-cell>
          <table:table-cell table:style-name="ce13" table:formula="of:=IF(ISNUMBER(MATCH([.P215];[$Datasheet.$B$1:.$B$9809];0));&quot;✓&quot;;&quot;x&quot;)" office:value-type="string" office:string-value="✓" calcext:value-type="string">
            <text:p>✓</text:p>
          </table:table-cell>
          <table:table-cell table:style-name="ce159" table:formula="of:=IFERROR(VLOOKUP([$Masterlist.$P215];[$Datasheet.$B$1:.$AV$9809];2;FALSE());&quot;-&quot;)" office:value-type="float" office:value="1" calcext:value-type="float">
            <text:p>1</text:p>
          </table:table-cell>
          <table:table-cell table:style-name="ce159" table:formula="of:=IFERROR(VLOOKUP([$Masterlist.$P215];[$Datasheet.$B$1:.$AV$9809];3;FALSE());&quot;-&quot;)" office:value-type="float" office:value="1" calcext:value-type="float">
            <text:p>1</text:p>
          </table:table-cell>
          <table:table-cell table:style-name="ce159" table:formula="of:=IFERROR(VLOOKUP([$Masterlist.$P215];[$Datasheet.$B$1:.$AV$9809];4;FALSE());&quot;-&quot;)" office:value-type="float" office:value="1" calcext:value-type="float">
            <text:p>1</text:p>
          </table:table-cell>
          <table:table-cell table:style-name="ce159" table:formula="of:=IFERROR(VLOOKUP([$Masterlist.$P215];[$Datasheet.$B$1:.$AV$9809];5;FALSE());&quot;-&quot;)" office:value-type="float" office:value="1" calcext:value-type="float">
            <text:p>1</text:p>
          </table:table-cell>
          <table:table-cell table:style-name="ce204" table:formula="of:=IFERROR(VLOOKUP([$Masterlist.$P215];[$Datasheet.$B$1:.$AV$9809];6;FALSE());&quot;-&quot;)" office:value-type="float" office:value="1" calcext:value-type="float">
            <text:p>1</text:p>
          </table:table-cell>
          <table:table-cell table:style-name="ce159" table:formula="of:=IFERROR(VLOOKUP([$Masterlist.$P215];[$Datasheet.$B$1:.$AV$9809];7;FALSE());&quot;-&quot;)" office:value-type="float" office:value="1" calcext:value-type="float">
            <text:p>1</text:p>
          </table:table-cell>
          <table:table-cell table:style-name="ce159" table:formula="of:=IFERROR(VLOOKUP([$Masterlist.$P215];[$Datasheet.$B$1:.$AV$9809];8;FALSE());&quot;-&quot;)" office:value-type="float" office:value="1" calcext:value-type="float">
            <text:p>1</text:p>
          </table:table-cell>
          <table:table-cell table:style-name="ce159" table:formula="of:=IFERROR(VLOOKUP([$Masterlist.$P215];[$Datasheet.$B$1:.$AV$9809];9;FALSE());&quot;-&quot;)" office:value-type="float" office:value="1" calcext:value-type="float">
            <text:p>1</text:p>
          </table:table-cell>
          <table:table-cell table:style-name="ce159" table:formula="of:=IFERROR(VLOOKUP([$Masterlist.$P215];[$Datasheet.$B$1:.$AV$9809];10;FALSE());&quot;-&quot;)" office:value-type="float" office:value="1" calcext:value-type="float">
            <text:p>1</text:p>
          </table:table-cell>
          <table:table-cell table:style-name="ce159" table:formula="of:=IFERROR(VLOOKUP([$Masterlist.$P215];[$Datasheet.$B$1:.$AV$9809];11;FALSE());&quot;-&quot;)" office:value-type="float" office:value="1" calcext:value-type="float">
            <text:p>1</text:p>
          </table:table-cell>
          <table:table-cell table:style-name="ce159" table:formula="of:=IFERROR(VLOOKUP([$Masterlist.$P215];[$Datasheet.$B$1:.$AV$9809];12;FALSE());&quot;-&quot;)" office:value-type="float" office:value="1" calcext:value-type="float">
            <text:p>1</text:p>
          </table:table-cell>
          <table:table-cell table:style-name="ce159" table:formula="of:=IFERROR(VLOOKUP([$Masterlist.$P215];[$Datasheet.$B$1:.$AV$9809];13;FALSE());&quot;-&quot;)" office:value-type="float" office:value="1" calcext:value-type="float">
            <text:p>1</text:p>
          </table:table-cell>
          <table:table-cell table:style-name="ce159" table:formula="of:=IFERROR(VLOOKUP([$Masterlist.$P215];[$Datasheet.$B$1:.$AV$9809];14;FALSE());&quot;-&quot;)" office:value-type="float" office:value="1" calcext:value-type="float">
            <text:p>1</text:p>
          </table:table-cell>
          <table:table-cell table:style-name="ce159" table:formula="of:=IFERROR(VLOOKUP([$Masterlist.$P215];[$Datasheet.$B$1:.$AV$9809];15;FALSE());&quot;-&quot;)" office:value-type="float" office:value="1" calcext:value-type="float">
            <text:p>1</text:p>
          </table:table-cell>
          <table:table-cell table:style-name="ce159" table:formula="of:=IFERROR(VLOOKUP([$Masterlist.$P215];[$Datasheet.$B$1:.$AV$9809];16;FALSE());&quot;-&quot;)" office:value-type="float" office:value="0" calcext:value-type="float">
            <text:p/>
          </table:table-cell>
          <table:table-cell table:style-name="ce159" table:formula="of:=IFERROR(VLOOKUP([$Masterlist.$P215];[$Datasheet.$B$1:.$AV$9809];17;FALSE());&quot;-&quot;)" office:value-type="float" office:value="0" calcext:value-type="float">
            <text:p/>
          </table:table-cell>
          <table:table-cell table:style-name="ce159" table:formula="of:=IFERROR(VLOOKUP([$Masterlist.$P215];[$Datasheet.$B$1:.$AV$9809];18;FALSE());&quot;-&quot;)" office:value-type="float" office:value="0" calcext:value-type="float">
            <text:p/>
          </table:table-cell>
          <table:table-cell table:style-name="ce159" table:formula="of:=IFERROR(VLOOKUP([$Masterlist.$P215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A</text:p>
          </table:table-cell>
          <table:table-cell table:style-name="ce50" office:value-type="string" calcext:value-type="string">
            <text:p>yes</text:p>
          </table:table-cell>
          <table:table-cell table:style-name="ce50" table:number-columns-repeated="11"/>
          <table:table-cell table:style-name="ce92" office:value-type="string" calcext:value-type="string">
            <text:p>Cam 4 / Cam 5 / Cam 7</text:p>
          </table:table-cell>
          <table:table-cell table:style-name="ce8" office:value-type="string" calcext:value-type="string">
            <text:p>Gavin De Villiers</text:p>
          </table:table-cell>
          <table:table-cell table:style-name="ce13" table:formula="of:=IF(ISNUMBER(MATCH([.P216];[$Datasheet.$B$1:.$B$9809];0));&quot;✓&quot;;&quot;x&quot;)" office:value-type="string" office:string-value="✓" calcext:value-type="string">
            <text:p>✓</text:p>
          </table:table-cell>
          <table:table-cell table:style-name="ce159" table:formula="of:=IFERROR(VLOOKUP([$Masterlist.$P216];[$Datasheet.$B$1:.$AV$9809];2;FALSE());&quot;-&quot;)" office:value-type="float" office:value="1" calcext:value-type="float">
            <text:p>1</text:p>
          </table:table-cell>
          <table:table-cell table:style-name="ce159" table:formula="of:=IFERROR(VLOOKUP([$Masterlist.$P216];[$Datasheet.$B$1:.$AV$9809];3;FALSE());&quot;-&quot;)" office:value-type="float" office:value="0" calcext:value-type="float">
            <text:p>0</text:p>
          </table:table-cell>
          <table:table-cell table:style-name="ce159" table:formula="of:=IFERROR(VLOOKUP([$Masterlist.$P216];[$Datasheet.$B$1:.$AV$9809];4;FALSE());&quot;-&quot;)" office:value-type="float" office:value="0" calcext:value-type="float">
            <text:p>0</text:p>
          </table:table-cell>
          <table:table-cell table:style-name="ce159" table:formula="of:=IFERROR(VLOOKUP([$Masterlist.$P216];[$Datasheet.$B$1:.$AV$9809];5;FALSE());&quot;-&quot;)" office:value-type="float" office:value="1" calcext:value-type="float">
            <text:p>1</text:p>
          </table:table-cell>
          <table:table-cell table:style-name="ce204" table:formula="of:=IFERROR(VLOOKUP([$Masterlist.$P216];[$Datasheet.$B$1:.$AV$9809];6;FALSE());&quot;-&quot;)" office:value-type="float" office:value="1" calcext:value-type="float">
            <text:p>1</text:p>
          </table:table-cell>
          <table:table-cell table:style-name="ce159" table:formula="of:=IFERROR(VLOOKUP([$Masterlist.$P216];[$Datasheet.$B$1:.$AV$9809];7;FALSE());&quot;-&quot;)" office:value-type="float" office:value="0" calcext:value-type="float">
            <text:p>0</text:p>
          </table:table-cell>
          <table:table-cell table:style-name="ce159" table:formula="of:=IFERROR(VLOOKUP([$Masterlist.$P216];[$Datasheet.$B$1:.$AV$9809];8;FALSE());&quot;-&quot;)" office:value-type="float" office:value="0" calcext:value-type="float">
            <text:p>0</text:p>
          </table:table-cell>
          <table:table-cell table:style-name="ce159" table:formula="of:=IFERROR(VLOOKUP([$Masterlist.$P216];[$Datasheet.$B$1:.$AV$9809];9;FALSE());&quot;-&quot;)" office:value-type="float" office:value="1" calcext:value-type="float">
            <text:p>1</text:p>
          </table:table-cell>
          <table:table-cell table:style-name="ce159" table:formula="of:=IFERROR(VLOOKUP([$Masterlist.$P216];[$Datasheet.$B$1:.$AV$9809];10;FALSE());&quot;-&quot;)" office:value-type="float" office:value="1" calcext:value-type="float">
            <text:p>1</text:p>
          </table:table-cell>
          <table:table-cell table:style-name="ce159" table:formula="of:=IFERROR(VLOOKUP([$Masterlist.$P216];[$Datasheet.$B$1:.$AV$9809];11;FALSE());&quot;-&quot;)" office:value-type="float" office:value="1" calcext:value-type="float">
            <text:p>1</text:p>
          </table:table-cell>
          <table:table-cell table:style-name="ce159" table:formula="of:=IFERROR(VLOOKUP([$Masterlist.$P216];[$Datasheet.$B$1:.$AV$9809];12;FALSE());&quot;-&quot;)" office:value-type="float" office:value="0" calcext:value-type="float">
            <text:p>0</text:p>
          </table:table-cell>
          <table:table-cell table:style-name="ce159" table:formula="of:=IFERROR(VLOOKUP([$Masterlist.$P216];[$Datasheet.$B$1:.$AV$9809];13;FALSE());&quot;-&quot;)" office:value-type="float" office:value="1" calcext:value-type="float">
            <text:p>1</text:p>
          </table:table-cell>
          <table:table-cell table:style-name="ce159" table:formula="of:=IFERROR(VLOOKUP([$Masterlist.$P216];[$Datasheet.$B$1:.$AV$9809];14;FALSE());&quot;-&quot;)" office:value-type="float" office:value="1" calcext:value-type="float">
            <text:p>1</text:p>
          </table:table-cell>
          <table:table-cell table:style-name="ce159" table:formula="of:=IFERROR(VLOOKUP([$Masterlist.$P216];[$Datasheet.$B$1:.$AV$9809];15;FALSE());&quot;-&quot;)" office:value-type="float" office:value="0" calcext:value-type="float">
            <text:p>0</text:p>
          </table:table-cell>
          <table:table-cell table:style-name="ce159" table:formula="of:=IFERROR(VLOOKUP([$Masterlist.$P216];[$Datasheet.$B$1:.$AV$9809];16;FALSE());&quot;-&quot;)" office:value-type="float" office:value="0" calcext:value-type="float">
            <text:p/>
          </table:table-cell>
          <table:table-cell table:style-name="ce159" table:formula="of:=IFERROR(VLOOKUP([$Masterlist.$P216];[$Datasheet.$B$1:.$AV$9809];17;FALSE());&quot;-&quot;)" office:value-type="float" office:value="0" calcext:value-type="float">
            <text:p/>
          </table:table-cell>
          <table:table-cell table:style-name="ce159" table:formula="of:=IFERROR(VLOOKUP([$Masterlist.$P216];[$Datasheet.$B$1:.$AV$9809];18;FALSE());&quot;-&quot;)" office:value-type="float" office:value="0" calcext:value-type="float">
            <text:p/>
          </table:table-cell>
          <table:table-cell table:style-name="ce159" table:formula="of:=IFERROR(VLOOKUP([$Masterlist.$P216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office:value-type="string" calcext:value-type="string">
            <text:p>yes</text:p>
          </table:table-cell>
          <table:table-cell table:style-name="ce50" table:number-columns-repeated="11"/>
          <table:table-cell table:style-name="ce92" office:value-type="string" calcext:value-type="string">
            <text:p>Cam 1, Cam 3, Cam 4, Static Cam</text:p>
          </table:table-cell>
          <table:table-cell table:style-name="ce8" office:value-type="string" calcext:value-type="string">
            <text:p>Sean Botha</text:p>
          </table:table-cell>
          <table:table-cell table:style-name="ce13" table:formula="of:=IF(ISNUMBER(MATCH([.P217];[$Datasheet.$B$1:.$B$9809];0));&quot;✓&quot;;&quot;x&quot;)" office:value-type="string" office:string-value="✓" calcext:value-type="string">
            <text:p>✓</text:p>
          </table:table-cell>
          <table:table-cell table:style-name="ce159" table:formula="of:=IFERROR(VLOOKUP([$Masterlist.$P217];[$Datasheet.$B$1:.$AV$9809];2;FALSE());&quot;-&quot;)" office:value-type="float" office:value="0" calcext:value-type="float">
            <text:p>0</text:p>
          </table:table-cell>
          <table:table-cell table:style-name="ce159" table:formula="of:=IFERROR(VLOOKUP([$Masterlist.$P217];[$Datasheet.$B$1:.$AV$9809];3;FALSE());&quot;-&quot;)" office:value-type="float" office:value="1" calcext:value-type="float">
            <text:p>1</text:p>
          </table:table-cell>
          <table:table-cell table:style-name="ce159" table:formula="of:=IFERROR(VLOOKUP([$Masterlist.$P217];[$Datasheet.$B$1:.$AV$9809];4;FALSE());&quot;-&quot;)" office:value-type="float" office:value="0" calcext:value-type="float">
            <text:p>0</text:p>
          </table:table-cell>
          <table:table-cell table:style-name="ce159" table:formula="of:=IFERROR(VLOOKUP([$Masterlist.$P217];[$Datasheet.$B$1:.$AV$9809];5;FALSE());&quot;-&quot;)" office:value-type="float" office:value="1" calcext:value-type="float">
            <text:p>1</text:p>
          </table:table-cell>
          <table:table-cell table:style-name="ce204" table:formula="of:=IFERROR(VLOOKUP([$Masterlist.$P217];[$Datasheet.$B$1:.$AV$9809];6;FALSE());&quot;-&quot;)" office:value-type="float" office:value="0" calcext:value-type="float">
            <text:p>0</text:p>
          </table:table-cell>
          <table:table-cell table:style-name="ce159" table:formula="of:=IFERROR(VLOOKUP([$Masterlist.$P217];[$Datasheet.$B$1:.$AV$9809];7;FALSE());&quot;-&quot;)" office:value-type="float" office:value="1" calcext:value-type="float">
            <text:p>1</text:p>
          </table:table-cell>
          <table:table-cell table:style-name="ce159" table:formula="of:=IFERROR(VLOOKUP([$Masterlist.$P217];[$Datasheet.$B$1:.$AV$9809];8;FALSE());&quot;-&quot;)" office:value-type="float" office:value="0" calcext:value-type="float">
            <text:p>0</text:p>
          </table:table-cell>
          <table:table-cell table:style-name="ce159" table:formula="of:=IFERROR(VLOOKUP([$Masterlist.$P217];[$Datasheet.$B$1:.$AV$9809];9;FALSE());&quot;-&quot;)" office:value-type="float" office:value="1" calcext:value-type="float">
            <text:p>1</text:p>
          </table:table-cell>
          <table:table-cell table:style-name="ce159" table:formula="of:=IFERROR(VLOOKUP([$Masterlist.$P217];[$Datasheet.$B$1:.$AV$9809];10;FALSE());&quot;-&quot;)" office:value-type="float" office:value="0" calcext:value-type="float">
            <text:p>0</text:p>
          </table:table-cell>
          <table:table-cell table:style-name="ce159" table:formula="of:=IFERROR(VLOOKUP([$Masterlist.$P217];[$Datasheet.$B$1:.$AV$9809];11;FALSE());&quot;-&quot;)" office:value-type="float" office:value="1" calcext:value-type="float">
            <text:p>1</text:p>
          </table:table-cell>
          <table:table-cell table:style-name="ce159" table:formula="of:=IFERROR(VLOOKUP([$Masterlist.$P217];[$Datasheet.$B$1:.$AV$9809];12;FALSE());&quot;-&quot;)" office:value-type="float" office:value="0" calcext:value-type="float">
            <text:p>0</text:p>
          </table:table-cell>
          <table:table-cell table:style-name="ce159" table:formula="of:=IFERROR(VLOOKUP([$Masterlist.$P217];[$Datasheet.$B$1:.$AV$9809];13;FALSE());&quot;-&quot;)" office:value-type="float" office:value="1" calcext:value-type="float">
            <text:p>1</text:p>
          </table:table-cell>
          <table:table-cell table:style-name="ce159" table:formula="of:=IFERROR(VLOOKUP([$Masterlist.$P217];[$Datasheet.$B$1:.$AV$9809];14;FALSE());&quot;-&quot;)" office:value-type="float" office:value="0" calcext:value-type="float">
            <text:p>0</text:p>
          </table:table-cell>
          <table:table-cell table:style-name="ce159" table:formula="of:=IFERROR(VLOOKUP([$Masterlist.$P217];[$Datasheet.$B$1:.$AV$9809];15;FALSE());&quot;-&quot;)" office:value-type="float" office:value="1" calcext:value-type="float">
            <text:p>1</text:p>
          </table:table-cell>
          <table:table-cell table:style-name="ce159" table:formula="of:=IFERROR(VLOOKUP([$Masterlist.$P217];[$Datasheet.$B$1:.$AV$9809];16;FALSE());&quot;-&quot;)" office:value-type="float" office:value="0" calcext:value-type="float">
            <text:p/>
          </table:table-cell>
          <table:table-cell table:style-name="ce159" table:formula="of:=IFERROR(VLOOKUP([$Masterlist.$P217];[$Datasheet.$B$1:.$AV$9809];17;FALSE());&quot;-&quot;)" office:value-type="float" office:value="0" calcext:value-type="float">
            <text:p/>
          </table:table-cell>
          <table:table-cell table:style-name="ce159" table:formula="of:=IFERROR(VLOOKUP([$Masterlist.$P217];[$Datasheet.$B$1:.$AV$9809];18;FALSE());&quot;-&quot;)" office:value-type="float" office:value="0" calcext:value-type="float">
            <text:p/>
          </table:table-cell>
          <table:table-cell table:style-name="ce159" table:formula="of:=IFERROR(VLOOKUP([$Masterlist.$P217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office:value-type="string" calcext:value-type="string">
            <text:p>yes</text:p>
          </table:table-cell>
          <table:table-cell table:style-name="ce50" table:number-columns-repeated="11"/>
          <table:table-cell table:style-name="ce92" office:value-type="string" calcext:value-type="string">
            <text:p>Cam 4 / Cam 5 / Static Cam / Spider Cam</text:p>
          </table:table-cell>
          <table:table-cell table:style-name="ce8" office:value-type="string" calcext:value-type="string">
            <text:p>Malerato Mosia</text:p>
          </table:table-cell>
          <table:table-cell table:style-name="ce13" table:formula="of:=IF(ISNUMBER(MATCH([.P218];[$Datasheet.$B$1:.$B$9809];0));&quot;✓&quot;;&quot;x&quot;)" office:value-type="string" office:string-value="✓" calcext:value-type="string">
            <text:p>✓</text:p>
          </table:table-cell>
          <table:table-cell table:style-name="ce159" table:formula="of:=IFERROR(VLOOKUP([$Masterlist.$P218];[$Datasheet.$B$1:.$AV$9809];2;FALSE());&quot;-&quot;)" office:value-type="float" office:value="0" calcext:value-type="float">
            <text:p>0</text:p>
          </table:table-cell>
          <table:table-cell table:style-name="ce159" table:formula="of:=IFERROR(VLOOKUP([$Masterlist.$P218];[$Datasheet.$B$1:.$AV$9809];3;FALSE());&quot;-&quot;)" office:value-type="float" office:value="0" calcext:value-type="float">
            <text:p>0</text:p>
          </table:table-cell>
          <table:table-cell table:style-name="ce159" table:formula="of:=IFERROR(VLOOKUP([$Masterlist.$P218];[$Datasheet.$B$1:.$AV$9809];4;FALSE());&quot;-&quot;)" office:value-type="float" office:value="1" calcext:value-type="float">
            <text:p>1</text:p>
          </table:table-cell>
          <table:table-cell table:style-name="ce159" table:formula="of:=IFERROR(VLOOKUP([$Masterlist.$P218];[$Datasheet.$B$1:.$AV$9809];5;FALSE());&quot;-&quot;)" office:value-type="float" office:value="1" calcext:value-type="float">
            <text:p>1</text:p>
          </table:table-cell>
          <table:table-cell table:style-name="ce204" table:formula="of:=IFERROR(VLOOKUP([$Masterlist.$P218];[$Datasheet.$B$1:.$AV$9809];6;FALSE());&quot;-&quot;)" office:value-type="float" office:value="1" calcext:value-type="float">
            <text:p>1</text:p>
          </table:table-cell>
          <table:table-cell table:style-name="ce159" table:formula="of:=IFERROR(VLOOKUP([$Masterlist.$P218];[$Datasheet.$B$1:.$AV$9809];7;FALSE());&quot;-&quot;)" office:value-type="float" office:value="1" calcext:value-type="float">
            <text:p>1</text:p>
          </table:table-cell>
          <table:table-cell table:style-name="ce159" table:formula="of:=IFERROR(VLOOKUP([$Masterlist.$P218];[$Datasheet.$B$1:.$AV$9809];8;FALSE());&quot;-&quot;)" office:value-type="float" office:value="0" calcext:value-type="float">
            <text:p>0</text:p>
          </table:table-cell>
          <table:table-cell table:style-name="ce159" table:formula="of:=IFERROR(VLOOKUP([$Masterlist.$P218];[$Datasheet.$B$1:.$AV$9809];9;FALSE());&quot;-&quot;)" office:value-type="float" office:value="0" calcext:value-type="float">
            <text:p>0</text:p>
          </table:table-cell>
          <table:table-cell table:style-name="ce159" table:formula="of:=IFERROR(VLOOKUP([$Masterlist.$P218];[$Datasheet.$B$1:.$AV$9809];10;FALSE());&quot;-&quot;)" office:value-type="float" office:value="1" calcext:value-type="float">
            <text:p>1</text:p>
          </table:table-cell>
          <table:table-cell table:style-name="ce159" table:formula="of:=IFERROR(VLOOKUP([$Masterlist.$P218];[$Datasheet.$B$1:.$AV$9809];11;FALSE());&quot;-&quot;)" office:value-type="float" office:value="1" calcext:value-type="float">
            <text:p>1</text:p>
          </table:table-cell>
          <table:table-cell table:style-name="ce159" table:formula="of:=IFERROR(VLOOKUP([$Masterlist.$P218];[$Datasheet.$B$1:.$AV$9809];12;FALSE());&quot;-&quot;)" office:value-type="float" office:value="0" calcext:value-type="float">
            <text:p>0</text:p>
          </table:table-cell>
          <table:table-cell table:style-name="ce159" table:formula="of:=IFERROR(VLOOKUP([$Masterlist.$P218];[$Datasheet.$B$1:.$AV$9809];13;FALSE());&quot;-&quot;)" office:value-type="float" office:value="0" calcext:value-type="float">
            <text:p>0</text:p>
          </table:table-cell>
          <table:table-cell table:style-name="ce159" table:formula="of:=IFERROR(VLOOKUP([$Masterlist.$P218];[$Datasheet.$B$1:.$AV$9809];14;FALSE());&quot;-&quot;)" office:value-type="float" office:value="1" calcext:value-type="float">
            <text:p>1</text:p>
          </table:table-cell>
          <table:table-cell table:style-name="ce159" table:formula="of:=IFERROR(VLOOKUP([$Masterlist.$P218];[$Datasheet.$B$1:.$AV$9809];15;FALSE());&quot;-&quot;)" office:value-type="float" office:value="1" calcext:value-type="float">
            <text:p>1</text:p>
          </table:table-cell>
          <table:table-cell table:style-name="ce159" table:formula="of:=IFERROR(VLOOKUP([$Masterlist.$P218];[$Datasheet.$B$1:.$AV$9809];16;FALSE());&quot;-&quot;)" office:value-type="float" office:value="0" calcext:value-type="float">
            <text:p/>
          </table:table-cell>
          <table:table-cell table:style-name="ce159" table:formula="of:=IFERROR(VLOOKUP([$Masterlist.$P218];[$Datasheet.$B$1:.$AV$9809];17;FALSE());&quot;-&quot;)" office:value-type="float" office:value="0" calcext:value-type="float">
            <text:p/>
          </table:table-cell>
          <table:table-cell table:style-name="ce159" table:formula="of:=IFERROR(VLOOKUP([$Masterlist.$P218];[$Datasheet.$B$1:.$AV$9809];18;FALSE());&quot;-&quot;)" office:value-type="float" office:value="0" calcext:value-type="float">
            <text:p/>
          </table:table-cell>
          <table:table-cell table:style-name="ce159" table:formula="of:=IFERROR(VLOOKUP([$Masterlist.$P218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office:value-type="string" calcext:value-type="string">
            <text:p>yes</text:p>
          </table:table-cell>
          <table:table-cell table:style-name="ce50" table:number-columns-repeated="11"/>
          <table:table-cell table:style-name="ce92" office:value-type="string" calcext:value-type="string">
            <text:p>Cam 4 / Cam 5 / Cam 7 / Spider Cam, Static Cam</text:p>
          </table:table-cell>
          <table:table-cell table:style-name="ce8" office:value-type="string" calcext:value-type="string">
            <text:p>Ben Van Zyl</text:p>
          </table:table-cell>
          <table:table-cell table:style-name="ce13" table:formula="of:=IF(ISNUMBER(MATCH([.P219];[$Datasheet.$B$1:.$B$9809];0));&quot;✓&quot;;&quot;x&quot;)" office:value-type="string" office:string-value="✓" calcext:value-type="string">
            <text:p>✓</text:p>
          </table:table-cell>
          <table:table-cell table:style-name="ce159" table:formula="of:=IFERROR(VLOOKUP([$Masterlist.$P219];[$Datasheet.$B$1:.$AV$9809];2;FALSE());&quot;-&quot;)" office:value-type="float" office:value="0" calcext:value-type="float">
            <text:p>0</text:p>
          </table:table-cell>
          <table:table-cell table:style-name="ce159" table:formula="of:=IFERROR(VLOOKUP([$Masterlist.$P219];[$Datasheet.$B$1:.$AV$9809];3;FALSE());&quot;-&quot;)" office:value-type="float" office:value="1" calcext:value-type="float">
            <text:p>1</text:p>
          </table:table-cell>
          <table:table-cell table:style-name="ce159" table:formula="of:=IFERROR(VLOOKUP([$Masterlist.$P219];[$Datasheet.$B$1:.$AV$9809];4;FALSE());&quot;-&quot;)" office:value-type="float" office:value="0" calcext:value-type="float">
            <text:p>0</text:p>
          </table:table-cell>
          <table:table-cell table:style-name="ce159" table:formula="of:=IFERROR(VLOOKUP([$Masterlist.$P219];[$Datasheet.$B$1:.$AV$9809];5;FALSE());&quot;-&quot;)" office:value-type="float" office:value="1" calcext:value-type="float">
            <text:p>1</text:p>
          </table:table-cell>
          <table:table-cell table:style-name="ce204" table:formula="of:=IFERROR(VLOOKUP([$Masterlist.$P219];[$Datasheet.$B$1:.$AV$9809];6;FALSE());&quot;-&quot;)" office:value-type="float" office:value="0" calcext:value-type="float">
            <text:p>0</text:p>
          </table:table-cell>
          <table:table-cell table:style-name="ce159" table:formula="of:=IFERROR(VLOOKUP([$Masterlist.$P219];[$Datasheet.$B$1:.$AV$9809];7;FALSE());&quot;-&quot;)" office:value-type="float" office:value="1" calcext:value-type="float">
            <text:p>1</text:p>
          </table:table-cell>
          <table:table-cell table:style-name="ce159" table:formula="of:=IFERROR(VLOOKUP([$Masterlist.$P219];[$Datasheet.$B$1:.$AV$9809];8;FALSE());&quot;-&quot;)" office:value-type="float" office:value="0" calcext:value-type="float">
            <text:p>0</text:p>
          </table:table-cell>
          <table:table-cell table:style-name="ce159" table:formula="of:=IFERROR(VLOOKUP([$Masterlist.$P219];[$Datasheet.$B$1:.$AV$9809];9;FALSE());&quot;-&quot;)" office:value-type="float" office:value="1" calcext:value-type="float">
            <text:p>1</text:p>
          </table:table-cell>
          <table:table-cell table:style-name="ce159" table:formula="of:=IFERROR(VLOOKUP([$Masterlist.$P219];[$Datasheet.$B$1:.$AV$9809];10;FALSE());&quot;-&quot;)" office:value-type="float" office:value="0" calcext:value-type="float">
            <text:p>0</text:p>
          </table:table-cell>
          <table:table-cell table:style-name="ce159" table:formula="of:=IFERROR(VLOOKUP([$Masterlist.$P219];[$Datasheet.$B$1:.$AV$9809];11;FALSE());&quot;-&quot;)" office:value-type="float" office:value="1" calcext:value-type="float">
            <text:p>1</text:p>
          </table:table-cell>
          <table:table-cell table:style-name="ce159" table:formula="of:=IFERROR(VLOOKUP([$Masterlist.$P219];[$Datasheet.$B$1:.$AV$9809];12;FALSE());&quot;-&quot;)" office:value-type="float" office:value="0" calcext:value-type="float">
            <text:p>0</text:p>
          </table:table-cell>
          <table:table-cell table:style-name="ce159" table:formula="of:=IFERROR(VLOOKUP([$Masterlist.$P219];[$Datasheet.$B$1:.$AV$9809];13;FALSE());&quot;-&quot;)" office:value-type="float" office:value="1" calcext:value-type="float">
            <text:p>1</text:p>
          </table:table-cell>
          <table:table-cell table:style-name="ce159" table:formula="of:=IFERROR(VLOOKUP([$Masterlist.$P219];[$Datasheet.$B$1:.$AV$9809];14;FALSE());&quot;-&quot;)" office:value-type="float" office:value="0" calcext:value-type="float">
            <text:p>0</text:p>
          </table:table-cell>
          <table:table-cell table:style-name="ce159" table:formula="of:=IFERROR(VLOOKUP([$Masterlist.$P219];[$Datasheet.$B$1:.$AV$9809];15;FALSE());&quot;-&quot;)" office:value-type="float" office:value="1" calcext:value-type="float">
            <text:p>1</text:p>
          </table:table-cell>
          <table:table-cell table:style-name="ce159" table:formula="of:=IFERROR(VLOOKUP([$Masterlist.$P219];[$Datasheet.$B$1:.$AV$9809];16;FALSE());&quot;-&quot;)" office:value-type="float" office:value="0" calcext:value-type="float">
            <text:p/>
          </table:table-cell>
          <table:table-cell table:style-name="ce159" table:formula="of:=IFERROR(VLOOKUP([$Masterlist.$P219];[$Datasheet.$B$1:.$AV$9809];17;FALSE());&quot;-&quot;)" office:value-type="float" office:value="0" calcext:value-type="float">
            <text:p/>
          </table:table-cell>
          <table:table-cell table:style-name="ce159" table:formula="of:=IFERROR(VLOOKUP([$Masterlist.$P219];[$Datasheet.$B$1:.$AV$9809];18;FALSE());&quot;-&quot;)" office:value-type="float" office:value="0" calcext:value-type="float">
            <text:p/>
          </table:table-cell>
          <table:table-cell table:style-name="ce159" table:formula="of:=IFERROR(VLOOKUP([$Masterlist.$P219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AL</text:p>
          </table:table-cell>
          <table:table-cell table:style-name="ce50" office:value-type="string" calcext:value-type="string">
            <text:p>yes</text:p>
          </table:table-cell>
          <table:table-cell table:style-name="ce50" table:number-columns-repeated="11"/>
          <table:table-cell table:style-name="ce97" office:value-type="string" calcext:value-type="string">
            <text:p>Cam 1 / Cam 3 / Cam 4 / Spider Cam, Static Cam</text:p>
          </table:table-cell>
          <table:table-cell table:style-name="ce8" office:value-type="string" calcext:value-type="string">
            <text:p>Gerrie Moolman</text:p>
          </table:table-cell>
          <table:table-cell table:style-name="ce13" table:formula="of:=IF(ISNUMBER(MATCH([.P220];[$Datasheet.$B$1:.$B$9809];0));&quot;✓&quot;;&quot;x&quot;)" office:value-type="string" office:string-value="✓" calcext:value-type="string">
            <text:p>✓</text:p>
          </table:table-cell>
          <table:table-cell table:style-name="ce159" table:formula="of:=IFERROR(VLOOKUP([$Masterlist.$P220];[$Datasheet.$B$1:.$AV$9809];2;FALSE());&quot;-&quot;)" office:value-type="float" office:value="0" calcext:value-type="float">
            <text:p>0</text:p>
          </table:table-cell>
          <table:table-cell table:style-name="ce159" table:formula="of:=IFERROR(VLOOKUP([$Masterlist.$P220];[$Datasheet.$B$1:.$AV$9809];3;FALSE());&quot;-&quot;)" office:value-type="float" office:value="0" calcext:value-type="float">
            <text:p>0</text:p>
          </table:table-cell>
          <table:table-cell table:style-name="ce159" table:formula="of:=IFERROR(VLOOKUP([$Masterlist.$P220];[$Datasheet.$B$1:.$AV$9809];4;FALSE());&quot;-&quot;)" office:value-type="float" office:value="1" calcext:value-type="float">
            <text:p>1</text:p>
          </table:table-cell>
          <table:table-cell table:style-name="ce159" table:formula="of:=IFERROR(VLOOKUP([$Masterlist.$P220];[$Datasheet.$B$1:.$AV$9809];5;FALSE());&quot;-&quot;)" office:value-type="float" office:value="1" calcext:value-type="float">
            <text:p>1</text:p>
          </table:table-cell>
          <table:table-cell table:style-name="ce204" table:formula="of:=IFERROR(VLOOKUP([$Masterlist.$P220];[$Datasheet.$B$1:.$AV$9809];6;FALSE());&quot;-&quot;)" office:value-type="float" office:value="1" calcext:value-type="float">
            <text:p>1</text:p>
          </table:table-cell>
          <table:table-cell table:style-name="ce159" table:formula="of:=IFERROR(VLOOKUP([$Masterlist.$P220];[$Datasheet.$B$1:.$AV$9809];7;FALSE());&quot;-&quot;)" office:value-type="float" office:value="1" calcext:value-type="float">
            <text:p>1</text:p>
          </table:table-cell>
          <table:table-cell table:style-name="ce159" table:formula="of:=IFERROR(VLOOKUP([$Masterlist.$P220];[$Datasheet.$B$1:.$AV$9809];8;FALSE());&quot;-&quot;)" office:value-type="float" office:value="0" calcext:value-type="float">
            <text:p>0</text:p>
          </table:table-cell>
          <table:table-cell table:style-name="ce159" table:formula="of:=IFERROR(VLOOKUP([$Masterlist.$P220];[$Datasheet.$B$1:.$AV$9809];9;FALSE());&quot;-&quot;)" office:value-type="float" office:value="0" calcext:value-type="float">
            <text:p>0</text:p>
          </table:table-cell>
          <table:table-cell table:style-name="ce159" table:formula="of:=IFERROR(VLOOKUP([$Masterlist.$P220];[$Datasheet.$B$1:.$AV$9809];10;FALSE());&quot;-&quot;)" office:value-type="float" office:value="0" calcext:value-type="float">
            <text:p>0</text:p>
          </table:table-cell>
          <table:table-cell table:style-name="ce159" table:formula="of:=IFERROR(VLOOKUP([$Masterlist.$P220];[$Datasheet.$B$1:.$AV$9809];11;FALSE());&quot;-&quot;)" office:value-type="float" office:value="0" calcext:value-type="float">
            <text:p>0</text:p>
          </table:table-cell>
          <table:table-cell table:style-name="ce159" table:formula="of:=IFERROR(VLOOKUP([$Masterlist.$P220];[$Datasheet.$B$1:.$AV$9809];12;FALSE());&quot;-&quot;)" office:value-type="float" office:value="0" calcext:value-type="float">
            <text:p>0</text:p>
          </table:table-cell>
          <table:table-cell table:style-name="ce159" table:formula="of:=IFERROR(VLOOKUP([$Masterlist.$P220];[$Datasheet.$B$1:.$AV$9809];13;FALSE());&quot;-&quot;)" office:value-type="float" office:value="0" calcext:value-type="float">
            <text:p>0</text:p>
          </table:table-cell>
          <table:table-cell table:style-name="ce159" table:formula="of:=IFERROR(VLOOKUP([$Masterlist.$P220];[$Datasheet.$B$1:.$AV$9809];14;FALSE());&quot;-&quot;)" office:value-type="float" office:value="1" calcext:value-type="float">
            <text:p>1</text:p>
          </table:table-cell>
          <table:table-cell table:style-name="ce159" table:formula="of:=IFERROR(VLOOKUP([$Masterlist.$P220];[$Datasheet.$B$1:.$AV$9809];15;FALSE());&quot;-&quot;)" office:value-type="float" office:value="1" calcext:value-type="float">
            <text:p>1</text:p>
          </table:table-cell>
          <table:table-cell table:style-name="ce159" table:formula="of:=IFERROR(VLOOKUP([$Masterlist.$P220];[$Datasheet.$B$1:.$AV$9809];16;FALSE());&quot;-&quot;)" office:value-type="float" office:value="0" calcext:value-type="float">
            <text:p/>
          </table:table-cell>
          <table:table-cell table:style-name="ce159" table:formula="of:=IFERROR(VLOOKUP([$Masterlist.$P220];[$Datasheet.$B$1:.$AV$9809];17;FALSE());&quot;-&quot;)" office:value-type="float" office:value="0" calcext:value-type="float">
            <text:p/>
          </table:table-cell>
          <table:table-cell table:style-name="ce159" table:formula="of:=IFERROR(VLOOKUP([$Masterlist.$P220];[$Datasheet.$B$1:.$AV$9809];18;FALSE());&quot;-&quot;)" office:value-type="float" office:value="0" calcext:value-type="float">
            <text:p/>
          </table:table-cell>
          <table:table-cell table:style-name="ce159" table:formula="of:=IFERROR(VLOOKUP([$Masterlist.$P220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office:value-type="string" calcext:value-type="string">
            <text:p>yes</text:p>
          </table:table-cell>
          <table:table-cell table:style-name="ce50" table:number-columns-repeated="11"/>
          <table:table-cell table:style-name="ce92" office:value-type="string" calcext:value-type="string">
            <text:p>Cam 4 / Cam 5 / Cam 7, Static Cam</text:p>
          </table:table-cell>
          <table:table-cell table:style-name="ce97" office:value-type="string" calcext:value-type="string">
            <text:p>Christo Meyer</text:p>
          </table:table-cell>
          <table:table-cell table:style-name="ce13" table:formula="of:=IF(ISNUMBER(MATCH([.P221];[$Datasheet.$B$1:.$B$9809];0));&quot;✓&quot;;&quot;x&quot;)" office:value-type="string" office:string-value="x" calcext:value-type="string">
            <text:p>x</text:p>
          </table:table-cell>
          <table:table-cell table:style-name="ce159" table:formula="of:=IFERROR(VLOOKUP([$Masterlist.$P221];[$Datasheet.$B$1:.$AV$9809];2;FALSE());&quot;-&quot;)" office:value-type="string" office:string-value="-" calcext:value-type="string">
            <text:p>-</text:p>
          </table:table-cell>
          <table:table-cell table:style-name="ce159" table:formula="of:=IFERROR(VLOOKUP([$Masterlist.$P221];[$Datasheet.$B$1:.$AV$9809];3;FALSE());&quot;-&quot;)" office:value-type="string" office:string-value="-" calcext:value-type="string">
            <text:p>-</text:p>
          </table:table-cell>
          <table:table-cell table:style-name="ce159" table:formula="of:=IFERROR(VLOOKUP([$Masterlist.$P221];[$Datasheet.$B$1:.$AV$9809];4;FALSE());&quot;-&quot;)" office:value-type="string" office:string-value="-" calcext:value-type="string">
            <text:p>-</text:p>
          </table:table-cell>
          <table:table-cell table:style-name="ce159" table:formula="of:=IFERROR(VLOOKUP([$Masterlist.$P221];[$Datasheet.$B$1:.$AV$9809];5;FALSE());&quot;-&quot;)" office:value-type="string" office:string-value="-" calcext:value-type="string">
            <text:p>-</text:p>
          </table:table-cell>
          <table:table-cell table:style-name="ce204" table:formula="of:=IFERROR(VLOOKUP([$Masterlist.$P221];[$Datasheet.$B$1:.$AV$9809];6;FALSE());&quot;-&quot;)" office:value-type="string" office:string-value="-" calcext:value-type="string">
            <text:p>-</text:p>
          </table:table-cell>
          <table:table-cell table:style-name="ce159" table:formula="of:=IFERROR(VLOOKUP([$Masterlist.$P221];[$Datasheet.$B$1:.$AV$9809];7;FALSE());&quot;-&quot;)" office:value-type="string" office:string-value="-" calcext:value-type="string">
            <text:p>-</text:p>
          </table:table-cell>
          <table:table-cell table:style-name="ce159" table:formula="of:=IFERROR(VLOOKUP([$Masterlist.$P221];[$Datasheet.$B$1:.$AV$9809];8;FALSE());&quot;-&quot;)" office:value-type="string" office:string-value="-" calcext:value-type="string">
            <text:p>-</text:p>
          </table:table-cell>
          <table:table-cell table:style-name="ce159" table:formula="of:=IFERROR(VLOOKUP([$Masterlist.$P221];[$Datasheet.$B$1:.$AV$9809];9;FALSE());&quot;-&quot;)" office:value-type="string" office:string-value="-" calcext:value-type="string">
            <text:p>-</text:p>
          </table:table-cell>
          <table:table-cell table:style-name="ce159" table:formula="of:=IFERROR(VLOOKUP([$Masterlist.$P221];[$Datasheet.$B$1:.$AV$9809];10;FALSE());&quot;-&quot;)" office:value-type="string" office:string-value="-" calcext:value-type="string">
            <text:p>-</text:p>
          </table:table-cell>
          <table:table-cell table:style-name="ce159" table:formula="of:=IFERROR(VLOOKUP([$Masterlist.$P221];[$Datasheet.$B$1:.$AV$9809];11;FALSE());&quot;-&quot;)" office:value-type="string" office:string-value="-" calcext:value-type="string">
            <text:p>-</text:p>
          </table:table-cell>
          <table:table-cell table:style-name="ce159" table:formula="of:=IFERROR(VLOOKUP([$Masterlist.$P221];[$Datasheet.$B$1:.$AV$9809];12;FALSE());&quot;-&quot;)" office:value-type="string" office:string-value="-" calcext:value-type="string">
            <text:p>-</text:p>
          </table:table-cell>
          <table:table-cell table:style-name="ce159" table:formula="of:=IFERROR(VLOOKUP([$Masterlist.$P221];[$Datasheet.$B$1:.$AV$9809];13;FALSE());&quot;-&quot;)" office:value-type="string" office:string-value="-" calcext:value-type="string">
            <text:p>-</text:p>
          </table:table-cell>
          <table:table-cell table:style-name="ce159" table:formula="of:=IFERROR(VLOOKUP([$Masterlist.$P221];[$Datasheet.$B$1:.$AV$9809];14;FALSE());&quot;-&quot;)" office:value-type="string" office:string-value="-" calcext:value-type="string">
            <text:p>-</text:p>
          </table:table-cell>
          <table:table-cell table:style-name="ce159" table:formula="of:=IFERROR(VLOOKUP([$Masterlist.$P221];[$Datasheet.$B$1:.$AV$9809];15;FALSE());&quot;-&quot;)" office:value-type="string" office:string-value="-" calcext:value-type="string">
            <text:p>-</text:p>
          </table:table-cell>
          <table:table-cell table:style-name="ce159" table:formula="of:=IFERROR(VLOOKUP([$Masterlist.$P221];[$Datasheet.$B$1:.$AV$9809];16;FALSE());&quot;-&quot;)" office:value-type="string" office:string-value="-" calcext:value-type="string">
            <text:p>-</text:p>
          </table:table-cell>
          <table:table-cell table:style-name="ce159" table:formula="of:=IFERROR(VLOOKUP([$Masterlist.$P221];[$Datasheet.$B$1:.$AV$9809];17;FALSE());&quot;-&quot;)" office:value-type="string" office:string-value="-" calcext:value-type="string">
            <text:p>-</text:p>
          </table:table-cell>
          <table:table-cell table:style-name="ce159" table:formula="of:=IFERROR(VLOOKUP([$Masterlist.$P221];[$Datasheet.$B$1:.$AV$9809];18;FALSE());&quot;-&quot;)" office:value-type="string" office:string-value="-" calcext:value-type="string">
            <text:p>-</text:p>
          </table:table-cell>
          <table:table-cell table:style-name="ce159" table:formula="of:=IFERROR(VLOOKUP([$Masterlist.$P221];[$Datasheet.$B$1:.$AV$9809];19;FALSE());&quot;-&quot;)" office:value-type="string" office:string-value="-" calcext:value-type="string">
            <text:p>-</text:p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office:value-type="string" calcext:value-type="string">
            <text:p>yes</text:p>
          </table:table-cell>
          <table:table-cell table:style-name="ce50" table:number-columns-repeated="11"/>
          <table:table-cell table:style-name="ce92" office:value-type="string" calcext:value-type="string">
            <text:p>Cam 4 / Cam 7</text:p>
          </table:table-cell>
          <table:table-cell table:style-name="ce8" office:value-type="string" calcext:value-type="string">
            <text:p>Anke Van Rooyen</text:p>
          </table:table-cell>
          <table:table-cell table:style-name="ce13" table:formula="of:=IF(ISNUMBER(MATCH([.P222];[$Datasheet.$B$1:.$B$9809];0));&quot;✓&quot;;&quot;x&quot;)" office:value-type="string" office:string-value="✓" calcext:value-type="string">
            <text:p>✓</text:p>
          </table:table-cell>
          <table:table-cell table:style-name="ce159" table:formula="of:=IFERROR(VLOOKUP([$Masterlist.$P222];[$Datasheet.$B$1:.$AV$9809];2;FALSE());&quot;-&quot;)" office:value-type="float" office:value="0" calcext:value-type="float">
            <text:p>0</text:p>
          </table:table-cell>
          <table:table-cell table:style-name="ce159" table:formula="of:=IFERROR(VLOOKUP([$Masterlist.$P222];[$Datasheet.$B$1:.$AV$9809];3;FALSE());&quot;-&quot;)" office:value-type="float" office:value="0" calcext:value-type="float">
            <text:p>0</text:p>
          </table:table-cell>
          <table:table-cell table:style-name="ce159" table:formula="of:=IFERROR(VLOOKUP([$Masterlist.$P222];[$Datasheet.$B$1:.$AV$9809];4;FALSE());&quot;-&quot;)" office:value-type="float" office:value="0" calcext:value-type="float">
            <text:p>0</text:p>
          </table:table-cell>
          <table:table-cell table:style-name="ce159" table:formula="of:=IFERROR(VLOOKUP([$Masterlist.$P222];[$Datasheet.$B$1:.$AV$9809];5;FALSE());&quot;-&quot;)" office:value-type="float" office:value="1" calcext:value-type="float">
            <text:p>1</text:p>
          </table:table-cell>
          <table:table-cell table:style-name="ce204" table:formula="of:=IFERROR(VLOOKUP([$Masterlist.$P222];[$Datasheet.$B$1:.$AV$9809];6;FALSE());&quot;-&quot;)" office:value-type="float" office:value="0" calcext:value-type="float">
            <text:p>0</text:p>
          </table:table-cell>
          <table:table-cell table:style-name="ce159" table:formula="of:=IFERROR(VLOOKUP([$Masterlist.$P222];[$Datasheet.$B$1:.$AV$9809];7;FALSE());&quot;-&quot;)" office:value-type="float" office:value="0" calcext:value-type="float">
            <text:p>0</text:p>
          </table:table-cell>
          <table:table-cell table:style-name="ce159" table:formula="of:=IFERROR(VLOOKUP([$Masterlist.$P222];[$Datasheet.$B$1:.$AV$9809];8;FALSE());&quot;-&quot;)" office:value-type="float" office:value="0" calcext:value-type="float">
            <text:p>0</text:p>
          </table:table-cell>
          <table:table-cell table:style-name="ce159" table:formula="of:=IFERROR(VLOOKUP([$Masterlist.$P222];[$Datasheet.$B$1:.$AV$9809];9;FALSE());&quot;-&quot;)" office:value-type="float" office:value="0" calcext:value-type="float">
            <text:p>0</text:p>
          </table:table-cell>
          <table:table-cell table:style-name="ce159" table:formula="of:=IFERROR(VLOOKUP([$Masterlist.$P222];[$Datasheet.$B$1:.$AV$9809];10;FALSE());&quot;-&quot;)" office:value-type="float" office:value="0" calcext:value-type="float">
            <text:p>0</text:p>
          </table:table-cell>
          <table:table-cell table:style-name="ce159" table:formula="of:=IFERROR(VLOOKUP([$Masterlist.$P222];[$Datasheet.$B$1:.$AV$9809];11;FALSE());&quot;-&quot;)" office:value-type="float" office:value="0" calcext:value-type="float">
            <text:p>0</text:p>
          </table:table-cell>
          <table:table-cell table:style-name="ce159" table:formula="of:=IFERROR(VLOOKUP([$Masterlist.$P222];[$Datasheet.$B$1:.$AV$9809];12;FALSE());&quot;-&quot;)" office:value-type="float" office:value="0" calcext:value-type="float">
            <text:p>0</text:p>
          </table:table-cell>
          <table:table-cell table:style-name="ce159" table:formula="of:=IFERROR(VLOOKUP([$Masterlist.$P222];[$Datasheet.$B$1:.$AV$9809];13;FALSE());&quot;-&quot;)" office:value-type="float" office:value="0" calcext:value-type="float">
            <text:p>0</text:p>
          </table:table-cell>
          <table:table-cell table:style-name="ce159" table:formula="of:=IFERROR(VLOOKUP([$Masterlist.$P222];[$Datasheet.$B$1:.$AV$9809];14;FALSE());&quot;-&quot;)" office:value-type="float" office:value="0" calcext:value-type="float">
            <text:p>0</text:p>
          </table:table-cell>
          <table:table-cell table:style-name="ce159" table:formula="of:=IFERROR(VLOOKUP([$Masterlist.$P222];[$Datasheet.$B$1:.$AV$9809];15;FALSE());&quot;-&quot;)" office:value-type="float" office:value="1" calcext:value-type="float">
            <text:p>1</text:p>
          </table:table-cell>
          <table:table-cell table:style-name="ce159" table:formula="of:=IFERROR(VLOOKUP([$Masterlist.$P222];[$Datasheet.$B$1:.$AV$9809];16;FALSE());&quot;-&quot;)" office:value-type="float" office:value="0" calcext:value-type="float">
            <text:p/>
          </table:table-cell>
          <table:table-cell table:style-name="ce159" table:formula="of:=IFERROR(VLOOKUP([$Masterlist.$P222];[$Datasheet.$B$1:.$AV$9809];17;FALSE());&quot;-&quot;)" office:value-type="float" office:value="0" calcext:value-type="float">
            <text:p/>
          </table:table-cell>
          <table:table-cell table:style-name="ce159" table:formula="of:=IFERROR(VLOOKUP([$Masterlist.$P222];[$Datasheet.$B$1:.$AV$9809];18;FALSE());&quot;-&quot;)" office:value-type="float" office:value="0" calcext:value-type="float">
            <text:p/>
          </table:table-cell>
          <table:table-cell table:style-name="ce159" table:formula="of:=IFERROR(VLOOKUP([$Masterlist.$P222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office:value-type="string" calcext:value-type="string">
            <text:p>yes</text:p>
          </table:table-cell>
          <table:table-cell table:style-name="ce50" table:number-columns-repeated="11"/>
          <table:table-cell table:style-name="ce92" office:value-type="string" calcext:value-type="string">
            <text:p>Cam 4 / Cam 5 / Cam 7</text:p>
          </table:table-cell>
          <table:table-cell table:style-name="ce8" office:value-type="string" calcext:value-type="string">
            <text:p>Rynhardt Nel</text:p>
          </table:table-cell>
          <table:table-cell table:style-name="ce13" table:formula="of:=IF(ISNUMBER(MATCH([.P223];[$Datasheet.$B$1:.$B$9809];0));&quot;✓&quot;;&quot;x&quot;)" office:value-type="string" office:string-value="✓" calcext:value-type="string">
            <text:p>✓</text:p>
          </table:table-cell>
          <table:table-cell table:style-name="ce159" table:formula="of:=IFERROR(VLOOKUP([$Masterlist.$P223];[$Datasheet.$B$1:.$AV$9809];2;FALSE());&quot;-&quot;)" office:value-type="float" office:value="0" calcext:value-type="float">
            <text:p>0</text:p>
          </table:table-cell>
          <table:table-cell table:style-name="ce159" table:formula="of:=IFERROR(VLOOKUP([$Masterlist.$P223];[$Datasheet.$B$1:.$AV$9809];3;FALSE());&quot;-&quot;)" office:value-type="float" office:value="0" calcext:value-type="float">
            <text:p>0</text:p>
          </table:table-cell>
          <table:table-cell table:style-name="ce159" table:formula="of:=IFERROR(VLOOKUP([$Masterlist.$P223];[$Datasheet.$B$1:.$AV$9809];4;FALSE());&quot;-&quot;)" office:value-type="float" office:value="0" calcext:value-type="float">
            <text:p>0</text:p>
          </table:table-cell>
          <table:table-cell table:style-name="ce159" table:formula="of:=IFERROR(VLOOKUP([$Masterlist.$P223];[$Datasheet.$B$1:.$AV$9809];5;FALSE());&quot;-&quot;)" office:value-type="float" office:value="1" calcext:value-type="float">
            <text:p>1</text:p>
          </table:table-cell>
          <table:table-cell table:style-name="ce204" table:formula="of:=IFERROR(VLOOKUP([$Masterlist.$P223];[$Datasheet.$B$1:.$AV$9809];6;FALSE());&quot;-&quot;)" office:value-type="float" office:value="0" calcext:value-type="float">
            <text:p>0</text:p>
          </table:table-cell>
          <table:table-cell table:style-name="ce159" table:formula="of:=IFERROR(VLOOKUP([$Masterlist.$P223];[$Datasheet.$B$1:.$AV$9809];7;FALSE());&quot;-&quot;)" office:value-type="float" office:value="0" calcext:value-type="float">
            <text:p>0</text:p>
          </table:table-cell>
          <table:table-cell table:style-name="ce159" table:formula="of:=IFERROR(VLOOKUP([$Masterlist.$P223];[$Datasheet.$B$1:.$AV$9809];8;FALSE());&quot;-&quot;)" office:value-type="float" office:value="0" calcext:value-type="float">
            <text:p>0</text:p>
          </table:table-cell>
          <table:table-cell table:style-name="ce159" table:formula="of:=IFERROR(VLOOKUP([$Masterlist.$P223];[$Datasheet.$B$1:.$AV$9809];9;FALSE());&quot;-&quot;)" office:value-type="float" office:value="1" calcext:value-type="float">
            <text:p>1</text:p>
          </table:table-cell>
          <table:table-cell table:style-name="ce159" table:formula="of:=IFERROR(VLOOKUP([$Masterlist.$P223];[$Datasheet.$B$1:.$AV$9809];10;FALSE());&quot;-&quot;)" office:value-type="float" office:value="0" calcext:value-type="float">
            <text:p>0</text:p>
          </table:table-cell>
          <table:table-cell table:style-name="ce159" table:formula="of:=IFERROR(VLOOKUP([$Masterlist.$P223];[$Datasheet.$B$1:.$AV$9809];11;FALSE());&quot;-&quot;)" office:value-type="float" office:value="0" calcext:value-type="float">
            <text:p>0</text:p>
          </table:table-cell>
          <table:table-cell table:style-name="ce159" table:formula="of:=IFERROR(VLOOKUP([$Masterlist.$P223];[$Datasheet.$B$1:.$AV$9809];12;FALSE());&quot;-&quot;)" office:value-type="float" office:value="1" calcext:value-type="float">
            <text:p>1</text:p>
          </table:table-cell>
          <table:table-cell table:style-name="ce159" table:formula="of:=IFERROR(VLOOKUP([$Masterlist.$P223];[$Datasheet.$B$1:.$AV$9809];13;FALSE());&quot;-&quot;)" office:value-type="float" office:value="0" calcext:value-type="float">
            <text:p>0</text:p>
          </table:table-cell>
          <table:table-cell table:style-name="ce159" table:formula="of:=IFERROR(VLOOKUP([$Masterlist.$P223];[$Datasheet.$B$1:.$AV$9809];14;FALSE());&quot;-&quot;)" office:value-type="float" office:value="1" calcext:value-type="float">
            <text:p>1</text:p>
          </table:table-cell>
          <table:table-cell table:style-name="ce159" table:formula="of:=IFERROR(VLOOKUP([$Masterlist.$P223];[$Datasheet.$B$1:.$AV$9809];15;FALSE());&quot;-&quot;)" office:value-type="float" office:value="1" calcext:value-type="float">
            <text:p>1</text:p>
          </table:table-cell>
          <table:table-cell table:style-name="ce159" table:formula="of:=IFERROR(VLOOKUP([$Masterlist.$P223];[$Datasheet.$B$1:.$AV$9809];16;FALSE());&quot;-&quot;)" office:value-type="float" office:value="0" calcext:value-type="float">
            <text:p/>
          </table:table-cell>
          <table:table-cell table:style-name="ce159" table:formula="of:=IFERROR(VLOOKUP([$Masterlist.$P223];[$Datasheet.$B$1:.$AV$9809];17;FALSE());&quot;-&quot;)" office:value-type="float" office:value="0" calcext:value-type="float">
            <text:p/>
          </table:table-cell>
          <table:table-cell table:style-name="ce159" table:formula="of:=IFERROR(VLOOKUP([$Masterlist.$P223];[$Datasheet.$B$1:.$AV$9809];18;FALSE());&quot;-&quot;)" office:value-type="float" office:value="0" calcext:value-type="float">
            <text:p/>
          </table:table-cell>
          <table:table-cell table:style-name="ce159" table:formula="of:=IFERROR(VLOOKUP([$Masterlist.$P223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office:value-type="string" calcext:value-type="string">
            <text:p>yes</text:p>
          </table:table-cell>
          <table:table-cell table:style-name="ce50" table:number-columns-repeated="11"/>
          <table:table-cell table:style-name="ce92" office:value-type="string" calcext:value-type="string">
            <text:p>Cam 4 / Cam 5 / Cam 7</text:p>
          </table:table-cell>
          <table:table-cell table:style-name="ce8" office:value-type="string" calcext:value-type="string">
            <text:p>Marcel Duvenhage</text:p>
          </table:table-cell>
          <table:table-cell table:style-name="ce13" table:formula="of:=IF(ISNUMBER(MATCH([.P224];[$Datasheet.$B$1:.$B$9809];0));&quot;✓&quot;;&quot;x&quot;)" office:value-type="string" office:string-value="x" calcext:value-type="string">
            <text:p>x</text:p>
          </table:table-cell>
          <table:table-cell table:style-name="ce159" table:formula="of:=IFERROR(VLOOKUP([$Masterlist.$P224];[$Datasheet.$B$1:.$AV$9809];2;FALSE());&quot;-&quot;)" office:value-type="string" office:string-value="-" calcext:value-type="string">
            <text:p>-</text:p>
          </table:table-cell>
          <table:table-cell table:style-name="ce159" table:formula="of:=IFERROR(VLOOKUP([$Masterlist.$P224];[$Datasheet.$B$1:.$AV$9809];3;FALSE());&quot;-&quot;)" office:value-type="string" office:string-value="-" calcext:value-type="string">
            <text:p>-</text:p>
          </table:table-cell>
          <table:table-cell table:style-name="ce159" table:formula="of:=IFERROR(VLOOKUP([$Masterlist.$P224];[$Datasheet.$B$1:.$AV$9809];4;FALSE());&quot;-&quot;)" office:value-type="string" office:string-value="-" calcext:value-type="string">
            <text:p>-</text:p>
          </table:table-cell>
          <table:table-cell table:style-name="ce159" table:formula="of:=IFERROR(VLOOKUP([$Masterlist.$P224];[$Datasheet.$B$1:.$AV$9809];5;FALSE());&quot;-&quot;)" office:value-type="string" office:string-value="-" calcext:value-type="string">
            <text:p>-</text:p>
          </table:table-cell>
          <table:table-cell table:style-name="ce204" table:formula="of:=IFERROR(VLOOKUP([$Masterlist.$P224];[$Datasheet.$B$1:.$AV$9809];6;FALSE());&quot;-&quot;)" office:value-type="string" office:string-value="-" calcext:value-type="string">
            <text:p>-</text:p>
          </table:table-cell>
          <table:table-cell table:style-name="ce159" table:formula="of:=IFERROR(VLOOKUP([$Masterlist.$P224];[$Datasheet.$B$1:.$AV$9809];7;FALSE());&quot;-&quot;)" office:value-type="string" office:string-value="-" calcext:value-type="string">
            <text:p>-</text:p>
          </table:table-cell>
          <table:table-cell table:style-name="ce159" table:formula="of:=IFERROR(VLOOKUP([$Masterlist.$P224];[$Datasheet.$B$1:.$AV$9809];8;FALSE());&quot;-&quot;)" office:value-type="string" office:string-value="-" calcext:value-type="string">
            <text:p>-</text:p>
          </table:table-cell>
          <table:table-cell table:style-name="ce159" table:formula="of:=IFERROR(VLOOKUP([$Masterlist.$P224];[$Datasheet.$B$1:.$AV$9809];9;FALSE());&quot;-&quot;)" office:value-type="string" office:string-value="-" calcext:value-type="string">
            <text:p>-</text:p>
          </table:table-cell>
          <table:table-cell table:style-name="ce159" table:formula="of:=IFERROR(VLOOKUP([$Masterlist.$P224];[$Datasheet.$B$1:.$AV$9809];10;FALSE());&quot;-&quot;)" office:value-type="string" office:string-value="-" calcext:value-type="string">
            <text:p>-</text:p>
          </table:table-cell>
          <table:table-cell table:style-name="ce159" table:formula="of:=IFERROR(VLOOKUP([$Masterlist.$P224];[$Datasheet.$B$1:.$AV$9809];11;FALSE());&quot;-&quot;)" office:value-type="string" office:string-value="-" calcext:value-type="string">
            <text:p>-</text:p>
          </table:table-cell>
          <table:table-cell table:style-name="ce159" table:formula="of:=IFERROR(VLOOKUP([$Masterlist.$P224];[$Datasheet.$B$1:.$AV$9809];12;FALSE());&quot;-&quot;)" office:value-type="string" office:string-value="-" calcext:value-type="string">
            <text:p>-</text:p>
          </table:table-cell>
          <table:table-cell table:style-name="ce159" table:formula="of:=IFERROR(VLOOKUP([$Masterlist.$P224];[$Datasheet.$B$1:.$AV$9809];13;FALSE());&quot;-&quot;)" office:value-type="string" office:string-value="-" calcext:value-type="string">
            <text:p>-</text:p>
          </table:table-cell>
          <table:table-cell table:style-name="ce159" table:formula="of:=IFERROR(VLOOKUP([$Masterlist.$P224];[$Datasheet.$B$1:.$AV$9809];14;FALSE());&quot;-&quot;)" office:value-type="string" office:string-value="-" calcext:value-type="string">
            <text:p>-</text:p>
          </table:table-cell>
          <table:table-cell table:style-name="ce159" table:formula="of:=IFERROR(VLOOKUP([$Masterlist.$P224];[$Datasheet.$B$1:.$AV$9809];15;FALSE());&quot;-&quot;)" office:value-type="string" office:string-value="-" calcext:value-type="string">
            <text:p>-</text:p>
          </table:table-cell>
          <table:table-cell table:style-name="ce159" table:formula="of:=IFERROR(VLOOKUP([$Masterlist.$P224];[$Datasheet.$B$1:.$AV$9809];16;FALSE());&quot;-&quot;)" office:value-type="string" office:string-value="-" calcext:value-type="string">
            <text:p>-</text:p>
          </table:table-cell>
          <table:table-cell table:style-name="ce159" table:formula="of:=IFERROR(VLOOKUP([$Masterlist.$P224];[$Datasheet.$B$1:.$AV$9809];17;FALSE());&quot;-&quot;)" office:value-type="string" office:string-value="-" calcext:value-type="string">
            <text:p>-</text:p>
          </table:table-cell>
          <table:table-cell table:style-name="ce159" table:formula="of:=IFERROR(VLOOKUP([$Masterlist.$P224];[$Datasheet.$B$1:.$AV$9809];18;FALSE());&quot;-&quot;)" office:value-type="string" office:string-value="-" calcext:value-type="string">
            <text:p>-</text:p>
          </table:table-cell>
          <table:table-cell table:style-name="ce159" table:formula="of:=IFERROR(VLOOKUP([$Masterlist.$P224];[$Datasheet.$B$1:.$AV$9809];19;FALSE());&quot;-&quot;)" office:value-type="string" office:string-value="-" calcext:value-type="string">
            <text:p>-</text:p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7" office:value-type="string" calcext:value-type="string">
            <text:p>L</text:p>
          </table:table-cell>
          <table:table-cell table:style-name="ce51" office:value-type="string" calcext:value-type="string">
            <text:p>yes</text:p>
          </table:table-cell>
          <table:table-cell table:style-name="ce51" table:number-columns-repeated="11"/>
          <table:table-cell table:style-name="ce93" office:value-type="string" calcext:value-type="string">
            <text:p>Cam 1, Cam 3, Cam 5, Static Cam</text:p>
          </table:table-cell>
          <table:table-cell table:style-name="ce102" office:value-type="string" calcext:value-type="string">
            <text:p>Johan Strydom</text:p>
          </table:table-cell>
          <table:table-cell table:style-name="ce116" table:formula="of:=IF(ISNUMBER(MATCH([.P225];[$Datasheet.$B$1:.$B$9809];0));&quot;✓&quot;;&quot;x&quot;)" office:value-type="string" office:string-value="✓" calcext:value-type="string">
            <text:p>✓</text:p>
          </table:table-cell>
          <table:table-cell table:style-name="ce160" table:formula="of:=IFERROR(VLOOKUP([$Masterlist.$P225];[$Datasheet.$B$1:.$AV$9809];2;FALSE());&quot;-&quot;)" office:value-type="float" office:value="0" calcext:value-type="float">
            <text:p>0</text:p>
          </table:table-cell>
          <table:table-cell table:style-name="ce160" table:formula="of:=IFERROR(VLOOKUP([$Masterlist.$P225];[$Datasheet.$B$1:.$AV$9809];3;FALSE());&quot;-&quot;)" office:value-type="float" office:value="1" calcext:value-type="float">
            <text:p>1</text:p>
          </table:table-cell>
          <table:table-cell table:style-name="ce160" table:formula="of:=IFERROR(VLOOKUP([$Masterlist.$P225];[$Datasheet.$B$1:.$AV$9809];4;FALSE());&quot;-&quot;)" office:value-type="float" office:value="0" calcext:value-type="float">
            <text:p>0</text:p>
          </table:table-cell>
          <table:table-cell table:style-name="ce160" table:formula="of:=IFERROR(VLOOKUP([$Masterlist.$P225];[$Datasheet.$B$1:.$AV$9809];5;FALSE());&quot;-&quot;)" office:value-type="float" office:value="1" calcext:value-type="float">
            <text:p>1</text:p>
          </table:table-cell>
          <table:table-cell table:style-name="ce205" table:formula="of:=IFERROR(VLOOKUP([$Masterlist.$P225];[$Datasheet.$B$1:.$AV$9809];6;FALSE());&quot;-&quot;)" office:value-type="float" office:value="0" calcext:value-type="float">
            <text:p>0</text:p>
          </table:table-cell>
          <table:table-cell table:style-name="ce160" table:formula="of:=IFERROR(VLOOKUP([$Masterlist.$P225];[$Datasheet.$B$1:.$AV$9809];7;FALSE());&quot;-&quot;)" office:value-type="float" office:value="1" calcext:value-type="float">
            <text:p>1</text:p>
          </table:table-cell>
          <table:table-cell table:style-name="ce160" table:formula="of:=IFERROR(VLOOKUP([$Masterlist.$P225];[$Datasheet.$B$1:.$AV$9809];8;FALSE());&quot;-&quot;)" office:value-type="float" office:value="0" calcext:value-type="float">
            <text:p>0</text:p>
          </table:table-cell>
          <table:table-cell table:style-name="ce160" table:formula="of:=IFERROR(VLOOKUP([$Masterlist.$P225];[$Datasheet.$B$1:.$AV$9809];9;FALSE());&quot;-&quot;)" office:value-type="float" office:value="1" calcext:value-type="float">
            <text:p>1</text:p>
          </table:table-cell>
          <table:table-cell table:style-name="ce160" table:formula="of:=IFERROR(VLOOKUP([$Masterlist.$P225];[$Datasheet.$B$1:.$AV$9809];10;FALSE());&quot;-&quot;)" office:value-type="float" office:value="0" calcext:value-type="float">
            <text:p>0</text:p>
          </table:table-cell>
          <table:table-cell table:style-name="ce160" table:formula="of:=IFERROR(VLOOKUP([$Masterlist.$P225];[$Datasheet.$B$1:.$AV$9809];11;FALSE());&quot;-&quot;)" office:value-type="float" office:value="1" calcext:value-type="float">
            <text:p>1</text:p>
          </table:table-cell>
          <table:table-cell table:style-name="ce160" table:formula="of:=IFERROR(VLOOKUP([$Masterlist.$P225];[$Datasheet.$B$1:.$AV$9809];12;FALSE());&quot;-&quot;)" office:value-type="float" office:value="0" calcext:value-type="float">
            <text:p>0</text:p>
          </table:table-cell>
          <table:table-cell table:style-name="ce160" table:formula="of:=IFERROR(VLOOKUP([$Masterlist.$P225];[$Datasheet.$B$1:.$AV$9809];13;FALSE());&quot;-&quot;)" office:value-type="float" office:value="1" calcext:value-type="float">
            <text:p>1</text:p>
          </table:table-cell>
          <table:table-cell table:style-name="ce160" table:formula="of:=IFERROR(VLOOKUP([$Masterlist.$P225];[$Datasheet.$B$1:.$AV$9809];14;FALSE());&quot;-&quot;)" office:value-type="float" office:value="0" calcext:value-type="float">
            <text:p>0</text:p>
          </table:table-cell>
          <table:table-cell table:style-name="ce160" table:formula="of:=IFERROR(VLOOKUP([$Masterlist.$P225];[$Datasheet.$B$1:.$AV$9809];15;FALSE());&quot;-&quot;)" office:value-type="float" office:value="1" calcext:value-type="float">
            <text:p>1</text:p>
          </table:table-cell>
          <table:table-cell table:style-name="ce160" table:formula="of:=IFERROR(VLOOKUP([$Masterlist.$P225];[$Datasheet.$B$1:.$AV$9809];16;FALSE());&quot;-&quot;)" office:value-type="float" office:value="0" calcext:value-type="float">
            <text:p/>
          </table:table-cell>
          <table:table-cell table:style-name="ce160" table:formula="of:=IFERROR(VLOOKUP([$Masterlist.$P225];[$Datasheet.$B$1:.$AV$9809];17;FALSE());&quot;-&quot;)" office:value-type="float" office:value="0" calcext:value-type="float">
            <text:p/>
          </table:table-cell>
          <table:table-cell table:style-name="ce160" table:formula="of:=IFERROR(VLOOKUP([$Masterlist.$P225];[$Datasheet.$B$1:.$AV$9809];18;FALSE());&quot;-&quot;)" office:value-type="float" office:value="0" calcext:value-type="float">
            <text:p/>
          </table:table-cell>
          <table:table-cell table:style-name="ce160" table:formula="of:=IFERROR(VLOOKUP([$Masterlist.$P225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9"/>
          <table:table-cell table:style-name="ce42" office:value-type="string" calcext:value-type="string" table:number-columns-spanned="15" table:number-rows-spanned="1">
            <text:p>CABLES - MORNE COETZEE</text:p>
          </table:table-cell>
          <table:covered-table-cell table:number-columns-repeated="13" table:style-name="ce45"/>
          <table:covered-table-cell table:style-name="ce99"/>
          <table:table-cell table:style-name="ce127"/>
          <table:table-cell table:style-name="ce161" office:value-type="string" calcext:value-type="string" table:number-columns-spanned="18" table:number-rows-spanned="1">
            <text:p>CABLES - MORNE COETZEE</text:p>
          </table:table-cell>
          <table:covered-table-cell table:number-columns-repeated="16" table:style-name="ce45"/>
          <table:covered-table-cell table:style-name="ce99"/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6"/>
          <table:table-cell table:style-name="ce25" office:value-type="string" calcext:value-type="string">
            <text:p>L</text:p>
          </table:table-cell>
          <table:table-cell table:style-name="ce49"/>
          <table:table-cell table:style-name="ce49" office:value-type="string" calcext:value-type="string">
            <text:p>yes</text:p>
          </table:table-cell>
          <table:table-cell table:style-name="ce49" table:number-columns-repeated="10"/>
          <table:table-cell table:style-name="ce91" office:value-type="string" calcext:value-type="string">
            <text:p>Cable Runner</text:p>
          </table:table-cell>
          <table:table-cell table:style-name="ce100" office:value-type="string" calcext:value-type="string">
            <text:p>Morne Coetzee</text:p>
          </table:table-cell>
          <table:table-cell table:style-name="ce13" table:formula="of:=IF(ISNUMBER(MATCH([.P227];[$Datasheet.$B$1:.$B$9809];0));&quot;✓&quot;;&quot;x&quot;)" office:value-type="string" office:string-value="✓" calcext:value-type="string">
            <text:p>✓</text:p>
          </table:table-cell>
          <table:table-cell table:style-name="ce162" table:formula="of:=IFERROR(VLOOKUP([$Masterlist.$P227];[$Datasheet.$B$1:.$AV$9809];2;FALSE());&quot;-&quot;)" office:value-type="float" office:value="1" calcext:value-type="float">
            <text:p>1</text:p>
          </table:table-cell>
          <table:table-cell table:style-name="ce162" table:formula="of:=IFERROR(VLOOKUP([$Masterlist.$P227];[$Datasheet.$B$1:.$AV$9809];3;FALSE());&quot;-&quot;)" office:value-type="float" office:value="1" calcext:value-type="float">
            <text:p>1</text:p>
          </table:table-cell>
          <table:table-cell table:style-name="ce162" table:formula="of:=IFERROR(VLOOKUP([$Masterlist.$P227];[$Datasheet.$B$1:.$AV$9809];4;FALSE());&quot;-&quot;)" office:value-type="float" office:value="1" calcext:value-type="float">
            <text:p>1</text:p>
          </table:table-cell>
          <table:table-cell table:style-name="ce162" table:formula="of:=IFERROR(VLOOKUP([$Masterlist.$P227];[$Datasheet.$B$1:.$AV$9809];5;FALSE());&quot;-&quot;)" office:value-type="float" office:value="0" calcext:value-type="float">
            <text:p>0</text:p>
          </table:table-cell>
          <table:table-cell table:style-name="ce206" table:formula="of:=IFERROR(VLOOKUP([$Masterlist.$P227];[$Datasheet.$B$1:.$AV$9809];6;FALSE());&quot;-&quot;)" office:value-type="float" office:value="1" calcext:value-type="float">
            <text:p>1</text:p>
          </table:table-cell>
          <table:table-cell table:style-name="ce162" table:formula="of:=IFERROR(VLOOKUP([$Masterlist.$P227];[$Datasheet.$B$1:.$AV$9809];7;FALSE());&quot;-&quot;)" office:value-type="float" office:value="1" calcext:value-type="float">
            <text:p>1</text:p>
          </table:table-cell>
          <table:table-cell table:style-name="ce162" table:formula="of:=IFERROR(VLOOKUP([$Masterlist.$P227];[$Datasheet.$B$1:.$AV$9809];8;FALSE());&quot;-&quot;)" office:value-type="float" office:value="1" calcext:value-type="float">
            <text:p>1</text:p>
          </table:table-cell>
          <table:table-cell table:style-name="ce162" table:formula="of:=IFERROR(VLOOKUP([$Masterlist.$P227];[$Datasheet.$B$1:.$AV$9809];9;FALSE());&quot;-&quot;)" office:value-type="float" office:value="1" calcext:value-type="float">
            <text:p>1</text:p>
          </table:table-cell>
          <table:table-cell table:style-name="ce162" table:formula="of:=IFERROR(VLOOKUP([$Masterlist.$P227];[$Datasheet.$B$1:.$AV$9809];10;FALSE());&quot;-&quot;)" office:value-type="float" office:value="0" calcext:value-type="float">
            <text:p>0</text:p>
          </table:table-cell>
          <table:table-cell table:style-name="ce225" table:formula="of:=IFERROR(VLOOKUP([$Masterlist.$P227];[$Datasheet.$B$1:.$AV$9809];11;FALSE());&quot;-&quot;)" office:value-type="float" office:value="1" calcext:value-type="float">
            <text:p>1</text:p>
          </table:table-cell>
          <table:table-cell table:style-name="ce225" table:formula="of:=IFERROR(VLOOKUP([$Masterlist.$P227];[$Datasheet.$B$1:.$AV$9809];12;FALSE());&quot;-&quot;)" office:value-type="float" office:value="1" calcext:value-type="float">
            <text:p>1</text:p>
          </table:table-cell>
          <table:table-cell table:style-name="ce225" table:formula="of:=IFERROR(VLOOKUP([$Masterlist.$P227];[$Datasheet.$B$1:.$AV$9809];13;FALSE());&quot;-&quot;)" office:value-type="float" office:value="0" calcext:value-type="float">
            <text:p>0</text:p>
          </table:table-cell>
          <table:table-cell table:style-name="ce225" table:formula="of:=IFERROR(VLOOKUP([$Masterlist.$P227];[$Datasheet.$B$1:.$AV$9809];14;FALSE());&quot;-&quot;)" office:value-type="float" office:value="1" calcext:value-type="float">
            <text:p>1</text:p>
          </table:table-cell>
          <table:table-cell table:style-name="ce225" table:formula="of:=IFERROR(VLOOKUP([$Masterlist.$P227];[$Datasheet.$B$1:.$AV$9809];15;FALSE());&quot;-&quot;)" office:value-type="float" office:value="1" calcext:value-type="float">
            <text:p>1</text:p>
          </table:table-cell>
          <table:table-cell table:style-name="ce225" table:formula="of:=IFERROR(VLOOKUP([$Masterlist.$P227];[$Datasheet.$B$1:.$AV$9809];16;FALSE());&quot;-&quot;)" office:value-type="float" office:value="0" calcext:value-type="float">
            <text:p/>
          </table:table-cell>
          <table:table-cell table:style-name="ce225" table:formula="of:=IFERROR(VLOOKUP([$Masterlist.$P227];[$Datasheet.$B$1:.$AV$9809];17;FALSE());&quot;-&quot;)" office:value-type="float" office:value="0" calcext:value-type="float">
            <text:p/>
          </table:table-cell>
          <table:table-cell table:style-name="ce225" table:formula="of:=IFERROR(VLOOKUP([$Masterlist.$P227];[$Datasheet.$B$1:.$AV$9809];18;FALSE());&quot;-&quot;)" office:value-type="float" office:value="0" calcext:value-type="float">
            <text:p/>
          </table:table-cell>
          <table:table-cell table:style-name="ce225" table:formula="of:=IFERROR(VLOOKUP([$Masterlist.$P227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6"/>
          <table:table-cell table:style-name="ce26" office:value-type="string" calcext:value-type="string">
            <text:p>L</text:p>
          </table:table-cell>
          <table:table-cell table:style-name="ce50"/>
          <table:table-cell table:style-name="ce50" office:value-type="string" calcext:value-type="string">
            <text:p>yes</text:p>
          </table:table-cell>
          <table:table-cell table:style-name="ce50" table:number-columns-repeated="10"/>
          <table:table-cell table:style-name="ce92" office:value-type="string" calcext:value-type="string">
            <text:p>Cable Runner</text:p>
          </table:table-cell>
          <table:table-cell table:style-name="ce8" office:value-type="string" calcext:value-type="string">
            <text:p>Tristan Badenhorst</text:p>
          </table:table-cell>
          <table:table-cell table:style-name="ce13" table:formula="of:=IF(ISNUMBER(MATCH([.P228];[$Datasheet.$B$1:.$B$9809];0));&quot;✓&quot;;&quot;x&quot;)" office:value-type="string" office:string-value="✓" calcext:value-type="string">
            <text:p>✓</text:p>
          </table:table-cell>
          <table:table-cell table:style-name="ce162" table:formula="of:=IFERROR(VLOOKUP([$Masterlist.$P228];[$Datasheet.$B$1:.$AV$9809];2;FALSE());&quot;-&quot;)" office:value-type="float" office:value="1" calcext:value-type="float">
            <text:p>1</text:p>
          </table:table-cell>
          <table:table-cell table:style-name="ce162" table:formula="of:=IFERROR(VLOOKUP([$Masterlist.$P228];[$Datasheet.$B$1:.$AV$9809];3;FALSE());&quot;-&quot;)" office:value-type="float" office:value="1" calcext:value-type="float">
            <text:p>1</text:p>
          </table:table-cell>
          <table:table-cell table:style-name="ce162" table:formula="of:=IFERROR(VLOOKUP([$Masterlist.$P228];[$Datasheet.$B$1:.$AV$9809];4;FALSE());&quot;-&quot;)" office:value-type="float" office:value="1" calcext:value-type="float">
            <text:p>1</text:p>
          </table:table-cell>
          <table:table-cell table:style-name="ce162" table:formula="of:=IFERROR(VLOOKUP([$Masterlist.$P228];[$Datasheet.$B$1:.$AV$9809];5;FALSE());&quot;-&quot;)" office:value-type="float" office:value="1" calcext:value-type="float">
            <text:p>1</text:p>
          </table:table-cell>
          <table:table-cell table:style-name="ce206" table:formula="of:=IFERROR(VLOOKUP([$Masterlist.$P228];[$Datasheet.$B$1:.$AV$9809];6;FALSE());&quot;-&quot;)" office:value-type="float" office:value="1" calcext:value-type="float">
            <text:p>1</text:p>
          </table:table-cell>
          <table:table-cell table:style-name="ce162" table:formula="of:=IFERROR(VLOOKUP([$Masterlist.$P228];[$Datasheet.$B$1:.$AV$9809];7;FALSE());&quot;-&quot;)" office:value-type="float" office:value="1" calcext:value-type="float">
            <text:p>1</text:p>
          </table:table-cell>
          <table:table-cell table:style-name="ce162" table:formula="of:=IFERROR(VLOOKUP([$Masterlist.$P228];[$Datasheet.$B$1:.$AV$9809];8;FALSE());&quot;-&quot;)" office:value-type="float" office:value="1" calcext:value-type="float">
            <text:p>1</text:p>
          </table:table-cell>
          <table:table-cell table:style-name="ce162" table:formula="of:=IFERROR(VLOOKUP([$Masterlist.$P228];[$Datasheet.$B$1:.$AV$9809];9;FALSE());&quot;-&quot;)" office:value-type="float" office:value="1" calcext:value-type="float">
            <text:p>1</text:p>
          </table:table-cell>
          <table:table-cell table:style-name="ce162" table:formula="of:=IFERROR(VLOOKUP([$Masterlist.$P228];[$Datasheet.$B$1:.$AV$9809];10;FALSE());&quot;-&quot;)" office:value-type="float" office:value="1" calcext:value-type="float">
            <text:p>1</text:p>
          </table:table-cell>
          <table:table-cell table:style-name="ce225" table:formula="of:=IFERROR(VLOOKUP([$Masterlist.$P228];[$Datasheet.$B$1:.$AV$9809];11;FALSE());&quot;-&quot;)" office:value-type="float" office:value="1" calcext:value-type="float">
            <text:p>1</text:p>
          </table:table-cell>
          <table:table-cell table:style-name="ce225" table:formula="of:=IFERROR(VLOOKUP([$Masterlist.$P228];[$Datasheet.$B$1:.$AV$9809];12;FALSE());&quot;-&quot;)" office:value-type="float" office:value="1" calcext:value-type="float">
            <text:p>1</text:p>
          </table:table-cell>
          <table:table-cell table:style-name="ce225" table:formula="of:=IFERROR(VLOOKUP([$Masterlist.$P228];[$Datasheet.$B$1:.$AV$9809];13;FALSE());&quot;-&quot;)" office:value-type="float" office:value="1" calcext:value-type="float">
            <text:p>1</text:p>
          </table:table-cell>
          <table:table-cell table:style-name="ce225" table:formula="of:=IFERROR(VLOOKUP([$Masterlist.$P228];[$Datasheet.$B$1:.$AV$9809];14;FALSE());&quot;-&quot;)" office:value-type="float" office:value="1" calcext:value-type="float">
            <text:p>1</text:p>
          </table:table-cell>
          <table:table-cell table:style-name="ce225" table:formula="of:=IFERROR(VLOOKUP([$Masterlist.$P228];[$Datasheet.$B$1:.$AV$9809];15;FALSE());&quot;-&quot;)" office:value-type="float" office:value="1" calcext:value-type="float">
            <text:p>1</text:p>
          </table:table-cell>
          <table:table-cell table:style-name="ce225" table:formula="of:=IFERROR(VLOOKUP([$Masterlist.$P228];[$Datasheet.$B$1:.$AV$9809];16;FALSE());&quot;-&quot;)" office:value-type="float" office:value="0" calcext:value-type="float">
            <text:p/>
          </table:table-cell>
          <table:table-cell table:style-name="ce225" table:formula="of:=IFERROR(VLOOKUP([$Masterlist.$P228];[$Datasheet.$B$1:.$AV$9809];17;FALSE());&quot;-&quot;)" office:value-type="float" office:value="0" calcext:value-type="float">
            <text:p/>
          </table:table-cell>
          <table:table-cell table:style-name="ce225" table:formula="of:=IFERROR(VLOOKUP([$Masterlist.$P228];[$Datasheet.$B$1:.$AV$9809];18;FALSE());&quot;-&quot;)" office:value-type="float" office:value="0" calcext:value-type="float">
            <text:p/>
          </table:table-cell>
          <table:table-cell table:style-name="ce225" table:formula="of:=IFERROR(VLOOKUP([$Masterlist.$P228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6"/>
          <table:table-cell table:style-name="ce26" office:value-type="string" calcext:value-type="string">
            <text:p>L</text:p>
          </table:table-cell>
          <table:table-cell table:style-name="ce50"/>
          <table:table-cell table:style-name="ce50" office:value-type="string" calcext:value-type="string">
            <text:p>yes</text:p>
          </table:table-cell>
          <table:table-cell table:style-name="ce50" table:number-columns-repeated="10"/>
          <table:table-cell table:style-name="ce92" office:value-type="string" calcext:value-type="string">
            <text:p>Cable Lead</text:p>
          </table:table-cell>
          <table:table-cell table:style-name="ce8" office:value-type="string" calcext:value-type="string">
            <text:p>Johan Koekemoer</text:p>
          </table:table-cell>
          <table:table-cell table:style-name="ce13" table:formula="of:=IF(ISNUMBER(MATCH([.P229];[$Datasheet.$B$1:.$B$9809];0));&quot;✓&quot;;&quot;x&quot;)" office:value-type="string" office:string-value="✓" calcext:value-type="string">
            <text:p>✓</text:p>
          </table:table-cell>
          <table:table-cell table:style-name="ce162" table:formula="of:=IFERROR(VLOOKUP([$Masterlist.$P229];[$Datasheet.$B$1:.$AV$9809];2;FALSE());&quot;-&quot;)" office:value-type="float" office:value="0" calcext:value-type="float">
            <text:p>0</text:p>
          </table:table-cell>
          <table:table-cell table:style-name="ce162" table:formula="of:=IFERROR(VLOOKUP([$Masterlist.$P229];[$Datasheet.$B$1:.$AV$9809];3;FALSE());&quot;-&quot;)" office:value-type="float" office:value="1" calcext:value-type="float">
            <text:p>1</text:p>
          </table:table-cell>
          <table:table-cell table:style-name="ce162" table:formula="of:=IFERROR(VLOOKUP([$Masterlist.$P229];[$Datasheet.$B$1:.$AV$9809];4;FALSE());&quot;-&quot;)" office:value-type="float" office:value="1" calcext:value-type="float">
            <text:p>1</text:p>
          </table:table-cell>
          <table:table-cell table:style-name="ce162" table:formula="of:=IFERROR(VLOOKUP([$Masterlist.$P229];[$Datasheet.$B$1:.$AV$9809];5;FALSE());&quot;-&quot;)" office:value-type="float" office:value="0" calcext:value-type="float">
            <text:p>0</text:p>
          </table:table-cell>
          <table:table-cell table:style-name="ce206" table:formula="of:=IFERROR(VLOOKUP([$Masterlist.$P229];[$Datasheet.$B$1:.$AV$9809];6;FALSE());&quot;-&quot;)" office:value-type="float" office:value="1" calcext:value-type="float">
            <text:p>1</text:p>
          </table:table-cell>
          <table:table-cell table:style-name="ce162" table:formula="of:=IFERROR(VLOOKUP([$Masterlist.$P229];[$Datasheet.$B$1:.$AV$9809];7;FALSE());&quot;-&quot;)" office:value-type="float" office:value="1" calcext:value-type="float">
            <text:p>1</text:p>
          </table:table-cell>
          <table:table-cell table:style-name="ce162" table:formula="of:=IFERROR(VLOOKUP([$Masterlist.$P229];[$Datasheet.$B$1:.$AV$9809];8;FALSE());&quot;-&quot;)" office:value-type="float" office:value="0" calcext:value-type="float">
            <text:p>0</text:p>
          </table:table-cell>
          <table:table-cell table:style-name="ce162" table:formula="of:=IFERROR(VLOOKUP([$Masterlist.$P229];[$Datasheet.$B$1:.$AV$9809];9;FALSE());&quot;-&quot;)" office:value-type="float" office:value="1" calcext:value-type="float">
            <text:p>1</text:p>
          </table:table-cell>
          <table:table-cell table:style-name="ce162" table:formula="of:=IFERROR(VLOOKUP([$Masterlist.$P229];[$Datasheet.$B$1:.$AV$9809];10;FALSE());&quot;-&quot;)" office:value-type="float" office:value="0" calcext:value-type="float">
            <text:p>0</text:p>
          </table:table-cell>
          <table:table-cell table:style-name="ce225" table:formula="of:=IFERROR(VLOOKUP([$Masterlist.$P229];[$Datasheet.$B$1:.$AV$9809];11;FALSE());&quot;-&quot;)" office:value-type="float" office:value="0" calcext:value-type="float">
            <text:p>0</text:p>
          </table:table-cell>
          <table:table-cell table:style-name="ce225" table:formula="of:=IFERROR(VLOOKUP([$Masterlist.$P229];[$Datasheet.$B$1:.$AV$9809];12;FALSE());&quot;-&quot;)" office:value-type="float" office:value="0" calcext:value-type="float">
            <text:p>0</text:p>
          </table:table-cell>
          <table:table-cell table:style-name="ce225" table:formula="of:=IFERROR(VLOOKUP([$Masterlist.$P229];[$Datasheet.$B$1:.$AV$9809];13;FALSE());&quot;-&quot;)" office:value-type="float" office:value="1" calcext:value-type="float">
            <text:p>1</text:p>
          </table:table-cell>
          <table:table-cell table:style-name="ce225" table:formula="of:=IFERROR(VLOOKUP([$Masterlist.$P229];[$Datasheet.$B$1:.$AV$9809];14;FALSE());&quot;-&quot;)" office:value-type="float" office:value="1" calcext:value-type="float">
            <text:p>1</text:p>
          </table:table-cell>
          <table:table-cell table:style-name="ce225" table:formula="of:=IFERROR(VLOOKUP([$Masterlist.$P229];[$Datasheet.$B$1:.$AV$9809];15;FALSE());&quot;-&quot;)" office:value-type="float" office:value="0" calcext:value-type="float">
            <text:p>0</text:p>
          </table:table-cell>
          <table:table-cell table:style-name="ce225" table:formula="of:=IFERROR(VLOOKUP([$Masterlist.$P229];[$Datasheet.$B$1:.$AV$9809];16;FALSE());&quot;-&quot;)" office:value-type="float" office:value="0" calcext:value-type="float">
            <text:p/>
          </table:table-cell>
          <table:table-cell table:style-name="ce225" table:formula="of:=IFERROR(VLOOKUP([$Masterlist.$P229];[$Datasheet.$B$1:.$AV$9809];17;FALSE());&quot;-&quot;)" office:value-type="float" office:value="0" calcext:value-type="float">
            <text:p/>
          </table:table-cell>
          <table:table-cell table:style-name="ce225" table:formula="of:=IFERROR(VLOOKUP([$Masterlist.$P229];[$Datasheet.$B$1:.$AV$9809];18;FALSE());&quot;-&quot;)" office:value-type="float" office:value="0" calcext:value-type="float">
            <text:p/>
          </table:table-cell>
          <table:table-cell table:style-name="ce225" table:formula="of:=IFERROR(VLOOKUP([$Masterlist.$P229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9" office:value-type="string" calcext:value-type="string">
            <text:p>L</text:p>
          </table:table-cell>
          <table:table-cell table:number-columns-repeated="2" table:style-name="ce50" office:value-type="string" calcext:value-type="string">
            <text:p>yes</text:p>
          </table:table-cell>
          <table:table-cell table:style-name="ce50" table:number-columns-repeated="10"/>
          <table:table-cell table:style-name="ce92" office:value-type="string" calcext:value-type="string">
            <text:p>Sound Runner</text:p>
          </table:table-cell>
          <table:table-cell table:style-name="ce8" office:value-type="string" calcext:value-type="string">
            <text:p>Jan Bakker</text:p>
          </table:table-cell>
          <table:table-cell table:style-name="ce13" table:formula="of:=IF(ISNUMBER(MATCH([.P230];[$Datasheet.$B$1:.$B$9809];0));&quot;✓&quot;;&quot;x&quot;)" office:value-type="string" office:string-value="✓" calcext:value-type="string">
            <text:p>✓</text:p>
          </table:table-cell>
          <table:table-cell table:style-name="ce162" table:formula="of:=IFERROR(VLOOKUP([$Masterlist.$P230];[$Datasheet.$B$1:.$AV$9809];2;FALSE());&quot;-&quot;)" office:value-type="float" office:value="0" calcext:value-type="float">
            <text:p>0</text:p>
          </table:table-cell>
          <table:table-cell table:style-name="ce162" table:formula="of:=IFERROR(VLOOKUP([$Masterlist.$P230];[$Datasheet.$B$1:.$AV$9809];3;FALSE());&quot;-&quot;)" office:value-type="float" office:value="1" calcext:value-type="float">
            <text:p>1</text:p>
          </table:table-cell>
          <table:table-cell table:style-name="ce162" table:formula="of:=IFERROR(VLOOKUP([$Masterlist.$P230];[$Datasheet.$B$1:.$AV$9809];4;FALSE());&quot;-&quot;)" office:value-type="float" office:value="1" calcext:value-type="float">
            <text:p>1</text:p>
          </table:table-cell>
          <table:table-cell table:style-name="ce162" table:formula="of:=IFERROR(VLOOKUP([$Masterlist.$P230];[$Datasheet.$B$1:.$AV$9809];5;FALSE());&quot;-&quot;)" office:value-type="float" office:value="0" calcext:value-type="float">
            <text:p>0</text:p>
          </table:table-cell>
          <table:table-cell table:style-name="ce206" table:formula="of:=IFERROR(VLOOKUP([$Masterlist.$P230];[$Datasheet.$B$1:.$AV$9809];6;FALSE());&quot;-&quot;)" office:value-type="float" office:value="0" calcext:value-type="float">
            <text:p>0</text:p>
          </table:table-cell>
          <table:table-cell table:style-name="ce162" table:formula="of:=IFERROR(VLOOKUP([$Masterlist.$P230];[$Datasheet.$B$1:.$AV$9809];7;FALSE());&quot;-&quot;)" office:value-type="float" office:value="1" calcext:value-type="float">
            <text:p>1</text:p>
          </table:table-cell>
          <table:table-cell table:style-name="ce162" table:formula="of:=IFERROR(VLOOKUP([$Masterlist.$P230];[$Datasheet.$B$1:.$AV$9809];8;FALSE());&quot;-&quot;)" office:value-type="float" office:value="1" calcext:value-type="float">
            <text:p>1</text:p>
          </table:table-cell>
          <table:table-cell table:style-name="ce162" table:formula="of:=IFERROR(VLOOKUP([$Masterlist.$P230];[$Datasheet.$B$1:.$AV$9809];9;FALSE());&quot;-&quot;)" office:value-type="float" office:value="0" calcext:value-type="float">
            <text:p>0</text:p>
          </table:table-cell>
          <table:table-cell table:style-name="ce162" table:formula="of:=IFERROR(VLOOKUP([$Masterlist.$P230];[$Datasheet.$B$1:.$AV$9809];10;FALSE());&quot;-&quot;)" office:value-type="float" office:value="0" calcext:value-type="float">
            <text:p>0</text:p>
          </table:table-cell>
          <table:table-cell table:style-name="ce225" table:formula="of:=IFERROR(VLOOKUP([$Masterlist.$P230];[$Datasheet.$B$1:.$AV$9809];11;FALSE());&quot;-&quot;)" office:value-type="float" office:value="1" calcext:value-type="float">
            <text:p>1</text:p>
          </table:table-cell>
          <table:table-cell table:style-name="ce225" table:formula="of:=IFERROR(VLOOKUP([$Masterlist.$P230];[$Datasheet.$B$1:.$AV$9809];12;FALSE());&quot;-&quot;)" office:value-type="float" office:value="0" calcext:value-type="float">
            <text:p>0</text:p>
          </table:table-cell>
          <table:table-cell table:style-name="ce225" table:formula="of:=IFERROR(VLOOKUP([$Masterlist.$P230];[$Datasheet.$B$1:.$AV$9809];13;FALSE());&quot;-&quot;)" office:value-type="float" office:value="1" calcext:value-type="float">
            <text:p>1</text:p>
          </table:table-cell>
          <table:table-cell table:style-name="ce225" table:formula="of:=IFERROR(VLOOKUP([$Masterlist.$P230];[$Datasheet.$B$1:.$AV$9809];14;FALSE());&quot;-&quot;)" office:value-type="float" office:value="0" calcext:value-type="float">
            <text:p>0</text:p>
          </table:table-cell>
          <table:table-cell table:style-name="ce225" table:formula="of:=IFERROR(VLOOKUP([$Masterlist.$P230];[$Datasheet.$B$1:.$AV$9809];15;FALSE());&quot;-&quot;)" office:value-type="float" office:value="0" calcext:value-type="float">
            <text:p>0</text:p>
          </table:table-cell>
          <table:table-cell table:style-name="ce225" table:formula="of:=IFERROR(VLOOKUP([$Masterlist.$P230];[$Datasheet.$B$1:.$AV$9809];16;FALSE());&quot;-&quot;)" office:value-type="float" office:value="0" calcext:value-type="float">
            <text:p/>
          </table:table-cell>
          <table:table-cell table:style-name="ce225" table:formula="of:=IFERROR(VLOOKUP([$Masterlist.$P230];[$Datasheet.$B$1:.$AV$9809];17;FALSE());&quot;-&quot;)" office:value-type="float" office:value="0" calcext:value-type="float">
            <text:p/>
          </table:table-cell>
          <table:table-cell table:style-name="ce225" table:formula="of:=IFERROR(VLOOKUP([$Masterlist.$P230];[$Datasheet.$B$1:.$AV$9809];18;FALSE());&quot;-&quot;)" office:value-type="float" office:value="0" calcext:value-type="float">
            <text:p/>
          </table:table-cell>
          <table:table-cell table:style-name="ce225" table:formula="of:=IFERROR(VLOOKUP([$Masterlist.$P230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6"/>
          <table:table-cell table:style-name="ce26" office:value-type="string" calcext:value-type="string">
            <text:p>L</text:p>
          </table:table-cell>
          <table:table-cell table:style-name="ce50"/>
          <table:table-cell table:style-name="ce50" office:value-type="string" calcext:value-type="string">
            <text:p>yes</text:p>
          </table:table-cell>
          <table:table-cell table:style-name="ce50" table:number-columns-repeated="10"/>
          <table:table-cell table:style-name="ce92" office:value-type="string" calcext:value-type="string">
            <text:p>Cable Lead</text:p>
          </table:table-cell>
          <table:table-cell table:style-name="ce8" office:value-type="string" calcext:value-type="string">
            <text:p>William Wentzel</text:p>
          </table:table-cell>
          <table:table-cell table:style-name="ce13" table:formula="of:=IF(ISNUMBER(MATCH([.P231];[$Datasheet.$B$1:.$B$9809];0));&quot;✓&quot;;&quot;x&quot;)" office:value-type="string" office:string-value="✓" calcext:value-type="string">
            <text:p>✓</text:p>
          </table:table-cell>
          <table:table-cell table:style-name="ce162" table:formula="of:=IFERROR(VLOOKUP([$Masterlist.$P231];[$Datasheet.$B$1:.$AV$9809];2;FALSE());&quot;-&quot;)" office:value-type="float" office:value="0" calcext:value-type="float">
            <text:p>0</text:p>
          </table:table-cell>
          <table:table-cell table:style-name="ce162" table:formula="of:=IFERROR(VLOOKUP([$Masterlist.$P231];[$Datasheet.$B$1:.$AV$9809];3;FALSE());&quot;-&quot;)" office:value-type="float" office:value="0" calcext:value-type="float">
            <text:p>0</text:p>
          </table:table-cell>
          <table:table-cell table:style-name="ce162" table:formula="of:=IFERROR(VLOOKUP([$Masterlist.$P231];[$Datasheet.$B$1:.$AV$9809];4;FALSE());&quot;-&quot;)" office:value-type="float" office:value="1" calcext:value-type="float">
            <text:p>1</text:p>
          </table:table-cell>
          <table:table-cell table:style-name="ce162" table:formula="of:=IFERROR(VLOOKUP([$Masterlist.$P231];[$Datasheet.$B$1:.$AV$9809];5;FALSE());&quot;-&quot;)" office:value-type="float" office:value="1" calcext:value-type="float">
            <text:p>1</text:p>
          </table:table-cell>
          <table:table-cell table:style-name="ce206" table:formula="of:=IFERROR(VLOOKUP([$Masterlist.$P231];[$Datasheet.$B$1:.$AV$9809];6;FALSE());&quot;-&quot;)" office:value-type="float" office:value="1" calcext:value-type="float">
            <text:p>1</text:p>
          </table:table-cell>
          <table:table-cell table:style-name="ce162" table:formula="of:=IFERROR(VLOOKUP([$Masterlist.$P231];[$Datasheet.$B$1:.$AV$9809];7;FALSE());&quot;-&quot;)" office:value-type="float" office:value="1" calcext:value-type="float">
            <text:p>1</text:p>
          </table:table-cell>
          <table:table-cell table:style-name="ce162" table:formula="of:=IFERROR(VLOOKUP([$Masterlist.$P231];[$Datasheet.$B$1:.$AV$9809];8;FALSE());&quot;-&quot;)" office:value-type="float" office:value="1" calcext:value-type="float">
            <text:p>1</text:p>
          </table:table-cell>
          <table:table-cell table:style-name="ce162" table:formula="of:=IFERROR(VLOOKUP([$Masterlist.$P231];[$Datasheet.$B$1:.$AV$9809];9;FALSE());&quot;-&quot;)" office:value-type="float" office:value="1" calcext:value-type="float">
            <text:p>1</text:p>
          </table:table-cell>
          <table:table-cell table:style-name="ce162" table:formula="of:=IFERROR(VLOOKUP([$Masterlist.$P231];[$Datasheet.$B$1:.$AV$9809];10;FALSE());&quot;-&quot;)" office:value-type="float" office:value="1" calcext:value-type="float">
            <text:p>1</text:p>
          </table:table-cell>
          <table:table-cell table:style-name="ce225" table:formula="of:=IFERROR(VLOOKUP([$Masterlist.$P231];[$Datasheet.$B$1:.$AV$9809];11;FALSE());&quot;-&quot;)" office:value-type="float" office:value="1" calcext:value-type="float">
            <text:p>1</text:p>
          </table:table-cell>
          <table:table-cell table:style-name="ce225" table:formula="of:=IFERROR(VLOOKUP([$Masterlist.$P231];[$Datasheet.$B$1:.$AV$9809];12;FALSE());&quot;-&quot;)" office:value-type="float" office:value="1" calcext:value-type="float">
            <text:p>1</text:p>
          </table:table-cell>
          <table:table-cell table:style-name="ce225" table:formula="of:=IFERROR(VLOOKUP([$Masterlist.$P231];[$Datasheet.$B$1:.$AV$9809];13;FALSE());&quot;-&quot;)" office:value-type="float" office:value="1" calcext:value-type="float">
            <text:p>1</text:p>
          </table:table-cell>
          <table:table-cell table:style-name="ce225" table:formula="of:=IFERROR(VLOOKUP([$Masterlist.$P231];[$Datasheet.$B$1:.$AV$9809];14;FALSE());&quot;-&quot;)" office:value-type="float" office:value="1" calcext:value-type="float">
            <text:p>1</text:p>
          </table:table-cell>
          <table:table-cell table:style-name="ce225" table:formula="of:=IFERROR(VLOOKUP([$Masterlist.$P231];[$Datasheet.$B$1:.$AV$9809];15;FALSE());&quot;-&quot;)" office:value-type="float" office:value="1" calcext:value-type="float">
            <text:p>1</text:p>
          </table:table-cell>
          <table:table-cell table:style-name="ce225" table:formula="of:=IFERROR(VLOOKUP([$Masterlist.$P231];[$Datasheet.$B$1:.$AV$9809];16;FALSE());&quot;-&quot;)" office:value-type="float" office:value="0" calcext:value-type="float">
            <text:p/>
          </table:table-cell>
          <table:table-cell table:style-name="ce225" table:formula="of:=IFERROR(VLOOKUP([$Masterlist.$P231];[$Datasheet.$B$1:.$AV$9809];17;FALSE());&quot;-&quot;)" office:value-type="float" office:value="0" calcext:value-type="float">
            <text:p/>
          </table:table-cell>
          <table:table-cell table:style-name="ce225" table:formula="of:=IFERROR(VLOOKUP([$Masterlist.$P231];[$Datasheet.$B$1:.$AV$9809];18;FALSE());&quot;-&quot;)" office:value-type="float" office:value="0" calcext:value-type="float">
            <text:p/>
          </table:table-cell>
          <table:table-cell table:style-name="ce225" table:formula="of:=IFERROR(VLOOKUP([$Masterlist.$P231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6"/>
          <table:table-cell table:style-name="ce26" office:value-type="string" calcext:value-type="string">
            <text:p>L</text:p>
          </table:table-cell>
          <table:table-cell table:style-name="ce50"/>
          <table:table-cell table:style-name="ce50" office:value-type="string" calcext:value-type="string">
            <text:p>yes</text:p>
          </table:table-cell>
          <table:table-cell table:style-name="ce50" table:number-columns-repeated="10"/>
          <table:table-cell table:style-name="ce92" office:value-type="string" calcext:value-type="string">
            <text:p>Cable Lead</text:p>
          </table:table-cell>
          <table:table-cell table:style-name="ce8" office:value-type="string" calcext:value-type="string">
            <text:p>Ruben Venter</text:p>
          </table:table-cell>
          <table:table-cell table:style-name="ce13" table:formula="of:=IF(ISNUMBER(MATCH([.P232];[$Datasheet.$B$1:.$B$9809];0));&quot;✓&quot;;&quot;x&quot;)" office:value-type="string" office:string-value="x" calcext:value-type="string">
            <text:p>x</text:p>
          </table:table-cell>
          <table:table-cell table:style-name="ce162" table:formula="of:=IFERROR(VLOOKUP([$Masterlist.$P232];[$Datasheet.$B$1:.$AV$9809];2;FALSE());&quot;-&quot;)" office:value-type="string" office:string-value="-" calcext:value-type="string">
            <text:p>-</text:p>
          </table:table-cell>
          <table:table-cell table:style-name="ce162" table:formula="of:=IFERROR(VLOOKUP([$Masterlist.$P232];[$Datasheet.$B$1:.$AV$9809];3;FALSE());&quot;-&quot;)" office:value-type="string" office:string-value="-" calcext:value-type="string">
            <text:p>-</text:p>
          </table:table-cell>
          <table:table-cell table:style-name="ce162" table:formula="of:=IFERROR(VLOOKUP([$Masterlist.$P232];[$Datasheet.$B$1:.$AV$9809];4;FALSE());&quot;-&quot;)" office:value-type="string" office:string-value="-" calcext:value-type="string">
            <text:p>-</text:p>
          </table:table-cell>
          <table:table-cell table:style-name="ce162" table:formula="of:=IFERROR(VLOOKUP([$Masterlist.$P232];[$Datasheet.$B$1:.$AV$9809];5;FALSE());&quot;-&quot;)" office:value-type="string" office:string-value="-" calcext:value-type="string">
            <text:p>-</text:p>
          </table:table-cell>
          <table:table-cell table:style-name="ce206" table:formula="of:=IFERROR(VLOOKUP([$Masterlist.$P232];[$Datasheet.$B$1:.$AV$9809];6;FALSE());&quot;-&quot;)" office:value-type="string" office:string-value="-" calcext:value-type="string">
            <text:p>-</text:p>
          </table:table-cell>
          <table:table-cell table:style-name="ce162" table:formula="of:=IFERROR(VLOOKUP([$Masterlist.$P232];[$Datasheet.$B$1:.$AV$9809];7;FALSE());&quot;-&quot;)" office:value-type="string" office:string-value="-" calcext:value-type="string">
            <text:p>-</text:p>
          </table:table-cell>
          <table:table-cell table:style-name="ce162" table:formula="of:=IFERROR(VLOOKUP([$Masterlist.$P232];[$Datasheet.$B$1:.$AV$9809];8;FALSE());&quot;-&quot;)" office:value-type="string" office:string-value="-" calcext:value-type="string">
            <text:p>-</text:p>
          </table:table-cell>
          <table:table-cell table:style-name="ce162" table:formula="of:=IFERROR(VLOOKUP([$Masterlist.$P232];[$Datasheet.$B$1:.$AV$9809];9;FALSE());&quot;-&quot;)" office:value-type="string" office:string-value="-" calcext:value-type="string">
            <text:p>-</text:p>
          </table:table-cell>
          <table:table-cell table:style-name="ce162" table:formula="of:=IFERROR(VLOOKUP([$Masterlist.$P232];[$Datasheet.$B$1:.$AV$9809];10;FALSE());&quot;-&quot;)" office:value-type="string" office:string-value="-" calcext:value-type="string">
            <text:p>-</text:p>
          </table:table-cell>
          <table:table-cell table:style-name="ce225" table:formula="of:=IFERROR(VLOOKUP([$Masterlist.$P232];[$Datasheet.$B$1:.$AV$9809];11;FALSE());&quot;-&quot;)" office:value-type="string" office:string-value="-" calcext:value-type="string">
            <text:p>-</text:p>
          </table:table-cell>
          <table:table-cell table:style-name="ce225" table:formula="of:=IFERROR(VLOOKUP([$Masterlist.$P232];[$Datasheet.$B$1:.$AV$9809];12;FALSE());&quot;-&quot;)" office:value-type="string" office:string-value="-" calcext:value-type="string">
            <text:p>-</text:p>
          </table:table-cell>
          <table:table-cell table:style-name="ce225" table:formula="of:=IFERROR(VLOOKUP([$Masterlist.$P232];[$Datasheet.$B$1:.$AV$9809];13;FALSE());&quot;-&quot;)" office:value-type="string" office:string-value="-" calcext:value-type="string">
            <text:p>-</text:p>
          </table:table-cell>
          <table:table-cell table:style-name="ce225" table:formula="of:=IFERROR(VLOOKUP([$Masterlist.$P232];[$Datasheet.$B$1:.$AV$9809];14;FALSE());&quot;-&quot;)" office:value-type="string" office:string-value="-" calcext:value-type="string">
            <text:p>-</text:p>
          </table:table-cell>
          <table:table-cell table:style-name="ce225" table:formula="of:=IFERROR(VLOOKUP([$Masterlist.$P232];[$Datasheet.$B$1:.$AV$9809];15;FALSE());&quot;-&quot;)" office:value-type="string" office:string-value="-" calcext:value-type="string">
            <text:p>-</text:p>
          </table:table-cell>
          <table:table-cell table:style-name="ce225" table:formula="of:=IFERROR(VLOOKUP([$Masterlist.$P232];[$Datasheet.$B$1:.$AV$9809];16;FALSE());&quot;-&quot;)" office:value-type="string" office:string-value="-" calcext:value-type="string">
            <text:p>-</text:p>
          </table:table-cell>
          <table:table-cell table:style-name="ce225" table:formula="of:=IFERROR(VLOOKUP([$Masterlist.$P232];[$Datasheet.$B$1:.$AV$9809];17;FALSE());&quot;-&quot;)" office:value-type="string" office:string-value="-" calcext:value-type="string">
            <text:p>-</text:p>
          </table:table-cell>
          <table:table-cell table:style-name="ce225" table:formula="of:=IFERROR(VLOOKUP([$Masterlist.$P232];[$Datasheet.$B$1:.$AV$9809];18;FALSE());&quot;-&quot;)" office:value-type="string" office:string-value="-" calcext:value-type="string">
            <text:p>-</text:p>
          </table:table-cell>
          <table:table-cell table:style-name="ce225" table:formula="of:=IFERROR(VLOOKUP([$Masterlist.$P232];[$Datasheet.$B$1:.$AV$9809];19;FALSE());&quot;-&quot;)" office:value-type="string" office:string-value="-" calcext:value-type="string">
            <text:p>-</text:p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6"/>
          <table:table-cell table:style-name="ce26" office:value-type="string" calcext:value-type="string">
            <text:p>L</text:p>
          </table:table-cell>
          <table:table-cell table:style-name="ce50"/>
          <table:table-cell table:style-name="ce50" office:value-type="string" calcext:value-type="string">
            <text:p>yes</text:p>
          </table:table-cell>
          <table:table-cell table:style-name="ce50" table:number-columns-repeated="10"/>
          <table:table-cell table:style-name="ce92" office:value-type="string" calcext:value-type="string">
            <text:p>Cable Runner</text:p>
          </table:table-cell>
          <table:table-cell table:style-name="ce8" office:value-type="string" calcext:value-type="string">
            <text:p>Louis Venter</text:p>
          </table:table-cell>
          <table:table-cell table:style-name="ce13" table:formula="of:=IF(ISNUMBER(MATCH([.P233];[$Datasheet.$B$1:.$B$9809];0));&quot;✓&quot;;&quot;x&quot;)" office:value-type="string" office:string-value="x" calcext:value-type="string">
            <text:p>x</text:p>
          </table:table-cell>
          <table:table-cell table:style-name="ce162" table:formula="of:=IFERROR(VLOOKUP([$Masterlist.$P233];[$Datasheet.$B$1:.$AV$9809];2;FALSE());&quot;-&quot;)" office:value-type="string" office:string-value="-" calcext:value-type="string">
            <text:p>-</text:p>
          </table:table-cell>
          <table:table-cell table:style-name="ce162" table:formula="of:=IFERROR(VLOOKUP([$Masterlist.$P233];[$Datasheet.$B$1:.$AV$9809];3;FALSE());&quot;-&quot;)" office:value-type="string" office:string-value="-" calcext:value-type="string">
            <text:p>-</text:p>
          </table:table-cell>
          <table:table-cell table:style-name="ce162" table:formula="of:=IFERROR(VLOOKUP([$Masterlist.$P233];[$Datasheet.$B$1:.$AV$9809];4;FALSE());&quot;-&quot;)" office:value-type="string" office:string-value="-" calcext:value-type="string">
            <text:p>-</text:p>
          </table:table-cell>
          <table:table-cell table:style-name="ce162" table:formula="of:=IFERROR(VLOOKUP([$Masterlist.$P233];[$Datasheet.$B$1:.$AV$9809];5;FALSE());&quot;-&quot;)" office:value-type="string" office:string-value="-" calcext:value-type="string">
            <text:p>-</text:p>
          </table:table-cell>
          <table:table-cell table:style-name="ce206" table:formula="of:=IFERROR(VLOOKUP([$Masterlist.$P233];[$Datasheet.$B$1:.$AV$9809];6;FALSE());&quot;-&quot;)" office:value-type="string" office:string-value="-" calcext:value-type="string">
            <text:p>-</text:p>
          </table:table-cell>
          <table:table-cell table:style-name="ce162" table:formula="of:=IFERROR(VLOOKUP([$Masterlist.$P233];[$Datasheet.$B$1:.$AV$9809];7;FALSE());&quot;-&quot;)" office:value-type="string" office:string-value="-" calcext:value-type="string">
            <text:p>-</text:p>
          </table:table-cell>
          <table:table-cell table:style-name="ce162" table:formula="of:=IFERROR(VLOOKUP([$Masterlist.$P233];[$Datasheet.$B$1:.$AV$9809];8;FALSE());&quot;-&quot;)" office:value-type="string" office:string-value="-" calcext:value-type="string">
            <text:p>-</text:p>
          </table:table-cell>
          <table:table-cell table:style-name="ce162" table:formula="of:=IFERROR(VLOOKUP([$Masterlist.$P233];[$Datasheet.$B$1:.$AV$9809];9;FALSE());&quot;-&quot;)" office:value-type="string" office:string-value="-" calcext:value-type="string">
            <text:p>-</text:p>
          </table:table-cell>
          <table:table-cell table:style-name="ce162" table:formula="of:=IFERROR(VLOOKUP([$Masterlist.$P233];[$Datasheet.$B$1:.$AV$9809];10;FALSE());&quot;-&quot;)" office:value-type="string" office:string-value="-" calcext:value-type="string">
            <text:p>-</text:p>
          </table:table-cell>
          <table:table-cell table:style-name="ce225" table:formula="of:=IFERROR(VLOOKUP([$Masterlist.$P233];[$Datasheet.$B$1:.$AV$9809];11;FALSE());&quot;-&quot;)" office:value-type="string" office:string-value="-" calcext:value-type="string">
            <text:p>-</text:p>
          </table:table-cell>
          <table:table-cell table:style-name="ce225" table:formula="of:=IFERROR(VLOOKUP([$Masterlist.$P233];[$Datasheet.$B$1:.$AV$9809];12;FALSE());&quot;-&quot;)" office:value-type="string" office:string-value="-" calcext:value-type="string">
            <text:p>-</text:p>
          </table:table-cell>
          <table:table-cell table:style-name="ce225" table:formula="of:=IFERROR(VLOOKUP([$Masterlist.$P233];[$Datasheet.$B$1:.$AV$9809];13;FALSE());&quot;-&quot;)" office:value-type="string" office:string-value="-" calcext:value-type="string">
            <text:p>-</text:p>
          </table:table-cell>
          <table:table-cell table:style-name="ce225" table:formula="of:=IFERROR(VLOOKUP([$Masterlist.$P233];[$Datasheet.$B$1:.$AV$9809];14;FALSE());&quot;-&quot;)" office:value-type="string" office:string-value="-" calcext:value-type="string">
            <text:p>-</text:p>
          </table:table-cell>
          <table:table-cell table:style-name="ce225" table:formula="of:=IFERROR(VLOOKUP([$Masterlist.$P233];[$Datasheet.$B$1:.$AV$9809];15;FALSE());&quot;-&quot;)" office:value-type="string" office:string-value="-" calcext:value-type="string">
            <text:p>-</text:p>
          </table:table-cell>
          <table:table-cell table:style-name="ce225" table:formula="of:=IFERROR(VLOOKUP([$Masterlist.$P233];[$Datasheet.$B$1:.$AV$9809];16;FALSE());&quot;-&quot;)" office:value-type="string" office:string-value="-" calcext:value-type="string">
            <text:p>-</text:p>
          </table:table-cell>
          <table:table-cell table:style-name="ce225" table:formula="of:=IFERROR(VLOOKUP([$Masterlist.$P233];[$Datasheet.$B$1:.$AV$9809];17;FALSE());&quot;-&quot;)" office:value-type="string" office:string-value="-" calcext:value-type="string">
            <text:p>-</text:p>
          </table:table-cell>
          <table:table-cell table:style-name="ce225" table:formula="of:=IFERROR(VLOOKUP([$Masterlist.$P233];[$Datasheet.$B$1:.$AV$9809];18;FALSE());&quot;-&quot;)" office:value-type="string" office:string-value="-" calcext:value-type="string">
            <text:p>-</text:p>
          </table:table-cell>
          <table:table-cell table:style-name="ce225" table:formula="of:=IFERROR(VLOOKUP([$Masterlist.$P233];[$Datasheet.$B$1:.$AV$9809];19;FALSE());&quot;-&quot;)" office:value-type="string" office:string-value="-" calcext:value-type="string">
            <text:p>-</text:p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6"/>
          <table:table-cell table:style-name="ce26" office:value-type="string" calcext:value-type="string">
            <text:p>L</text:p>
          </table:table-cell>
          <table:table-cell table:style-name="ce50"/>
          <table:table-cell table:style-name="ce50" office:value-type="string" calcext:value-type="string">
            <text:p>yes</text:p>
          </table:table-cell>
          <table:table-cell table:style-name="ce50" table:number-columns-repeated="10"/>
          <table:table-cell table:style-name="ce92" office:value-type="string" calcext:value-type="string">
            <text:p>Cable Runner</text:p>
          </table:table-cell>
          <table:table-cell table:style-name="ce8" office:value-type="string" calcext:value-type="string">
            <text:p>Kyle Boyes</text:p>
          </table:table-cell>
          <table:table-cell table:style-name="ce13" table:formula="of:=IF(ISNUMBER(MATCH([.P234];[$Datasheet.$B$1:.$B$9809];0));&quot;✓&quot;;&quot;x&quot;)" office:value-type="string" office:string-value="x" calcext:value-type="string">
            <text:p>x</text:p>
          </table:table-cell>
          <table:table-cell table:style-name="ce162" table:formula="of:=IFERROR(VLOOKUP([$Masterlist.$P234];[$Datasheet.$B$1:.$AV$9809];2;FALSE());&quot;-&quot;)" office:value-type="string" office:string-value="-" calcext:value-type="string">
            <text:p>-</text:p>
          </table:table-cell>
          <table:table-cell table:style-name="ce162" table:formula="of:=IFERROR(VLOOKUP([$Masterlist.$P234];[$Datasheet.$B$1:.$AV$9809];3;FALSE());&quot;-&quot;)" office:value-type="string" office:string-value="-" calcext:value-type="string">
            <text:p>-</text:p>
          </table:table-cell>
          <table:table-cell table:style-name="ce162" table:formula="of:=IFERROR(VLOOKUP([$Masterlist.$P234];[$Datasheet.$B$1:.$AV$9809];4;FALSE());&quot;-&quot;)" office:value-type="string" office:string-value="-" calcext:value-type="string">
            <text:p>-</text:p>
          </table:table-cell>
          <table:table-cell table:style-name="ce162" table:formula="of:=IFERROR(VLOOKUP([$Masterlist.$P234];[$Datasheet.$B$1:.$AV$9809];5;FALSE());&quot;-&quot;)" office:value-type="string" office:string-value="-" calcext:value-type="string">
            <text:p>-</text:p>
          </table:table-cell>
          <table:table-cell table:style-name="ce206" table:formula="of:=IFERROR(VLOOKUP([$Masterlist.$P234];[$Datasheet.$B$1:.$AV$9809];6;FALSE());&quot;-&quot;)" office:value-type="string" office:string-value="-" calcext:value-type="string">
            <text:p>-</text:p>
          </table:table-cell>
          <table:table-cell table:style-name="ce162" table:formula="of:=IFERROR(VLOOKUP([$Masterlist.$P234];[$Datasheet.$B$1:.$AV$9809];7;FALSE());&quot;-&quot;)" office:value-type="string" office:string-value="-" calcext:value-type="string">
            <text:p>-</text:p>
          </table:table-cell>
          <table:table-cell table:style-name="ce162" table:formula="of:=IFERROR(VLOOKUP([$Masterlist.$P234];[$Datasheet.$B$1:.$AV$9809];8;FALSE());&quot;-&quot;)" office:value-type="string" office:string-value="-" calcext:value-type="string">
            <text:p>-</text:p>
          </table:table-cell>
          <table:table-cell table:style-name="ce162" table:formula="of:=IFERROR(VLOOKUP([$Masterlist.$P234];[$Datasheet.$B$1:.$AV$9809];9;FALSE());&quot;-&quot;)" office:value-type="string" office:string-value="-" calcext:value-type="string">
            <text:p>-</text:p>
          </table:table-cell>
          <table:table-cell table:style-name="ce162" table:formula="of:=IFERROR(VLOOKUP([$Masterlist.$P234];[$Datasheet.$B$1:.$AV$9809];10;FALSE());&quot;-&quot;)" office:value-type="string" office:string-value="-" calcext:value-type="string">
            <text:p>-</text:p>
          </table:table-cell>
          <table:table-cell table:style-name="ce225" table:formula="of:=IFERROR(VLOOKUP([$Masterlist.$P234];[$Datasheet.$B$1:.$AV$9809];11;FALSE());&quot;-&quot;)" office:value-type="string" office:string-value="-" calcext:value-type="string">
            <text:p>-</text:p>
          </table:table-cell>
          <table:table-cell table:style-name="ce225" table:formula="of:=IFERROR(VLOOKUP([$Masterlist.$P234];[$Datasheet.$B$1:.$AV$9809];12;FALSE());&quot;-&quot;)" office:value-type="string" office:string-value="-" calcext:value-type="string">
            <text:p>-</text:p>
          </table:table-cell>
          <table:table-cell table:style-name="ce225" table:formula="of:=IFERROR(VLOOKUP([$Masterlist.$P234];[$Datasheet.$B$1:.$AV$9809];13;FALSE());&quot;-&quot;)" office:value-type="string" office:string-value="-" calcext:value-type="string">
            <text:p>-</text:p>
          </table:table-cell>
          <table:table-cell table:style-name="ce225" table:formula="of:=IFERROR(VLOOKUP([$Masterlist.$P234];[$Datasheet.$B$1:.$AV$9809];14;FALSE());&quot;-&quot;)" office:value-type="string" office:string-value="-" calcext:value-type="string">
            <text:p>-</text:p>
          </table:table-cell>
          <table:table-cell table:style-name="ce225" table:formula="of:=IFERROR(VLOOKUP([$Masterlist.$P234];[$Datasheet.$B$1:.$AV$9809];15;FALSE());&quot;-&quot;)" office:value-type="string" office:string-value="-" calcext:value-type="string">
            <text:p>-</text:p>
          </table:table-cell>
          <table:table-cell table:style-name="ce225" table:formula="of:=IFERROR(VLOOKUP([$Masterlist.$P234];[$Datasheet.$B$1:.$AV$9809];16;FALSE());&quot;-&quot;)" office:value-type="string" office:string-value="-" calcext:value-type="string">
            <text:p>-</text:p>
          </table:table-cell>
          <table:table-cell table:style-name="ce225" table:formula="of:=IFERROR(VLOOKUP([$Masterlist.$P234];[$Datasheet.$B$1:.$AV$9809];17;FALSE());&quot;-&quot;)" office:value-type="string" office:string-value="-" calcext:value-type="string">
            <text:p>-</text:p>
          </table:table-cell>
          <table:table-cell table:style-name="ce225" table:formula="of:=IFERROR(VLOOKUP([$Masterlist.$P234];[$Datasheet.$B$1:.$AV$9809];18;FALSE());&quot;-&quot;)" office:value-type="string" office:string-value="-" calcext:value-type="string">
            <text:p>-</text:p>
          </table:table-cell>
          <table:table-cell table:style-name="ce225" table:formula="of:=IFERROR(VLOOKUP([$Masterlist.$P234];[$Datasheet.$B$1:.$AV$9809];19;FALSE());&quot;-&quot;)" office:value-type="string" office:string-value="-" calcext:value-type="string">
            <text:p>-</text:p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6"/>
          <table:table-cell table:style-name="ce26" office:value-type="string" calcext:value-type="string">
            <text:p>L</text:p>
          </table:table-cell>
          <table:table-cell table:style-name="ce50"/>
          <table:table-cell table:style-name="ce50" office:value-type="string" calcext:value-type="string">
            <text:p>yes</text:p>
          </table:table-cell>
          <table:table-cell table:style-name="ce50" table:number-columns-repeated="10"/>
          <table:table-cell table:style-name="ce92" office:value-type="string" calcext:value-type="string">
            <text:p>Cable Runner</text:p>
          </table:table-cell>
          <table:table-cell table:style-name="ce8" office:value-type="string" calcext:value-type="string">
            <text:p>Ruan Taljaard</text:p>
          </table:table-cell>
          <table:table-cell table:style-name="ce13" table:formula="of:=IF(ISNUMBER(MATCH([.P235];[$Datasheet.$B$1:.$B$9809];0));&quot;✓&quot;;&quot;x&quot;)" office:value-type="string" office:string-value="x" calcext:value-type="string">
            <text:p>x</text:p>
          </table:table-cell>
          <table:table-cell table:style-name="ce162" table:formula="of:=IFERROR(VLOOKUP([$Masterlist.$P235];[$Datasheet.$B$1:.$AV$9809];2;FALSE());&quot;-&quot;)" office:value-type="string" office:string-value="-" calcext:value-type="string">
            <text:p>-</text:p>
          </table:table-cell>
          <table:table-cell table:style-name="ce162" table:formula="of:=IFERROR(VLOOKUP([$Masterlist.$P235];[$Datasheet.$B$1:.$AV$9809];3;FALSE());&quot;-&quot;)" office:value-type="string" office:string-value="-" calcext:value-type="string">
            <text:p>-</text:p>
          </table:table-cell>
          <table:table-cell table:style-name="ce162" table:formula="of:=IFERROR(VLOOKUP([$Masterlist.$P235];[$Datasheet.$B$1:.$AV$9809];4;FALSE());&quot;-&quot;)" office:value-type="string" office:string-value="-" calcext:value-type="string">
            <text:p>-</text:p>
          </table:table-cell>
          <table:table-cell table:style-name="ce162" table:formula="of:=IFERROR(VLOOKUP([$Masterlist.$P235];[$Datasheet.$B$1:.$AV$9809];5;FALSE());&quot;-&quot;)" office:value-type="string" office:string-value="-" calcext:value-type="string">
            <text:p>-</text:p>
          </table:table-cell>
          <table:table-cell table:style-name="ce206" table:formula="of:=IFERROR(VLOOKUP([$Masterlist.$P235];[$Datasheet.$B$1:.$AV$9809];6;FALSE());&quot;-&quot;)" office:value-type="string" office:string-value="-" calcext:value-type="string">
            <text:p>-</text:p>
          </table:table-cell>
          <table:table-cell table:style-name="ce162" table:formula="of:=IFERROR(VLOOKUP([$Masterlist.$P235];[$Datasheet.$B$1:.$AV$9809];7;FALSE());&quot;-&quot;)" office:value-type="string" office:string-value="-" calcext:value-type="string">
            <text:p>-</text:p>
          </table:table-cell>
          <table:table-cell table:style-name="ce162" table:formula="of:=IFERROR(VLOOKUP([$Masterlist.$P235];[$Datasheet.$B$1:.$AV$9809];8;FALSE());&quot;-&quot;)" office:value-type="string" office:string-value="-" calcext:value-type="string">
            <text:p>-</text:p>
          </table:table-cell>
          <table:table-cell table:style-name="ce162" table:formula="of:=IFERROR(VLOOKUP([$Masterlist.$P235];[$Datasheet.$B$1:.$AV$9809];9;FALSE());&quot;-&quot;)" office:value-type="string" office:string-value="-" calcext:value-type="string">
            <text:p>-</text:p>
          </table:table-cell>
          <table:table-cell table:style-name="ce162" table:formula="of:=IFERROR(VLOOKUP([$Masterlist.$P235];[$Datasheet.$B$1:.$AV$9809];10;FALSE());&quot;-&quot;)" office:value-type="string" office:string-value="-" calcext:value-type="string">
            <text:p>-</text:p>
          </table:table-cell>
          <table:table-cell table:style-name="ce225" table:formula="of:=IFERROR(VLOOKUP([$Masterlist.$P235];[$Datasheet.$B$1:.$AV$9809];11;FALSE());&quot;-&quot;)" office:value-type="string" office:string-value="-" calcext:value-type="string">
            <text:p>-</text:p>
          </table:table-cell>
          <table:table-cell table:style-name="ce225" table:formula="of:=IFERROR(VLOOKUP([$Masterlist.$P235];[$Datasheet.$B$1:.$AV$9809];12;FALSE());&quot;-&quot;)" office:value-type="string" office:string-value="-" calcext:value-type="string">
            <text:p>-</text:p>
          </table:table-cell>
          <table:table-cell table:style-name="ce225" table:formula="of:=IFERROR(VLOOKUP([$Masterlist.$P235];[$Datasheet.$B$1:.$AV$9809];13;FALSE());&quot;-&quot;)" office:value-type="string" office:string-value="-" calcext:value-type="string">
            <text:p>-</text:p>
          </table:table-cell>
          <table:table-cell table:style-name="ce225" table:formula="of:=IFERROR(VLOOKUP([$Masterlist.$P235];[$Datasheet.$B$1:.$AV$9809];14;FALSE());&quot;-&quot;)" office:value-type="string" office:string-value="-" calcext:value-type="string">
            <text:p>-</text:p>
          </table:table-cell>
          <table:table-cell table:style-name="ce225" table:formula="of:=IFERROR(VLOOKUP([$Masterlist.$P235];[$Datasheet.$B$1:.$AV$9809];15;FALSE());&quot;-&quot;)" office:value-type="string" office:string-value="-" calcext:value-type="string">
            <text:p>-</text:p>
          </table:table-cell>
          <table:table-cell table:style-name="ce225" table:formula="of:=IFERROR(VLOOKUP([$Masterlist.$P235];[$Datasheet.$B$1:.$AV$9809];16;FALSE());&quot;-&quot;)" office:value-type="string" office:string-value="-" calcext:value-type="string">
            <text:p>-</text:p>
          </table:table-cell>
          <table:table-cell table:style-name="ce225" table:formula="of:=IFERROR(VLOOKUP([$Masterlist.$P235];[$Datasheet.$B$1:.$AV$9809];17;FALSE());&quot;-&quot;)" office:value-type="string" office:string-value="-" calcext:value-type="string">
            <text:p>-</text:p>
          </table:table-cell>
          <table:table-cell table:style-name="ce225" table:formula="of:=IFERROR(VLOOKUP([$Masterlist.$P235];[$Datasheet.$B$1:.$AV$9809];18;FALSE());&quot;-&quot;)" office:value-type="string" office:string-value="-" calcext:value-type="string">
            <text:p>-</text:p>
          </table:table-cell>
          <table:table-cell table:style-name="ce225" table:formula="of:=IFERROR(VLOOKUP([$Masterlist.$P235];[$Datasheet.$B$1:.$AV$9809];19;FALSE());&quot;-&quot;)" office:value-type="string" office:string-value="-" calcext:value-type="string">
            <text:p>-</text:p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6"/>
          <table:table-cell table:style-name="ce26" office:value-type="string" calcext:value-type="string">
            <text:p>L</text:p>
          </table:table-cell>
          <table:table-cell table:style-name="ce50"/>
          <table:table-cell table:style-name="ce50" office:value-type="string" calcext:value-type="string">
            <text:p>yes</text:p>
          </table:table-cell>
          <table:table-cell table:style-name="ce50" table:number-columns-repeated="10"/>
          <table:table-cell table:style-name="ce92" office:value-type="string" calcext:value-type="string">
            <text:p>Cable Lead</text:p>
          </table:table-cell>
          <table:table-cell table:style-name="ce8" office:value-type="string" calcext:value-type="string">
            <text:p>Werner Schulte</text:p>
          </table:table-cell>
          <table:table-cell table:style-name="ce13" table:formula="of:=IF(ISNUMBER(MATCH([.P236];[$Datasheet.$B$1:.$B$9809];0));&quot;✓&quot;;&quot;x&quot;)" office:value-type="string" office:string-value="✓" calcext:value-type="string">
            <text:p>✓</text:p>
          </table:table-cell>
          <table:table-cell table:style-name="ce162" table:formula="of:=IFERROR(VLOOKUP([$Masterlist.$P236];[$Datasheet.$B$1:.$AV$9809];2;FALSE());&quot;-&quot;)" office:value-type="float" office:value="0" calcext:value-type="float">
            <text:p>0</text:p>
          </table:table-cell>
          <table:table-cell table:style-name="ce162" table:formula="of:=IFERROR(VLOOKUP([$Masterlist.$P236];[$Datasheet.$B$1:.$AV$9809];3;FALSE());&quot;-&quot;)" office:value-type="float" office:value="1" calcext:value-type="float">
            <text:p>1</text:p>
          </table:table-cell>
          <table:table-cell table:style-name="ce162" table:formula="of:=IFERROR(VLOOKUP([$Masterlist.$P236];[$Datasheet.$B$1:.$AV$9809];4;FALSE());&quot;-&quot;)" office:value-type="float" office:value="0" calcext:value-type="float">
            <text:p>0</text:p>
          </table:table-cell>
          <table:table-cell table:style-name="ce162" table:formula="of:=IFERROR(VLOOKUP([$Masterlist.$P236];[$Datasheet.$B$1:.$AV$9809];5;FALSE());&quot;-&quot;)" office:value-type="float" office:value="0" calcext:value-type="float">
            <text:p>0</text:p>
          </table:table-cell>
          <table:table-cell table:style-name="ce206" table:formula="of:=IFERROR(VLOOKUP([$Masterlist.$P236];[$Datasheet.$B$1:.$AV$9809];6;FALSE());&quot;-&quot;)" office:value-type="float" office:value="0" calcext:value-type="float">
            <text:p>0</text:p>
          </table:table-cell>
          <table:table-cell table:style-name="ce162" table:formula="of:=IFERROR(VLOOKUP([$Masterlist.$P236];[$Datasheet.$B$1:.$AV$9809];7;FALSE());&quot;-&quot;)" office:value-type="float" office:value="0" calcext:value-type="float">
            <text:p>0</text:p>
          </table:table-cell>
          <table:table-cell table:style-name="ce162" table:formula="of:=IFERROR(VLOOKUP([$Masterlist.$P236];[$Datasheet.$B$1:.$AV$9809];8;FALSE());&quot;-&quot;)" office:value-type="float" office:value="0" calcext:value-type="float">
            <text:p>0</text:p>
          </table:table-cell>
          <table:table-cell table:style-name="ce162" table:formula="of:=IFERROR(VLOOKUP([$Masterlist.$P236];[$Datasheet.$B$1:.$AV$9809];9;FALSE());&quot;-&quot;)" office:value-type="float" office:value="0" calcext:value-type="float">
            <text:p>0</text:p>
          </table:table-cell>
          <table:table-cell table:style-name="ce162" table:formula="of:=IFERROR(VLOOKUP([$Masterlist.$P236];[$Datasheet.$B$1:.$AV$9809];10;FALSE());&quot;-&quot;)" office:value-type="float" office:value="0" calcext:value-type="float">
            <text:p>0</text:p>
          </table:table-cell>
          <table:table-cell table:style-name="ce225" table:formula="of:=IFERROR(VLOOKUP([$Masterlist.$P236];[$Datasheet.$B$1:.$AV$9809];11;FALSE());&quot;-&quot;)" office:value-type="float" office:value="1" calcext:value-type="float">
            <text:p>1</text:p>
          </table:table-cell>
          <table:table-cell table:style-name="ce225" table:formula="of:=IFERROR(VLOOKUP([$Masterlist.$P236];[$Datasheet.$B$1:.$AV$9809];12;FALSE());&quot;-&quot;)" office:value-type="float" office:value="0" calcext:value-type="float">
            <text:p>0</text:p>
          </table:table-cell>
          <table:table-cell table:style-name="ce225" table:formula="of:=IFERROR(VLOOKUP([$Masterlist.$P236];[$Datasheet.$B$1:.$AV$9809];13;FALSE());&quot;-&quot;)" office:value-type="float" office:value="0" calcext:value-type="float">
            <text:p>0</text:p>
          </table:table-cell>
          <table:table-cell table:style-name="ce225" table:formula="of:=IFERROR(VLOOKUP([$Masterlist.$P236];[$Datasheet.$B$1:.$AV$9809];14;FALSE());&quot;-&quot;)" office:value-type="float" office:value="0" calcext:value-type="float">
            <text:p>0</text:p>
          </table:table-cell>
          <table:table-cell table:style-name="ce225" table:formula="of:=IFERROR(VLOOKUP([$Masterlist.$P236];[$Datasheet.$B$1:.$AV$9809];15;FALSE());&quot;-&quot;)" office:value-type="float" office:value="1" calcext:value-type="float">
            <text:p>1</text:p>
          </table:table-cell>
          <table:table-cell table:style-name="ce225" table:formula="of:=IFERROR(VLOOKUP([$Masterlist.$P236];[$Datasheet.$B$1:.$AV$9809];16;FALSE());&quot;-&quot;)" office:value-type="float" office:value="0" calcext:value-type="float">
            <text:p/>
          </table:table-cell>
          <table:table-cell table:style-name="ce225" table:formula="of:=IFERROR(VLOOKUP([$Masterlist.$P236];[$Datasheet.$B$1:.$AV$9809];17;FALSE());&quot;-&quot;)" office:value-type="float" office:value="0" calcext:value-type="float">
            <text:p/>
          </table:table-cell>
          <table:table-cell table:style-name="ce225" table:formula="of:=IFERROR(VLOOKUP([$Masterlist.$P236];[$Datasheet.$B$1:.$AV$9809];18;FALSE());&quot;-&quot;)" office:value-type="float" office:value="0" calcext:value-type="float">
            <text:p/>
          </table:table-cell>
          <table:table-cell table:style-name="ce225" table:formula="of:=IFERROR(VLOOKUP([$Masterlist.$P236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6"/>
          <table:table-cell table:style-name="ce27" office:value-type="string" calcext:value-type="string">
            <text:p>L</text:p>
          </table:table-cell>
          <table:table-cell table:style-name="ce51"/>
          <table:table-cell table:number-columns-repeated="2" table:style-name="ce51" office:value-type="string" calcext:value-type="string">
            <text:p>Yes</text:p>
          </table:table-cell>
          <table:table-cell table:style-name="ce51" table:number-columns-repeated="9"/>
          <table:table-cell table:style-name="ce93" office:value-type="string" calcext:value-type="string">
            <text:p>Cable Lead</text:p>
          </table:table-cell>
          <table:table-cell table:style-name="ce102" office:value-type="string" calcext:value-type="string">
            <text:p>Philcu Hatting</text:p>
          </table:table-cell>
          <table:table-cell table:style-name="ce13" table:formula="of:=IF(ISNUMBER(MATCH([.P237];[$Datasheet.$B$1:.$B$9809];0));&quot;✓&quot;;&quot;x&quot;)" office:value-type="string" office:string-value="x" calcext:value-type="string">
            <text:p>x</text:p>
          </table:table-cell>
          <table:table-cell table:style-name="ce162" table:formula="of:=IFERROR(VLOOKUP([$Masterlist.$P237];[$Datasheet.$B$1:.$AV$9809];2;FALSE());&quot;-&quot;)" office:value-type="string" office:string-value="-" calcext:value-type="string">
            <text:p>-</text:p>
          </table:table-cell>
          <table:table-cell table:style-name="ce162" table:formula="of:=IFERROR(VLOOKUP([$Masterlist.$P237];[$Datasheet.$B$1:.$AV$9809];3;FALSE());&quot;-&quot;)" office:value-type="string" office:string-value="-" calcext:value-type="string">
            <text:p>-</text:p>
          </table:table-cell>
          <table:table-cell table:style-name="ce162" table:formula="of:=IFERROR(VLOOKUP([$Masterlist.$P237];[$Datasheet.$B$1:.$AV$9809];4;FALSE());&quot;-&quot;)" office:value-type="string" office:string-value="-" calcext:value-type="string">
            <text:p>-</text:p>
          </table:table-cell>
          <table:table-cell table:style-name="ce162" table:formula="of:=IFERROR(VLOOKUP([$Masterlist.$P237];[$Datasheet.$B$1:.$AV$9809];5;FALSE());&quot;-&quot;)" office:value-type="string" office:string-value="-" calcext:value-type="string">
            <text:p>-</text:p>
          </table:table-cell>
          <table:table-cell table:style-name="ce206" table:formula="of:=IFERROR(VLOOKUP([$Masterlist.$P237];[$Datasheet.$B$1:.$AV$9809];6;FALSE());&quot;-&quot;)" office:value-type="string" office:string-value="-" calcext:value-type="string">
            <text:p>-</text:p>
          </table:table-cell>
          <table:table-cell table:style-name="ce162" table:formula="of:=IFERROR(VLOOKUP([$Masterlist.$P237];[$Datasheet.$B$1:.$AV$9809];7;FALSE());&quot;-&quot;)" office:value-type="string" office:string-value="-" calcext:value-type="string">
            <text:p>-</text:p>
          </table:table-cell>
          <table:table-cell table:style-name="ce162" table:formula="of:=IFERROR(VLOOKUP([$Masterlist.$P237];[$Datasheet.$B$1:.$AV$9809];8;FALSE());&quot;-&quot;)" office:value-type="string" office:string-value="-" calcext:value-type="string">
            <text:p>-</text:p>
          </table:table-cell>
          <table:table-cell table:style-name="ce162" table:formula="of:=IFERROR(VLOOKUP([$Masterlist.$P237];[$Datasheet.$B$1:.$AV$9809];9;FALSE());&quot;-&quot;)" office:value-type="string" office:string-value="-" calcext:value-type="string">
            <text:p>-</text:p>
          </table:table-cell>
          <table:table-cell table:style-name="ce162" table:formula="of:=IFERROR(VLOOKUP([$Masterlist.$P237];[$Datasheet.$B$1:.$AV$9809];10;FALSE());&quot;-&quot;)" office:value-type="string" office:string-value="-" calcext:value-type="string">
            <text:p>-</text:p>
          </table:table-cell>
          <table:table-cell table:style-name="ce225" table:formula="of:=IFERROR(VLOOKUP([$Masterlist.$P237];[$Datasheet.$B$1:.$AV$9809];11;FALSE());&quot;-&quot;)" office:value-type="string" office:string-value="-" calcext:value-type="string">
            <text:p>-</text:p>
          </table:table-cell>
          <table:table-cell table:style-name="ce225" table:formula="of:=IFERROR(VLOOKUP([$Masterlist.$P237];[$Datasheet.$B$1:.$AV$9809];12;FALSE());&quot;-&quot;)" office:value-type="string" office:string-value="-" calcext:value-type="string">
            <text:p>-</text:p>
          </table:table-cell>
          <table:table-cell table:style-name="ce225" table:formula="of:=IFERROR(VLOOKUP([$Masterlist.$P237];[$Datasheet.$B$1:.$AV$9809];13;FALSE());&quot;-&quot;)" office:value-type="string" office:string-value="-" calcext:value-type="string">
            <text:p>-</text:p>
          </table:table-cell>
          <table:table-cell table:style-name="ce225" table:formula="of:=IFERROR(VLOOKUP([$Masterlist.$P237];[$Datasheet.$B$1:.$AV$9809];14;FALSE());&quot;-&quot;)" office:value-type="string" office:string-value="-" calcext:value-type="string">
            <text:p>-</text:p>
          </table:table-cell>
          <table:table-cell table:style-name="ce225" table:formula="of:=IFERROR(VLOOKUP([$Masterlist.$P237];[$Datasheet.$B$1:.$AV$9809];15;FALSE());&quot;-&quot;)" office:value-type="string" office:string-value="-" calcext:value-type="string">
            <text:p>-</text:p>
          </table:table-cell>
          <table:table-cell table:style-name="ce225" table:formula="of:=IFERROR(VLOOKUP([$Masterlist.$P237];[$Datasheet.$B$1:.$AV$9809];16;FALSE());&quot;-&quot;)" office:value-type="string" office:string-value="-" calcext:value-type="string">
            <text:p>-</text:p>
          </table:table-cell>
          <table:table-cell table:style-name="ce225" table:formula="of:=IFERROR(VLOOKUP([$Masterlist.$P237];[$Datasheet.$B$1:.$AV$9809];17;FALSE());&quot;-&quot;)" office:value-type="string" office:string-value="-" calcext:value-type="string">
            <text:p>-</text:p>
          </table:table-cell>
          <table:table-cell table:style-name="ce225" table:formula="of:=IFERROR(VLOOKUP([$Masterlist.$P237];[$Datasheet.$B$1:.$AV$9809];18;FALSE());&quot;-&quot;)" office:value-type="string" office:string-value="-" calcext:value-type="string">
            <text:p>-</text:p>
          </table:table-cell>
          <table:table-cell table:style-name="ce225" table:formula="of:=IFERROR(VLOOKUP([$Masterlist.$P237];[$Datasheet.$B$1:.$AV$9809];19;FALSE());&quot;-&quot;)" office:value-type="string" office:string-value="-" calcext:value-type="string">
            <text:p>-</text:p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6"/>
          <table:table-cell table:style-name="ce27" office:value-type="string" calcext:value-type="string">
            <text:p>L</text:p>
          </table:table-cell>
          <table:table-cell table:style-name="ce51"/>
          <table:table-cell table:number-columns-repeated="2" table:style-name="ce51" office:value-type="string" calcext:value-type="string">
            <text:p>Yes</text:p>
          </table:table-cell>
          <table:table-cell table:style-name="ce51" table:number-columns-repeated="9"/>
          <table:table-cell table:style-name="ce93" office:value-type="string" calcext:value-type="string">
            <text:p>Cable Lead - Lynnwood</text:p>
          </table:table-cell>
          <table:table-cell table:style-name="ce102" office:value-type="string" calcext:value-type="string">
            <text:p>Magnus Koola</text:p>
          </table:table-cell>
          <table:table-cell table:style-name="ce13" table:formula="of:=IF(ISNUMBER(MATCH([.P238];[$Datasheet.$B$1:.$B$9809];0));&quot;✓&quot;;&quot;x&quot;)" office:value-type="string" office:string-value="✓" calcext:value-type="string">
            <text:p>✓</text:p>
          </table:table-cell>
          <table:table-cell table:style-name="ce162" table:formula="of:=IFERROR(VLOOKUP([$Masterlist.$P238];[$Datasheet.$B$1:.$AV$9809];2;FALSE());&quot;-&quot;)" office:value-type="float" office:value="1" calcext:value-type="float">
            <text:p>1</text:p>
          </table:table-cell>
          <table:table-cell table:style-name="ce162" table:formula="of:=IFERROR(VLOOKUP([$Masterlist.$P238];[$Datasheet.$B$1:.$AV$9809];3;FALSE());&quot;-&quot;)" office:value-type="float" office:value="1" calcext:value-type="float">
            <text:p>1</text:p>
          </table:table-cell>
          <table:table-cell table:style-name="ce162" table:formula="of:=IFERROR(VLOOKUP([$Masterlist.$P238];[$Datasheet.$B$1:.$AV$9809];4;FALSE());&quot;-&quot;)" office:value-type="float" office:value="1" calcext:value-type="float">
            <text:p>1</text:p>
          </table:table-cell>
          <table:table-cell table:style-name="ce162" table:formula="of:=IFERROR(VLOOKUP([$Masterlist.$P238];[$Datasheet.$B$1:.$AV$9809];5;FALSE());&quot;-&quot;)" office:value-type="float" office:value="1" calcext:value-type="float">
            <text:p>1</text:p>
          </table:table-cell>
          <table:table-cell table:style-name="ce206" table:formula="of:=IFERROR(VLOOKUP([$Masterlist.$P238];[$Datasheet.$B$1:.$AV$9809];6;FALSE());&quot;-&quot;)" office:value-type="float" office:value="1" calcext:value-type="float">
            <text:p>1</text:p>
          </table:table-cell>
          <table:table-cell table:style-name="ce162" table:formula="of:=IFERROR(VLOOKUP([$Masterlist.$P238];[$Datasheet.$B$1:.$AV$9809];7;FALSE());&quot;-&quot;)" office:value-type="float" office:value="1" calcext:value-type="float">
            <text:p>1</text:p>
          </table:table-cell>
          <table:table-cell table:style-name="ce162" table:formula="of:=IFERROR(VLOOKUP([$Masterlist.$P238];[$Datasheet.$B$1:.$AV$9809];8;FALSE());&quot;-&quot;)" office:value-type="float" office:value="1" calcext:value-type="float">
            <text:p>1</text:p>
          </table:table-cell>
          <table:table-cell table:style-name="ce162" table:formula="of:=IFERROR(VLOOKUP([$Masterlist.$P238];[$Datasheet.$B$1:.$AV$9809];9;FALSE());&quot;-&quot;)" office:value-type="float" office:value="1" calcext:value-type="float">
            <text:p>1</text:p>
          </table:table-cell>
          <table:table-cell table:style-name="ce162" table:formula="of:=IFERROR(VLOOKUP([$Masterlist.$P238];[$Datasheet.$B$1:.$AV$9809];10;FALSE());&quot;-&quot;)" office:value-type="float" office:value="1" calcext:value-type="float">
            <text:p>1</text:p>
          </table:table-cell>
          <table:table-cell table:style-name="ce225" table:formula="of:=IFERROR(VLOOKUP([$Masterlist.$P238];[$Datasheet.$B$1:.$AV$9809];11;FALSE());&quot;-&quot;)" office:value-type="float" office:value="1" calcext:value-type="float">
            <text:p>1</text:p>
          </table:table-cell>
          <table:table-cell table:style-name="ce225" table:formula="of:=IFERROR(VLOOKUP([$Masterlist.$P238];[$Datasheet.$B$1:.$AV$9809];12;FALSE());&quot;-&quot;)" office:value-type="float" office:value="1" calcext:value-type="float">
            <text:p>1</text:p>
          </table:table-cell>
          <table:table-cell table:style-name="ce225" table:formula="of:=IFERROR(VLOOKUP([$Masterlist.$P238];[$Datasheet.$B$1:.$AV$9809];13;FALSE());&quot;-&quot;)" office:value-type="float" office:value="1" calcext:value-type="float">
            <text:p>1</text:p>
          </table:table-cell>
          <table:table-cell table:style-name="ce225" table:formula="of:=IFERROR(VLOOKUP([$Masterlist.$P238];[$Datasheet.$B$1:.$AV$9809];14;FALSE());&quot;-&quot;)" office:value-type="float" office:value="1" calcext:value-type="float">
            <text:p>1</text:p>
          </table:table-cell>
          <table:table-cell table:style-name="ce225" table:formula="of:=IFERROR(VLOOKUP([$Masterlist.$P238];[$Datasheet.$B$1:.$AV$9809];15;FALSE());&quot;-&quot;)" office:value-type="float" office:value="1" calcext:value-type="float">
            <text:p>1</text:p>
          </table:table-cell>
          <table:table-cell table:style-name="ce225" table:formula="of:=IFERROR(VLOOKUP([$Masterlist.$P238];[$Datasheet.$B$1:.$AV$9809];16;FALSE());&quot;-&quot;)" office:value-type="float" office:value="0" calcext:value-type="float">
            <text:p/>
          </table:table-cell>
          <table:table-cell table:style-name="ce225" table:formula="of:=IFERROR(VLOOKUP([$Masterlist.$P238];[$Datasheet.$B$1:.$AV$9809];17;FALSE());&quot;-&quot;)" office:value-type="float" office:value="0" calcext:value-type="float">
            <text:p/>
          </table:table-cell>
          <table:table-cell table:style-name="ce225" table:formula="of:=IFERROR(VLOOKUP([$Masterlist.$P238];[$Datasheet.$B$1:.$AV$9809];18;FALSE());&quot;-&quot;)" office:value-type="float" office:value="0" calcext:value-type="float">
            <text:p/>
          </table:table-cell>
          <table:table-cell table:style-name="ce225" table:formula="of:=IFERROR(VLOOKUP([$Masterlist.$P238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6"/>
          <table:table-cell table:style-name="ce27" office:value-type="string" calcext:value-type="string">
            <text:p>L</text:p>
          </table:table-cell>
          <table:table-cell table:style-name="ce51"/>
          <table:table-cell table:style-name="ce51" office:value-type="string" calcext:value-type="string">
            <text:p>yes</text:p>
          </table:table-cell>
          <table:table-cell table:style-name="ce51" table:number-columns-repeated="10"/>
          <table:table-cell table:style-name="ce93" office:value-type="string" calcext:value-type="string">
            <text:p>Cable Lead</text:p>
          </table:table-cell>
          <table:table-cell table:style-name="ce102" office:value-type="string" calcext:value-type="string">
            <text:p>Franco Conradie</text:p>
          </table:table-cell>
          <table:table-cell table:style-name="ce116" table:formula="of:=IF(ISNUMBER(MATCH([.P239];[$Datasheet.$B$1:.$B$9809];0));&quot;✓&quot;;&quot;x&quot;)" office:value-type="string" office:string-value="✓" calcext:value-type="string">
            <text:p>✓</text:p>
          </table:table-cell>
          <table:table-cell table:style-name="ce163" table:formula="of:=IFERROR(VLOOKUP([$Masterlist.$P239];[$Datasheet.$B$1:.$AV$9809];2;FALSE());&quot;-&quot;)" office:value-type="float" office:value="0" calcext:value-type="float">
            <text:p>0</text:p>
          </table:table-cell>
          <table:table-cell table:style-name="ce163" table:formula="of:=IFERROR(VLOOKUP([$Masterlist.$P239];[$Datasheet.$B$1:.$AV$9809];3;FALSE());&quot;-&quot;)" office:value-type="float" office:value="0" calcext:value-type="float">
            <text:p>0</text:p>
          </table:table-cell>
          <table:table-cell table:style-name="ce163" table:formula="of:=IFERROR(VLOOKUP([$Masterlist.$P239];[$Datasheet.$B$1:.$AV$9809];4;FALSE());&quot;-&quot;)" office:value-type="float" office:value="1" calcext:value-type="float">
            <text:p>1</text:p>
          </table:table-cell>
          <table:table-cell table:style-name="ce163" table:formula="of:=IFERROR(VLOOKUP([$Masterlist.$P239];[$Datasheet.$B$1:.$AV$9809];5;FALSE());&quot;-&quot;)" office:value-type="float" office:value="1" calcext:value-type="float">
            <text:p>1</text:p>
          </table:table-cell>
          <table:table-cell table:style-name="ce207" table:formula="of:=IFERROR(VLOOKUP([$Masterlist.$P239];[$Datasheet.$B$1:.$AV$9809];6;FALSE());&quot;-&quot;)" office:value-type="float" office:value="0" calcext:value-type="float">
            <text:p>0</text:p>
          </table:table-cell>
          <table:table-cell table:style-name="ce163" table:formula="of:=IFERROR(VLOOKUP([$Masterlist.$P239];[$Datasheet.$B$1:.$AV$9809];7;FALSE());&quot;-&quot;)" office:value-type="float" office:value="0" calcext:value-type="float">
            <text:p>0</text:p>
          </table:table-cell>
          <table:table-cell table:style-name="ce163" table:formula="of:=IFERROR(VLOOKUP([$Masterlist.$P239];[$Datasheet.$B$1:.$AV$9809];8;FALSE());&quot;-&quot;)" office:value-type="float" office:value="1" calcext:value-type="float">
            <text:p>1</text:p>
          </table:table-cell>
          <table:table-cell table:style-name="ce163" table:formula="of:=IFERROR(VLOOKUP([$Masterlist.$P239];[$Datasheet.$B$1:.$AV$9809];9;FALSE());&quot;-&quot;)" office:value-type="float" office:value="1" calcext:value-type="float">
            <text:p>1</text:p>
          </table:table-cell>
          <table:table-cell table:style-name="ce163" table:formula="of:=IFERROR(VLOOKUP([$Masterlist.$P239];[$Datasheet.$B$1:.$AV$9809];10;FALSE());&quot;-&quot;)" office:value-type="float" office:value="0" calcext:value-type="float">
            <text:p>0</text:p>
          </table:table-cell>
          <table:table-cell table:style-name="ce226" table:formula="of:=IFERROR(VLOOKUP([$Masterlist.$P239];[$Datasheet.$B$1:.$AV$9809];11;FALSE());&quot;-&quot;)" office:value-type="float" office:value="0" calcext:value-type="float">
            <text:p>0</text:p>
          </table:table-cell>
          <table:table-cell table:style-name="ce226" table:formula="of:=IFERROR(VLOOKUP([$Masterlist.$P239];[$Datasheet.$B$1:.$AV$9809];12;FALSE());&quot;-&quot;)" office:value-type="float" office:value="1" calcext:value-type="float">
            <text:p>1</text:p>
          </table:table-cell>
          <table:table-cell table:style-name="ce226" table:formula="of:=IFERROR(VLOOKUP([$Masterlist.$P239];[$Datasheet.$B$1:.$AV$9809];13;FALSE());&quot;-&quot;)" office:value-type="float" office:value="1" calcext:value-type="float">
            <text:p>1</text:p>
          </table:table-cell>
          <table:table-cell table:style-name="ce226" table:formula="of:=IFERROR(VLOOKUP([$Masterlist.$P239];[$Datasheet.$B$1:.$AV$9809];14;FALSE());&quot;-&quot;)" office:value-type="float" office:value="0" calcext:value-type="float">
            <text:p>0</text:p>
          </table:table-cell>
          <table:table-cell table:style-name="ce226" table:formula="of:=IFERROR(VLOOKUP([$Masterlist.$P239];[$Datasheet.$B$1:.$AV$9809];15;FALSE());&quot;-&quot;)" office:value-type="float" office:value="0" calcext:value-type="float">
            <text:p>0</text:p>
          </table:table-cell>
          <table:table-cell table:style-name="ce226" table:formula="of:=IFERROR(VLOOKUP([$Masterlist.$P239];[$Datasheet.$B$1:.$AV$9809];16;FALSE());&quot;-&quot;)" office:value-type="float" office:value="0" calcext:value-type="float">
            <text:p/>
          </table:table-cell>
          <table:table-cell table:style-name="ce226" table:formula="of:=IFERROR(VLOOKUP([$Masterlist.$P239];[$Datasheet.$B$1:.$AV$9809];17;FALSE());&quot;-&quot;)" office:value-type="float" office:value="0" calcext:value-type="float">
            <text:p/>
          </table:table-cell>
          <table:table-cell table:style-name="ce226" table:formula="of:=IFERROR(VLOOKUP([$Masterlist.$P239];[$Datasheet.$B$1:.$AV$9809];18;FALSE());&quot;-&quot;)" office:value-type="float" office:value="0" calcext:value-type="float">
            <text:p/>
          </table:table-cell>
          <table:table-cell table:style-name="ce226" table:formula="of:=IFERROR(VLOOKUP([$Masterlist.$P239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43" office:value-type="string" calcext:value-type="string" table:number-columns-spanned="15" table:number-rows-spanned="1">
            <text:p>STAGE - JUAN-JACQUES KOCH</text:p>
          </table:table-cell>
          <table:covered-table-cell table:number-columns-repeated="13" table:style-name="ce45"/>
          <table:covered-table-cell table:style-name="ce99"/>
          <table:table-cell table:style-name="ce128"/>
          <table:table-cell table:style-name="ce164" office:value-type="string" calcext:value-type="string" table:number-columns-spanned="18" table:number-rows-spanned="1">
            <text:p>STAGE - JUAN-JACQUES KOCH</text:p>
          </table:table-cell>
          <table:covered-table-cell table:number-columns-repeated="16" table:style-name="ce45"/>
          <table:covered-table-cell table:style-name="ce99"/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5" office:value-type="string" calcext:value-type="string">
            <text:p>L</text:p>
          </table:table-cell>
          <table:table-cell table:number-columns-repeated="4" table:style-name="ce49" office:value-type="string" calcext:value-type="string">
            <text:p>yes</text:p>
          </table:table-cell>
          <table:table-cell table:style-name="ce49" table:number-columns-repeated="8"/>
          <table:table-cell table:style-name="ce91" office:value-type="string" calcext:value-type="string">
            <text:p>Stage Hand / uCrew Runner</text:p>
          </table:table-cell>
          <table:table-cell table:style-name="ce100" office:value-type="string" calcext:value-type="string">
            <text:p>André Lesch</text:p>
          </table:table-cell>
          <table:table-cell table:style-name="ce13" table:formula="of:=IF(ISNUMBER(MATCH([.P241];[$Datasheet.$B$1:.$B$9809];0));&quot;✓&quot;;&quot;x&quot;)" office:value-type="string" office:string-value="✓" calcext:value-type="string">
            <text:p>✓</text:p>
          </table:table-cell>
          <table:table-cell table:style-name="ce165" table:formula="of:=IFERROR(VLOOKUP([$Masterlist.$P241];[$Datasheet.$B$1:.$AV$9809];2;FALSE());&quot;-&quot;)" office:value-type="float" office:value="0" calcext:value-type="float">
            <text:p>0</text:p>
          </table:table-cell>
          <table:table-cell table:style-name="ce165" table:formula="of:=IFERROR(VLOOKUP([$Masterlist.$P241];[$Datasheet.$B$1:.$AV$9809];3;FALSE());&quot;-&quot;)" office:value-type="float" office:value="1" calcext:value-type="float">
            <text:p>1</text:p>
          </table:table-cell>
          <table:table-cell table:style-name="ce165" table:formula="of:=IFERROR(VLOOKUP([$Masterlist.$P241];[$Datasheet.$B$1:.$AV$9809];4;FALSE());&quot;-&quot;)" office:value-type="float" office:value="1" calcext:value-type="float">
            <text:p>1</text:p>
          </table:table-cell>
          <table:table-cell table:style-name="ce165" table:formula="of:=IFERROR(VLOOKUP([$Masterlist.$P241];[$Datasheet.$B$1:.$AV$9809];5;FALSE());&quot;-&quot;)" office:value-type="float" office:value="1" calcext:value-type="float">
            <text:p>1</text:p>
          </table:table-cell>
          <table:table-cell table:style-name="ce208" table:formula="of:=IFERROR(VLOOKUP([$Masterlist.$P241];[$Datasheet.$B$1:.$AV$9809];6;FALSE());&quot;-&quot;)" office:value-type="float" office:value="1" calcext:value-type="float">
            <text:p>1</text:p>
          </table:table-cell>
          <table:table-cell table:style-name="ce165" table:formula="of:=IFERROR(VLOOKUP([$Masterlist.$P241];[$Datasheet.$B$1:.$AV$9809];7;FALSE());&quot;-&quot;)" office:value-type="float" office:value="1" calcext:value-type="float">
            <text:p>1</text:p>
          </table:table-cell>
          <table:table-cell table:style-name="ce165" table:formula="of:=IFERROR(VLOOKUP([$Masterlist.$P241];[$Datasheet.$B$1:.$AV$9809];8;FALSE());&quot;-&quot;)" office:value-type="float" office:value="1" calcext:value-type="float">
            <text:p>1</text:p>
          </table:table-cell>
          <table:table-cell table:style-name="ce165" table:formula="of:=IFERROR(VLOOKUP([$Masterlist.$P241];[$Datasheet.$B$1:.$AV$9809];9;FALSE());&quot;-&quot;)" office:value-type="float" office:value="1" calcext:value-type="float">
            <text:p>1</text:p>
          </table:table-cell>
          <table:table-cell table:style-name="ce220" table:formula="of:=IFERROR(VLOOKUP([$Masterlist.$P241];[$Datasheet.$B$1:.$AV$9809];10;FALSE());&quot;-&quot;)" office:value-type="float" office:value="1" calcext:value-type="float">
            <text:p>1</text:p>
          </table:table-cell>
          <table:table-cell table:style-name="ce220" table:formula="of:=IFERROR(VLOOKUP([$Masterlist.$P241];[$Datasheet.$B$1:.$AV$9809];11;FALSE());&quot;-&quot;)" office:value-type="float" office:value="1" calcext:value-type="float">
            <text:p>1</text:p>
          </table:table-cell>
          <table:table-cell table:style-name="ce220" table:formula="of:=IFERROR(VLOOKUP([$Masterlist.$P241];[$Datasheet.$B$1:.$AV$9809];12;FALSE());&quot;-&quot;)" office:value-type="float" office:value="0" calcext:value-type="float">
            <text:p>0</text:p>
          </table:table-cell>
          <table:table-cell table:style-name="ce220" table:formula="of:=IFERROR(VLOOKUP([$Masterlist.$P241];[$Datasheet.$B$1:.$AV$9809];13;FALSE());&quot;-&quot;)" office:value-type="float" office:value="0" calcext:value-type="float">
            <text:p>0</text:p>
          </table:table-cell>
          <table:table-cell table:style-name="ce220" table:formula="of:=IFERROR(VLOOKUP([$Masterlist.$P241];[$Datasheet.$B$1:.$AV$9809];14;FALSE());&quot;-&quot;)" office:value-type="float" office:value="1" calcext:value-type="float">
            <text:p>1</text:p>
          </table:table-cell>
          <table:table-cell table:style-name="ce220" table:formula="of:=IFERROR(VLOOKUP([$Masterlist.$P241];[$Datasheet.$B$1:.$AV$9809];15;FALSE());&quot;-&quot;)" office:value-type="float" office:value="1" calcext:value-type="float">
            <text:p>1</text:p>
          </table:table-cell>
          <table:table-cell table:style-name="ce220" table:formula="of:=IFERROR(VLOOKUP([$Masterlist.$P241];[$Datasheet.$B$1:.$AV$9809];16;FALSE());&quot;-&quot;)" office:value-type="float" office:value="0" calcext:value-type="float">
            <text:p/>
          </table:table-cell>
          <table:table-cell table:style-name="ce220" table:formula="of:=IFERROR(VLOOKUP([$Masterlist.$P241];[$Datasheet.$B$1:.$AV$9809];17;FALSE());&quot;-&quot;)" office:value-type="float" office:value="0" calcext:value-type="float">
            <text:p/>
          </table:table-cell>
          <table:table-cell table:style-name="ce220" table:formula="of:=IFERROR(VLOOKUP([$Masterlist.$P241];[$Datasheet.$B$1:.$AV$9809];18;FALSE());&quot;-&quot;)" office:value-type="float" office:value="0" calcext:value-type="float">
            <text:p/>
          </table:table-cell>
          <table:table-cell table:style-name="ce220" table:formula="of:=IFERROR(VLOOKUP([$Masterlist.$P241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number-columns-repeated="4" table:style-name="ce50" office:value-type="string" calcext:value-type="string">
            <text:p>yes</text:p>
          </table:table-cell>
          <table:table-cell table:style-name="ce50" table:number-columns-repeated="8"/>
          <table:table-cell table:style-name="ce92" office:value-type="string" calcext:value-type="string">
            <text:p>Stage Hand / uCrew Runner</text:p>
          </table:table-cell>
          <table:table-cell table:style-name="ce97" office:value-type="string" calcext:value-type="string">
            <text:p>Christo Meyer</text:p>
          </table:table-cell>
          <table:table-cell table:style-name="ce13" table:formula="of:=IF(ISNUMBER(MATCH([.P242];[$Datasheet.$B$1:.$B$9809];0));&quot;✓&quot;;&quot;x&quot;)" office:value-type="string" office:string-value="x" calcext:value-type="string">
            <text:p>x</text:p>
          </table:table-cell>
          <table:table-cell table:style-name="ce165" table:formula="of:=IFERROR(VLOOKUP([$Masterlist.$P242];[$Datasheet.$B$1:.$AV$9809];2;FALSE());&quot;-&quot;)" office:value-type="string" office:string-value="-" calcext:value-type="string">
            <text:p>-</text:p>
          </table:table-cell>
          <table:table-cell table:style-name="ce165" table:formula="of:=IFERROR(VLOOKUP([$Masterlist.$P242];[$Datasheet.$B$1:.$AV$9809];3;FALSE());&quot;-&quot;)" office:value-type="string" office:string-value="-" calcext:value-type="string">
            <text:p>-</text:p>
          </table:table-cell>
          <table:table-cell table:style-name="ce165" table:formula="of:=IFERROR(VLOOKUP([$Masterlist.$P242];[$Datasheet.$B$1:.$AV$9809];4;FALSE());&quot;-&quot;)" office:value-type="string" office:string-value="-" calcext:value-type="string">
            <text:p>-</text:p>
          </table:table-cell>
          <table:table-cell table:style-name="ce165" table:formula="of:=IFERROR(VLOOKUP([$Masterlist.$P242];[$Datasheet.$B$1:.$AV$9809];5;FALSE());&quot;-&quot;)" office:value-type="string" office:string-value="-" calcext:value-type="string">
            <text:p>-</text:p>
          </table:table-cell>
          <table:table-cell table:style-name="ce208" table:formula="of:=IFERROR(VLOOKUP([$Masterlist.$P242];[$Datasheet.$B$1:.$AV$9809];6;FALSE());&quot;-&quot;)" office:value-type="string" office:string-value="-" calcext:value-type="string">
            <text:p>-</text:p>
          </table:table-cell>
          <table:table-cell table:style-name="ce165" table:formula="of:=IFERROR(VLOOKUP([$Masterlist.$P242];[$Datasheet.$B$1:.$AV$9809];7;FALSE());&quot;-&quot;)" office:value-type="string" office:string-value="-" calcext:value-type="string">
            <text:p>-</text:p>
          </table:table-cell>
          <table:table-cell table:style-name="ce165" table:formula="of:=IFERROR(VLOOKUP([$Masterlist.$P242];[$Datasheet.$B$1:.$AV$9809];8;FALSE());&quot;-&quot;)" office:value-type="string" office:string-value="-" calcext:value-type="string">
            <text:p>-</text:p>
          </table:table-cell>
          <table:table-cell table:style-name="ce165" table:formula="of:=IFERROR(VLOOKUP([$Masterlist.$P242];[$Datasheet.$B$1:.$AV$9809];9;FALSE());&quot;-&quot;)" office:value-type="string" office:string-value="-" calcext:value-type="string">
            <text:p>-</text:p>
          </table:table-cell>
          <table:table-cell table:style-name="ce220" table:formula="of:=IFERROR(VLOOKUP([$Masterlist.$P242];[$Datasheet.$B$1:.$AV$9809];10;FALSE());&quot;-&quot;)" office:value-type="string" office:string-value="-" calcext:value-type="string">
            <text:p>-</text:p>
          </table:table-cell>
          <table:table-cell table:style-name="ce220" table:formula="of:=IFERROR(VLOOKUP([$Masterlist.$P242];[$Datasheet.$B$1:.$AV$9809];11;FALSE());&quot;-&quot;)" office:value-type="string" office:string-value="-" calcext:value-type="string">
            <text:p>-</text:p>
          </table:table-cell>
          <table:table-cell table:style-name="ce220" table:formula="of:=IFERROR(VLOOKUP([$Masterlist.$P242];[$Datasheet.$B$1:.$AV$9809];12;FALSE());&quot;-&quot;)" office:value-type="string" office:string-value="-" calcext:value-type="string">
            <text:p>-</text:p>
          </table:table-cell>
          <table:table-cell table:style-name="ce220" table:formula="of:=IFERROR(VLOOKUP([$Masterlist.$P242];[$Datasheet.$B$1:.$AV$9809];13;FALSE());&quot;-&quot;)" office:value-type="string" office:string-value="-" calcext:value-type="string">
            <text:p>-</text:p>
          </table:table-cell>
          <table:table-cell table:style-name="ce220" table:formula="of:=IFERROR(VLOOKUP([$Masterlist.$P242];[$Datasheet.$B$1:.$AV$9809];14;FALSE());&quot;-&quot;)" office:value-type="string" office:string-value="-" calcext:value-type="string">
            <text:p>-</text:p>
          </table:table-cell>
          <table:table-cell table:style-name="ce220" table:formula="of:=IFERROR(VLOOKUP([$Masterlist.$P242];[$Datasheet.$B$1:.$AV$9809];15;FALSE());&quot;-&quot;)" office:value-type="string" office:string-value="-" calcext:value-type="string">
            <text:p>-</text:p>
          </table:table-cell>
          <table:table-cell table:style-name="ce220" table:formula="of:=IFERROR(VLOOKUP([$Masterlist.$P242];[$Datasheet.$B$1:.$AV$9809];16;FALSE());&quot;-&quot;)" office:value-type="string" office:string-value="-" calcext:value-type="string">
            <text:p>-</text:p>
          </table:table-cell>
          <table:table-cell table:style-name="ce220" table:formula="of:=IFERROR(VLOOKUP([$Masterlist.$P242];[$Datasheet.$B$1:.$AV$9809];17;FALSE());&quot;-&quot;)" office:value-type="string" office:string-value="-" calcext:value-type="string">
            <text:p>-</text:p>
          </table:table-cell>
          <table:table-cell table:style-name="ce220" table:formula="of:=IFERROR(VLOOKUP([$Masterlist.$P242];[$Datasheet.$B$1:.$AV$9809];18;FALSE());&quot;-&quot;)" office:value-type="string" office:string-value="-" calcext:value-type="string">
            <text:p>-</text:p>
          </table:table-cell>
          <table:table-cell table:style-name="ce220" table:formula="of:=IFERROR(VLOOKUP([$Masterlist.$P242];[$Datasheet.$B$1:.$AV$9809];19;FALSE());&quot;-&quot;)" office:value-type="string" office:string-value="-" calcext:value-type="string">
            <text:p>-</text:p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number-columns-repeated="4" table:style-name="ce50" office:value-type="string" calcext:value-type="string">
            <text:p>yes</text:p>
          </table:table-cell>
          <table:table-cell table:style-name="ce50" table:number-columns-repeated="8"/>
          <table:table-cell table:style-name="ce92" office:value-type="string" calcext:value-type="string">
            <text:p>Stage Hand / uCrew Runner</text:p>
          </table:table-cell>
          <table:table-cell table:style-name="ce8" office:value-type="string" calcext:value-type="string">
            <text:p>Anke Van Rooyen</text:p>
          </table:table-cell>
          <table:table-cell table:style-name="ce13" table:formula="of:=IF(ISNUMBER(MATCH([.P243];[$Datasheet.$B$1:.$B$9809];0));&quot;✓&quot;;&quot;x&quot;)" office:value-type="string" office:string-value="✓" calcext:value-type="string">
            <text:p>✓</text:p>
          </table:table-cell>
          <table:table-cell table:style-name="ce165" table:formula="of:=IFERROR(VLOOKUP([$Masterlist.$P243];[$Datasheet.$B$1:.$AV$9809];2;FALSE());&quot;-&quot;)" office:value-type="float" office:value="0" calcext:value-type="float">
            <text:p>0</text:p>
          </table:table-cell>
          <table:table-cell table:style-name="ce165" table:formula="of:=IFERROR(VLOOKUP([$Masterlist.$P243];[$Datasheet.$B$1:.$AV$9809];3;FALSE());&quot;-&quot;)" office:value-type="float" office:value="0" calcext:value-type="float">
            <text:p>0</text:p>
          </table:table-cell>
          <table:table-cell table:style-name="ce165" table:formula="of:=IFERROR(VLOOKUP([$Masterlist.$P243];[$Datasheet.$B$1:.$AV$9809];4;FALSE());&quot;-&quot;)" office:value-type="float" office:value="0" calcext:value-type="float">
            <text:p>0</text:p>
          </table:table-cell>
          <table:table-cell table:style-name="ce165" table:formula="of:=IFERROR(VLOOKUP([$Masterlist.$P243];[$Datasheet.$B$1:.$AV$9809];5;FALSE());&quot;-&quot;)" office:value-type="float" office:value="1" calcext:value-type="float">
            <text:p>1</text:p>
          </table:table-cell>
          <table:table-cell table:style-name="ce208" table:formula="of:=IFERROR(VLOOKUP([$Masterlist.$P243];[$Datasheet.$B$1:.$AV$9809];6;FALSE());&quot;-&quot;)" office:value-type="float" office:value="0" calcext:value-type="float">
            <text:p>0</text:p>
          </table:table-cell>
          <table:table-cell table:style-name="ce165" table:formula="of:=IFERROR(VLOOKUP([$Masterlist.$P243];[$Datasheet.$B$1:.$AV$9809];7;FALSE());&quot;-&quot;)" office:value-type="float" office:value="0" calcext:value-type="float">
            <text:p>0</text:p>
          </table:table-cell>
          <table:table-cell table:style-name="ce165" table:formula="of:=IFERROR(VLOOKUP([$Masterlist.$P243];[$Datasheet.$B$1:.$AV$9809];8;FALSE());&quot;-&quot;)" office:value-type="float" office:value="0" calcext:value-type="float">
            <text:p>0</text:p>
          </table:table-cell>
          <table:table-cell table:style-name="ce165" table:formula="of:=IFERROR(VLOOKUP([$Masterlist.$P243];[$Datasheet.$B$1:.$AV$9809];9;FALSE());&quot;-&quot;)" office:value-type="float" office:value="0" calcext:value-type="float">
            <text:p>0</text:p>
          </table:table-cell>
          <table:table-cell table:style-name="ce220" table:formula="of:=IFERROR(VLOOKUP([$Masterlist.$P243];[$Datasheet.$B$1:.$AV$9809];10;FALSE());&quot;-&quot;)" office:value-type="float" office:value="0" calcext:value-type="float">
            <text:p>0</text:p>
          </table:table-cell>
          <table:table-cell table:style-name="ce220" table:formula="of:=IFERROR(VLOOKUP([$Masterlist.$P243];[$Datasheet.$B$1:.$AV$9809];11;FALSE());&quot;-&quot;)" office:value-type="float" office:value="0" calcext:value-type="float">
            <text:p>0</text:p>
          </table:table-cell>
          <table:table-cell table:style-name="ce220" table:formula="of:=IFERROR(VLOOKUP([$Masterlist.$P243];[$Datasheet.$B$1:.$AV$9809];12;FALSE());&quot;-&quot;)" office:value-type="float" office:value="0" calcext:value-type="float">
            <text:p>0</text:p>
          </table:table-cell>
          <table:table-cell table:style-name="ce220" table:formula="of:=IFERROR(VLOOKUP([$Masterlist.$P243];[$Datasheet.$B$1:.$AV$9809];13;FALSE());&quot;-&quot;)" office:value-type="float" office:value="0" calcext:value-type="float">
            <text:p>0</text:p>
          </table:table-cell>
          <table:table-cell table:style-name="ce220" table:formula="of:=IFERROR(VLOOKUP([$Masterlist.$P243];[$Datasheet.$B$1:.$AV$9809];14;FALSE());&quot;-&quot;)" office:value-type="float" office:value="0" calcext:value-type="float">
            <text:p>0</text:p>
          </table:table-cell>
          <table:table-cell table:style-name="ce220" table:formula="of:=IFERROR(VLOOKUP([$Masterlist.$P243];[$Datasheet.$B$1:.$AV$9809];15;FALSE());&quot;-&quot;)" office:value-type="float" office:value="1" calcext:value-type="float">
            <text:p>1</text:p>
          </table:table-cell>
          <table:table-cell table:style-name="ce220" table:formula="of:=IFERROR(VLOOKUP([$Masterlist.$P243];[$Datasheet.$B$1:.$AV$9809];16;FALSE());&quot;-&quot;)" office:value-type="float" office:value="0" calcext:value-type="float">
            <text:p/>
          </table:table-cell>
          <table:table-cell table:style-name="ce220" table:formula="of:=IFERROR(VLOOKUP([$Masterlist.$P243];[$Datasheet.$B$1:.$AV$9809];17;FALSE());&quot;-&quot;)" office:value-type="float" office:value="0" calcext:value-type="float">
            <text:p/>
          </table:table-cell>
          <table:table-cell table:style-name="ce220" table:formula="of:=IFERROR(VLOOKUP([$Masterlist.$P243];[$Datasheet.$B$1:.$AV$9809];18;FALSE());&quot;-&quot;)" office:value-type="float" office:value="0" calcext:value-type="float">
            <text:p/>
          </table:table-cell>
          <table:table-cell table:style-name="ce220" table:formula="of:=IFERROR(VLOOKUP([$Masterlist.$P243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number-columns-repeated="4" table:style-name="ce50" office:value-type="string" calcext:value-type="string">
            <text:p>yes</text:p>
          </table:table-cell>
          <table:table-cell table:style-name="ce50" table:number-columns-repeated="8"/>
          <table:table-cell table:style-name="ce92" office:value-type="string" calcext:value-type="string">
            <text:p>Stage Hand / uCrew Runner</text:p>
          </table:table-cell>
          <table:table-cell table:style-name="ce8" office:value-type="string" calcext:value-type="string">
            <text:p>Ben Van Zyl</text:p>
          </table:table-cell>
          <table:table-cell table:style-name="ce13" table:formula="of:=IF(ISNUMBER(MATCH([.P244];[$Datasheet.$B$1:.$B$9809];0));&quot;✓&quot;;&quot;x&quot;)" office:value-type="string" office:string-value="✓" calcext:value-type="string">
            <text:p>✓</text:p>
          </table:table-cell>
          <table:table-cell table:style-name="ce165" table:formula="of:=IFERROR(VLOOKUP([$Masterlist.$P244];[$Datasheet.$B$1:.$AV$9809];2;FALSE());&quot;-&quot;)" office:value-type="float" office:value="0" calcext:value-type="float">
            <text:p>0</text:p>
          </table:table-cell>
          <table:table-cell table:style-name="ce165" table:formula="of:=IFERROR(VLOOKUP([$Masterlist.$P244];[$Datasheet.$B$1:.$AV$9809];3;FALSE());&quot;-&quot;)" office:value-type="float" office:value="1" calcext:value-type="float">
            <text:p>1</text:p>
          </table:table-cell>
          <table:table-cell table:style-name="ce165" table:formula="of:=IFERROR(VLOOKUP([$Masterlist.$P244];[$Datasheet.$B$1:.$AV$9809];4;FALSE());&quot;-&quot;)" office:value-type="float" office:value="0" calcext:value-type="float">
            <text:p>0</text:p>
          </table:table-cell>
          <table:table-cell table:style-name="ce165" table:formula="of:=IFERROR(VLOOKUP([$Masterlist.$P244];[$Datasheet.$B$1:.$AV$9809];5;FALSE());&quot;-&quot;)" office:value-type="float" office:value="1" calcext:value-type="float">
            <text:p>1</text:p>
          </table:table-cell>
          <table:table-cell table:style-name="ce208" table:formula="of:=IFERROR(VLOOKUP([$Masterlist.$P244];[$Datasheet.$B$1:.$AV$9809];6;FALSE());&quot;-&quot;)" office:value-type="float" office:value="0" calcext:value-type="float">
            <text:p>0</text:p>
          </table:table-cell>
          <table:table-cell table:style-name="ce165" table:formula="of:=IFERROR(VLOOKUP([$Masterlist.$P244];[$Datasheet.$B$1:.$AV$9809];7;FALSE());&quot;-&quot;)" office:value-type="float" office:value="1" calcext:value-type="float">
            <text:p>1</text:p>
          </table:table-cell>
          <table:table-cell table:style-name="ce165" table:formula="of:=IFERROR(VLOOKUP([$Masterlist.$P244];[$Datasheet.$B$1:.$AV$9809];8;FALSE());&quot;-&quot;)" office:value-type="float" office:value="0" calcext:value-type="float">
            <text:p>0</text:p>
          </table:table-cell>
          <table:table-cell table:style-name="ce165" table:formula="of:=IFERROR(VLOOKUP([$Masterlist.$P244];[$Datasheet.$B$1:.$AV$9809];9;FALSE());&quot;-&quot;)" office:value-type="float" office:value="1" calcext:value-type="float">
            <text:p>1</text:p>
          </table:table-cell>
          <table:table-cell table:style-name="ce220" table:formula="of:=IFERROR(VLOOKUP([$Masterlist.$P244];[$Datasheet.$B$1:.$AV$9809];10;FALSE());&quot;-&quot;)" office:value-type="float" office:value="0" calcext:value-type="float">
            <text:p>0</text:p>
          </table:table-cell>
          <table:table-cell table:style-name="ce220" table:formula="of:=IFERROR(VLOOKUP([$Masterlist.$P244];[$Datasheet.$B$1:.$AV$9809];11;FALSE());&quot;-&quot;)" office:value-type="float" office:value="1" calcext:value-type="float">
            <text:p>1</text:p>
          </table:table-cell>
          <table:table-cell table:style-name="ce220" table:formula="of:=IFERROR(VLOOKUP([$Masterlist.$P244];[$Datasheet.$B$1:.$AV$9809];12;FALSE());&quot;-&quot;)" office:value-type="float" office:value="0" calcext:value-type="float">
            <text:p>0</text:p>
          </table:table-cell>
          <table:table-cell table:style-name="ce220" table:formula="of:=IFERROR(VLOOKUP([$Masterlist.$P244];[$Datasheet.$B$1:.$AV$9809];13;FALSE());&quot;-&quot;)" office:value-type="float" office:value="1" calcext:value-type="float">
            <text:p>1</text:p>
          </table:table-cell>
          <table:table-cell table:style-name="ce220" table:formula="of:=IFERROR(VLOOKUP([$Masterlist.$P244];[$Datasheet.$B$1:.$AV$9809];14;FALSE());&quot;-&quot;)" office:value-type="float" office:value="0" calcext:value-type="float">
            <text:p>0</text:p>
          </table:table-cell>
          <table:table-cell table:style-name="ce220" table:formula="of:=IFERROR(VLOOKUP([$Masterlist.$P244];[$Datasheet.$B$1:.$AV$9809];15;FALSE());&quot;-&quot;)" office:value-type="float" office:value="1" calcext:value-type="float">
            <text:p>1</text:p>
          </table:table-cell>
          <table:table-cell table:style-name="ce220" table:formula="of:=IFERROR(VLOOKUP([$Masterlist.$P244];[$Datasheet.$B$1:.$AV$9809];16;FALSE());&quot;-&quot;)" office:value-type="float" office:value="0" calcext:value-type="float">
            <text:p/>
          </table:table-cell>
          <table:table-cell table:style-name="ce220" table:formula="of:=IFERROR(VLOOKUP([$Masterlist.$P244];[$Datasheet.$B$1:.$AV$9809];17;FALSE());&quot;-&quot;)" office:value-type="float" office:value="0" calcext:value-type="float">
            <text:p/>
          </table:table-cell>
          <table:table-cell table:style-name="ce220" table:formula="of:=IFERROR(VLOOKUP([$Masterlist.$P244];[$Datasheet.$B$1:.$AV$9809];18;FALSE());&quot;-&quot;)" office:value-type="float" office:value="0" calcext:value-type="float">
            <text:p/>
          </table:table-cell>
          <table:table-cell table:style-name="ce220" table:formula="of:=IFERROR(VLOOKUP([$Masterlist.$P244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number-columns-repeated="4" table:style-name="ce50" office:value-type="string" calcext:value-type="string">
            <text:p>yes</text:p>
          </table:table-cell>
          <table:table-cell table:style-name="ce50" table:number-columns-repeated="8"/>
          <table:table-cell table:style-name="ce92" office:value-type="string" calcext:value-type="string">
            <text:p>Stage Hand / uCrew Runner</text:p>
          </table:table-cell>
          <table:table-cell table:style-name="ce8" office:value-type="string" calcext:value-type="string">
            <text:p>Justin Jooste</text:p>
          </table:table-cell>
          <table:table-cell table:style-name="ce13" table:formula="of:=IF(ISNUMBER(MATCH([.P245];[$Datasheet.$B$1:.$B$9809];0));&quot;✓&quot;;&quot;x&quot;)" office:value-type="string" office:string-value="✓" calcext:value-type="string">
            <text:p>✓</text:p>
          </table:table-cell>
          <table:table-cell table:style-name="ce165" table:formula="of:=IFERROR(VLOOKUP([$Masterlist.$P245];[$Datasheet.$B$1:.$AV$9809];2;FALSE());&quot;-&quot;)" office:value-type="float" office:value="0" calcext:value-type="float">
            <text:p>0</text:p>
          </table:table-cell>
          <table:table-cell table:style-name="ce165" table:formula="of:=IFERROR(VLOOKUP([$Masterlist.$P245];[$Datasheet.$B$1:.$AV$9809];3;FALSE());&quot;-&quot;)" office:value-type="float" office:value="1" calcext:value-type="float">
            <text:p>1</text:p>
          </table:table-cell>
          <table:table-cell table:style-name="ce165" table:formula="of:=IFERROR(VLOOKUP([$Masterlist.$P245];[$Datasheet.$B$1:.$AV$9809];4;FALSE());&quot;-&quot;)" office:value-type="float" office:value="0" calcext:value-type="float">
            <text:p>0</text:p>
          </table:table-cell>
          <table:table-cell table:style-name="ce165" table:formula="of:=IFERROR(VLOOKUP([$Masterlist.$P245];[$Datasheet.$B$1:.$AV$9809];5;FALSE());&quot;-&quot;)" office:value-type="float" office:value="0" calcext:value-type="float">
            <text:p>0</text:p>
          </table:table-cell>
          <table:table-cell table:style-name="ce208" table:formula="of:=IFERROR(VLOOKUP([$Masterlist.$P245];[$Datasheet.$B$1:.$AV$9809];6;FALSE());&quot;-&quot;)" office:value-type="float" office:value="0" calcext:value-type="float">
            <text:p>0</text:p>
          </table:table-cell>
          <table:table-cell table:style-name="ce165" table:formula="of:=IFERROR(VLOOKUP([$Masterlist.$P245];[$Datasheet.$B$1:.$AV$9809];7;FALSE());&quot;-&quot;)" office:value-type="float" office:value="1" calcext:value-type="float">
            <text:p>1</text:p>
          </table:table-cell>
          <table:table-cell table:style-name="ce165" table:formula="of:=IFERROR(VLOOKUP([$Masterlist.$P245];[$Datasheet.$B$1:.$AV$9809];8;FALSE());&quot;-&quot;)" office:value-type="float" office:value="0" calcext:value-type="float">
            <text:p>0</text:p>
          </table:table-cell>
          <table:table-cell table:style-name="ce165" table:formula="of:=IFERROR(VLOOKUP([$Masterlist.$P245];[$Datasheet.$B$1:.$AV$9809];9;FALSE());&quot;-&quot;)" office:value-type="float" office:value="0" calcext:value-type="float">
            <text:p>0</text:p>
          </table:table-cell>
          <table:table-cell table:style-name="ce220" table:formula="of:=IFERROR(VLOOKUP([$Masterlist.$P245];[$Datasheet.$B$1:.$AV$9809];10;FALSE());&quot;-&quot;)" office:value-type="float" office:value="0" calcext:value-type="float">
            <text:p>0</text:p>
          </table:table-cell>
          <table:table-cell table:style-name="ce220" table:formula="of:=IFERROR(VLOOKUP([$Masterlist.$P245];[$Datasheet.$B$1:.$AV$9809];11;FALSE());&quot;-&quot;)" office:value-type="float" office:value="1" calcext:value-type="float">
            <text:p>1</text:p>
          </table:table-cell>
          <table:table-cell table:style-name="ce220" table:formula="of:=IFERROR(VLOOKUP([$Masterlist.$P245];[$Datasheet.$B$1:.$AV$9809];12;FALSE());&quot;-&quot;)" office:value-type="float" office:value="0" calcext:value-type="float">
            <text:p>0</text:p>
          </table:table-cell>
          <table:table-cell table:style-name="ce220" table:formula="of:=IFERROR(VLOOKUP([$Masterlist.$P245];[$Datasheet.$B$1:.$AV$9809];13;FALSE());&quot;-&quot;)" office:value-type="float" office:value="1" calcext:value-type="float">
            <text:p>1</text:p>
          </table:table-cell>
          <table:table-cell table:style-name="ce220" table:formula="of:=IFERROR(VLOOKUP([$Masterlist.$P245];[$Datasheet.$B$1:.$AV$9809];14;FALSE());&quot;-&quot;)" office:value-type="float" office:value="0" calcext:value-type="float">
            <text:p>0</text:p>
          </table:table-cell>
          <table:table-cell table:style-name="ce220" table:formula="of:=IFERROR(VLOOKUP([$Masterlist.$P245];[$Datasheet.$B$1:.$AV$9809];15;FALSE());&quot;-&quot;)" office:value-type="float" office:value="1" calcext:value-type="float">
            <text:p>1</text:p>
          </table:table-cell>
          <table:table-cell table:style-name="ce220" table:formula="of:=IFERROR(VLOOKUP([$Masterlist.$P245];[$Datasheet.$B$1:.$AV$9809];16;FALSE());&quot;-&quot;)" office:value-type="float" office:value="0" calcext:value-type="float">
            <text:p/>
          </table:table-cell>
          <table:table-cell table:style-name="ce220" table:formula="of:=IFERROR(VLOOKUP([$Masterlist.$P245];[$Datasheet.$B$1:.$AV$9809];17;FALSE());&quot;-&quot;)" office:value-type="float" office:value="0" calcext:value-type="float">
            <text:p/>
          </table:table-cell>
          <table:table-cell table:style-name="ce220" table:formula="of:=IFERROR(VLOOKUP([$Masterlist.$P245];[$Datasheet.$B$1:.$AV$9809];18;FALSE());&quot;-&quot;)" office:value-type="float" office:value="0" calcext:value-type="float">
            <text:p/>
          </table:table-cell>
          <table:table-cell table:style-name="ce220" table:formula="of:=IFERROR(VLOOKUP([$Masterlist.$P245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7" office:value-type="string" calcext:value-type="string">
            <text:p>L</text:p>
          </table:table-cell>
          <table:table-cell table:style-name="ce50" table:number-columns-repeated="5"/>
          <table:table-cell table:number-columns-repeated="2" table:style-name="ce50" office:value-type="string" calcext:value-type="string">
            <text:p>yes</text:p>
          </table:table-cell>
          <table:table-cell table:style-name="ce50" table:number-columns-repeated="5"/>
          <table:table-cell table:style-name="ce92" office:value-type="string" calcext:value-type="string">
            <text:p>Stage Hand / uCrew Runner</text:p>
          </table:table-cell>
          <table:table-cell table:style-name="ce8" office:value-type="string" calcext:value-type="string">
            <text:p>Marcel Lubbinge</text:p>
          </table:table-cell>
          <table:table-cell table:style-name="ce13" table:formula="of:=IF(ISNUMBER(MATCH([.P246];[$Datasheet.$B$1:.$B$9809];0));&quot;✓&quot;;&quot;x&quot;)" office:value-type="string" office:string-value="x" calcext:value-type="string">
            <text:p>x</text:p>
          </table:table-cell>
          <table:table-cell table:style-name="ce165" table:formula="of:=IFERROR(VLOOKUP([$Masterlist.$P246];[$Datasheet.$B$1:.$AV$9809];2;FALSE());&quot;-&quot;)" office:value-type="string" office:string-value="-" calcext:value-type="string">
            <text:p>-</text:p>
          </table:table-cell>
          <table:table-cell table:style-name="ce165" table:formula="of:=IFERROR(VLOOKUP([$Masterlist.$P246];[$Datasheet.$B$1:.$AV$9809];3;FALSE());&quot;-&quot;)" office:value-type="string" office:string-value="-" calcext:value-type="string">
            <text:p>-</text:p>
          </table:table-cell>
          <table:table-cell table:style-name="ce165" table:formula="of:=IFERROR(VLOOKUP([$Masterlist.$P246];[$Datasheet.$B$1:.$AV$9809];4;FALSE());&quot;-&quot;)" office:value-type="string" office:string-value="-" calcext:value-type="string">
            <text:p>-</text:p>
          </table:table-cell>
          <table:table-cell table:style-name="ce165" table:formula="of:=IFERROR(VLOOKUP([$Masterlist.$P246];[$Datasheet.$B$1:.$AV$9809];5;FALSE());&quot;-&quot;)" office:value-type="string" office:string-value="-" calcext:value-type="string">
            <text:p>-</text:p>
          </table:table-cell>
          <table:table-cell table:style-name="ce208" table:formula="of:=IFERROR(VLOOKUP([$Masterlist.$P246];[$Datasheet.$B$1:.$AV$9809];6;FALSE());&quot;-&quot;)" office:value-type="string" office:string-value="-" calcext:value-type="string">
            <text:p>-</text:p>
          </table:table-cell>
          <table:table-cell table:style-name="ce165" table:formula="of:=IFERROR(VLOOKUP([$Masterlist.$P246];[$Datasheet.$B$1:.$AV$9809];7;FALSE());&quot;-&quot;)" office:value-type="string" office:string-value="-" calcext:value-type="string">
            <text:p>-</text:p>
          </table:table-cell>
          <table:table-cell table:style-name="ce165" table:formula="of:=IFERROR(VLOOKUP([$Masterlist.$P246];[$Datasheet.$B$1:.$AV$9809];8;FALSE());&quot;-&quot;)" office:value-type="string" office:string-value="-" calcext:value-type="string">
            <text:p>-</text:p>
          </table:table-cell>
          <table:table-cell table:style-name="ce165" table:formula="of:=IFERROR(VLOOKUP([$Masterlist.$P246];[$Datasheet.$B$1:.$AV$9809];9;FALSE());&quot;-&quot;)" office:value-type="string" office:string-value="-" calcext:value-type="string">
            <text:p>-</text:p>
          </table:table-cell>
          <table:table-cell table:style-name="ce220" table:formula="of:=IFERROR(VLOOKUP([$Masterlist.$P246];[$Datasheet.$B$1:.$AV$9809];10;FALSE());&quot;-&quot;)" office:value-type="string" office:string-value="-" calcext:value-type="string">
            <text:p>-</text:p>
          </table:table-cell>
          <table:table-cell table:style-name="ce220" table:formula="of:=IFERROR(VLOOKUP([$Masterlist.$P246];[$Datasheet.$B$1:.$AV$9809];11;FALSE());&quot;-&quot;)" office:value-type="string" office:string-value="-" calcext:value-type="string">
            <text:p>-</text:p>
          </table:table-cell>
          <table:table-cell table:style-name="ce220" table:formula="of:=IFERROR(VLOOKUP([$Masterlist.$P246];[$Datasheet.$B$1:.$AV$9809];12;FALSE());&quot;-&quot;)" office:value-type="string" office:string-value="-" calcext:value-type="string">
            <text:p>-</text:p>
          </table:table-cell>
          <table:table-cell table:style-name="ce220" table:formula="of:=IFERROR(VLOOKUP([$Masterlist.$P246];[$Datasheet.$B$1:.$AV$9809];13;FALSE());&quot;-&quot;)" office:value-type="string" office:string-value="-" calcext:value-type="string">
            <text:p>-</text:p>
          </table:table-cell>
          <table:table-cell table:style-name="ce220" table:formula="of:=IFERROR(VLOOKUP([$Masterlist.$P246];[$Datasheet.$B$1:.$AV$9809];14;FALSE());&quot;-&quot;)" office:value-type="string" office:string-value="-" calcext:value-type="string">
            <text:p>-</text:p>
          </table:table-cell>
          <table:table-cell table:style-name="ce220" table:formula="of:=IFERROR(VLOOKUP([$Masterlist.$P246];[$Datasheet.$B$1:.$AV$9809];15;FALSE());&quot;-&quot;)" office:value-type="string" office:string-value="-" calcext:value-type="string">
            <text:p>-</text:p>
          </table:table-cell>
          <table:table-cell table:style-name="ce220" table:formula="of:=IFERROR(VLOOKUP([$Masterlist.$P246];[$Datasheet.$B$1:.$AV$9809];16;FALSE());&quot;-&quot;)" office:value-type="string" office:string-value="-" calcext:value-type="string">
            <text:p>-</text:p>
          </table:table-cell>
          <table:table-cell table:style-name="ce220" table:formula="of:=IFERROR(VLOOKUP([$Masterlist.$P246];[$Datasheet.$B$1:.$AV$9809];17;FALSE());&quot;-&quot;)" office:value-type="string" office:string-value="-" calcext:value-type="string">
            <text:p>-</text:p>
          </table:table-cell>
          <table:table-cell table:style-name="ce220" table:formula="of:=IFERROR(VLOOKUP([$Masterlist.$P246];[$Datasheet.$B$1:.$AV$9809];18;FALSE());&quot;-&quot;)" office:value-type="string" office:string-value="-" calcext:value-type="string">
            <text:p>-</text:p>
          </table:table-cell>
          <table:table-cell table:style-name="ce220" table:formula="of:=IFERROR(VLOOKUP([$Masterlist.$P246];[$Datasheet.$B$1:.$AV$9809];19;FALSE());&quot;-&quot;)" office:value-type="string" office:string-value="-" calcext:value-type="string">
            <text:p>-</text:p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number-columns-repeated="4" table:style-name="ce50" office:value-type="string" calcext:value-type="string">
            <text:p>yes</text:p>
          </table:table-cell>
          <table:table-cell table:style-name="ce50" table:number-columns-repeated="8"/>
          <table:table-cell table:style-name="ce92" office:value-type="string" calcext:value-type="string">
            <text:p>Stage Hand / uCrew Runner</text:p>
          </table:table-cell>
          <table:table-cell table:style-name="ce8" office:value-type="string" calcext:value-type="string">
            <text:p>Daniel de Kock</text:p>
          </table:table-cell>
          <table:table-cell table:style-name="ce13" table:formula="of:=IF(ISNUMBER(MATCH([.P247];[$Datasheet.$B$1:.$B$9809];0));&quot;✓&quot;;&quot;x&quot;)" office:value-type="string" office:string-value="✓" calcext:value-type="string">
            <text:p>✓</text:p>
          </table:table-cell>
          <table:table-cell table:style-name="ce165" table:formula="of:=IFERROR(VLOOKUP([$Masterlist.$P247];[$Datasheet.$B$1:.$AV$9809];2;FALSE());&quot;-&quot;)" office:value-type="float" office:value="1" calcext:value-type="float">
            <text:p>1</text:p>
          </table:table-cell>
          <table:table-cell table:style-name="ce165" table:formula="of:=IFERROR(VLOOKUP([$Masterlist.$P247];[$Datasheet.$B$1:.$AV$9809];3;FALSE());&quot;-&quot;)" office:value-type="float" office:value="1" calcext:value-type="float">
            <text:p>1</text:p>
          </table:table-cell>
          <table:table-cell table:style-name="ce165" table:formula="of:=IFERROR(VLOOKUP([$Masterlist.$P247];[$Datasheet.$B$1:.$AV$9809];4;FALSE());&quot;-&quot;)" office:value-type="float" office:value="1" calcext:value-type="float">
            <text:p>1</text:p>
          </table:table-cell>
          <table:table-cell table:style-name="ce165" table:formula="of:=IFERROR(VLOOKUP([$Masterlist.$P247];[$Datasheet.$B$1:.$AV$9809];5;FALSE());&quot;-&quot;)" office:value-type="float" office:value="1" calcext:value-type="float">
            <text:p>1</text:p>
          </table:table-cell>
          <table:table-cell table:style-name="ce208" table:formula="of:=IFERROR(VLOOKUP([$Masterlist.$P247];[$Datasheet.$B$1:.$AV$9809];6;FALSE());&quot;-&quot;)" office:value-type="float" office:value="1" calcext:value-type="float">
            <text:p>1</text:p>
          </table:table-cell>
          <table:table-cell table:style-name="ce165" table:formula="of:=IFERROR(VLOOKUP([$Masterlist.$P247];[$Datasheet.$B$1:.$AV$9809];7;FALSE());&quot;-&quot;)" office:value-type="float" office:value="1" calcext:value-type="float">
            <text:p>1</text:p>
          </table:table-cell>
          <table:table-cell table:style-name="ce165" table:formula="of:=IFERROR(VLOOKUP([$Masterlist.$P247];[$Datasheet.$B$1:.$AV$9809];8;FALSE());&quot;-&quot;)" office:value-type="float" office:value="1" calcext:value-type="float">
            <text:p>1</text:p>
          </table:table-cell>
          <table:table-cell table:style-name="ce165" table:formula="of:=IFERROR(VLOOKUP([$Masterlist.$P247];[$Datasheet.$B$1:.$AV$9809];9;FALSE());&quot;-&quot;)" office:value-type="float" office:value="1" calcext:value-type="float">
            <text:p>1</text:p>
          </table:table-cell>
          <table:table-cell table:style-name="ce220" table:formula="of:=IFERROR(VLOOKUP([$Masterlist.$P247];[$Datasheet.$B$1:.$AV$9809];10;FALSE());&quot;-&quot;)" office:value-type="float" office:value="1" calcext:value-type="float">
            <text:p>1</text:p>
          </table:table-cell>
          <table:table-cell table:style-name="ce220" table:formula="of:=IFERROR(VLOOKUP([$Masterlist.$P247];[$Datasheet.$B$1:.$AV$9809];11;FALSE());&quot;-&quot;)" office:value-type="float" office:value="1" calcext:value-type="float">
            <text:p>1</text:p>
          </table:table-cell>
          <table:table-cell table:style-name="ce220" table:formula="of:=IFERROR(VLOOKUP([$Masterlist.$P247];[$Datasheet.$B$1:.$AV$9809];12;FALSE());&quot;-&quot;)" office:value-type="float" office:value="1" calcext:value-type="float">
            <text:p>1</text:p>
          </table:table-cell>
          <table:table-cell table:style-name="ce220" table:formula="of:=IFERROR(VLOOKUP([$Masterlist.$P247];[$Datasheet.$B$1:.$AV$9809];13;FALSE());&quot;-&quot;)" office:value-type="float" office:value="1" calcext:value-type="float">
            <text:p>1</text:p>
          </table:table-cell>
          <table:table-cell table:style-name="ce220" table:formula="of:=IFERROR(VLOOKUP([$Masterlist.$P247];[$Datasheet.$B$1:.$AV$9809];14;FALSE());&quot;-&quot;)" office:value-type="float" office:value="1" calcext:value-type="float">
            <text:p>1</text:p>
          </table:table-cell>
          <table:table-cell table:style-name="ce220" table:formula="of:=IFERROR(VLOOKUP([$Masterlist.$P247];[$Datasheet.$B$1:.$AV$9809];15;FALSE());&quot;-&quot;)" office:value-type="float" office:value="1" calcext:value-type="float">
            <text:p>1</text:p>
          </table:table-cell>
          <table:table-cell table:style-name="ce220" table:formula="of:=IFERROR(VLOOKUP([$Masterlist.$P247];[$Datasheet.$B$1:.$AV$9809];16;FALSE());&quot;-&quot;)" office:value-type="float" office:value="0" calcext:value-type="float">
            <text:p/>
          </table:table-cell>
          <table:table-cell table:style-name="ce220" table:formula="of:=IFERROR(VLOOKUP([$Masterlist.$P247];[$Datasheet.$B$1:.$AV$9809];17;FALSE());&quot;-&quot;)" office:value-type="float" office:value="0" calcext:value-type="float">
            <text:p/>
          </table:table-cell>
          <table:table-cell table:style-name="ce220" table:formula="of:=IFERROR(VLOOKUP([$Masterlist.$P247];[$Datasheet.$B$1:.$AV$9809];18;FALSE());&quot;-&quot;)" office:value-type="float" office:value="0" calcext:value-type="float">
            <text:p/>
          </table:table-cell>
          <table:table-cell table:style-name="ce220" table:formula="of:=IFERROR(VLOOKUP([$Masterlist.$P247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A</text:p>
          </table:table-cell>
          <table:table-cell table:number-columns-repeated="4" table:style-name="ce50" office:value-type="string" calcext:value-type="string">
            <text:p>yes</text:p>
          </table:table-cell>
          <table:table-cell table:style-name="ce50" table:number-columns-repeated="8"/>
          <table:table-cell table:style-name="ce92" office:value-type="string" calcext:value-type="string">
            <text:p>Stage Hand / uCrew Runner</text:p>
          </table:table-cell>
          <table:table-cell table:style-name="ce8" office:value-type="string" calcext:value-type="string">
            <text:p>Gavin De Villiers</text:p>
          </table:table-cell>
          <table:table-cell table:style-name="ce13" table:formula="of:=IF(ISNUMBER(MATCH([.P248];[$Datasheet.$B$1:.$B$9809];0));&quot;✓&quot;;&quot;x&quot;)" office:value-type="string" office:string-value="✓" calcext:value-type="string">
            <text:p>✓</text:p>
          </table:table-cell>
          <table:table-cell table:style-name="ce165" table:formula="of:=IFERROR(VLOOKUP([$Masterlist.$P248];[$Datasheet.$B$1:.$AV$9809];2;FALSE());&quot;-&quot;)" office:value-type="float" office:value="1" calcext:value-type="float">
            <text:p>1</text:p>
          </table:table-cell>
          <table:table-cell table:style-name="ce165" table:formula="of:=IFERROR(VLOOKUP([$Masterlist.$P248];[$Datasheet.$B$1:.$AV$9809];3;FALSE());&quot;-&quot;)" office:value-type="float" office:value="0" calcext:value-type="float">
            <text:p>0</text:p>
          </table:table-cell>
          <table:table-cell table:style-name="ce165" table:formula="of:=IFERROR(VLOOKUP([$Masterlist.$P248];[$Datasheet.$B$1:.$AV$9809];4;FALSE());&quot;-&quot;)" office:value-type="float" office:value="0" calcext:value-type="float">
            <text:p>0</text:p>
          </table:table-cell>
          <table:table-cell table:style-name="ce165" table:formula="of:=IFERROR(VLOOKUP([$Masterlist.$P248];[$Datasheet.$B$1:.$AV$9809];5;FALSE());&quot;-&quot;)" office:value-type="float" office:value="1" calcext:value-type="float">
            <text:p>1</text:p>
          </table:table-cell>
          <table:table-cell table:style-name="ce208" table:formula="of:=IFERROR(VLOOKUP([$Masterlist.$P248];[$Datasheet.$B$1:.$AV$9809];6;FALSE());&quot;-&quot;)" office:value-type="float" office:value="1" calcext:value-type="float">
            <text:p>1</text:p>
          </table:table-cell>
          <table:table-cell table:style-name="ce165" table:formula="of:=IFERROR(VLOOKUP([$Masterlist.$P248];[$Datasheet.$B$1:.$AV$9809];7;FALSE());&quot;-&quot;)" office:value-type="float" office:value="0" calcext:value-type="float">
            <text:p>0</text:p>
          </table:table-cell>
          <table:table-cell table:style-name="ce165" table:formula="of:=IFERROR(VLOOKUP([$Masterlist.$P248];[$Datasheet.$B$1:.$AV$9809];8;FALSE());&quot;-&quot;)" office:value-type="float" office:value="0" calcext:value-type="float">
            <text:p>0</text:p>
          </table:table-cell>
          <table:table-cell table:style-name="ce165" table:formula="of:=IFERROR(VLOOKUP([$Masterlist.$P248];[$Datasheet.$B$1:.$AV$9809];9;FALSE());&quot;-&quot;)" office:value-type="float" office:value="1" calcext:value-type="float">
            <text:p>1</text:p>
          </table:table-cell>
          <table:table-cell table:style-name="ce220" table:formula="of:=IFERROR(VLOOKUP([$Masterlist.$P248];[$Datasheet.$B$1:.$AV$9809];10;FALSE());&quot;-&quot;)" office:value-type="float" office:value="1" calcext:value-type="float">
            <text:p>1</text:p>
          </table:table-cell>
          <table:table-cell table:style-name="ce220" table:formula="of:=IFERROR(VLOOKUP([$Masterlist.$P248];[$Datasheet.$B$1:.$AV$9809];11;FALSE());&quot;-&quot;)" office:value-type="float" office:value="1" calcext:value-type="float">
            <text:p>1</text:p>
          </table:table-cell>
          <table:table-cell table:style-name="ce220" table:formula="of:=IFERROR(VLOOKUP([$Masterlist.$P248];[$Datasheet.$B$1:.$AV$9809];12;FALSE());&quot;-&quot;)" office:value-type="float" office:value="0" calcext:value-type="float">
            <text:p>0</text:p>
          </table:table-cell>
          <table:table-cell table:style-name="ce220" table:formula="of:=IFERROR(VLOOKUP([$Masterlist.$P248];[$Datasheet.$B$1:.$AV$9809];13;FALSE());&quot;-&quot;)" office:value-type="float" office:value="1" calcext:value-type="float">
            <text:p>1</text:p>
          </table:table-cell>
          <table:table-cell table:style-name="ce220" table:formula="of:=IFERROR(VLOOKUP([$Masterlist.$P248];[$Datasheet.$B$1:.$AV$9809];14;FALSE());&quot;-&quot;)" office:value-type="float" office:value="1" calcext:value-type="float">
            <text:p>1</text:p>
          </table:table-cell>
          <table:table-cell table:style-name="ce220" table:formula="of:=IFERROR(VLOOKUP([$Masterlist.$P248];[$Datasheet.$B$1:.$AV$9809];15;FALSE());&quot;-&quot;)" office:value-type="float" office:value="0" calcext:value-type="float">
            <text:p>0</text:p>
          </table:table-cell>
          <table:table-cell table:style-name="ce220" table:formula="of:=IFERROR(VLOOKUP([$Masterlist.$P248];[$Datasheet.$B$1:.$AV$9809];16;FALSE());&quot;-&quot;)" office:value-type="float" office:value="0" calcext:value-type="float">
            <text:p/>
          </table:table-cell>
          <table:table-cell table:style-name="ce220" table:formula="of:=IFERROR(VLOOKUP([$Masterlist.$P248];[$Datasheet.$B$1:.$AV$9809];17;FALSE());&quot;-&quot;)" office:value-type="float" office:value="0" calcext:value-type="float">
            <text:p/>
          </table:table-cell>
          <table:table-cell table:style-name="ce220" table:formula="of:=IFERROR(VLOOKUP([$Masterlist.$P248];[$Datasheet.$B$1:.$AV$9809];18;FALSE());&quot;-&quot;)" office:value-type="float" office:value="0" calcext:value-type="float">
            <text:p/>
          </table:table-cell>
          <table:table-cell table:style-name="ce220" table:formula="of:=IFERROR(VLOOKUP([$Masterlist.$P248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number-columns-repeated="4" table:style-name="ce50" office:value-type="string" calcext:value-type="string">
            <text:p>yes</text:p>
          </table:table-cell>
          <table:table-cell table:style-name="ce50" table:number-columns-repeated="8"/>
          <table:table-cell table:style-name="ce92" office:value-type="string" calcext:value-type="string">
            <text:p>Stage Hand / uCrew Runner</text:p>
          </table:table-cell>
          <table:table-cell table:style-name="ce8" office:value-type="string" calcext:value-type="string">
            <text:p>Tiaan Botes</text:p>
          </table:table-cell>
          <table:table-cell table:style-name="ce13" table:formula="of:=IF(ISNUMBER(MATCH([.P249];[$Datasheet.$B$1:.$B$9809];0));&quot;✓&quot;;&quot;x&quot;)" office:value-type="string" office:string-value="✓" calcext:value-type="string">
            <text:p>✓</text:p>
          </table:table-cell>
          <table:table-cell table:style-name="ce165" table:formula="of:=IFERROR(VLOOKUP([$Masterlist.$P249];[$Datasheet.$B$1:.$AV$9809];2;FALSE());&quot;-&quot;)" office:value-type="float" office:value="1" calcext:value-type="float">
            <text:p>1</text:p>
          </table:table-cell>
          <table:table-cell table:style-name="ce165" table:formula="of:=IFERROR(VLOOKUP([$Masterlist.$P249];[$Datasheet.$B$1:.$AV$9809];3;FALSE());&quot;-&quot;)" office:value-type="float" office:value="1" calcext:value-type="float">
            <text:p>1</text:p>
          </table:table-cell>
          <table:table-cell table:style-name="ce165" table:formula="of:=IFERROR(VLOOKUP([$Masterlist.$P249];[$Datasheet.$B$1:.$AV$9809];4;FALSE());&quot;-&quot;)" office:value-type="float" office:value="1" calcext:value-type="float">
            <text:p>1</text:p>
          </table:table-cell>
          <table:table-cell table:style-name="ce165" table:formula="of:=IFERROR(VLOOKUP([$Masterlist.$P249];[$Datasheet.$B$1:.$AV$9809];5;FALSE());&quot;-&quot;)" office:value-type="float" office:value="1" calcext:value-type="float">
            <text:p>1</text:p>
          </table:table-cell>
          <table:table-cell table:style-name="ce208" table:formula="of:=IFERROR(VLOOKUP([$Masterlist.$P249];[$Datasheet.$B$1:.$AV$9809];6;FALSE());&quot;-&quot;)" office:value-type="float" office:value="1" calcext:value-type="float">
            <text:p>1</text:p>
          </table:table-cell>
          <table:table-cell table:style-name="ce165" table:formula="of:=IFERROR(VLOOKUP([$Masterlist.$P249];[$Datasheet.$B$1:.$AV$9809];7;FALSE());&quot;-&quot;)" office:value-type="float" office:value="1" calcext:value-type="float">
            <text:p>1</text:p>
          </table:table-cell>
          <table:table-cell table:style-name="ce165" table:formula="of:=IFERROR(VLOOKUP([$Masterlist.$P249];[$Datasheet.$B$1:.$AV$9809];8;FALSE());&quot;-&quot;)" office:value-type="float" office:value="0" calcext:value-type="float">
            <text:p>0</text:p>
          </table:table-cell>
          <table:table-cell table:style-name="ce165" table:formula="of:=IFERROR(VLOOKUP([$Masterlist.$P249];[$Datasheet.$B$1:.$AV$9809];9;FALSE());&quot;-&quot;)" office:value-type="float" office:value="0" calcext:value-type="float">
            <text:p>0</text:p>
          </table:table-cell>
          <table:table-cell table:style-name="ce220" table:formula="of:=IFERROR(VLOOKUP([$Masterlist.$P249];[$Datasheet.$B$1:.$AV$9809];10;FALSE());&quot;-&quot;)" office:value-type="float" office:value="1" calcext:value-type="float">
            <text:p>1</text:p>
          </table:table-cell>
          <table:table-cell table:style-name="ce220" table:formula="of:=IFERROR(VLOOKUP([$Masterlist.$P249];[$Datasheet.$B$1:.$AV$9809];11;FALSE());&quot;-&quot;)" office:value-type="float" office:value="1" calcext:value-type="float">
            <text:p>1</text:p>
          </table:table-cell>
          <table:table-cell table:style-name="ce220" table:formula="of:=IFERROR(VLOOKUP([$Masterlist.$P249];[$Datasheet.$B$1:.$AV$9809];12;FALSE());&quot;-&quot;)" office:value-type="float" office:value="1" calcext:value-type="float">
            <text:p>1</text:p>
          </table:table-cell>
          <table:table-cell table:style-name="ce220" table:formula="of:=IFERROR(VLOOKUP([$Masterlist.$P249];[$Datasheet.$B$1:.$AV$9809];13;FALSE());&quot;-&quot;)" office:value-type="float" office:value="1" calcext:value-type="float">
            <text:p>1</text:p>
          </table:table-cell>
          <table:table-cell table:style-name="ce220" table:formula="of:=IFERROR(VLOOKUP([$Masterlist.$P249];[$Datasheet.$B$1:.$AV$9809];14;FALSE());&quot;-&quot;)" office:value-type="float" office:value="1" calcext:value-type="float">
            <text:p>1</text:p>
          </table:table-cell>
          <table:table-cell table:style-name="ce220" table:formula="of:=IFERROR(VLOOKUP([$Masterlist.$P249];[$Datasheet.$B$1:.$AV$9809];15;FALSE());&quot;-&quot;)" office:value-type="float" office:value="1" calcext:value-type="float">
            <text:p>1</text:p>
          </table:table-cell>
          <table:table-cell table:style-name="ce220" table:formula="of:=IFERROR(VLOOKUP([$Masterlist.$P249];[$Datasheet.$B$1:.$AV$9809];16;FALSE());&quot;-&quot;)" office:value-type="float" office:value="0" calcext:value-type="float">
            <text:p/>
          </table:table-cell>
          <table:table-cell table:style-name="ce220" table:formula="of:=IFERROR(VLOOKUP([$Masterlist.$P249];[$Datasheet.$B$1:.$AV$9809];17;FALSE());&quot;-&quot;)" office:value-type="float" office:value="0" calcext:value-type="float">
            <text:p/>
          </table:table-cell>
          <table:table-cell table:style-name="ce220" table:formula="of:=IFERROR(VLOOKUP([$Masterlist.$P249];[$Datasheet.$B$1:.$AV$9809];18;FALSE());&quot;-&quot;)" office:value-type="float" office:value="0" calcext:value-type="float">
            <text:p/>
          </table:table-cell>
          <table:table-cell table:style-name="ce220" table:formula="of:=IFERROR(VLOOKUP([$Masterlist.$P249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number-columns-repeated="4" table:style-name="ce50" office:value-type="string" calcext:value-type="string">
            <text:p>yes</text:p>
          </table:table-cell>
          <table:table-cell table:style-name="ce50" table:number-columns-repeated="8"/>
          <table:table-cell table:style-name="ce92" office:value-type="string" calcext:value-type="string">
            <text:p>Stage Hand / uCrew Runner</text:p>
          </table:table-cell>
          <table:table-cell table:style-name="ce8" office:value-type="string" calcext:value-type="string">
            <text:p>Tiaan Nel</text:p>
          </table:table-cell>
          <table:table-cell table:style-name="ce13" table:formula="of:=IF(ISNUMBER(MATCH([.P250];[$Datasheet.$B$1:.$B$9809];0));&quot;✓&quot;;&quot;x&quot;)" office:value-type="string" office:string-value="✓" calcext:value-type="string">
            <text:p>✓</text:p>
          </table:table-cell>
          <table:table-cell table:style-name="ce165" table:formula="of:=IFERROR(VLOOKUP([$Masterlist.$P250];[$Datasheet.$B$1:.$AV$9809];2;FALSE());&quot;-&quot;)" office:value-type="float" office:value="1" calcext:value-type="float">
            <text:p>1</text:p>
          </table:table-cell>
          <table:table-cell table:style-name="ce165" table:formula="of:=IFERROR(VLOOKUP([$Masterlist.$P250];[$Datasheet.$B$1:.$AV$9809];3;FALSE());&quot;-&quot;)" office:value-type="float" office:value="1" calcext:value-type="float">
            <text:p>1</text:p>
          </table:table-cell>
          <table:table-cell table:style-name="ce165" table:formula="of:=IFERROR(VLOOKUP([$Masterlist.$P250];[$Datasheet.$B$1:.$AV$9809];4;FALSE());&quot;-&quot;)" office:value-type="float" office:value="1" calcext:value-type="float">
            <text:p>1</text:p>
          </table:table-cell>
          <table:table-cell table:style-name="ce165" table:formula="of:=IFERROR(VLOOKUP([$Masterlist.$P250];[$Datasheet.$B$1:.$AV$9809];5;FALSE());&quot;-&quot;)" office:value-type="float" office:value="1" calcext:value-type="float">
            <text:p>1</text:p>
          </table:table-cell>
          <table:table-cell table:style-name="ce208" table:formula="of:=IFERROR(VLOOKUP([$Masterlist.$P250];[$Datasheet.$B$1:.$AV$9809];6;FALSE());&quot;-&quot;)" office:value-type="float" office:value="0" calcext:value-type="float">
            <text:p>0</text:p>
          </table:table-cell>
          <table:table-cell table:style-name="ce165" table:formula="of:=IFERROR(VLOOKUP([$Masterlist.$P250];[$Datasheet.$B$1:.$AV$9809];7;FALSE());&quot;-&quot;)" office:value-type="float" office:value="0" calcext:value-type="float">
            <text:p>0</text:p>
          </table:table-cell>
          <table:table-cell table:style-name="ce165" table:formula="of:=IFERROR(VLOOKUP([$Masterlist.$P250];[$Datasheet.$B$1:.$AV$9809];8;FALSE());&quot;-&quot;)" office:value-type="float" office:value="1" calcext:value-type="float">
            <text:p>1</text:p>
          </table:table-cell>
          <table:table-cell table:style-name="ce165" table:formula="of:=IFERROR(VLOOKUP([$Masterlist.$P250];[$Datasheet.$B$1:.$AV$9809];9;FALSE());&quot;-&quot;)" office:value-type="float" office:value="1" calcext:value-type="float">
            <text:p>1</text:p>
          </table:table-cell>
          <table:table-cell table:style-name="ce220" table:formula="of:=IFERROR(VLOOKUP([$Masterlist.$P250];[$Datasheet.$B$1:.$AV$9809];10;FALSE());&quot;-&quot;)" office:value-type="float" office:value="1" calcext:value-type="float">
            <text:p>1</text:p>
          </table:table-cell>
          <table:table-cell table:style-name="ce220" table:formula="of:=IFERROR(VLOOKUP([$Masterlist.$P250];[$Datasheet.$B$1:.$AV$9809];11;FALSE());&quot;-&quot;)" office:value-type="float" office:value="1" calcext:value-type="float">
            <text:p>1</text:p>
          </table:table-cell>
          <table:table-cell table:style-name="ce220" table:formula="of:=IFERROR(VLOOKUP([$Masterlist.$P250];[$Datasheet.$B$1:.$AV$9809];12;FALSE());&quot;-&quot;)" office:value-type="float" office:value="0" calcext:value-type="float">
            <text:p>0</text:p>
          </table:table-cell>
          <table:table-cell table:style-name="ce220" table:formula="of:=IFERROR(VLOOKUP([$Masterlist.$P250];[$Datasheet.$B$1:.$AV$9809];13;FALSE());&quot;-&quot;)" office:value-type="float" office:value="0" calcext:value-type="float">
            <text:p>0</text:p>
          </table:table-cell>
          <table:table-cell table:style-name="ce220" table:formula="of:=IFERROR(VLOOKUP([$Masterlist.$P250];[$Datasheet.$B$1:.$AV$9809];14;FALSE());&quot;-&quot;)" office:value-type="float" office:value="1" calcext:value-type="float">
            <text:p>1</text:p>
          </table:table-cell>
          <table:table-cell table:style-name="ce220" table:formula="of:=IFERROR(VLOOKUP([$Masterlist.$P250];[$Datasheet.$B$1:.$AV$9809];15;FALSE());&quot;-&quot;)" office:value-type="float" office:value="1" calcext:value-type="float">
            <text:p>1</text:p>
          </table:table-cell>
          <table:table-cell table:style-name="ce220" table:formula="of:=IFERROR(VLOOKUP([$Masterlist.$P250];[$Datasheet.$B$1:.$AV$9809];16;FALSE());&quot;-&quot;)" office:value-type="float" office:value="0" calcext:value-type="float">
            <text:p/>
          </table:table-cell>
          <table:table-cell table:style-name="ce220" table:formula="of:=IFERROR(VLOOKUP([$Masterlist.$P250];[$Datasheet.$B$1:.$AV$9809];17;FALSE());&quot;-&quot;)" office:value-type="float" office:value="0" calcext:value-type="float">
            <text:p/>
          </table:table-cell>
          <table:table-cell table:style-name="ce220" table:formula="of:=IFERROR(VLOOKUP([$Masterlist.$P250];[$Datasheet.$B$1:.$AV$9809];18;FALSE());&quot;-&quot;)" office:value-type="float" office:value="0" calcext:value-type="float">
            <text:p/>
          </table:table-cell>
          <table:table-cell table:style-name="ce220" table:formula="of:=IFERROR(VLOOKUP([$Masterlist.$P250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number-columns-repeated="4" table:style-name="ce50" office:value-type="string" calcext:value-type="string">
            <text:p>yes</text:p>
          </table:table-cell>
          <table:table-cell table:style-name="ce50" table:number-columns-repeated="8"/>
          <table:table-cell table:style-name="ce92" office:value-type="string" calcext:value-type="string">
            <text:p>Stage Hand / uCrew Runner</text:p>
          </table:table-cell>
          <table:table-cell table:style-name="ce8" office:value-type="string" calcext:value-type="string">
            <text:p>David Janse van Vuuren</text:p>
          </table:table-cell>
          <table:table-cell table:style-name="ce13" table:formula="of:=IF(ISNUMBER(MATCH([.P251];[$Datasheet.$B$1:.$B$9809];0));&quot;✓&quot;;&quot;x&quot;)" office:value-type="string" office:string-value="x" calcext:value-type="string">
            <text:p>x</text:p>
          </table:table-cell>
          <table:table-cell table:style-name="ce165" table:formula="of:=IFERROR(VLOOKUP([$Masterlist.$P251];[$Datasheet.$B$1:.$AV$9809];2;FALSE());&quot;-&quot;)" office:value-type="string" office:string-value="-" calcext:value-type="string">
            <text:p>-</text:p>
          </table:table-cell>
          <table:table-cell table:style-name="ce165" table:formula="of:=IFERROR(VLOOKUP([$Masterlist.$P251];[$Datasheet.$B$1:.$AV$9809];3;FALSE());&quot;-&quot;)" office:value-type="string" office:string-value="-" calcext:value-type="string">
            <text:p>-</text:p>
          </table:table-cell>
          <table:table-cell table:style-name="ce165" table:formula="of:=IFERROR(VLOOKUP([$Masterlist.$P251];[$Datasheet.$B$1:.$AV$9809];4;FALSE());&quot;-&quot;)" office:value-type="string" office:string-value="-" calcext:value-type="string">
            <text:p>-</text:p>
          </table:table-cell>
          <table:table-cell table:style-name="ce165" table:formula="of:=IFERROR(VLOOKUP([$Masterlist.$P251];[$Datasheet.$B$1:.$AV$9809];5;FALSE());&quot;-&quot;)" office:value-type="string" office:string-value="-" calcext:value-type="string">
            <text:p>-</text:p>
          </table:table-cell>
          <table:table-cell table:style-name="ce208" table:formula="of:=IFERROR(VLOOKUP([$Masterlist.$P251];[$Datasheet.$B$1:.$AV$9809];6;FALSE());&quot;-&quot;)" office:value-type="string" office:string-value="-" calcext:value-type="string">
            <text:p>-</text:p>
          </table:table-cell>
          <table:table-cell table:style-name="ce165" table:formula="of:=IFERROR(VLOOKUP([$Masterlist.$P251];[$Datasheet.$B$1:.$AV$9809];7;FALSE());&quot;-&quot;)" office:value-type="string" office:string-value="-" calcext:value-type="string">
            <text:p>-</text:p>
          </table:table-cell>
          <table:table-cell table:style-name="ce165" table:formula="of:=IFERROR(VLOOKUP([$Masterlist.$P251];[$Datasheet.$B$1:.$AV$9809];8;FALSE());&quot;-&quot;)" office:value-type="string" office:string-value="-" calcext:value-type="string">
            <text:p>-</text:p>
          </table:table-cell>
          <table:table-cell table:style-name="ce165" table:formula="of:=IFERROR(VLOOKUP([$Masterlist.$P251];[$Datasheet.$B$1:.$AV$9809];9;FALSE());&quot;-&quot;)" office:value-type="string" office:string-value="-" calcext:value-type="string">
            <text:p>-</text:p>
          </table:table-cell>
          <table:table-cell table:style-name="ce220" table:formula="of:=IFERROR(VLOOKUP([$Masterlist.$P251];[$Datasheet.$B$1:.$AV$9809];10;FALSE());&quot;-&quot;)" office:value-type="string" office:string-value="-" calcext:value-type="string">
            <text:p>-</text:p>
          </table:table-cell>
          <table:table-cell table:style-name="ce220" table:formula="of:=IFERROR(VLOOKUP([$Masterlist.$P251];[$Datasheet.$B$1:.$AV$9809];11;FALSE());&quot;-&quot;)" office:value-type="string" office:string-value="-" calcext:value-type="string">
            <text:p>-</text:p>
          </table:table-cell>
          <table:table-cell table:style-name="ce220" table:formula="of:=IFERROR(VLOOKUP([$Masterlist.$P251];[$Datasheet.$B$1:.$AV$9809];12;FALSE());&quot;-&quot;)" office:value-type="string" office:string-value="-" calcext:value-type="string">
            <text:p>-</text:p>
          </table:table-cell>
          <table:table-cell table:style-name="ce220" table:formula="of:=IFERROR(VLOOKUP([$Masterlist.$P251];[$Datasheet.$B$1:.$AV$9809];13;FALSE());&quot;-&quot;)" office:value-type="string" office:string-value="-" calcext:value-type="string">
            <text:p>-</text:p>
          </table:table-cell>
          <table:table-cell table:style-name="ce220" table:formula="of:=IFERROR(VLOOKUP([$Masterlist.$P251];[$Datasheet.$B$1:.$AV$9809];14;FALSE());&quot;-&quot;)" office:value-type="string" office:string-value="-" calcext:value-type="string">
            <text:p>-</text:p>
          </table:table-cell>
          <table:table-cell table:style-name="ce220" table:formula="of:=IFERROR(VLOOKUP([$Masterlist.$P251];[$Datasheet.$B$1:.$AV$9809];15;FALSE());&quot;-&quot;)" office:value-type="string" office:string-value="-" calcext:value-type="string">
            <text:p>-</text:p>
          </table:table-cell>
          <table:table-cell table:style-name="ce220" table:formula="of:=IFERROR(VLOOKUP([$Masterlist.$P251];[$Datasheet.$B$1:.$AV$9809];16;FALSE());&quot;-&quot;)" office:value-type="string" office:string-value="-" calcext:value-type="string">
            <text:p>-</text:p>
          </table:table-cell>
          <table:table-cell table:style-name="ce220" table:formula="of:=IFERROR(VLOOKUP([$Masterlist.$P251];[$Datasheet.$B$1:.$AV$9809];17;FALSE());&quot;-&quot;)" office:value-type="string" office:string-value="-" calcext:value-type="string">
            <text:p>-</text:p>
          </table:table-cell>
          <table:table-cell table:style-name="ce220" table:formula="of:=IFERROR(VLOOKUP([$Masterlist.$P251];[$Datasheet.$B$1:.$AV$9809];18;FALSE());&quot;-&quot;)" office:value-type="string" office:string-value="-" calcext:value-type="string">
            <text:p>-</text:p>
          </table:table-cell>
          <table:table-cell table:style-name="ce220" table:formula="of:=IFERROR(VLOOKUP([$Masterlist.$P251];[$Datasheet.$B$1:.$AV$9809];19;FALSE());&quot;-&quot;)" office:value-type="string" office:string-value="-" calcext:value-type="string">
            <text:p>-</text:p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number-columns-repeated="4" table:style-name="ce50" office:value-type="string" calcext:value-type="string">
            <text:p>yes</text:p>
          </table:table-cell>
          <table:table-cell table:style-name="ce50" table:number-columns-repeated="8"/>
          <table:table-cell table:style-name="ce92" office:value-type="string" calcext:value-type="string">
            <text:p>Stage Hand / uCrew Runner</text:p>
          </table:table-cell>
          <table:table-cell table:style-name="ce8" office:value-type="string" calcext:value-type="string">
            <text:p>NJ Corbett</text:p>
          </table:table-cell>
          <table:table-cell table:style-name="ce13" table:formula="of:=IF(ISNUMBER(MATCH([.P252];[$Datasheet.$B$1:.$B$9809];0));&quot;✓&quot;;&quot;x&quot;)" office:value-type="string" office:string-value="x" calcext:value-type="string">
            <text:p>x</text:p>
          </table:table-cell>
          <table:table-cell table:style-name="ce165" table:formula="of:=IFERROR(VLOOKUP([$Masterlist.$P252];[$Datasheet.$B$1:.$AV$9809];2;FALSE());&quot;-&quot;)" office:value-type="string" office:string-value="-" calcext:value-type="string">
            <text:p>-</text:p>
          </table:table-cell>
          <table:table-cell table:style-name="ce165" table:formula="of:=IFERROR(VLOOKUP([$Masterlist.$P252];[$Datasheet.$B$1:.$AV$9809];3;FALSE());&quot;-&quot;)" office:value-type="string" office:string-value="-" calcext:value-type="string">
            <text:p>-</text:p>
          </table:table-cell>
          <table:table-cell table:style-name="ce165" table:formula="of:=IFERROR(VLOOKUP([$Masterlist.$P252];[$Datasheet.$B$1:.$AV$9809];4;FALSE());&quot;-&quot;)" office:value-type="string" office:string-value="-" calcext:value-type="string">
            <text:p>-</text:p>
          </table:table-cell>
          <table:table-cell table:style-name="ce165" table:formula="of:=IFERROR(VLOOKUP([$Masterlist.$P252];[$Datasheet.$B$1:.$AV$9809];5;FALSE());&quot;-&quot;)" office:value-type="string" office:string-value="-" calcext:value-type="string">
            <text:p>-</text:p>
          </table:table-cell>
          <table:table-cell table:style-name="ce208" table:formula="of:=IFERROR(VLOOKUP([$Masterlist.$P252];[$Datasheet.$B$1:.$AV$9809];6;FALSE());&quot;-&quot;)" office:value-type="string" office:string-value="-" calcext:value-type="string">
            <text:p>-</text:p>
          </table:table-cell>
          <table:table-cell table:style-name="ce165" table:formula="of:=IFERROR(VLOOKUP([$Masterlist.$P252];[$Datasheet.$B$1:.$AV$9809];7;FALSE());&quot;-&quot;)" office:value-type="string" office:string-value="-" calcext:value-type="string">
            <text:p>-</text:p>
          </table:table-cell>
          <table:table-cell table:style-name="ce165" table:formula="of:=IFERROR(VLOOKUP([$Masterlist.$P252];[$Datasheet.$B$1:.$AV$9809];8;FALSE());&quot;-&quot;)" office:value-type="string" office:string-value="-" calcext:value-type="string">
            <text:p>-</text:p>
          </table:table-cell>
          <table:table-cell table:style-name="ce165" table:formula="of:=IFERROR(VLOOKUP([$Masterlist.$P252];[$Datasheet.$B$1:.$AV$9809];9;FALSE());&quot;-&quot;)" office:value-type="string" office:string-value="-" calcext:value-type="string">
            <text:p>-</text:p>
          </table:table-cell>
          <table:table-cell table:style-name="ce220" table:formula="of:=IFERROR(VLOOKUP([$Masterlist.$P252];[$Datasheet.$B$1:.$AV$9809];10;FALSE());&quot;-&quot;)" office:value-type="string" office:string-value="-" calcext:value-type="string">
            <text:p>-</text:p>
          </table:table-cell>
          <table:table-cell table:style-name="ce220" table:formula="of:=IFERROR(VLOOKUP([$Masterlist.$P252];[$Datasheet.$B$1:.$AV$9809];11;FALSE());&quot;-&quot;)" office:value-type="string" office:string-value="-" calcext:value-type="string">
            <text:p>-</text:p>
          </table:table-cell>
          <table:table-cell table:style-name="ce220" table:formula="of:=IFERROR(VLOOKUP([$Masterlist.$P252];[$Datasheet.$B$1:.$AV$9809];12;FALSE());&quot;-&quot;)" office:value-type="string" office:string-value="-" calcext:value-type="string">
            <text:p>-</text:p>
          </table:table-cell>
          <table:table-cell table:style-name="ce220" table:formula="of:=IFERROR(VLOOKUP([$Masterlist.$P252];[$Datasheet.$B$1:.$AV$9809];13;FALSE());&quot;-&quot;)" office:value-type="string" office:string-value="-" calcext:value-type="string">
            <text:p>-</text:p>
          </table:table-cell>
          <table:table-cell table:style-name="ce220" table:formula="of:=IFERROR(VLOOKUP([$Masterlist.$P252];[$Datasheet.$B$1:.$AV$9809];14;FALSE());&quot;-&quot;)" office:value-type="string" office:string-value="-" calcext:value-type="string">
            <text:p>-</text:p>
          </table:table-cell>
          <table:table-cell table:style-name="ce220" table:formula="of:=IFERROR(VLOOKUP([$Masterlist.$P252];[$Datasheet.$B$1:.$AV$9809];15;FALSE());&quot;-&quot;)" office:value-type="string" office:string-value="-" calcext:value-type="string">
            <text:p>-</text:p>
          </table:table-cell>
          <table:table-cell table:style-name="ce220" table:formula="of:=IFERROR(VLOOKUP([$Masterlist.$P252];[$Datasheet.$B$1:.$AV$9809];16;FALSE());&quot;-&quot;)" office:value-type="string" office:string-value="-" calcext:value-type="string">
            <text:p>-</text:p>
          </table:table-cell>
          <table:table-cell table:style-name="ce220" table:formula="of:=IFERROR(VLOOKUP([$Masterlist.$P252];[$Datasheet.$B$1:.$AV$9809];17;FALSE());&quot;-&quot;)" office:value-type="string" office:string-value="-" calcext:value-type="string">
            <text:p>-</text:p>
          </table:table-cell>
          <table:table-cell table:style-name="ce220" table:formula="of:=IFERROR(VLOOKUP([$Masterlist.$P252];[$Datasheet.$B$1:.$AV$9809];18;FALSE());&quot;-&quot;)" office:value-type="string" office:string-value="-" calcext:value-type="string">
            <text:p>-</text:p>
          </table:table-cell>
          <table:table-cell table:style-name="ce220" table:formula="of:=IFERROR(VLOOKUP([$Masterlist.$P252];[$Datasheet.$B$1:.$AV$9809];19;FALSE());&quot;-&quot;)" office:value-type="string" office:string-value="-" calcext:value-type="string">
            <text:p>-</text:p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number-columns-repeated="4" table:style-name="ce50" office:value-type="string" calcext:value-type="string">
            <text:p>yes</text:p>
          </table:table-cell>
          <table:table-cell table:style-name="ce50" table:number-columns-repeated="8"/>
          <table:table-cell table:style-name="ce92" office:value-type="string" calcext:value-type="string">
            <text:p>Stage Hand / uCrew Runner</text:p>
          </table:table-cell>
          <table:table-cell table:style-name="ce8" office:value-type="string" calcext:value-type="string">
            <text:p>Ephert Roodt</text:p>
          </table:table-cell>
          <table:table-cell table:style-name="ce13" table:formula="of:=IF(ISNUMBER(MATCH([.P253];[$Datasheet.$B$1:.$B$9809];0));&quot;✓&quot;;&quot;x&quot;)" office:value-type="string" office:string-value="✓" calcext:value-type="string">
            <text:p>✓</text:p>
          </table:table-cell>
          <table:table-cell table:style-name="ce165" table:formula="of:=IFERROR(VLOOKUP([$Masterlist.$P253];[$Datasheet.$B$1:.$AV$9809];2;FALSE());&quot;-&quot;)" office:value-type="float" office:value="0" calcext:value-type="float">
            <text:p>0</text:p>
          </table:table-cell>
          <table:table-cell table:style-name="ce165" table:formula="of:=IFERROR(VLOOKUP([$Masterlist.$P253];[$Datasheet.$B$1:.$AV$9809];3;FALSE());&quot;-&quot;)" office:value-type="float" office:value="0" calcext:value-type="float">
            <text:p>0</text:p>
          </table:table-cell>
          <table:table-cell table:style-name="ce165" table:formula="of:=IFERROR(VLOOKUP([$Masterlist.$P253];[$Datasheet.$B$1:.$AV$9809];4;FALSE());&quot;-&quot;)" office:value-type="float" office:value="0" calcext:value-type="float">
            <text:p>0</text:p>
          </table:table-cell>
          <table:table-cell table:style-name="ce165" table:formula="of:=IFERROR(VLOOKUP([$Masterlist.$P253];[$Datasheet.$B$1:.$AV$9809];5;FALSE());&quot;-&quot;)" office:value-type="float" office:value="0" calcext:value-type="float">
            <text:p>0</text:p>
          </table:table-cell>
          <table:table-cell table:style-name="ce208" table:formula="of:=IFERROR(VLOOKUP([$Masterlist.$P253];[$Datasheet.$B$1:.$AV$9809];6;FALSE());&quot;-&quot;)" office:value-type="float" office:value="0" calcext:value-type="float">
            <text:p>0</text:p>
          </table:table-cell>
          <table:table-cell table:style-name="ce165" table:formula="of:=IFERROR(VLOOKUP([$Masterlist.$P253];[$Datasheet.$B$1:.$AV$9809];7;FALSE());&quot;-&quot;)" office:value-type="float" office:value="1" calcext:value-type="float">
            <text:p>1</text:p>
          </table:table-cell>
          <table:table-cell table:style-name="ce165" table:formula="of:=IFERROR(VLOOKUP([$Masterlist.$P253];[$Datasheet.$B$1:.$AV$9809];8;FALSE());&quot;-&quot;)" office:value-type="float" office:value="0" calcext:value-type="float">
            <text:p>0</text:p>
          </table:table-cell>
          <table:table-cell table:style-name="ce165" table:formula="of:=IFERROR(VLOOKUP([$Masterlist.$P253];[$Datasheet.$B$1:.$AV$9809];9;FALSE());&quot;-&quot;)" office:value-type="float" office:value="0" calcext:value-type="float">
            <text:p>0</text:p>
          </table:table-cell>
          <table:table-cell table:style-name="ce220" table:formula="of:=IFERROR(VLOOKUP([$Masterlist.$P253];[$Datasheet.$B$1:.$AV$9809];10;FALSE());&quot;-&quot;)" office:value-type="float" office:value="0" calcext:value-type="float">
            <text:p>0</text:p>
          </table:table-cell>
          <table:table-cell table:style-name="ce220" table:formula="of:=IFERROR(VLOOKUP([$Masterlist.$P253];[$Datasheet.$B$1:.$AV$9809];11;FALSE());&quot;-&quot;)" office:value-type="float" office:value="1" calcext:value-type="float">
            <text:p>1</text:p>
          </table:table-cell>
          <table:table-cell table:style-name="ce220" table:formula="of:=IFERROR(VLOOKUP([$Masterlist.$P253];[$Datasheet.$B$1:.$AV$9809];12;FALSE());&quot;-&quot;)" office:value-type="float" office:value="0" calcext:value-type="float">
            <text:p>0</text:p>
          </table:table-cell>
          <table:table-cell table:style-name="ce220" table:formula="of:=IFERROR(VLOOKUP([$Masterlist.$P253];[$Datasheet.$B$1:.$AV$9809];13;FALSE());&quot;-&quot;)" office:value-type="float" office:value="1" calcext:value-type="float">
            <text:p>1</text:p>
          </table:table-cell>
          <table:table-cell table:style-name="ce220" table:formula="of:=IFERROR(VLOOKUP([$Masterlist.$P253];[$Datasheet.$B$1:.$AV$9809];14;FALSE());&quot;-&quot;)" office:value-type="float" office:value="0" calcext:value-type="float">
            <text:p>0</text:p>
          </table:table-cell>
          <table:table-cell table:style-name="ce220" table:formula="of:=IFERROR(VLOOKUP([$Masterlist.$P253];[$Datasheet.$B$1:.$AV$9809];15;FALSE());&quot;-&quot;)" office:value-type="float" office:value="0" calcext:value-type="float">
            <text:p>0</text:p>
          </table:table-cell>
          <table:table-cell table:style-name="ce220" table:formula="of:=IFERROR(VLOOKUP([$Masterlist.$P253];[$Datasheet.$B$1:.$AV$9809];16;FALSE());&quot;-&quot;)" office:value-type="float" office:value="0" calcext:value-type="float">
            <text:p/>
          </table:table-cell>
          <table:table-cell table:style-name="ce220" table:formula="of:=IFERROR(VLOOKUP([$Masterlist.$P253];[$Datasheet.$B$1:.$AV$9809];17;FALSE());&quot;-&quot;)" office:value-type="float" office:value="0" calcext:value-type="float">
            <text:p/>
          </table:table-cell>
          <table:table-cell table:style-name="ce220" table:formula="of:=IFERROR(VLOOKUP([$Masterlist.$P253];[$Datasheet.$B$1:.$AV$9809];18;FALSE());&quot;-&quot;)" office:value-type="float" office:value="0" calcext:value-type="float">
            <text:p/>
          </table:table-cell>
          <table:table-cell table:style-name="ce220" table:formula="of:=IFERROR(VLOOKUP([$Masterlist.$P253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office:value-type="string" calcext:value-type="string">
            <text:p>Yes</text:p>
          </table:table-cell>
          <table:table-cell table:number-columns-repeated="2" table:style-name="ce50" office:value-type="string" calcext:value-type="string">
            <text:p>yes</text:p>
          </table:table-cell>
          <table:table-cell table:style-name="ce50" table:number-columns-repeated="9"/>
          <table:table-cell table:style-name="ce92" office:value-type="string" calcext:value-type="string">
            <text:p>Stage Hand / uCrew Runner</text:p>
          </table:table-cell>
          <table:table-cell table:style-name="ce8" office:value-type="string" calcext:value-type="string">
            <text:p>JP Palm</text:p>
          </table:table-cell>
          <table:table-cell table:style-name="ce13" table:formula="of:=IF(ISNUMBER(MATCH([.P254];[$Datasheet.$B$1:.$B$9809];0));&quot;✓&quot;;&quot;x&quot;)" office:value-type="string" office:string-value="x" calcext:value-type="string">
            <text:p>x</text:p>
          </table:table-cell>
          <table:table-cell table:style-name="ce166" table:formula="of:=IFERROR(VLOOKUP([$Masterlist.$P254];[$Datasheet.$B$1:.$AV$9809];2;FALSE());&quot;-&quot;)" office:value-type="string" office:string-value="-" calcext:value-type="string">
            <text:p>-</text:p>
          </table:table-cell>
          <table:table-cell table:style-name="ce166" table:formula="of:=IFERROR(VLOOKUP([$Masterlist.$P254];[$Datasheet.$B$1:.$AV$9809];3;FALSE());&quot;-&quot;)" office:value-type="string" office:string-value="-" calcext:value-type="string">
            <text:p>-</text:p>
          </table:table-cell>
          <table:table-cell table:style-name="ce166" table:formula="of:=IFERROR(VLOOKUP([$Masterlist.$P254];[$Datasheet.$B$1:.$AV$9809];4;FALSE());&quot;-&quot;)" office:value-type="string" office:string-value="-" calcext:value-type="string">
            <text:p>-</text:p>
          </table:table-cell>
          <table:table-cell table:style-name="ce166" table:formula="of:=IFERROR(VLOOKUP([$Masterlist.$P254];[$Datasheet.$B$1:.$AV$9809];5;FALSE());&quot;-&quot;)" office:value-type="string" office:string-value="-" calcext:value-type="string">
            <text:p>-</text:p>
          </table:table-cell>
          <table:table-cell table:style-name="ce209" table:formula="of:=IFERROR(VLOOKUP([$Masterlist.$P254];[$Datasheet.$B$1:.$AV$9809];6;FALSE());&quot;-&quot;)" office:value-type="string" office:string-value="-" calcext:value-type="string">
            <text:p>-</text:p>
          </table:table-cell>
          <table:table-cell table:style-name="ce166" table:formula="of:=IFERROR(VLOOKUP([$Masterlist.$P254];[$Datasheet.$B$1:.$AV$9809];7;FALSE());&quot;-&quot;)" office:value-type="string" office:string-value="-" calcext:value-type="string">
            <text:p>-</text:p>
          </table:table-cell>
          <table:table-cell table:style-name="ce166" table:formula="of:=IFERROR(VLOOKUP([$Masterlist.$P254];[$Datasheet.$B$1:.$AV$9809];8;FALSE());&quot;-&quot;)" office:value-type="string" office:string-value="-" calcext:value-type="string">
            <text:p>-</text:p>
          </table:table-cell>
          <table:table-cell table:style-name="ce166" table:formula="of:=IFERROR(VLOOKUP([$Masterlist.$P254];[$Datasheet.$B$1:.$AV$9809];9;FALSE());&quot;-&quot;)" office:value-type="string" office:string-value="-" calcext:value-type="string">
            <text:p>-</text:p>
          </table:table-cell>
          <table:table-cell table:style-name="ce221" table:formula="of:=IFERROR(VLOOKUP([$Masterlist.$P254];[$Datasheet.$B$1:.$AV$9809];10;FALSE());&quot;-&quot;)" office:value-type="string" office:string-value="-" calcext:value-type="string">
            <text:p>-</text:p>
          </table:table-cell>
          <table:table-cell table:style-name="ce221" table:formula="of:=IFERROR(VLOOKUP([$Masterlist.$P254];[$Datasheet.$B$1:.$AV$9809];11;FALSE());&quot;-&quot;)" office:value-type="string" office:string-value="-" calcext:value-type="string">
            <text:p>-</text:p>
          </table:table-cell>
          <table:table-cell table:style-name="ce221" table:formula="of:=IFERROR(VLOOKUP([$Masterlist.$P254];[$Datasheet.$B$1:.$AV$9809];12;FALSE());&quot;-&quot;)" office:value-type="string" office:string-value="-" calcext:value-type="string">
            <text:p>-</text:p>
          </table:table-cell>
          <table:table-cell table:style-name="ce221" table:formula="of:=IFERROR(VLOOKUP([$Masterlist.$P254];[$Datasheet.$B$1:.$AV$9809];13;FALSE());&quot;-&quot;)" office:value-type="string" office:string-value="-" calcext:value-type="string">
            <text:p>-</text:p>
          </table:table-cell>
          <table:table-cell table:style-name="ce221" table:formula="of:=IFERROR(VLOOKUP([$Masterlist.$P254];[$Datasheet.$B$1:.$AV$9809];14;FALSE());&quot;-&quot;)" office:value-type="string" office:string-value="-" calcext:value-type="string">
            <text:p>-</text:p>
          </table:table-cell>
          <table:table-cell table:style-name="ce221" table:formula="of:=IFERROR(VLOOKUP([$Masterlist.$P254];[$Datasheet.$B$1:.$AV$9809];15;FALSE());&quot;-&quot;)" office:value-type="string" office:string-value="-" calcext:value-type="string">
            <text:p>-</text:p>
          </table:table-cell>
          <table:table-cell table:style-name="ce221" table:formula="of:=IFERROR(VLOOKUP([$Masterlist.$P254];[$Datasheet.$B$1:.$AV$9809];16;FALSE());&quot;-&quot;)" office:value-type="string" office:string-value="-" calcext:value-type="string">
            <text:p>-</text:p>
          </table:table-cell>
          <table:table-cell table:style-name="ce221" table:formula="of:=IFERROR(VLOOKUP([$Masterlist.$P254];[$Datasheet.$B$1:.$AV$9809];17;FALSE());&quot;-&quot;)" office:value-type="string" office:string-value="-" calcext:value-type="string">
            <text:p>-</text:p>
          </table:table-cell>
          <table:table-cell table:style-name="ce221" table:formula="of:=IFERROR(VLOOKUP([$Masterlist.$P254];[$Datasheet.$B$1:.$AV$9809];18;FALSE());&quot;-&quot;)" office:value-type="string" office:string-value="-" calcext:value-type="string">
            <text:p>-</text:p>
          </table:table-cell>
          <table:table-cell table:style-name="ce221" table:formula="of:=IFERROR(VLOOKUP([$Masterlist.$P254];[$Datasheet.$B$1:.$AV$9809];19;FALSE());&quot;-&quot;)" office:value-type="string" office:string-value="-" calcext:value-type="string">
            <text:p>-</text:p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office:value-type="string" calcext:value-type="string">
            <text:p>Yes</text:p>
          </table:table-cell>
          <table:table-cell table:style-name="ce50" table:number-columns-repeated="11"/>
          <table:table-cell table:style-name="ce92" office:value-type="string" calcext:value-type="string">
            <text:p>Stage Hand / uCrew Runner</text:p>
          </table:table-cell>
          <table:table-cell table:style-name="ce8" office:value-type="string" calcext:value-type="string">
            <text:p>Minkateko Nkuna</text:p>
          </table:table-cell>
          <table:table-cell table:style-name="ce13" table:formula="of:=IF(ISNUMBER(MATCH([.P255];[$Datasheet.$B$1:.$B$9809];0));&quot;✓&quot;;&quot;x&quot;)" office:value-type="string" office:string-value="✓" calcext:value-type="string">
            <text:p>✓</text:p>
          </table:table-cell>
          <table:table-cell table:style-name="ce166" table:formula="of:=IFERROR(VLOOKUP([$Masterlist.$P255];[$Datasheet.$B$1:.$AV$9809];2;FALSE());&quot;-&quot;)" office:value-type="float" office:value="1" calcext:value-type="float">
            <text:p>1</text:p>
          </table:table-cell>
          <table:table-cell table:style-name="ce166" table:formula="of:=IFERROR(VLOOKUP([$Masterlist.$P255];[$Datasheet.$B$1:.$AV$9809];3;FALSE());&quot;-&quot;)" office:value-type="float" office:value="1" calcext:value-type="float">
            <text:p>1</text:p>
          </table:table-cell>
          <table:table-cell table:style-name="ce166" table:formula="of:=IFERROR(VLOOKUP([$Masterlist.$P255];[$Datasheet.$B$1:.$AV$9809];4;FALSE());&quot;-&quot;)" office:value-type="float" office:value="0" calcext:value-type="float">
            <text:p>0</text:p>
          </table:table-cell>
          <table:table-cell table:style-name="ce166" table:formula="of:=IFERROR(VLOOKUP([$Masterlist.$P255];[$Datasheet.$B$1:.$AV$9809];5;FALSE());&quot;-&quot;)" office:value-type="float" office:value="0" calcext:value-type="float">
            <text:p>0</text:p>
          </table:table-cell>
          <table:table-cell table:style-name="ce209" table:formula="of:=IFERROR(VLOOKUP([$Masterlist.$P255];[$Datasheet.$B$1:.$AV$9809];6;FALSE());&quot;-&quot;)" office:value-type="float" office:value="1" calcext:value-type="float">
            <text:p>1</text:p>
          </table:table-cell>
          <table:table-cell table:style-name="ce166" table:formula="of:=IFERROR(VLOOKUP([$Masterlist.$P255];[$Datasheet.$B$1:.$AV$9809];7;FALSE());&quot;-&quot;)" office:value-type="float" office:value="1" calcext:value-type="float">
            <text:p>1</text:p>
          </table:table-cell>
          <table:table-cell table:style-name="ce166" table:formula="of:=IFERROR(VLOOKUP([$Masterlist.$P255];[$Datasheet.$B$1:.$AV$9809];8;FALSE());&quot;-&quot;)" office:value-type="float" office:value="0" calcext:value-type="float">
            <text:p>0</text:p>
          </table:table-cell>
          <table:table-cell table:style-name="ce166" table:formula="of:=IFERROR(VLOOKUP([$Masterlist.$P255];[$Datasheet.$B$1:.$AV$9809];9;FALSE());&quot;-&quot;)" office:value-type="float" office:value="1" calcext:value-type="float">
            <text:p>1</text:p>
          </table:table-cell>
          <table:table-cell table:style-name="ce221" table:formula="of:=IFERROR(VLOOKUP([$Masterlist.$P255];[$Datasheet.$B$1:.$AV$9809];10;FALSE());&quot;-&quot;)" office:value-type="float" office:value="0" calcext:value-type="float">
            <text:p>0</text:p>
          </table:table-cell>
          <table:table-cell table:style-name="ce221" table:formula="of:=IFERROR(VLOOKUP([$Masterlist.$P255];[$Datasheet.$B$1:.$AV$9809];11;FALSE());&quot;-&quot;)" office:value-type="float" office:value="0" calcext:value-type="float">
            <text:p>0</text:p>
          </table:table-cell>
          <table:table-cell table:style-name="ce221" table:formula="of:=IFERROR(VLOOKUP([$Masterlist.$P255];[$Datasheet.$B$1:.$AV$9809];12;FALSE());&quot;-&quot;)" office:value-type="float" office:value="0" calcext:value-type="float">
            <text:p>0</text:p>
          </table:table-cell>
          <table:table-cell table:style-name="ce221" table:formula="of:=IFERROR(VLOOKUP([$Masterlist.$P255];[$Datasheet.$B$1:.$AV$9809];13;FALSE());&quot;-&quot;)" office:value-type="float" office:value="0" calcext:value-type="float">
            <text:p>0</text:p>
          </table:table-cell>
          <table:table-cell table:style-name="ce221" table:formula="of:=IFERROR(VLOOKUP([$Masterlist.$P255];[$Datasheet.$B$1:.$AV$9809];14;FALSE());&quot;-&quot;)" office:value-type="float" office:value="1" calcext:value-type="float">
            <text:p>1</text:p>
          </table:table-cell>
          <table:table-cell table:style-name="ce221" table:formula="of:=IFERROR(VLOOKUP([$Masterlist.$P255];[$Datasheet.$B$1:.$AV$9809];15;FALSE());&quot;-&quot;)" office:value-type="float" office:value="1" calcext:value-type="float">
            <text:p>1</text:p>
          </table:table-cell>
          <table:table-cell table:style-name="ce221" table:formula="of:=IFERROR(VLOOKUP([$Masterlist.$P255];[$Datasheet.$B$1:.$AV$9809];16;FALSE());&quot;-&quot;)" office:value-type="float" office:value="0" calcext:value-type="float">
            <text:p/>
          </table:table-cell>
          <table:table-cell table:style-name="ce221" table:formula="of:=IFERROR(VLOOKUP([$Masterlist.$P255];[$Datasheet.$B$1:.$AV$9809];17;FALSE());&quot;-&quot;)" office:value-type="float" office:value="0" calcext:value-type="float">
            <text:p/>
          </table:table-cell>
          <table:table-cell table:style-name="ce221" table:formula="of:=IFERROR(VLOOKUP([$Masterlist.$P255];[$Datasheet.$B$1:.$AV$9809];18;FALSE());&quot;-&quot;)" office:value-type="float" office:value="0" calcext:value-type="float">
            <text:p/>
          </table:table-cell>
          <table:table-cell table:style-name="ce221" table:formula="of:=IFERROR(VLOOKUP([$Masterlist.$P255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/>
          <table:table-cell table:number-columns-repeated="2" table:style-name="ce50" office:value-type="string" calcext:value-type="string">
            <text:p>Yes</text:p>
          </table:table-cell>
          <table:table-cell table:style-name="ce50" table:number-columns-repeated="9"/>
          <table:table-cell table:style-name="ce92" office:value-type="string" calcext:value-type="string">
            <text:p>Stage Hand </text:p>
          </table:table-cell>
          <table:table-cell table:style-name="ce8" office:value-type="string" calcext:value-type="string">
            <text:p>Werner Schultz</text:p>
          </table:table-cell>
          <table:table-cell table:style-name="ce13" table:formula="of:=IF(ISNUMBER(MATCH([.P256];[$Datasheet.$B$1:.$B$9809];0));&quot;✓&quot;;&quot;x&quot;)" office:value-type="string" office:string-value="x" calcext:value-type="string">
            <text:p>x</text:p>
          </table:table-cell>
          <table:table-cell table:style-name="ce166" table:formula="of:=IFERROR(VLOOKUP([$Masterlist.$P256];[$Datasheet.$B$1:.$AV$9809];2;FALSE());&quot;-&quot;)" office:value-type="string" office:string-value="-" calcext:value-type="string">
            <text:p>-</text:p>
          </table:table-cell>
          <table:table-cell table:style-name="ce166" table:formula="of:=IFERROR(VLOOKUP([$Masterlist.$P256];[$Datasheet.$B$1:.$AV$9809];3;FALSE());&quot;-&quot;)" office:value-type="string" office:string-value="-" calcext:value-type="string">
            <text:p>-</text:p>
          </table:table-cell>
          <table:table-cell table:style-name="ce166" table:formula="of:=IFERROR(VLOOKUP([$Masterlist.$P256];[$Datasheet.$B$1:.$AV$9809];4;FALSE());&quot;-&quot;)" office:value-type="string" office:string-value="-" calcext:value-type="string">
            <text:p>-</text:p>
          </table:table-cell>
          <table:table-cell table:style-name="ce166" table:formula="of:=IFERROR(VLOOKUP([$Masterlist.$P256];[$Datasheet.$B$1:.$AV$9809];5;FALSE());&quot;-&quot;)" office:value-type="string" office:string-value="-" calcext:value-type="string">
            <text:p>-</text:p>
          </table:table-cell>
          <table:table-cell table:style-name="ce209" table:formula="of:=IFERROR(VLOOKUP([$Masterlist.$P256];[$Datasheet.$B$1:.$AV$9809];6;FALSE());&quot;-&quot;)" office:value-type="string" office:string-value="-" calcext:value-type="string">
            <text:p>-</text:p>
          </table:table-cell>
          <table:table-cell table:style-name="ce166" table:formula="of:=IFERROR(VLOOKUP([$Masterlist.$P256];[$Datasheet.$B$1:.$AV$9809];7;FALSE());&quot;-&quot;)" office:value-type="string" office:string-value="-" calcext:value-type="string">
            <text:p>-</text:p>
          </table:table-cell>
          <table:table-cell table:style-name="ce166" table:formula="of:=IFERROR(VLOOKUP([$Masterlist.$P256];[$Datasheet.$B$1:.$AV$9809];8;FALSE());&quot;-&quot;)" office:value-type="string" office:string-value="-" calcext:value-type="string">
            <text:p>-</text:p>
          </table:table-cell>
          <table:table-cell table:style-name="ce166" table:formula="of:=IFERROR(VLOOKUP([$Masterlist.$P256];[$Datasheet.$B$1:.$AV$9809];9;FALSE());&quot;-&quot;)" office:value-type="string" office:string-value="-" calcext:value-type="string">
            <text:p>-</text:p>
          </table:table-cell>
          <table:table-cell table:style-name="ce221" table:formula="of:=IFERROR(VLOOKUP([$Masterlist.$P256];[$Datasheet.$B$1:.$AV$9809];10;FALSE());&quot;-&quot;)" office:value-type="string" office:string-value="-" calcext:value-type="string">
            <text:p>-</text:p>
          </table:table-cell>
          <table:table-cell table:style-name="ce221" table:formula="of:=IFERROR(VLOOKUP([$Masterlist.$P256];[$Datasheet.$B$1:.$AV$9809];11;FALSE());&quot;-&quot;)" office:value-type="string" office:string-value="-" calcext:value-type="string">
            <text:p>-</text:p>
          </table:table-cell>
          <table:table-cell table:style-name="ce221" table:formula="of:=IFERROR(VLOOKUP([$Masterlist.$P256];[$Datasheet.$B$1:.$AV$9809];12;FALSE());&quot;-&quot;)" office:value-type="string" office:string-value="-" calcext:value-type="string">
            <text:p>-</text:p>
          </table:table-cell>
          <table:table-cell table:style-name="ce221" table:formula="of:=IFERROR(VLOOKUP([$Masterlist.$P256];[$Datasheet.$B$1:.$AV$9809];13;FALSE());&quot;-&quot;)" office:value-type="string" office:string-value="-" calcext:value-type="string">
            <text:p>-</text:p>
          </table:table-cell>
          <table:table-cell table:style-name="ce221" table:formula="of:=IFERROR(VLOOKUP([$Masterlist.$P256];[$Datasheet.$B$1:.$AV$9809];14;FALSE());&quot;-&quot;)" office:value-type="string" office:string-value="-" calcext:value-type="string">
            <text:p>-</text:p>
          </table:table-cell>
          <table:table-cell table:style-name="ce221" table:formula="of:=IFERROR(VLOOKUP([$Masterlist.$P256];[$Datasheet.$B$1:.$AV$9809];15;FALSE());&quot;-&quot;)" office:value-type="string" office:string-value="-" calcext:value-type="string">
            <text:p>-</text:p>
          </table:table-cell>
          <table:table-cell table:style-name="ce221" table:formula="of:=IFERROR(VLOOKUP([$Masterlist.$P256];[$Datasheet.$B$1:.$AV$9809];16;FALSE());&quot;-&quot;)" office:value-type="string" office:string-value="-" calcext:value-type="string">
            <text:p>-</text:p>
          </table:table-cell>
          <table:table-cell table:style-name="ce221" table:formula="of:=IFERROR(VLOOKUP([$Masterlist.$P256];[$Datasheet.$B$1:.$AV$9809];17;FALSE());&quot;-&quot;)" office:value-type="string" office:string-value="-" calcext:value-type="string">
            <text:p>-</text:p>
          </table:table-cell>
          <table:table-cell table:style-name="ce221" table:formula="of:=IFERROR(VLOOKUP([$Masterlist.$P256];[$Datasheet.$B$1:.$AV$9809];18;FALSE());&quot;-&quot;)" office:value-type="string" office:string-value="-" calcext:value-type="string">
            <text:p>-</text:p>
          </table:table-cell>
          <table:table-cell table:style-name="ce221" table:formula="of:=IFERROR(VLOOKUP([$Masterlist.$P256];[$Datasheet.$B$1:.$AV$9809];19;FALSE());&quot;-&quot;)" office:value-type="string" office:string-value="-" calcext:value-type="string">
            <text:p>-</text:p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/>
          <table:table-cell table:number-columns-repeated="2" table:style-name="ce50" office:value-type="string" calcext:value-type="string">
            <text:p>Yes</text:p>
          </table:table-cell>
          <table:table-cell table:style-name="ce50" table:number-columns-repeated="9"/>
          <table:table-cell table:style-name="ce92" office:value-type="string" calcext:value-type="string">
            <text:p>Stage Hand</text:p>
          </table:table-cell>
          <table:table-cell table:style-name="ce8" office:value-type="string" calcext:value-type="string">
            <text:p>William Wentzel</text:p>
          </table:table-cell>
          <table:table-cell table:style-name="ce13" table:formula="of:=IF(ISNUMBER(MATCH([.P257];[$Datasheet.$B$1:.$B$9809];0));&quot;✓&quot;;&quot;x&quot;)" office:value-type="string" office:string-value="✓" calcext:value-type="string">
            <text:p>✓</text:p>
          </table:table-cell>
          <table:table-cell table:style-name="ce166" table:formula="of:=IFERROR(VLOOKUP([$Masterlist.$P257];[$Datasheet.$B$1:.$AV$9809];2;FALSE());&quot;-&quot;)" office:value-type="float" office:value="0" calcext:value-type="float">
            <text:p>0</text:p>
          </table:table-cell>
          <table:table-cell table:style-name="ce166" table:formula="of:=IFERROR(VLOOKUP([$Masterlist.$P257];[$Datasheet.$B$1:.$AV$9809];3;FALSE());&quot;-&quot;)" office:value-type="float" office:value="0" calcext:value-type="float">
            <text:p>0</text:p>
          </table:table-cell>
          <table:table-cell table:style-name="ce166" table:formula="of:=IFERROR(VLOOKUP([$Masterlist.$P257];[$Datasheet.$B$1:.$AV$9809];4;FALSE());&quot;-&quot;)" office:value-type="float" office:value="1" calcext:value-type="float">
            <text:p>1</text:p>
          </table:table-cell>
          <table:table-cell table:style-name="ce166" table:formula="of:=IFERROR(VLOOKUP([$Masterlist.$P257];[$Datasheet.$B$1:.$AV$9809];5;FALSE());&quot;-&quot;)" office:value-type="float" office:value="1" calcext:value-type="float">
            <text:p>1</text:p>
          </table:table-cell>
          <table:table-cell table:style-name="ce209" table:formula="of:=IFERROR(VLOOKUP([$Masterlist.$P257];[$Datasheet.$B$1:.$AV$9809];6;FALSE());&quot;-&quot;)" office:value-type="float" office:value="1" calcext:value-type="float">
            <text:p>1</text:p>
          </table:table-cell>
          <table:table-cell table:style-name="ce166" table:formula="of:=IFERROR(VLOOKUP([$Masterlist.$P257];[$Datasheet.$B$1:.$AV$9809];7;FALSE());&quot;-&quot;)" office:value-type="float" office:value="1" calcext:value-type="float">
            <text:p>1</text:p>
          </table:table-cell>
          <table:table-cell table:style-name="ce166" table:formula="of:=IFERROR(VLOOKUP([$Masterlist.$P257];[$Datasheet.$B$1:.$AV$9809];8;FALSE());&quot;-&quot;)" office:value-type="float" office:value="1" calcext:value-type="float">
            <text:p>1</text:p>
          </table:table-cell>
          <table:table-cell table:style-name="ce166" table:formula="of:=IFERROR(VLOOKUP([$Masterlist.$P257];[$Datasheet.$B$1:.$AV$9809];9;FALSE());&quot;-&quot;)" office:value-type="float" office:value="1" calcext:value-type="float">
            <text:p>1</text:p>
          </table:table-cell>
          <table:table-cell table:style-name="ce221" table:formula="of:=IFERROR(VLOOKUP([$Masterlist.$P257];[$Datasheet.$B$1:.$AV$9809];10;FALSE());&quot;-&quot;)" office:value-type="float" office:value="1" calcext:value-type="float">
            <text:p>1</text:p>
          </table:table-cell>
          <table:table-cell table:style-name="ce221" table:formula="of:=IFERROR(VLOOKUP([$Masterlist.$P257];[$Datasheet.$B$1:.$AV$9809];11;FALSE());&quot;-&quot;)" office:value-type="float" office:value="1" calcext:value-type="float">
            <text:p>1</text:p>
          </table:table-cell>
          <table:table-cell table:style-name="ce221" table:formula="of:=IFERROR(VLOOKUP([$Masterlist.$P257];[$Datasheet.$B$1:.$AV$9809];12;FALSE());&quot;-&quot;)" office:value-type="float" office:value="1" calcext:value-type="float">
            <text:p>1</text:p>
          </table:table-cell>
          <table:table-cell table:style-name="ce221" table:formula="of:=IFERROR(VLOOKUP([$Masterlist.$P257];[$Datasheet.$B$1:.$AV$9809];13;FALSE());&quot;-&quot;)" office:value-type="float" office:value="1" calcext:value-type="float">
            <text:p>1</text:p>
          </table:table-cell>
          <table:table-cell table:style-name="ce221" table:formula="of:=IFERROR(VLOOKUP([$Masterlist.$P257];[$Datasheet.$B$1:.$AV$9809];14;FALSE());&quot;-&quot;)" office:value-type="float" office:value="1" calcext:value-type="float">
            <text:p>1</text:p>
          </table:table-cell>
          <table:table-cell table:style-name="ce221" table:formula="of:=IFERROR(VLOOKUP([$Masterlist.$P257];[$Datasheet.$B$1:.$AV$9809];15;FALSE());&quot;-&quot;)" office:value-type="float" office:value="1" calcext:value-type="float">
            <text:p>1</text:p>
          </table:table-cell>
          <table:table-cell table:style-name="ce221" table:formula="of:=IFERROR(VLOOKUP([$Masterlist.$P257];[$Datasheet.$B$1:.$AV$9809];16;FALSE());&quot;-&quot;)" office:value-type="float" office:value="0" calcext:value-type="float">
            <text:p/>
          </table:table-cell>
          <table:table-cell table:style-name="ce221" table:formula="of:=IFERROR(VLOOKUP([$Masterlist.$P257];[$Datasheet.$B$1:.$AV$9809];17;FALSE());&quot;-&quot;)" office:value-type="float" office:value="0" calcext:value-type="float">
            <text:p/>
          </table:table-cell>
          <table:table-cell table:style-name="ce221" table:formula="of:=IFERROR(VLOOKUP([$Masterlist.$P257];[$Datasheet.$B$1:.$AV$9809];18;FALSE());&quot;-&quot;)" office:value-type="float" office:value="0" calcext:value-type="float">
            <text:p/>
          </table:table-cell>
          <table:table-cell table:style-name="ce221" table:formula="of:=IFERROR(VLOOKUP([$Masterlist.$P257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/>
          <table:table-cell table:number-columns-repeated="2" table:style-name="ce50" office:value-type="string" calcext:value-type="string">
            <text:p>yes</text:p>
          </table:table-cell>
          <table:table-cell table:style-name="ce50" table:number-columns-repeated="9"/>
          <table:table-cell table:style-name="ce92" office:value-type="string" calcext:value-type="string">
            <text:p>Stage Hand </text:p>
          </table:table-cell>
          <table:table-cell table:style-name="ce8" office:value-type="string" calcext:value-type="string">
            <text:p>Magnus Koola</text:p>
          </table:table-cell>
          <table:table-cell table:style-name="ce13" table:formula="of:=IF(ISNUMBER(MATCH([.P258];[$Datasheet.$B$1:.$B$9809];0));&quot;✓&quot;;&quot;x&quot;)" office:value-type="string" office:string-value="✓" calcext:value-type="string">
            <text:p>✓</text:p>
          </table:table-cell>
          <table:table-cell table:style-name="ce166" table:formula="of:=IFERROR(VLOOKUP([$Masterlist.$P258];[$Datasheet.$B$1:.$AV$9809];2;FALSE());&quot;-&quot;)" office:value-type="float" office:value="1" calcext:value-type="float">
            <text:p>1</text:p>
          </table:table-cell>
          <table:table-cell table:style-name="ce166" table:formula="of:=IFERROR(VLOOKUP([$Masterlist.$P258];[$Datasheet.$B$1:.$AV$9809];3;FALSE());&quot;-&quot;)" office:value-type="float" office:value="1" calcext:value-type="float">
            <text:p>1</text:p>
          </table:table-cell>
          <table:table-cell table:style-name="ce166" table:formula="of:=IFERROR(VLOOKUP([$Masterlist.$P258];[$Datasheet.$B$1:.$AV$9809];4;FALSE());&quot;-&quot;)" office:value-type="float" office:value="1" calcext:value-type="float">
            <text:p>1</text:p>
          </table:table-cell>
          <table:table-cell table:style-name="ce166" table:formula="of:=IFERROR(VLOOKUP([$Masterlist.$P258];[$Datasheet.$B$1:.$AV$9809];5;FALSE());&quot;-&quot;)" office:value-type="float" office:value="1" calcext:value-type="float">
            <text:p>1</text:p>
          </table:table-cell>
          <table:table-cell table:style-name="ce209" table:formula="of:=IFERROR(VLOOKUP([$Masterlist.$P258];[$Datasheet.$B$1:.$AV$9809];6;FALSE());&quot;-&quot;)" office:value-type="float" office:value="1" calcext:value-type="float">
            <text:p>1</text:p>
          </table:table-cell>
          <table:table-cell table:style-name="ce166" table:formula="of:=IFERROR(VLOOKUP([$Masterlist.$P258];[$Datasheet.$B$1:.$AV$9809];7;FALSE());&quot;-&quot;)" office:value-type="float" office:value="1" calcext:value-type="float">
            <text:p>1</text:p>
          </table:table-cell>
          <table:table-cell table:style-name="ce166" table:formula="of:=IFERROR(VLOOKUP([$Masterlist.$P258];[$Datasheet.$B$1:.$AV$9809];8;FALSE());&quot;-&quot;)" office:value-type="float" office:value="1" calcext:value-type="float">
            <text:p>1</text:p>
          </table:table-cell>
          <table:table-cell table:style-name="ce166" table:formula="of:=IFERROR(VLOOKUP([$Masterlist.$P258];[$Datasheet.$B$1:.$AV$9809];9;FALSE());&quot;-&quot;)" office:value-type="float" office:value="1" calcext:value-type="float">
            <text:p>1</text:p>
          </table:table-cell>
          <table:table-cell table:style-name="ce221" table:formula="of:=IFERROR(VLOOKUP([$Masterlist.$P258];[$Datasheet.$B$1:.$AV$9809];10;FALSE());&quot;-&quot;)" office:value-type="float" office:value="1" calcext:value-type="float">
            <text:p>1</text:p>
          </table:table-cell>
          <table:table-cell table:style-name="ce221" table:formula="of:=IFERROR(VLOOKUP([$Masterlist.$P258];[$Datasheet.$B$1:.$AV$9809];11;FALSE());&quot;-&quot;)" office:value-type="float" office:value="1" calcext:value-type="float">
            <text:p>1</text:p>
          </table:table-cell>
          <table:table-cell table:style-name="ce221" table:formula="of:=IFERROR(VLOOKUP([$Masterlist.$P258];[$Datasheet.$B$1:.$AV$9809];12;FALSE());&quot;-&quot;)" office:value-type="float" office:value="1" calcext:value-type="float">
            <text:p>1</text:p>
          </table:table-cell>
          <table:table-cell table:style-name="ce221" table:formula="of:=IFERROR(VLOOKUP([$Masterlist.$P258];[$Datasheet.$B$1:.$AV$9809];13;FALSE());&quot;-&quot;)" office:value-type="float" office:value="1" calcext:value-type="float">
            <text:p>1</text:p>
          </table:table-cell>
          <table:table-cell table:style-name="ce221" table:formula="of:=IFERROR(VLOOKUP([$Masterlist.$P258];[$Datasheet.$B$1:.$AV$9809];14;FALSE());&quot;-&quot;)" office:value-type="float" office:value="1" calcext:value-type="float">
            <text:p>1</text:p>
          </table:table-cell>
          <table:table-cell table:style-name="ce221" table:formula="of:=IFERROR(VLOOKUP([$Masterlist.$P258];[$Datasheet.$B$1:.$AV$9809];15;FALSE());&quot;-&quot;)" office:value-type="float" office:value="1" calcext:value-type="float">
            <text:p>1</text:p>
          </table:table-cell>
          <table:table-cell table:style-name="ce221" table:formula="of:=IFERROR(VLOOKUP([$Masterlist.$P258];[$Datasheet.$B$1:.$AV$9809];16;FALSE());&quot;-&quot;)" office:value-type="float" office:value="0" calcext:value-type="float">
            <text:p/>
          </table:table-cell>
          <table:table-cell table:style-name="ce221" table:formula="of:=IFERROR(VLOOKUP([$Masterlist.$P258];[$Datasheet.$B$1:.$AV$9809];17;FALSE());&quot;-&quot;)" office:value-type="float" office:value="0" calcext:value-type="float">
            <text:p/>
          </table:table-cell>
          <table:table-cell table:style-name="ce221" table:formula="of:=IFERROR(VLOOKUP([$Masterlist.$P258];[$Datasheet.$B$1:.$AV$9809];18;FALSE());&quot;-&quot;)" office:value-type="float" office:value="0" calcext:value-type="float">
            <text:p/>
          </table:table-cell>
          <table:table-cell table:style-name="ce221" table:formula="of:=IFERROR(VLOOKUP([$Masterlist.$P258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/>
          <table:table-cell table:number-columns-repeated="2" table:style-name="ce50" office:value-type="string" calcext:value-type="string">
            <text:p>yes</text:p>
          </table:table-cell>
          <table:table-cell table:style-name="ce50" table:number-columns-repeated="9"/>
          <table:table-cell table:style-name="ce92" office:value-type="string" calcext:value-type="string">
            <text:p>Stage Hand</text:p>
          </table:table-cell>
          <table:table-cell table:style-name="ce8" office:value-type="string" calcext:value-type="string">
            <text:p>Johan Koekemoer</text:p>
          </table:table-cell>
          <table:table-cell table:style-name="ce13" table:formula="of:=IF(ISNUMBER(MATCH([.P259];[$Datasheet.$B$1:.$B$9809];0));&quot;✓&quot;;&quot;x&quot;)" office:value-type="string" office:string-value="✓" calcext:value-type="string">
            <text:p>✓</text:p>
          </table:table-cell>
          <table:table-cell table:style-name="ce166" table:formula="of:=IFERROR(VLOOKUP([$Masterlist.$P259];[$Datasheet.$B$1:.$AV$9809];2;FALSE());&quot;-&quot;)" office:value-type="float" office:value="0" calcext:value-type="float">
            <text:p>0</text:p>
          </table:table-cell>
          <table:table-cell table:style-name="ce166" table:formula="of:=IFERROR(VLOOKUP([$Masterlist.$P259];[$Datasheet.$B$1:.$AV$9809];3;FALSE());&quot;-&quot;)" office:value-type="float" office:value="1" calcext:value-type="float">
            <text:p>1</text:p>
          </table:table-cell>
          <table:table-cell table:style-name="ce166" table:formula="of:=IFERROR(VLOOKUP([$Masterlist.$P259];[$Datasheet.$B$1:.$AV$9809];4;FALSE());&quot;-&quot;)" office:value-type="float" office:value="1" calcext:value-type="float">
            <text:p>1</text:p>
          </table:table-cell>
          <table:table-cell table:style-name="ce166" table:formula="of:=IFERROR(VLOOKUP([$Masterlist.$P259];[$Datasheet.$B$1:.$AV$9809];5;FALSE());&quot;-&quot;)" office:value-type="float" office:value="0" calcext:value-type="float">
            <text:p>0</text:p>
          </table:table-cell>
          <table:table-cell table:style-name="ce209" table:formula="of:=IFERROR(VLOOKUP([$Masterlist.$P259];[$Datasheet.$B$1:.$AV$9809];6;FALSE());&quot;-&quot;)" office:value-type="float" office:value="1" calcext:value-type="float">
            <text:p>1</text:p>
          </table:table-cell>
          <table:table-cell table:style-name="ce166" table:formula="of:=IFERROR(VLOOKUP([$Masterlist.$P259];[$Datasheet.$B$1:.$AV$9809];7;FALSE());&quot;-&quot;)" office:value-type="float" office:value="1" calcext:value-type="float">
            <text:p>1</text:p>
          </table:table-cell>
          <table:table-cell table:style-name="ce166" table:formula="of:=IFERROR(VLOOKUP([$Masterlist.$P259];[$Datasheet.$B$1:.$AV$9809];8;FALSE());&quot;-&quot;)" office:value-type="float" office:value="0" calcext:value-type="float">
            <text:p>0</text:p>
          </table:table-cell>
          <table:table-cell table:style-name="ce166" table:formula="of:=IFERROR(VLOOKUP([$Masterlist.$P259];[$Datasheet.$B$1:.$AV$9809];9;FALSE());&quot;-&quot;)" office:value-type="float" office:value="1" calcext:value-type="float">
            <text:p>1</text:p>
          </table:table-cell>
          <table:table-cell table:style-name="ce221" table:formula="of:=IFERROR(VLOOKUP([$Masterlist.$P259];[$Datasheet.$B$1:.$AV$9809];10;FALSE());&quot;-&quot;)" office:value-type="float" office:value="0" calcext:value-type="float">
            <text:p>0</text:p>
          </table:table-cell>
          <table:table-cell table:style-name="ce221" table:formula="of:=IFERROR(VLOOKUP([$Masterlist.$P259];[$Datasheet.$B$1:.$AV$9809];11;FALSE());&quot;-&quot;)" office:value-type="float" office:value="0" calcext:value-type="float">
            <text:p>0</text:p>
          </table:table-cell>
          <table:table-cell table:style-name="ce221" table:formula="of:=IFERROR(VLOOKUP([$Masterlist.$P259];[$Datasheet.$B$1:.$AV$9809];12;FALSE());&quot;-&quot;)" office:value-type="float" office:value="0" calcext:value-type="float">
            <text:p>0</text:p>
          </table:table-cell>
          <table:table-cell table:style-name="ce221" table:formula="of:=IFERROR(VLOOKUP([$Masterlist.$P259];[$Datasheet.$B$1:.$AV$9809];13;FALSE());&quot;-&quot;)" office:value-type="float" office:value="1" calcext:value-type="float">
            <text:p>1</text:p>
          </table:table-cell>
          <table:table-cell table:style-name="ce221" table:formula="of:=IFERROR(VLOOKUP([$Masterlist.$P259];[$Datasheet.$B$1:.$AV$9809];14;FALSE());&quot;-&quot;)" office:value-type="float" office:value="1" calcext:value-type="float">
            <text:p>1</text:p>
          </table:table-cell>
          <table:table-cell table:style-name="ce221" table:formula="of:=IFERROR(VLOOKUP([$Masterlist.$P259];[$Datasheet.$B$1:.$AV$9809];15;FALSE());&quot;-&quot;)" office:value-type="float" office:value="0" calcext:value-type="float">
            <text:p>0</text:p>
          </table:table-cell>
          <table:table-cell table:style-name="ce221" table:formula="of:=IFERROR(VLOOKUP([$Masterlist.$P259];[$Datasheet.$B$1:.$AV$9809];16;FALSE());&quot;-&quot;)" office:value-type="float" office:value="0" calcext:value-type="float">
            <text:p/>
          </table:table-cell>
          <table:table-cell table:style-name="ce221" table:formula="of:=IFERROR(VLOOKUP([$Masterlist.$P259];[$Datasheet.$B$1:.$AV$9809];17;FALSE());&quot;-&quot;)" office:value-type="float" office:value="0" calcext:value-type="float">
            <text:p/>
          </table:table-cell>
          <table:table-cell table:style-name="ce221" table:formula="of:=IFERROR(VLOOKUP([$Masterlist.$P259];[$Datasheet.$B$1:.$AV$9809];18;FALSE());&quot;-&quot;)" office:value-type="float" office:value="0" calcext:value-type="float">
            <text:p/>
          </table:table-cell>
          <table:table-cell table:style-name="ce221" table:formula="of:=IFERROR(VLOOKUP([$Masterlist.$P259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AL</text:p>
          </table:table-cell>
          <table:table-cell table:number-columns-repeated="4" table:style-name="ce50" office:value-type="string" calcext:value-type="string">
            <text:p>Yes</text:p>
          </table:table-cell>
          <table:table-cell table:style-name="ce50" table:number-columns-repeated="8"/>
          <table:table-cell table:style-name="ce92" office:value-type="string" calcext:value-type="string">
            <text:p>Stage Hand</text:p>
          </table:table-cell>
          <table:table-cell table:style-name="ce8" office:value-type="string" calcext:value-type="string">
            <text:p>Gerrie Moolman</text:p>
          </table:table-cell>
          <table:table-cell table:style-name="ce13" table:formula="of:=IF(ISNUMBER(MATCH([.P260];[$Datasheet.$B$1:.$B$9809];0));&quot;✓&quot;;&quot;x&quot;)" office:value-type="string" office:string-value="✓" calcext:value-type="string">
            <text:p>✓</text:p>
          </table:table-cell>
          <table:table-cell table:style-name="ce166" table:formula="of:=IFERROR(VLOOKUP([$Masterlist.$P260];[$Datasheet.$B$1:.$AV$9809];2;FALSE());&quot;-&quot;)" office:value-type="float" office:value="0" calcext:value-type="float">
            <text:p>0</text:p>
          </table:table-cell>
          <table:table-cell table:style-name="ce166" table:formula="of:=IFERROR(VLOOKUP([$Masterlist.$P260];[$Datasheet.$B$1:.$AV$9809];3;FALSE());&quot;-&quot;)" office:value-type="float" office:value="0" calcext:value-type="float">
            <text:p>0</text:p>
          </table:table-cell>
          <table:table-cell table:style-name="ce166" table:formula="of:=IFERROR(VLOOKUP([$Masterlist.$P260];[$Datasheet.$B$1:.$AV$9809];4;FALSE());&quot;-&quot;)" office:value-type="float" office:value="1" calcext:value-type="float">
            <text:p>1</text:p>
          </table:table-cell>
          <table:table-cell table:style-name="ce166" table:formula="of:=IFERROR(VLOOKUP([$Masterlist.$P260];[$Datasheet.$B$1:.$AV$9809];5;FALSE());&quot;-&quot;)" office:value-type="float" office:value="1" calcext:value-type="float">
            <text:p>1</text:p>
          </table:table-cell>
          <table:table-cell table:style-name="ce209" table:formula="of:=IFERROR(VLOOKUP([$Masterlist.$P260];[$Datasheet.$B$1:.$AV$9809];6;FALSE());&quot;-&quot;)" office:value-type="float" office:value="1" calcext:value-type="float">
            <text:p>1</text:p>
          </table:table-cell>
          <table:table-cell table:style-name="ce166" table:formula="of:=IFERROR(VLOOKUP([$Masterlist.$P260];[$Datasheet.$B$1:.$AV$9809];7;FALSE());&quot;-&quot;)" office:value-type="float" office:value="1" calcext:value-type="float">
            <text:p>1</text:p>
          </table:table-cell>
          <table:table-cell table:style-name="ce166" table:formula="of:=IFERROR(VLOOKUP([$Masterlist.$P260];[$Datasheet.$B$1:.$AV$9809];8;FALSE());&quot;-&quot;)" office:value-type="float" office:value="0" calcext:value-type="float">
            <text:p>0</text:p>
          </table:table-cell>
          <table:table-cell table:style-name="ce166" table:formula="of:=IFERROR(VLOOKUP([$Masterlist.$P260];[$Datasheet.$B$1:.$AV$9809];9;FALSE());&quot;-&quot;)" office:value-type="float" office:value="0" calcext:value-type="float">
            <text:p>0</text:p>
          </table:table-cell>
          <table:table-cell table:style-name="ce221" table:formula="of:=IFERROR(VLOOKUP([$Masterlist.$P260];[$Datasheet.$B$1:.$AV$9809];10;FALSE());&quot;-&quot;)" office:value-type="float" office:value="0" calcext:value-type="float">
            <text:p>0</text:p>
          </table:table-cell>
          <table:table-cell table:style-name="ce221" table:formula="of:=IFERROR(VLOOKUP([$Masterlist.$P260];[$Datasheet.$B$1:.$AV$9809];11;FALSE());&quot;-&quot;)" office:value-type="float" office:value="0" calcext:value-type="float">
            <text:p>0</text:p>
          </table:table-cell>
          <table:table-cell table:style-name="ce221" table:formula="of:=IFERROR(VLOOKUP([$Masterlist.$P260];[$Datasheet.$B$1:.$AV$9809];12;FALSE());&quot;-&quot;)" office:value-type="float" office:value="0" calcext:value-type="float">
            <text:p>0</text:p>
          </table:table-cell>
          <table:table-cell table:style-name="ce221" table:formula="of:=IFERROR(VLOOKUP([$Masterlist.$P260];[$Datasheet.$B$1:.$AV$9809];13;FALSE());&quot;-&quot;)" office:value-type="float" office:value="0" calcext:value-type="float">
            <text:p>0</text:p>
          </table:table-cell>
          <table:table-cell table:style-name="ce221" table:formula="of:=IFERROR(VLOOKUP([$Masterlist.$P260];[$Datasheet.$B$1:.$AV$9809];14;FALSE());&quot;-&quot;)" office:value-type="float" office:value="1" calcext:value-type="float">
            <text:p>1</text:p>
          </table:table-cell>
          <table:table-cell table:style-name="ce221" table:formula="of:=IFERROR(VLOOKUP([$Masterlist.$P260];[$Datasheet.$B$1:.$AV$9809];15;FALSE());&quot;-&quot;)" office:value-type="float" office:value="1" calcext:value-type="float">
            <text:p>1</text:p>
          </table:table-cell>
          <table:table-cell table:style-name="ce221" table:formula="of:=IFERROR(VLOOKUP([$Masterlist.$P260];[$Datasheet.$B$1:.$AV$9809];16;FALSE());&quot;-&quot;)" office:value-type="float" office:value="0" calcext:value-type="float">
            <text:p/>
          </table:table-cell>
          <table:table-cell table:style-name="ce221" table:formula="of:=IFERROR(VLOOKUP([$Masterlist.$P260];[$Datasheet.$B$1:.$AV$9809];17;FALSE());&quot;-&quot;)" office:value-type="float" office:value="0" calcext:value-type="float">
            <text:p/>
          </table:table-cell>
          <table:table-cell table:style-name="ce221" table:formula="of:=IFERROR(VLOOKUP([$Masterlist.$P260];[$Datasheet.$B$1:.$AV$9809];18;FALSE());&quot;-&quot;)" office:value-type="float" office:value="0" calcext:value-type="float">
            <text:p/>
          </table:table-cell>
          <table:table-cell table:style-name="ce221" table:formula="of:=IFERROR(VLOOKUP([$Masterlist.$P260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table:number-columns-repeated="4"/>
          <table:table-cell table:style-name="ce50" office:value-type="string" calcext:value-type="string">
            <text:p>yes</text:p>
          </table:table-cell>
          <table:table-cell table:style-name="ce50" table:number-columns-repeated="7"/>
          <table:table-cell table:style-name="ce92" office:value-type="string" calcext:value-type="string">
            <text:p>Stage Hand / uCrew Runner</text:p>
          </table:table-cell>
          <table:table-cell table:style-name="ce8" office:value-type="string" calcext:value-type="string">
            <text:p>Jonathan Solomon</text:p>
          </table:table-cell>
          <table:table-cell table:style-name="ce13" table:formula="of:=IF(ISNUMBER(MATCH([.P261];[$Datasheet.$B$1:.$B$9809];0));&quot;✓&quot;;&quot;x&quot;)" office:value-type="string" office:string-value="✓" calcext:value-type="string">
            <text:p>✓</text:p>
          </table:table-cell>
          <table:table-cell table:style-name="ce165" table:formula="of:=IFERROR(VLOOKUP([$Masterlist.$P261];[$Datasheet.$B$1:.$AV$9809];2;FALSE());&quot;-&quot;)" office:value-type="float" office:value="0" calcext:value-type="float">
            <text:p>0</text:p>
          </table:table-cell>
          <table:table-cell table:style-name="ce165" table:formula="of:=IFERROR(VLOOKUP([$Masterlist.$P261];[$Datasheet.$B$1:.$AV$9809];3;FALSE());&quot;-&quot;)" office:value-type="float" office:value="0" calcext:value-type="float">
            <text:p>0</text:p>
          </table:table-cell>
          <table:table-cell table:style-name="ce165" table:formula="of:=IFERROR(VLOOKUP([$Masterlist.$P261];[$Datasheet.$B$1:.$AV$9809];4;FALSE());&quot;-&quot;)" office:value-type="float" office:value="1" calcext:value-type="float">
            <text:p>1</text:p>
          </table:table-cell>
          <table:table-cell table:style-name="ce165" table:formula="of:=IFERROR(VLOOKUP([$Masterlist.$P261];[$Datasheet.$B$1:.$AV$9809];5;FALSE());&quot;-&quot;)" office:value-type="float" office:value="1" calcext:value-type="float">
            <text:p>1</text:p>
          </table:table-cell>
          <table:table-cell table:style-name="ce208" table:formula="of:=IFERROR(VLOOKUP([$Masterlist.$P261];[$Datasheet.$B$1:.$AV$9809];6;FALSE());&quot;-&quot;)" office:value-type="float" office:value="0" calcext:value-type="float">
            <text:p>0</text:p>
          </table:table-cell>
          <table:table-cell table:style-name="ce165" table:formula="of:=IFERROR(VLOOKUP([$Masterlist.$P261];[$Datasheet.$B$1:.$AV$9809];7;FALSE());&quot;-&quot;)" office:value-type="float" office:value="0" calcext:value-type="float">
            <text:p>0</text:p>
          </table:table-cell>
          <table:table-cell table:style-name="ce165" table:formula="of:=IFERROR(VLOOKUP([$Masterlist.$P261];[$Datasheet.$B$1:.$AV$9809];8;FALSE());&quot;-&quot;)" office:value-type="float" office:value="0" calcext:value-type="float">
            <text:p>0</text:p>
          </table:table-cell>
          <table:table-cell table:style-name="ce165" table:formula="of:=IFERROR(VLOOKUP([$Masterlist.$P261];[$Datasheet.$B$1:.$AV$9809];9;FALSE());&quot;-&quot;)" office:value-type="float" office:value="0" calcext:value-type="float">
            <text:p>0</text:p>
          </table:table-cell>
          <table:table-cell table:style-name="ce220" table:formula="of:=IFERROR(VLOOKUP([$Masterlist.$P261];[$Datasheet.$B$1:.$AV$9809];10;FALSE());&quot;-&quot;)" office:value-type="float" office:value="1" calcext:value-type="float">
            <text:p>1</text:p>
          </table:table-cell>
          <table:table-cell table:style-name="ce220" table:formula="of:=IFERROR(VLOOKUP([$Masterlist.$P261];[$Datasheet.$B$1:.$AV$9809];11;FALSE());&quot;-&quot;)" office:value-type="float" office:value="1" calcext:value-type="float">
            <text:p>1</text:p>
          </table:table-cell>
          <table:table-cell table:style-name="ce220" table:formula="of:=IFERROR(VLOOKUP([$Masterlist.$P261];[$Datasheet.$B$1:.$AV$9809];12;FALSE());&quot;-&quot;)" office:value-type="float" office:value="1" calcext:value-type="float">
            <text:p>1</text:p>
          </table:table-cell>
          <table:table-cell table:style-name="ce220" table:formula="of:=IFERROR(VLOOKUP([$Masterlist.$P261];[$Datasheet.$B$1:.$AV$9809];13;FALSE());&quot;-&quot;)" office:value-type="float" office:value="1" calcext:value-type="float">
            <text:p>1</text:p>
          </table:table-cell>
          <table:table-cell table:style-name="ce220" table:formula="of:=IFERROR(VLOOKUP([$Masterlist.$P261];[$Datasheet.$B$1:.$AV$9809];14;FALSE());&quot;-&quot;)" office:value-type="float" office:value="0" calcext:value-type="float">
            <text:p>0</text:p>
          </table:table-cell>
          <table:table-cell table:style-name="ce220" table:formula="of:=IFERROR(VLOOKUP([$Masterlist.$P261];[$Datasheet.$B$1:.$AV$9809];15;FALSE());&quot;-&quot;)" office:value-type="float" office:value="0" calcext:value-type="float">
            <text:p>0</text:p>
          </table:table-cell>
          <table:table-cell table:style-name="ce220" table:formula="of:=IFERROR(VLOOKUP([$Masterlist.$P261];[$Datasheet.$B$1:.$AV$9809];16;FALSE());&quot;-&quot;)" office:value-type="float" office:value="0" calcext:value-type="float">
            <text:p/>
          </table:table-cell>
          <table:table-cell table:style-name="ce220" table:formula="of:=IFERROR(VLOOKUP([$Masterlist.$P261];[$Datasheet.$B$1:.$AV$9809];17;FALSE());&quot;-&quot;)" office:value-type="float" office:value="0" calcext:value-type="float">
            <text:p/>
          </table:table-cell>
          <table:table-cell table:style-name="ce220" table:formula="of:=IFERROR(VLOOKUP([$Masterlist.$P261];[$Datasheet.$B$1:.$AV$9809];18;FALSE());&quot;-&quot;)" office:value-type="float" office:value="0" calcext:value-type="float">
            <text:p/>
          </table:table-cell>
          <table:table-cell table:style-name="ce220" table:formula="of:=IFERROR(VLOOKUP([$Masterlist.$P261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50" table:number-columns-repeated="4"/>
          <table:table-cell table:style-name="ce50" office:value-type="string" calcext:value-type="string">
            <text:p>yes</text:p>
          </table:table-cell>
          <table:table-cell table:style-name="ce50" table:number-columns-repeated="7"/>
          <table:table-cell table:style-name="ce92" office:value-type="string" calcext:value-type="string">
            <text:p>Stage Hand / uCrew Runner</text:p>
          </table:table-cell>
          <table:table-cell table:style-name="ce8" office:value-type="string" calcext:value-type="string">
            <text:p>Morne Pretorius</text:p>
          </table:table-cell>
          <table:table-cell table:style-name="ce13" table:formula="of:=IF(ISNUMBER(MATCH([.P262];[$Datasheet.$B$1:.$B$9809];0));&quot;✓&quot;;&quot;x&quot;)" office:value-type="string" office:string-value="✓" calcext:value-type="string">
            <text:p>✓</text:p>
          </table:table-cell>
          <table:table-cell table:style-name="ce165" table:formula="of:=IFERROR(VLOOKUP([$Masterlist.$P262];[$Datasheet.$B$1:.$AV$9809];2;FALSE());&quot;-&quot;)" office:value-type="float" office:value="1" calcext:value-type="float">
            <text:p>1</text:p>
          </table:table-cell>
          <table:table-cell table:style-name="ce165" table:formula="of:=IFERROR(VLOOKUP([$Masterlist.$P262];[$Datasheet.$B$1:.$AV$9809];3;FALSE());&quot;-&quot;)" office:value-type="float" office:value="1" calcext:value-type="float">
            <text:p>1</text:p>
          </table:table-cell>
          <table:table-cell table:style-name="ce165" table:formula="of:=IFERROR(VLOOKUP([$Masterlist.$P262];[$Datasheet.$B$1:.$AV$9809];4;FALSE());&quot;-&quot;)" office:value-type="float" office:value="1" calcext:value-type="float">
            <text:p>1</text:p>
          </table:table-cell>
          <table:table-cell table:style-name="ce165" table:formula="of:=IFERROR(VLOOKUP([$Masterlist.$P262];[$Datasheet.$B$1:.$AV$9809];5;FALSE());&quot;-&quot;)" office:value-type="float" office:value="0" calcext:value-type="float">
            <text:p>0</text:p>
          </table:table-cell>
          <table:table-cell table:style-name="ce208" table:formula="of:=IFERROR(VLOOKUP([$Masterlist.$P262];[$Datasheet.$B$1:.$AV$9809];6;FALSE());&quot;-&quot;)" office:value-type="float" office:value="1" calcext:value-type="float">
            <text:p>1</text:p>
          </table:table-cell>
          <table:table-cell table:style-name="ce165" table:formula="of:=IFERROR(VLOOKUP([$Masterlist.$P262];[$Datasheet.$B$1:.$AV$9809];7;FALSE());&quot;-&quot;)" office:value-type="float" office:value="1" calcext:value-type="float">
            <text:p>1</text:p>
          </table:table-cell>
          <table:table-cell table:style-name="ce165" table:formula="of:=IFERROR(VLOOKUP([$Masterlist.$P262];[$Datasheet.$B$1:.$AV$9809];8;FALSE());&quot;-&quot;)" office:value-type="float" office:value="1" calcext:value-type="float">
            <text:p>1</text:p>
          </table:table-cell>
          <table:table-cell table:style-name="ce165" table:formula="of:=IFERROR(VLOOKUP([$Masterlist.$P262];[$Datasheet.$B$1:.$AV$9809];9;FALSE());&quot;-&quot;)" office:value-type="float" office:value="1" calcext:value-type="float">
            <text:p>1</text:p>
          </table:table-cell>
          <table:table-cell table:style-name="ce220" table:formula="of:=IFERROR(VLOOKUP([$Masterlist.$P262];[$Datasheet.$B$1:.$AV$9809];10;FALSE());&quot;-&quot;)" office:value-type="float" office:value="1" calcext:value-type="float">
            <text:p>1</text:p>
          </table:table-cell>
          <table:table-cell table:style-name="ce220" table:formula="of:=IFERROR(VLOOKUP([$Masterlist.$P262];[$Datasheet.$B$1:.$AV$9809];11;FALSE());&quot;-&quot;)" office:value-type="float" office:value="0" calcext:value-type="float">
            <text:p>0</text:p>
          </table:table-cell>
          <table:table-cell table:style-name="ce220" table:formula="of:=IFERROR(VLOOKUP([$Masterlist.$P262];[$Datasheet.$B$1:.$AV$9809];12;FALSE());&quot;-&quot;)" office:value-type="float" office:value="1" calcext:value-type="float">
            <text:p>1</text:p>
          </table:table-cell>
          <table:table-cell table:style-name="ce220" table:formula="of:=IFERROR(VLOOKUP([$Masterlist.$P262];[$Datasheet.$B$1:.$AV$9809];13;FALSE());&quot;-&quot;)" office:value-type="float" office:value="1" calcext:value-type="float">
            <text:p>1</text:p>
          </table:table-cell>
          <table:table-cell table:style-name="ce220" table:formula="of:=IFERROR(VLOOKUP([$Masterlist.$P262];[$Datasheet.$B$1:.$AV$9809];14;FALSE());&quot;-&quot;)" office:value-type="float" office:value="0" calcext:value-type="float">
            <text:p>0</text:p>
          </table:table-cell>
          <table:table-cell table:style-name="ce220" table:formula="of:=IFERROR(VLOOKUP([$Masterlist.$P262];[$Datasheet.$B$1:.$AV$9809];15;FALSE());&quot;-&quot;)" office:value-type="float" office:value="0" calcext:value-type="float">
            <text:p>0</text:p>
          </table:table-cell>
          <table:table-cell table:style-name="ce220" table:formula="of:=IFERROR(VLOOKUP([$Masterlist.$P262];[$Datasheet.$B$1:.$AV$9809];16;FALSE());&quot;-&quot;)" office:value-type="float" office:value="0" calcext:value-type="float">
            <text:p/>
          </table:table-cell>
          <table:table-cell table:style-name="ce220" table:formula="of:=IFERROR(VLOOKUP([$Masterlist.$P262];[$Datasheet.$B$1:.$AV$9809];17;FALSE());&quot;-&quot;)" office:value-type="float" office:value="0" calcext:value-type="float">
            <text:p/>
          </table:table-cell>
          <table:table-cell table:style-name="ce220" table:formula="of:=IFERROR(VLOOKUP([$Masterlist.$P262];[$Datasheet.$B$1:.$AV$9809];18;FALSE());&quot;-&quot;)" office:value-type="float" office:value="0" calcext:value-type="float">
            <text:p/>
          </table:table-cell>
          <table:table-cell table:style-name="ce220" table:formula="of:=IFERROR(VLOOKUP([$Masterlist.$P262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A</text:p>
          </table:table-cell>
          <table:table-cell table:style-name="ce50" table:number-columns-repeated="4"/>
          <table:table-cell table:style-name="ce50" office:value-type="string" calcext:value-type="string">
            <text:p>yes</text:p>
          </table:table-cell>
          <table:table-cell table:style-name="ce50" table:number-columns-repeated="7"/>
          <table:table-cell table:style-name="ce92" office:value-type="string" calcext:value-type="string">
            <text:p>Stage Hand / uCrew Runner</text:p>
          </table:table-cell>
          <table:table-cell table:style-name="ce8" office:value-type="string" calcext:value-type="string">
            <text:p>Hennie Van Jaarsveld</text:p>
          </table:table-cell>
          <table:table-cell table:style-name="ce13" table:formula="of:=IF(ISNUMBER(MATCH([.P263];[$Datasheet.$B$1:.$B$9809];0));&quot;✓&quot;;&quot;x&quot;)" office:value-type="string" office:string-value="✓" calcext:value-type="string">
            <text:p>✓</text:p>
          </table:table-cell>
          <table:table-cell table:style-name="ce165" table:formula="of:=IFERROR(VLOOKUP([$Masterlist.$P263];[$Datasheet.$B$1:.$AV$9809];2;FALSE());&quot;-&quot;)" office:value-type="float" office:value="0" calcext:value-type="float">
            <text:p>0</text:p>
          </table:table-cell>
          <table:table-cell table:style-name="ce165" table:formula="of:=IFERROR(VLOOKUP([$Masterlist.$P263];[$Datasheet.$B$1:.$AV$9809];3;FALSE());&quot;-&quot;)" office:value-type="float" office:value="0" calcext:value-type="float">
            <text:p>0</text:p>
          </table:table-cell>
          <table:table-cell table:style-name="ce165" table:formula="of:=IFERROR(VLOOKUP([$Masterlist.$P263];[$Datasheet.$B$1:.$AV$9809];4;FALSE());&quot;-&quot;)" office:value-type="float" office:value="1" calcext:value-type="float">
            <text:p>1</text:p>
          </table:table-cell>
          <table:table-cell table:style-name="ce165" table:formula="of:=IFERROR(VLOOKUP([$Masterlist.$P263];[$Datasheet.$B$1:.$AV$9809];5;FALSE());&quot;-&quot;)" office:value-type="float" office:value="1" calcext:value-type="float">
            <text:p>1</text:p>
          </table:table-cell>
          <table:table-cell table:style-name="ce208" table:formula="of:=IFERROR(VLOOKUP([$Masterlist.$P263];[$Datasheet.$B$1:.$AV$9809];6;FALSE());&quot;-&quot;)" office:value-type="float" office:value="1" calcext:value-type="float">
            <text:p>1</text:p>
          </table:table-cell>
          <table:table-cell table:style-name="ce165" table:formula="of:=IFERROR(VLOOKUP([$Masterlist.$P263];[$Datasheet.$B$1:.$AV$9809];7;FALSE());&quot;-&quot;)" office:value-type="float" office:value="1" calcext:value-type="float">
            <text:p>1</text:p>
          </table:table-cell>
          <table:table-cell table:style-name="ce165" table:formula="of:=IFERROR(VLOOKUP([$Masterlist.$P263];[$Datasheet.$B$1:.$AV$9809];8;FALSE());&quot;-&quot;)" office:value-type="float" office:value="1" calcext:value-type="float">
            <text:p>1</text:p>
          </table:table-cell>
          <table:table-cell table:style-name="ce165" table:formula="of:=IFERROR(VLOOKUP([$Masterlist.$P263];[$Datasheet.$B$1:.$AV$9809];9;FALSE());&quot;-&quot;)" office:value-type="float" office:value="1" calcext:value-type="float">
            <text:p>1</text:p>
          </table:table-cell>
          <table:table-cell table:style-name="ce220" table:formula="of:=IFERROR(VLOOKUP([$Masterlist.$P263];[$Datasheet.$B$1:.$AV$9809];10;FALSE());&quot;-&quot;)" office:value-type="float" office:value="1" calcext:value-type="float">
            <text:p>1</text:p>
          </table:table-cell>
          <table:table-cell table:style-name="ce220" table:formula="of:=IFERROR(VLOOKUP([$Masterlist.$P263];[$Datasheet.$B$1:.$AV$9809];11;FALSE());&quot;-&quot;)" office:value-type="float" office:value="1" calcext:value-type="float">
            <text:p>1</text:p>
          </table:table-cell>
          <table:table-cell table:style-name="ce220" table:formula="of:=IFERROR(VLOOKUP([$Masterlist.$P263];[$Datasheet.$B$1:.$AV$9809];12;FALSE());&quot;-&quot;)" office:value-type="float" office:value="1" calcext:value-type="float">
            <text:p>1</text:p>
          </table:table-cell>
          <table:table-cell table:style-name="ce220" table:formula="of:=IFERROR(VLOOKUP([$Masterlist.$P263];[$Datasheet.$B$1:.$AV$9809];13;FALSE());&quot;-&quot;)" office:value-type="float" office:value="1" calcext:value-type="float">
            <text:p>1</text:p>
          </table:table-cell>
          <table:table-cell table:style-name="ce220" table:formula="of:=IFERROR(VLOOKUP([$Masterlist.$P263];[$Datasheet.$B$1:.$AV$9809];14;FALSE());&quot;-&quot;)" office:value-type="float" office:value="1" calcext:value-type="float">
            <text:p>1</text:p>
          </table:table-cell>
          <table:table-cell table:style-name="ce220" table:formula="of:=IFERROR(VLOOKUP([$Masterlist.$P263];[$Datasheet.$B$1:.$AV$9809];15;FALSE());&quot;-&quot;)" office:value-type="float" office:value="1" calcext:value-type="float">
            <text:p>1</text:p>
          </table:table-cell>
          <table:table-cell table:style-name="ce220" table:formula="of:=IFERROR(VLOOKUP([$Masterlist.$P263];[$Datasheet.$B$1:.$AV$9809];16;FALSE());&quot;-&quot;)" office:value-type="float" office:value="0" calcext:value-type="float">
            <text:p/>
          </table:table-cell>
          <table:table-cell table:style-name="ce220" table:formula="of:=IFERROR(VLOOKUP([$Masterlist.$P263];[$Datasheet.$B$1:.$AV$9809];17;FALSE());&quot;-&quot;)" office:value-type="float" office:value="0" calcext:value-type="float">
            <text:p/>
          </table:table-cell>
          <table:table-cell table:style-name="ce220" table:formula="of:=IFERROR(VLOOKUP([$Masterlist.$P263];[$Datasheet.$B$1:.$AV$9809];18;FALSE());&quot;-&quot;)" office:value-type="float" office:value="0" calcext:value-type="float">
            <text:p/>
          </table:table-cell>
          <table:table-cell table:style-name="ce220" table:formula="of:=IFERROR(VLOOKUP([$Masterlist.$P263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/>
          <table:table-cell table:style-name="ce50" table:number-columns-repeated="4"/>
          <table:table-cell table:style-name="ce50" office:value-type="string" calcext:value-type="string">
            <text:p>yes</text:p>
          </table:table-cell>
          <table:table-cell table:style-name="ce50" table:number-columns-repeated="7"/>
          <table:table-cell table:style-name="ce92" office:value-type="string" calcext:value-type="string">
            <text:p>Stage Hand / uCrew Runner</text:p>
          </table:table-cell>
          <table:table-cell table:style-name="ce8" office:value-type="string" calcext:value-type="string">
            <text:p>Philip Lerm</text:p>
          </table:table-cell>
          <table:table-cell table:style-name="ce13" table:formula="of:=IF(ISNUMBER(MATCH([.P264];[$Datasheet.$B$1:.$B$9809];0));&quot;✓&quot;;&quot;x&quot;)" office:value-type="string" office:string-value="✓" calcext:value-type="string">
            <text:p>✓</text:p>
          </table:table-cell>
          <table:table-cell table:style-name="ce166" table:formula="of:=IFERROR(VLOOKUP([$Masterlist.$P264];[$Datasheet.$B$1:.$AV$9809];2;FALSE());&quot;-&quot;)" office:value-type="float" office:value="0" calcext:value-type="float">
            <text:p>0</text:p>
          </table:table-cell>
          <table:table-cell table:style-name="ce166" table:formula="of:=IFERROR(VLOOKUP([$Masterlist.$P264];[$Datasheet.$B$1:.$AV$9809];3;FALSE());&quot;-&quot;)" office:value-type="float" office:value="0" calcext:value-type="float">
            <text:p>0</text:p>
          </table:table-cell>
          <table:table-cell table:style-name="ce166" table:formula="of:=IFERROR(VLOOKUP([$Masterlist.$P264];[$Datasheet.$B$1:.$AV$9809];4;FALSE());&quot;-&quot;)" office:value-type="float" office:value="1" calcext:value-type="float">
            <text:p>1</text:p>
          </table:table-cell>
          <table:table-cell table:style-name="ce166" table:formula="of:=IFERROR(VLOOKUP([$Masterlist.$P264];[$Datasheet.$B$1:.$AV$9809];5;FALSE());&quot;-&quot;)" office:value-type="float" office:value="0" calcext:value-type="float">
            <text:p>0</text:p>
          </table:table-cell>
          <table:table-cell table:style-name="ce209" table:formula="of:=IFERROR(VLOOKUP([$Masterlist.$P264];[$Datasheet.$B$1:.$AV$9809];6;FALSE());&quot;-&quot;)" office:value-type="float" office:value="1" calcext:value-type="float">
            <text:p>1</text:p>
          </table:table-cell>
          <table:table-cell table:style-name="ce166" table:formula="of:=IFERROR(VLOOKUP([$Masterlist.$P264];[$Datasheet.$B$1:.$AV$9809];7;FALSE());&quot;-&quot;)" office:value-type="float" office:value="1" calcext:value-type="float">
            <text:p>1</text:p>
          </table:table-cell>
          <table:table-cell table:style-name="ce166" table:formula="of:=IFERROR(VLOOKUP([$Masterlist.$P264];[$Datasheet.$B$1:.$AV$9809];8;FALSE());&quot;-&quot;)" office:value-type="float" office:value="1" calcext:value-type="float">
            <text:p>1</text:p>
          </table:table-cell>
          <table:table-cell table:style-name="ce166" table:formula="of:=IFERROR(VLOOKUP([$Masterlist.$P264];[$Datasheet.$B$1:.$AV$9809];9;FALSE());&quot;-&quot;)" office:value-type="float" office:value="1" calcext:value-type="float">
            <text:p>1</text:p>
          </table:table-cell>
          <table:table-cell table:style-name="ce221" table:formula="of:=IFERROR(VLOOKUP([$Masterlist.$P264];[$Datasheet.$B$1:.$AV$9809];10;FALSE());&quot;-&quot;)" office:value-type="float" office:value="1" calcext:value-type="float">
            <text:p>1</text:p>
          </table:table-cell>
          <table:table-cell table:style-name="ce221" table:formula="of:=IFERROR(VLOOKUP([$Masterlist.$P264];[$Datasheet.$B$1:.$AV$9809];11;FALSE());&quot;-&quot;)" office:value-type="float" office:value="1" calcext:value-type="float">
            <text:p>1</text:p>
          </table:table-cell>
          <table:table-cell table:style-name="ce221" table:formula="of:=IFERROR(VLOOKUP([$Masterlist.$P264];[$Datasheet.$B$1:.$AV$9809];12;FALSE());&quot;-&quot;)" office:value-type="float" office:value="0" calcext:value-type="float">
            <text:p>0</text:p>
          </table:table-cell>
          <table:table-cell table:style-name="ce221" table:formula="of:=IFERROR(VLOOKUP([$Masterlist.$P264];[$Datasheet.$B$1:.$AV$9809];13;FALSE());&quot;-&quot;)" office:value-type="float" office:value="0" calcext:value-type="float">
            <text:p>0</text:p>
          </table:table-cell>
          <table:table-cell table:style-name="ce221" table:formula="of:=IFERROR(VLOOKUP([$Masterlist.$P264];[$Datasheet.$B$1:.$AV$9809];14;FALSE());&quot;-&quot;)" office:value-type="float" office:value="0" calcext:value-type="float">
            <text:p>0</text:p>
          </table:table-cell>
          <table:table-cell table:style-name="ce221" table:formula="of:=IFERROR(VLOOKUP([$Masterlist.$P264];[$Datasheet.$B$1:.$AV$9809];15;FALSE());&quot;-&quot;)" office:value-type="float" office:value="0" calcext:value-type="float">
            <text:p>0</text:p>
          </table:table-cell>
          <table:table-cell table:style-name="ce221" table:formula="of:=IFERROR(VLOOKUP([$Masterlist.$P264];[$Datasheet.$B$1:.$AV$9809];16;FALSE());&quot;-&quot;)" office:value-type="float" office:value="0" calcext:value-type="float">
            <text:p/>
          </table:table-cell>
          <table:table-cell table:style-name="ce221" table:formula="of:=IFERROR(VLOOKUP([$Masterlist.$P264];[$Datasheet.$B$1:.$AV$9809];17;FALSE());&quot;-&quot;)" office:value-type="float" office:value="0" calcext:value-type="float">
            <text:p/>
          </table:table-cell>
          <table:table-cell table:style-name="ce221" table:formula="of:=IFERROR(VLOOKUP([$Masterlist.$P264];[$Datasheet.$B$1:.$AV$9809];18;FALSE());&quot;-&quot;)" office:value-type="float" office:value="0" calcext:value-type="float">
            <text:p/>
          </table:table-cell>
          <table:table-cell table:style-name="ce221" table:formula="of:=IFERROR(VLOOKUP([$Masterlist.$P264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1">
          <table:table-cell table:style-name="ce15"/>
          <table:table-cell table:style-name="ce26" office:value-type="string" calcext:value-type="string">
            <text:p>AL</text:p>
          </table:table-cell>
          <table:table-cell table:style-name="ce50" table:number-columns-repeated="5"/>
          <table:table-cell table:number-columns-repeated="2" table:style-name="ce50" office:value-type="string" calcext:value-type="string">
            <text:p>Yes</text:p>
          </table:table-cell>
          <table:table-cell table:style-name="ce50" table:number-columns-repeated="5"/>
          <table:table-cell table:style-name="ce92" office:value-type="string" calcext:value-type="string">
            <text:p>Stage Hand / uCrew Runner</text:p>
          </table:table-cell>
          <table:table-cell table:style-name="ce8" office:value-type="string" calcext:value-type="string">
            <text:p>JP Marais</text:p>
          </table:table-cell>
          <table:table-cell table:style-name="ce13" table:formula="of:=IF(ISNUMBER(MATCH([.P265];[$Datasheet.$B$1:.$B$9809];0));&quot;✓&quot;;&quot;x&quot;)" office:value-type="string" office:string-value="✓" calcext:value-type="string">
            <text:p>✓</text:p>
          </table:table-cell>
          <table:table-cell table:style-name="ce165" table:formula="of:=IFERROR(VLOOKUP([$Masterlist.$P265];[$Datasheet.$B$1:.$AV$9809];2;FALSE());&quot;-&quot;)" office:value-type="float" office:value="1" calcext:value-type="float">
            <text:p>1</text:p>
          </table:table-cell>
          <table:table-cell table:style-name="ce165" table:formula="of:=IFERROR(VLOOKUP([$Masterlist.$P265];[$Datasheet.$B$1:.$AV$9809];3;FALSE());&quot;-&quot;)" office:value-type="float" office:value="1" calcext:value-type="float">
            <text:p>1</text:p>
          </table:table-cell>
          <table:table-cell table:style-name="ce165" table:formula="of:=IFERROR(VLOOKUP([$Masterlist.$P265];[$Datasheet.$B$1:.$AV$9809];4;FALSE());&quot;-&quot;)" office:value-type="float" office:value="0" calcext:value-type="float">
            <text:p>0</text:p>
          </table:table-cell>
          <table:table-cell table:style-name="ce165" table:formula="of:=IFERROR(VLOOKUP([$Masterlist.$P265];[$Datasheet.$B$1:.$AV$9809];5;FALSE());&quot;-&quot;)" office:value-type="float" office:value="0" calcext:value-type="float">
            <text:p>0</text:p>
          </table:table-cell>
          <table:table-cell table:style-name="ce208" table:formula="of:=IFERROR(VLOOKUP([$Masterlist.$P265];[$Datasheet.$B$1:.$AV$9809];6;FALSE());&quot;-&quot;)" office:value-type="float" office:value="1" calcext:value-type="float">
            <text:p>1</text:p>
          </table:table-cell>
          <table:table-cell table:style-name="ce165" table:formula="of:=IFERROR(VLOOKUP([$Masterlist.$P265];[$Datasheet.$B$1:.$AV$9809];7;FALSE());&quot;-&quot;)" office:value-type="float" office:value="1" calcext:value-type="float">
            <text:p>1</text:p>
          </table:table-cell>
          <table:table-cell table:style-name="ce165" table:formula="of:=IFERROR(VLOOKUP([$Masterlist.$P265];[$Datasheet.$B$1:.$AV$9809];8;FALSE());&quot;-&quot;)" office:value-type="float" office:value="1" calcext:value-type="float">
            <text:p>1</text:p>
          </table:table-cell>
          <table:table-cell table:style-name="ce165" table:formula="of:=IFERROR(VLOOKUP([$Masterlist.$P265];[$Datasheet.$B$1:.$AV$9809];9;FALSE());&quot;-&quot;)" office:value-type="float" office:value="1" calcext:value-type="float">
            <text:p>1</text:p>
          </table:table-cell>
          <table:table-cell table:style-name="ce220" table:formula="of:=IFERROR(VLOOKUP([$Masterlist.$P265];[$Datasheet.$B$1:.$AV$9809];10;FALSE());&quot;-&quot;)" office:value-type="float" office:value="0" calcext:value-type="float">
            <text:p>0</text:p>
          </table:table-cell>
          <table:table-cell table:style-name="ce220" table:formula="of:=IFERROR(VLOOKUP([$Masterlist.$P265];[$Datasheet.$B$1:.$AV$9809];11;FALSE());&quot;-&quot;)" office:value-type="float" office:value="0" calcext:value-type="float">
            <text:p>0</text:p>
          </table:table-cell>
          <table:table-cell table:style-name="ce220" table:formula="of:=IFERROR(VLOOKUP([$Masterlist.$P265];[$Datasheet.$B$1:.$AV$9809];12;FALSE());&quot;-&quot;)" office:value-type="float" office:value="1" calcext:value-type="float">
            <text:p>1</text:p>
          </table:table-cell>
          <table:table-cell table:style-name="ce220" table:formula="of:=IFERROR(VLOOKUP([$Masterlist.$P265];[$Datasheet.$B$1:.$AV$9809];13;FALSE());&quot;-&quot;)" office:value-type="float" office:value="1" calcext:value-type="float">
            <text:p>1</text:p>
          </table:table-cell>
          <table:table-cell table:style-name="ce220" table:formula="of:=IFERROR(VLOOKUP([$Masterlist.$P265];[$Datasheet.$B$1:.$AV$9809];14;FALSE());&quot;-&quot;)" office:value-type="float" office:value="1" calcext:value-type="float">
            <text:p>1</text:p>
          </table:table-cell>
          <table:table-cell table:style-name="ce220" table:formula="of:=IFERROR(VLOOKUP([$Masterlist.$P265];[$Datasheet.$B$1:.$AV$9809];15;FALSE());&quot;-&quot;)" office:value-type="float" office:value="1" calcext:value-type="float">
            <text:p>1</text:p>
          </table:table-cell>
          <table:table-cell table:style-name="ce220" table:formula="of:=IFERROR(VLOOKUP([$Masterlist.$P265];[$Datasheet.$B$1:.$AV$9809];16;FALSE());&quot;-&quot;)" office:value-type="float" office:value="0" calcext:value-type="float">
            <text:p/>
          </table:table-cell>
          <table:table-cell table:style-name="ce220" table:formula="of:=IFERROR(VLOOKUP([$Masterlist.$P265];[$Datasheet.$B$1:.$AV$9809];17;FALSE());&quot;-&quot;)" office:value-type="float" office:value="0" calcext:value-type="float">
            <text:p/>
          </table:table-cell>
          <table:table-cell table:style-name="ce220" table:formula="of:=IFERROR(VLOOKUP([$Masterlist.$P265];[$Datasheet.$B$1:.$AV$9809];18;FALSE());&quot;-&quot;)" office:value-type="float" office:value="0" calcext:value-type="float">
            <text:p/>
          </table:table-cell>
          <table:table-cell table:style-name="ce220" table:formula="of:=IFERROR(VLOOKUP([$Masterlist.$P265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7" office:value-type="string" calcext:value-type="string">
            <text:p>M</text:p>
          </table:table-cell>
          <table:table-cell table:style-name="ce50" table:number-columns-repeated="5"/>
          <table:table-cell table:number-columns-repeated="2" table:style-name="ce50" office:value-type="string" calcext:value-type="string">
            <text:p>Yes</text:p>
          </table:table-cell>
          <table:table-cell table:style-name="ce50" table:number-columns-repeated="5"/>
          <table:table-cell table:style-name="ce92" office:value-type="string" calcext:value-type="string">
            <text:p>Stage Hand / uCrew Runner</text:p>
          </table:table-cell>
          <table:table-cell table:style-name="ce8" office:value-type="string" calcext:value-type="string">
            <text:p>Christo Schoeman</text:p>
          </table:table-cell>
          <table:table-cell table:style-name="ce13" table:formula="of:=IF(ISNUMBER(MATCH([.P266];[$Datasheet.$B$1:.$B$9809];0));&quot;✓&quot;;&quot;x&quot;)" office:value-type="string" office:string-value="✓" calcext:value-type="string">
            <text:p>✓</text:p>
          </table:table-cell>
          <table:table-cell table:style-name="ce166" table:formula="of:=IFERROR(VLOOKUP([$Masterlist.$P266];[$Datasheet.$B$1:.$AV$9809];2;FALSE());&quot;-&quot;)" office:value-type="float" office:value="1" calcext:value-type="float">
            <text:p>1</text:p>
          </table:table-cell>
          <table:table-cell table:style-name="ce166" table:formula="of:=IFERROR(VLOOKUP([$Masterlist.$P266];[$Datasheet.$B$1:.$AV$9809];3;FALSE());&quot;-&quot;)" office:value-type="float" office:value="1" calcext:value-type="float">
            <text:p>1</text:p>
          </table:table-cell>
          <table:table-cell table:style-name="ce166" table:formula="of:=IFERROR(VLOOKUP([$Masterlist.$P266];[$Datasheet.$B$1:.$AV$9809];4;FALSE());&quot;-&quot;)" office:value-type="float" office:value="1" calcext:value-type="float">
            <text:p>1</text:p>
          </table:table-cell>
          <table:table-cell table:style-name="ce166" table:formula="of:=IFERROR(VLOOKUP([$Masterlist.$P266];[$Datasheet.$B$1:.$AV$9809];5;FALSE());&quot;-&quot;)" office:value-type="float" office:value="1" calcext:value-type="float">
            <text:p>1</text:p>
          </table:table-cell>
          <table:table-cell table:style-name="ce209" table:formula="of:=IFERROR(VLOOKUP([$Masterlist.$P266];[$Datasheet.$B$1:.$AV$9809];6;FALSE());&quot;-&quot;)" office:value-type="float" office:value="1" calcext:value-type="float">
            <text:p>1</text:p>
          </table:table-cell>
          <table:table-cell table:style-name="ce166" table:formula="of:=IFERROR(VLOOKUP([$Masterlist.$P266];[$Datasheet.$B$1:.$AV$9809];7;FALSE());&quot;-&quot;)" office:value-type="float" office:value="1" calcext:value-type="float">
            <text:p>1</text:p>
          </table:table-cell>
          <table:table-cell table:style-name="ce166" table:formula="of:=IFERROR(VLOOKUP([$Masterlist.$P266];[$Datasheet.$B$1:.$AV$9809];8;FALSE());&quot;-&quot;)" office:value-type="float" office:value="1" calcext:value-type="float">
            <text:p>1</text:p>
          </table:table-cell>
          <table:table-cell table:style-name="ce166" table:formula="of:=IFERROR(VLOOKUP([$Masterlist.$P266];[$Datasheet.$B$1:.$AV$9809];9;FALSE());&quot;-&quot;)" office:value-type="float" office:value="1" calcext:value-type="float">
            <text:p>1</text:p>
          </table:table-cell>
          <table:table-cell table:style-name="ce221" table:formula="of:=IFERROR(VLOOKUP([$Masterlist.$P266];[$Datasheet.$B$1:.$AV$9809];10;FALSE());&quot;-&quot;)" office:value-type="float" office:value="1" calcext:value-type="float">
            <text:p>1</text:p>
          </table:table-cell>
          <table:table-cell table:style-name="ce221" table:formula="of:=IFERROR(VLOOKUP([$Masterlist.$P266];[$Datasheet.$B$1:.$AV$9809];11;FALSE());&quot;-&quot;)" office:value-type="float" office:value="1" calcext:value-type="float">
            <text:p>1</text:p>
          </table:table-cell>
          <table:table-cell table:style-name="ce221" table:formula="of:=IFERROR(VLOOKUP([$Masterlist.$P266];[$Datasheet.$B$1:.$AV$9809];12;FALSE());&quot;-&quot;)" office:value-type="float" office:value="1" calcext:value-type="float">
            <text:p>1</text:p>
          </table:table-cell>
          <table:table-cell table:style-name="ce221" table:formula="of:=IFERROR(VLOOKUP([$Masterlist.$P266];[$Datasheet.$B$1:.$AV$9809];13;FALSE());&quot;-&quot;)" office:value-type="float" office:value="1" calcext:value-type="float">
            <text:p>1</text:p>
          </table:table-cell>
          <table:table-cell table:style-name="ce221" table:formula="of:=IFERROR(VLOOKUP([$Masterlist.$P266];[$Datasheet.$B$1:.$AV$9809];14;FALSE());&quot;-&quot;)" office:value-type="float" office:value="0" calcext:value-type="float">
            <text:p>0</text:p>
          </table:table-cell>
          <table:table-cell table:style-name="ce221" table:formula="of:=IFERROR(VLOOKUP([$Masterlist.$P266];[$Datasheet.$B$1:.$AV$9809];15;FALSE());&quot;-&quot;)" office:value-type="float" office:value="0" calcext:value-type="float">
            <text:p>0</text:p>
          </table:table-cell>
          <table:table-cell table:style-name="ce221" table:formula="of:=IFERROR(VLOOKUP([$Masterlist.$P266];[$Datasheet.$B$1:.$AV$9809];16;FALSE());&quot;-&quot;)" office:value-type="float" office:value="0" calcext:value-type="float">
            <text:p/>
          </table:table-cell>
          <table:table-cell table:style-name="ce221" table:formula="of:=IFERROR(VLOOKUP([$Masterlist.$P266];[$Datasheet.$B$1:.$AV$9809];17;FALSE());&quot;-&quot;)" office:value-type="float" office:value="0" calcext:value-type="float">
            <text:p/>
          </table:table-cell>
          <table:table-cell table:style-name="ce221" table:formula="of:=IFERROR(VLOOKUP([$Masterlist.$P266];[$Datasheet.$B$1:.$AV$9809];18;FALSE());&quot;-&quot;)" office:value-type="float" office:value="0" calcext:value-type="float">
            <text:p/>
          </table:table-cell>
          <table:table-cell table:style-name="ce221" table:formula="of:=IFERROR(VLOOKUP([$Masterlist.$P266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7" office:value-type="string" calcext:value-type="string">
            <text:p>M</text:p>
          </table:table-cell>
          <table:table-cell table:style-name="ce50" table:number-columns-repeated="11"/>
          <table:table-cell table:style-name="ce50" office:value-type="string" calcext:value-type="string">
            <text:p>yes</text:p>
          </table:table-cell>
          <table:table-cell table:style-name="ce92" office:value-type="string" calcext:value-type="string">
            <text:p>Stage Hand / uCrew Runner</text:p>
          </table:table-cell>
          <table:table-cell table:style-name="ce8" office:value-type="string" calcext:value-type="string">
            <text:p>Jeandre Jacobs</text:p>
          </table:table-cell>
          <table:table-cell table:style-name="ce13" table:formula="of:=IF(ISNUMBER(MATCH([.P267];[$Datasheet.$B$1:.$B$9809];0));&quot;✓&quot;;&quot;x&quot;)" office:value-type="string" office:string-value="✓" calcext:value-type="string">
            <text:p>✓</text:p>
          </table:table-cell>
          <table:table-cell table:style-name="ce167" table:formula="of:=IFERROR(VLOOKUP([$Masterlist.$P267];[$Datasheet.$B$1:.$AV$9809];2;FALSE());&quot;-&quot;)" office:value-type="float" office:value="0" calcext:value-type="float">
            <text:p>0</text:p>
          </table:table-cell>
          <table:table-cell table:style-name="ce167" table:formula="of:=IFERROR(VLOOKUP([$Masterlist.$P267];[$Datasheet.$B$1:.$AV$9809];3;FALSE());&quot;-&quot;)" office:value-type="float" office:value="0" calcext:value-type="float">
            <text:p>0</text:p>
          </table:table-cell>
          <table:table-cell table:style-name="ce167" table:formula="of:=IFERROR(VLOOKUP([$Masterlist.$P267];[$Datasheet.$B$1:.$AV$9809];4;FALSE());&quot;-&quot;)" office:value-type="float" office:value="1" calcext:value-type="float">
            <text:p>1</text:p>
          </table:table-cell>
          <table:table-cell table:style-name="ce167" table:formula="of:=IFERROR(VLOOKUP([$Masterlist.$P267];[$Datasheet.$B$1:.$AV$9809];5;FALSE());&quot;-&quot;)" office:value-type="float" office:value="1" calcext:value-type="float">
            <text:p>1</text:p>
          </table:table-cell>
          <table:table-cell table:style-name="ce210" table:formula="of:=IFERROR(VLOOKUP([$Masterlist.$P267];[$Datasheet.$B$1:.$AV$9809];6;FALSE());&quot;-&quot;)" office:value-type="float" office:value="1" calcext:value-type="float">
            <text:p>1</text:p>
          </table:table-cell>
          <table:table-cell table:style-name="ce167" table:formula="of:=IFERROR(VLOOKUP([$Masterlist.$P267];[$Datasheet.$B$1:.$AV$9809];7;FALSE());&quot;-&quot;)" office:value-type="float" office:value="1" calcext:value-type="float">
            <text:p>1</text:p>
          </table:table-cell>
          <table:table-cell table:style-name="ce167" table:formula="of:=IFERROR(VLOOKUP([$Masterlist.$P267];[$Datasheet.$B$1:.$AV$9809];8;FALSE());&quot;-&quot;)" office:value-type="float" office:value="1" calcext:value-type="float">
            <text:p>1</text:p>
          </table:table-cell>
          <table:table-cell table:style-name="ce167" table:formula="of:=IFERROR(VLOOKUP([$Masterlist.$P267];[$Datasheet.$B$1:.$AV$9809];9;FALSE());&quot;-&quot;)" office:value-type="float" office:value="1" calcext:value-type="float">
            <text:p>1</text:p>
          </table:table-cell>
          <table:table-cell table:style-name="ce220" table:formula="of:=IFERROR(VLOOKUP([$Masterlist.$P267];[$Datasheet.$B$1:.$AV$9809];10;FALSE());&quot;-&quot;)" office:value-type="float" office:value="1" calcext:value-type="float">
            <text:p>1</text:p>
          </table:table-cell>
          <table:table-cell table:style-name="ce220" table:formula="of:=IFERROR(VLOOKUP([$Masterlist.$P267];[$Datasheet.$B$1:.$AV$9809];11;FALSE());&quot;-&quot;)" office:value-type="float" office:value="1" calcext:value-type="float">
            <text:p>1</text:p>
          </table:table-cell>
          <table:table-cell table:style-name="ce220" table:formula="of:=IFERROR(VLOOKUP([$Masterlist.$P267];[$Datasheet.$B$1:.$AV$9809];12;FALSE());&quot;-&quot;)" office:value-type="float" office:value="1" calcext:value-type="float">
            <text:p>1</text:p>
          </table:table-cell>
          <table:table-cell table:style-name="ce220" table:formula="of:=IFERROR(VLOOKUP([$Masterlist.$P267];[$Datasheet.$B$1:.$AV$9809];13;FALSE());&quot;-&quot;)" office:value-type="float" office:value="1" calcext:value-type="float">
            <text:p>1</text:p>
          </table:table-cell>
          <table:table-cell table:style-name="ce220" table:formula="of:=IFERROR(VLOOKUP([$Masterlist.$P267];[$Datasheet.$B$1:.$AV$9809];14;FALSE());&quot;-&quot;)" office:value-type="float" office:value="1" calcext:value-type="float">
            <text:p>1</text:p>
          </table:table-cell>
          <table:table-cell table:style-name="ce220" table:formula="of:=IFERROR(VLOOKUP([$Masterlist.$P267];[$Datasheet.$B$1:.$AV$9809];15;FALSE());&quot;-&quot;)" office:value-type="float" office:value="1" calcext:value-type="float">
            <text:p>1</text:p>
          </table:table-cell>
          <table:table-cell table:style-name="ce220" table:formula="of:=IFERROR(VLOOKUP([$Masterlist.$P267];[$Datasheet.$B$1:.$AV$9809];16;FALSE());&quot;-&quot;)" office:value-type="float" office:value="0" calcext:value-type="float">
            <text:p/>
          </table:table-cell>
          <table:table-cell table:style-name="ce220" table:formula="of:=IFERROR(VLOOKUP([$Masterlist.$P267];[$Datasheet.$B$1:.$AV$9809];17;FALSE());&quot;-&quot;)" office:value-type="float" office:value="0" calcext:value-type="float">
            <text:p/>
          </table:table-cell>
          <table:table-cell table:style-name="ce220" table:formula="of:=IFERROR(VLOOKUP([$Masterlist.$P267];[$Datasheet.$B$1:.$AV$9809];18;FALSE());&quot;-&quot;)" office:value-type="float" office:value="0" calcext:value-type="float">
            <text:p/>
          </table:table-cell>
          <table:table-cell table:style-name="ce220" table:formula="of:=IFERROR(VLOOKUP([$Masterlist.$P267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6" office:value-type="string" calcext:value-type="string">
            <text:p>L</text:p>
          </table:table-cell>
          <table:table-cell table:style-name="ce49" office:value-type="string" calcext:value-type="string">
            <text:p>Yes</text:p>
          </table:table-cell>
          <table:table-cell table:style-name="ce50" table:number-columns-repeated="11"/>
          <table:table-cell table:style-name="ce92" office:value-type="string" calcext:value-type="string">
            <text:p>Stage Hand / uCrew Runner</text:p>
          </table:table-cell>
          <table:table-cell table:style-name="ce8" office:value-type="string" calcext:value-type="string">
            <text:p>Moshidi Mabaso</text:p>
          </table:table-cell>
          <table:table-cell table:style-name="ce13" table:formula="of:=IF(ISNUMBER(MATCH([.P268];[$Datasheet.$B$1:.$B$9809];0));&quot;✓&quot;;&quot;x&quot;)" office:value-type="string" office:string-value="✓" calcext:value-type="string">
            <text:p>✓</text:p>
          </table:table-cell>
          <table:table-cell table:style-name="ce168" table:formula="of:=IFERROR(VLOOKUP([$Masterlist.$P268];[$Datasheet.$B$1:.$AV$9809];2;FALSE());&quot;-&quot;)" office:value-type="float" office:value="0" calcext:value-type="float">
            <text:p>0</text:p>
          </table:table-cell>
          <table:table-cell table:style-name="ce168" table:formula="of:=IFERROR(VLOOKUP([$Masterlist.$P268];[$Datasheet.$B$1:.$AV$9809];3;FALSE());&quot;-&quot;)" office:value-type="float" office:value="1" calcext:value-type="float">
            <text:p>1</text:p>
          </table:table-cell>
          <table:table-cell table:style-name="ce168" table:formula="of:=IFERROR(VLOOKUP([$Masterlist.$P268];[$Datasheet.$B$1:.$AV$9809];4;FALSE());&quot;-&quot;)" office:value-type="float" office:value="0" calcext:value-type="float">
            <text:p>0</text:p>
          </table:table-cell>
          <table:table-cell table:style-name="ce168" table:formula="of:=IFERROR(VLOOKUP([$Masterlist.$P268];[$Datasheet.$B$1:.$AV$9809];5;FALSE());&quot;-&quot;)" office:value-type="float" office:value="1" calcext:value-type="float">
            <text:p>1</text:p>
          </table:table-cell>
          <table:table-cell table:style-name="ce191" table:formula="of:=IFERROR(VLOOKUP([$Masterlist.$P268];[$Datasheet.$B$1:.$AV$9809];6;FALSE());&quot;-&quot;)" office:value-type="float" office:value="0" calcext:value-type="float">
            <text:p>0</text:p>
          </table:table-cell>
          <table:table-cell table:style-name="ce168" table:formula="of:=IFERROR(VLOOKUP([$Masterlist.$P268];[$Datasheet.$B$1:.$AV$9809];7;FALSE());&quot;-&quot;)" office:value-type="float" office:value="0" calcext:value-type="float">
            <text:p>0</text:p>
          </table:table-cell>
          <table:table-cell table:style-name="ce168" table:formula="of:=IFERROR(VLOOKUP([$Masterlist.$P268];[$Datasheet.$B$1:.$AV$9809];8;FALSE());&quot;-&quot;)" office:value-type="float" office:value="0" calcext:value-type="float">
            <text:p>0</text:p>
          </table:table-cell>
          <table:table-cell table:style-name="ce168" table:formula="of:=IFERROR(VLOOKUP([$Masterlist.$P268];[$Datasheet.$B$1:.$AV$9809];9;FALSE());&quot;-&quot;)" office:value-type="float" office:value="0" calcext:value-type="float">
            <text:p>0</text:p>
          </table:table-cell>
          <table:table-cell table:style-name="ce168" table:formula="of:=IFERROR(VLOOKUP([$Masterlist.$P268];[$Datasheet.$B$1:.$AV$9809];10;FALSE());&quot;-&quot;)" office:value-type="float" office:value="0" calcext:value-type="float">
            <text:p>0</text:p>
          </table:table-cell>
          <table:table-cell table:style-name="ce168" table:formula="of:=IFERROR(VLOOKUP([$Masterlist.$P268];[$Datasheet.$B$1:.$AV$9809];11;FALSE());&quot;-&quot;)" office:value-type="float" office:value="1" calcext:value-type="float">
            <text:p>1</text:p>
          </table:table-cell>
          <table:table-cell table:style-name="ce168" table:formula="of:=IFERROR(VLOOKUP([$Masterlist.$P268];[$Datasheet.$B$1:.$AV$9809];12;FALSE());&quot;-&quot;)" office:value-type="float" office:value="0" calcext:value-type="float">
            <text:p>0</text:p>
          </table:table-cell>
          <table:table-cell table:style-name="ce168" table:formula="of:=IFERROR(VLOOKUP([$Masterlist.$P268];[$Datasheet.$B$1:.$AV$9809];13;FALSE());&quot;-&quot;)" office:value-type="float" office:value="1" calcext:value-type="float">
            <text:p>1</text:p>
          </table:table-cell>
          <table:table-cell table:style-name="ce168" table:formula="of:=IFERROR(VLOOKUP([$Masterlist.$P268];[$Datasheet.$B$1:.$AV$9809];14;FALSE());&quot;-&quot;)" office:value-type="float" office:value="0" calcext:value-type="float">
            <text:p>0</text:p>
          </table:table-cell>
          <table:table-cell table:style-name="ce168" table:formula="of:=IFERROR(VLOOKUP([$Masterlist.$P268];[$Datasheet.$B$1:.$AV$9809];15;FALSE());&quot;-&quot;)" office:value-type="float" office:value="0" calcext:value-type="float">
            <text:p>0</text:p>
          </table:table-cell>
          <table:table-cell table:style-name="ce168" table:formula="of:=IFERROR(VLOOKUP([$Masterlist.$P268];[$Datasheet.$B$1:.$AV$9809];16;FALSE());&quot;-&quot;)" office:value-type="float" office:value="0" calcext:value-type="float">
            <text:p/>
          </table:table-cell>
          <table:table-cell table:style-name="ce168" table:formula="of:=IFERROR(VLOOKUP([$Masterlist.$P268];[$Datasheet.$B$1:.$AV$9809];17;FALSE());&quot;-&quot;)" office:value-type="float" office:value="0" calcext:value-type="float">
            <text:p/>
          </table:table-cell>
          <table:table-cell table:style-name="ce168" table:formula="of:=IFERROR(VLOOKUP([$Masterlist.$P268];[$Datasheet.$B$1:.$AV$9809];18;FALSE());&quot;-&quot;)" office:value-type="float" office:value="0" calcext:value-type="float">
            <text:p/>
          </table:table-cell>
          <table:table-cell table:style-name="ce168" table:formula="of:=IFERROR(VLOOKUP([$Masterlist.$P268];[$Datasheet.$B$1:.$AV$9809];19;FALSE());&quot;-&quot;)" office:value-type="float" office:value="0" calcext:value-type="float">
            <text:p/>
          </table:table-cell>
          <table:table-cell table:style-name="ce15" table:number-columns-repeated="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21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/>
          <table:table-cell table:style-name="ce15" table:formula="of:=IFERROR(__xludf.dummyfunction(&quot;COUNTIF(UNIQUE(FILTER(P8:Q1045,Q8:Q1045=&quot;&quot;✓&quot;&quot;)),&quot;&quot;✓&quot;&quot;)&#10;&quot;);148)" office:value-type="float" office:value="148" calcext:value-type="float">
            <text:p>148</text:p>
          </table:table-cell>
          <table:table-cell table:style-name="ce15" office:value-type="string" calcext:value-type="string">
            <text:p>✓</text:p>
          </table:table-cell>
          <table:table-cell table:style-name="ce15" table:number-columns-repeated="18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/>
          <table:table-cell table:style-name="ce15" table:formula="of:=COUNTIF([.Q8:.Q1050];&quot;x&quot;)" office:value-type="float" office:value="46" calcext:value-type="float">
            <text:p>46</text:p>
          </table:table-cell>
          <table:table-cell table:style-name="ce15" office:value-type="string" calcext:value-type="string">
            <text:p>x</text:p>
          </table:table-cell>
          <table:table-cell table:style-name="ce15" table:number-columns-repeated="18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21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/>
          <table:table-cell table:number-columns-repeated="2"/>
          <table:table-cell table:style-name="ce15"/>
          <table:table-cell table:style-name="ce181" office:value-type="string" calcext:value-type="string" table:number-columns-spanned="2" table:number-rows-spanned="1">
            <text:p>Who hasn't filled in</text:p>
          </table:table-cell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114"/>
          <table:table-cell table:style-name="ce129"/>
          <table:table-cell table:style-name="ce15"/>
          <table:table-cell/>
          <table:table-cell table:style-name="ce15"/>
          <table:table-cell table:style-name="ce182" table:formula="of:=IFERROR(__xludf.dummyfunction(&quot;UNIQUE(FILTER(P8:P1045,Q8:Q1045=&quot;&quot;x&quot;&quot;))&quot;);&quot;Zavier van der Westhuizen&quot;)" office:value-type="string" office:string-value="Zavier van der Westhuizen" calcext:value-type="string">
            <text:p>Zavier van der Westhuizen</text:p>
          </table:table-cell>
          <table:table-cell table:style-name="ce15" table:number-columns-repeated="2"/>
          <table:table-cell table:style-name="ce181" table:formula="of:=IFERROR(__xludf.dummyfunction(&quot;UNIQUE(FILTER(Datasheet!B1:B9807,ISERROR(MATCH(Datasheet!B1:B9807,Masterlist!P8:P1045,0))))&#10;&quot;);&quot;Name&quot;)" office:value-type="string" office:string-value="Name" calcext:value-type="string" table:number-columns-spanned="2" table:number-rows-spanned="1">
            <text:p>Name</text:p>
          </table:table-cell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formula="of:=IFERROR(__xludf.dummyfunction(&quot;&quot;&quot;COMPUTED_VALUE&quot;&quot;&quot;);&quot;Louis Jacobs&quot;)" office:value-type="string" office:string-value="Louis Jacobs" calcext:value-type="string" table:number-columns-spanned="2" table:number-rows-spanned="1">
            <text:p>Louis Jacobs</text:p>
          </table:table-cell>
          <table:covered-table-cell/>
          <table:table-cell table:style-name="ce15"/>
          <table:table-cell table:style-name="ce181" table:formula="of:=IFERROR(__xludf.dummyfunction(&quot;&quot;&quot;COMPUTED_VALUE&quot;&quot;&quot;);&quot;David Jansen Van Vuuren&quot;)" office:value-type="string" office:string-value="David Jansen Van Vuuren" calcext:value-type="string" table:number-columns-spanned="2" table:number-rows-spanned="1">
            <text:p>David Jansen Van Vuuren</text:p>
          </table:table-cell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/>
          <table:table-cell table:style-name="ce169" table:number-matrix-columns-spanned="1" table:number-matrix-rows-spanned="1" table:formula="of:=COUNTA(_xludf.unique([$Datasheet.B1:.B998]))" office:value-type="float" office:value="1" calcext:value-type="float">
            <text:p>1</text:p>
          </table:table-cell>
          <table:table-cell table:style-name="ce15" office:value-type="string" calcext:value-type="string">
            <text:p>Datasheet</text:p>
          </table:table-cell>
          <table:table-cell table:style-name="ce15"/>
          <table:table-cell table:style-name="ce181" table:formula="of:=IFERROR(__xludf.dummyfunction(&quot;&quot;&quot;COMPUTED_VALUE&quot;&quot;&quot;);&quot;Christo Pretorius&quot;)" office:value-type="string" office:string-value="Christo Pretorius" calcext:value-type="string" table:number-columns-spanned="2" table:number-rows-spanned="1">
            <text:p>Christo Pretorius</text:p>
          </table:table-cell>
          <table:covered-table-cell/>
          <table:table-cell table:style-name="ce15"/>
          <table:table-cell table:style-name="ce216" table:formula="of:=IFERROR(__xludf.dummyfunction(&quot;&quot;&quot;COMPUTED_VALUE&quot;&quot;&quot;);&quot;Christo&quot;)" office:value-type="string" office:string-value="Christo" calcext:value-type="string" table:number-columns-spanned="2" table:number-rows-spanned="1">
            <text:p>Christo</text:p>
          </table:table-cell>
          <table:covered-table-cell table:style-name="ce211"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/>
          <table:table-cell table:style-name="ce170"/>
          <table:table-cell table:style-name="ce15" table:number-columns-repeated="2"/>
          <table:table-cell table:style-name="ce181" table:formula="of:=IFERROR(__xludf.dummyfunction(&quot;&quot;&quot;COMPUTED_VALUE&quot;&quot;&quot;);&quot;Daniel Kloppers&quot;)" office:value-type="string" office:string-value="Daniel Kloppers" calcext:value-type="string" table:number-columns-spanned="2" table:number-rows-spanned="1">
            <text:p>Daniel Kloppers</text:p>
          </table:table-cell>
          <table:covered-table-cell/>
          <table:table-cell table:style-name="ce15"/>
          <table:table-cell table:style-name="ce216" table:formula="of:=IFERROR(__xludf.dummyfunction(&quot;&quot;&quot;COMPUTED_VALUE&quot;&quot;&quot;);&quot;Amber Chen&quot;)" office:value-type="string" office:string-value="Amber Chen" calcext:value-type="string" table:number-columns-spanned="2" table:number-rows-spanned="1">
            <text:p>Amber Chen</text:p>
          </table:table-cell>
          <table:covered-table-cell table:style-name="ce211"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formula="of:=IFERROR(__xludf.dummyfunction(&quot;&quot;&quot;COMPUTED_VALUE&quot;&quot;&quot;);&quot;Ian Rall&quot;)" office:value-type="string" office:string-value="Ian Rall" calcext:value-type="string" table:number-columns-spanned="2" table:number-rows-spanned="1">
            <text:p>Ian Rall</text:p>
          </table:table-cell>
          <table:covered-table-cell/>
          <table:table-cell table:style-name="ce15"/>
          <table:table-cell table:style-name="ce216" table:formula="of:=IFERROR(__xludf.dummyfunction(&quot;&quot;&quot;COMPUTED_VALUE&quot;&quot;&quot;);&quot;Walter Jacobs&quot;)" office:value-type="string" office:string-value="Walter Jacobs" calcext:value-type="string" table:number-columns-spanned="2" table:number-rows-spanned="1">
            <text:p>Walter Jacobs</text:p>
          </table:table-cell>
          <table:covered-table-cell table:style-name="ce211"/>
          <table:table-cell table:style-name="ce181" table:number-columns-spanned="2" table:number-rows-spanned="1"/>
          <table:covered-table-cell/>
          <table:table-cell table:style-name="ce15" table:number-columns-repeated="10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formula="of:=IFERROR(__xludf.dummyfunction(&quot;&quot;&quot;COMPUTED_VALUE&quot;&quot;&quot;);&quot;Wayne Ferreria&quot;)" office:value-type="string" office:string-value="Wayne Ferreria" calcext:value-type="string" table:number-columns-spanned="2" table:number-rows-spanned="1">
            <text:p>Wayne Ferreria</text:p>
          </table:table-cell>
          <table:covered-table-cell/>
          <table:table-cell table:style-name="ce15"/>
          <table:table-cell table:style-name="ce216" table:formula="of:=IFERROR(__xludf.dummyfunction(&quot;&quot;&quot;COMPUTED_VALUE&quot;&quot;&quot;);&quot;Ntando Ngobe&quot;)" office:value-type="string" office:string-value="Ntando Ngobe" calcext:value-type="string" table:number-columns-spanned="2" table:number-rows-spanned="1">
            <text:p>Ntando Ngobe</text:p>
          </table:table-cell>
          <table:covered-table-cell table:style-name="ce211"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formula="of:=IFERROR(__xludf.dummyfunction(&quot;&quot;&quot;COMPUTED_VALUE&quot;&quot;&quot;);&quot;Tiaan Pienaar&quot;)" office:value-type="string" office:string-value="Tiaan Pienaar" calcext:value-type="string" table:number-columns-spanned="2" table:number-rows-spanned="1">
            <text:p>Tiaan Pienaar</text:p>
          </table:table-cell>
          <table:covered-table-cell/>
          <table:table-cell table:style-name="ce15"/>
          <table:table-cell table:style-name="ce216" table:formula="of:=IFERROR(__xludf.dummyfunction(&quot;&quot;&quot;COMPUTED_VALUE&quot;&quot;&quot;);&quot;Lindie van der Westhuizen&quot;)" office:value-type="string" office:string-value="Lindie van der Westhuizen" calcext:value-type="string" table:number-columns-spanned="2" table:number-rows-spanned="1">
            <text:p>Lindie van der Westhuizen</text:p>
          </table:table-cell>
          <table:covered-table-cell table:style-name="ce211"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formula="of:=IFERROR(__xludf.dummyfunction(&quot;&quot;&quot;COMPUTED_VALUE&quot;&quot;&quot;);&quot;Mickey Van Den Berg&quot;)" office:value-type="string" office:string-value="Mickey Van Den Berg" calcext:value-type="string" table:number-columns-spanned="2" table:number-rows-spanned="1">
            <text:p>Mickey Van Den Berg</text:p>
          </table:table-cell>
          <table:covered-table-cell/>
          <table:table-cell table:style-name="ce15"/>
          <table:table-cell table:style-name="ce216" table:formula="of:=IFERROR(__xludf.dummyfunction(&quot;&quot;&quot;COMPUTED_VALUE&quot;&quot;&quot;);&quot;Victoria Cope&quot;)" office:value-type="string" office:string-value="Victoria Cope" calcext:value-type="string" table:number-columns-spanned="2" table:number-rows-spanned="1">
            <text:p>Victoria Cope</text:p>
          </table:table-cell>
          <table:covered-table-cell table:style-name="ce211"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formula="of:=IFERROR(__xludf.dummyfunction(&quot;&quot;&quot;COMPUTED_VALUE&quot;&quot;&quot;);&quot;Jason Pretorius&quot;)" office:value-type="string" office:string-value="Jason Pretorius" calcext:value-type="string" table:number-columns-spanned="2" table:number-rows-spanned="1">
            <text:p>Jason Pretorius</text:p>
          </table:table-cell>
          <table:covered-table-cell/>
          <table:table-cell table:style-name="ce15"/>
          <table:table-cell table:style-name="ce216" table:formula="of:=IFERROR(__xludf.dummyfunction(&quot;&quot;&quot;COMPUTED_VALUE&quot;&quot;&quot;);&quot;Ewald Fourie&quot;)" office:value-type="string" office:string-value="Ewald Fourie" calcext:value-type="string" table:number-columns-spanned="2" table:number-rows-spanned="1">
            <text:p>Ewald Fourie</text:p>
          </table:table-cell>
          <table:covered-table-cell table:style-name="ce211"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formula="of:=IFERROR(__xludf.dummyfunction(&quot;&quot;&quot;COMPUTED_VALUE&quot;&quot;&quot;);&quot;Liezel Myburgh (BABY)&quot;)" office:value-type="string" office:string-value="Liezel Myburgh (BABY)" calcext:value-type="string" table:number-columns-spanned="2" table:number-rows-spanned="1">
            <text:p>Liezel Myburgh (BABY)</text:p>
          </table:table-cell>
          <table:covered-table-cell/>
          <table:table-cell table:style-name="ce15"/>
          <table:table-cell table:style-name="ce216" table:formula="of:=IFERROR(__xludf.dummyfunction(&quot;&quot;&quot;COMPUTED_VALUE&quot;&quot;&quot;);&quot;Shardone Cronje&quot;)" office:value-type="string" office:string-value="Shardone Cronje" calcext:value-type="string" table:number-columns-spanned="2" table:number-rows-spanned="1">
            <text:p>Shardone Cronje</text:p>
          </table:table-cell>
          <table:covered-table-cell table:style-name="ce211"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formula="of:=IFERROR(__xludf.dummyfunction(&quot;&quot;&quot;COMPUTED_VALUE&quot;&quot;&quot;);&quot;Anton Bezuidenhout&quot;)" office:value-type="string" office:string-value="Anton Bezuidenhout" calcext:value-type="string" table:number-columns-spanned="2" table:number-rows-spanned="1">
            <text:p>Anton Bezuidenhout</text:p>
          </table:table-cell>
          <table:covered-table-cell/>
          <table:table-cell table:style-name="ce15"/>
          <table:table-cell table:style-name="ce216" table:formula="of:=IFERROR(__xludf.dummyfunction(&quot;&quot;&quot;COMPUTED_VALUE&quot;&quot;&quot;);&quot;Philcu Hattingh&quot;)" office:value-type="string" office:string-value="Philcu Hattingh" calcext:value-type="string" table:number-columns-spanned="2" table:number-rows-spanned="1">
            <text:p>Philcu Hattingh</text:p>
          </table:table-cell>
          <table:covered-table-cell table:style-name="ce211"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formula="of:=IFERROR(__xludf.dummyfunction(&quot;&quot;&quot;COMPUTED_VALUE&quot;&quot;&quot;);&quot;Kyle Jali&quot;)" office:value-type="string" office:string-value="Kyle Jali" calcext:value-type="string" table:number-columns-spanned="2" table:number-rows-spanned="1">
            <text:p>Kyle Jali</text:p>
          </table:table-cell>
          <table:covered-table-cell/>
          <table:table-cell table:style-name="ce15"/>
          <table:table-cell table:style-name="ce216" table:formula="of:=IFERROR(__xludf.dummyfunction(&quot;&quot;&quot;COMPUTED_VALUE&quot;&quot;&quot;);&quot;Armand La Grange&quot;)" office:value-type="string" office:string-value="Armand La Grange" calcext:value-type="string" table:number-columns-spanned="2" table:number-rows-spanned="1">
            <text:p>Armand La Grange</text:p>
          </table:table-cell>
          <table:covered-table-cell table:style-name="ce211"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formula="of:=IFERROR(__xludf.dummyfunction(&quot;&quot;&quot;COMPUTED_VALUE&quot;&quot;&quot;);&quot;Michael Cockcroft&quot;)" office:value-type="string" office:string-value="Michael Cockcroft" calcext:value-type="string" table:number-columns-spanned="2" table:number-rows-spanned="1">
            <text:p>Michael Cockcroft</text:p>
          </table:table-cell>
          <table:covered-table-cell/>
          <table:table-cell table:style-name="ce15"/>
          <table:table-cell table:style-name="ce216" table:formula="of:=IFERROR(__xludf.dummyfunction(&quot;&quot;&quot;COMPUTED_VALUE&quot;&quot;&quot;);&quot;Anmarie Scheepers&quot;)" office:value-type="string" office:string-value="Anmarie Scheepers" calcext:value-type="string" table:number-columns-spanned="2" table:number-rows-spanned="1">
            <text:p>Anmarie Scheepers</text:p>
          </table:table-cell>
          <table:covered-table-cell table:style-name="ce211"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formula="of:=IFERROR(__xludf.dummyfunction(&quot;&quot;&quot;COMPUTED_VALUE&quot;&quot;&quot;);&quot;Jan Louis du Plessis&quot;)" office:value-type="string" office:string-value="Jan Louis du Plessis" calcext:value-type="string" table:number-columns-spanned="2" table:number-rows-spanned="1">
            <text:p>Jan Louis du Plessis</text:p>
          </table:table-cell>
          <table:covered-table-cell/>
          <table:table-cell table:style-name="ce15"/>
          <table:table-cell table:style-name="ce181" table:formula="of:=IFERROR(__xludf.dummyfunction(&quot;&quot;&quot;COMPUTED_VALUE&quot;&quot;&quot;);&quot;Jacques Kotze&quot;)" office:value-type="string" office:string-value="Jacques Kotze" calcext:value-type="string" table:number-columns-spanned="2" table:number-rows-spanned="1">
            <text:p>Jacques Kotze</text:p>
          </table:table-cell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formula="of:=IFERROR(__xludf.dummyfunction(&quot;&quot;&quot;COMPUTED_VALUE&quot;&quot;&quot;);&quot;Rupert Bothma&quot;)" office:value-type="string" office:string-value="Rupert Bothma" calcext:value-type="string" table:number-columns-spanned="2" table:number-rows-spanned="1">
            <text:p>Rupert Bothma</text:p>
          </table:table-cell>
          <table:covered-table-cell/>
          <table:table-cell table:style-name="ce15"/>
          <table:table-cell table:style-name="ce181" table:formula="of:=IFERROR(__xludf.dummyfunction(&quot;&quot;&quot;COMPUTED_VALUE&quot;&quot;&quot;);&quot;Righard van der Vyver&quot;)" office:value-type="string" office:string-value="Righard van der Vyver" calcext:value-type="string" table:number-columns-spanned="2" table:number-rows-spanned="1">
            <text:p>Righard van der Vyver</text:p>
          </table:table-cell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formula="of:=IFERROR(__xludf.dummyfunction(&quot;&quot;&quot;COMPUTED_VALUE&quot;&quot;&quot;);&quot;Roxanne Emslie&quot;)" office:value-type="string" office:string-value="Roxanne Emslie" calcext:value-type="string" table:number-columns-spanned="2" table:number-rows-spanned="1">
            <text:p>Roxanne Emslie</text:p>
          </table:table-cell>
          <table:covered-table-cell/>
          <table:table-cell table:style-name="ce15"/>
          <table:table-cell table:style-name="ce181" table:formula="of:=IFERROR(__xludf.dummyfunction(&quot;&quot;&quot;COMPUTED_VALUE&quot;&quot;&quot;);&quot;Reinold Brink&quot;)" office:value-type="string" office:string-value="Reinold Brink" calcext:value-type="string" table:number-columns-spanned="2" table:number-rows-spanned="1">
            <text:p>Reinold Brink</text:p>
          </table:table-cell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formula="of:=IFERROR(__xludf.dummyfunction(&quot;&quot;&quot;COMPUTED_VALUE&quot;&quot;&quot;);&quot;Greg Moore&quot;)" office:value-type="string" office:string-value="Greg Moore" calcext:value-type="string" table:number-columns-spanned="2" table:number-rows-spanned="1">
            <text:p>Greg Moore</text:p>
          </table:table-cell>
          <table:covered-table-cell/>
          <table:table-cell table:style-name="ce15"/>
          <table:table-cell table:style-name="ce181" table:formula="of:=IFERROR(__xludf.dummyfunction(&quot;&quot;&quot;COMPUTED_VALUE&quot;&quot;&quot;);&quot;Anrich Venter&quot;)" office:value-type="string" office:string-value="Anrich Venter" calcext:value-type="string" table:number-columns-spanned="2" table:number-rows-spanned="1">
            <text:p>Anrich Venter</text:p>
          </table:table-cell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formula="of:=IFERROR(__xludf.dummyfunction(&quot;&quot;&quot;COMPUTED_VALUE&quot;&quot;&quot;);&quot;Bernice Pretorius&quot;)" office:value-type="string" office:string-value="Bernice Pretorius" calcext:value-type="string" table:number-columns-spanned="2" table:number-rows-spanned="1">
            <text:p>Bernice Pretorius</text:p>
          </table:table-cell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formula="of:=IFERROR(__xludf.dummyfunction(&quot;&quot;&quot;COMPUTED_VALUE&quot;&quot;&quot;);&quot;Carla Prinsloo&quot;)" office:value-type="string" office:string-value="Carla Prinsloo" calcext:value-type="string" table:number-columns-spanned="2" table:number-rows-spanned="1">
            <text:p>Carla Prinsloo</text:p>
          </table:table-cell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formula="of:=IFERROR(__xludf.dummyfunction(&quot;&quot;&quot;COMPUTED_VALUE&quot;&quot;&quot;);&quot;Danmari Hoffman&quot;)" office:value-type="string" office:string-value="Danmari Hoffman" calcext:value-type="string" table:number-columns-spanned="2" table:number-rows-spanned="1">
            <text:p>Danmari Hoffman</text:p>
          </table:table-cell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formula="of:=IFERROR(__xludf.dummyfunction(&quot;&quot;&quot;COMPUTED_VALUE&quot;&quot;&quot;);&quot;Diane Pretorius&quot;)" office:value-type="string" office:string-value="Diane Pretorius" calcext:value-type="string" table:number-columns-spanned="2" table:number-rows-spanned="1">
            <text:p>Diane Pretorius</text:p>
          </table:table-cell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formula="of:=IFERROR(__xludf.dummyfunction(&quot;&quot;&quot;COMPUTED_VALUE&quot;&quot;&quot;);&quot;Dineke Capazorio&quot;)" office:value-type="string" office:string-value="Dineke Capazorio" calcext:value-type="string" table:number-columns-spanned="2" table:number-rows-spanned="1">
            <text:p>Dineke Capazorio</text:p>
          </table:table-cell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formula="of:=IFERROR(__xludf.dummyfunction(&quot;&quot;&quot;COMPUTED_VALUE&quot;&quot;&quot;);&quot;Helana Robinson&quot;)" office:value-type="string" office:string-value="Helana Robinson" calcext:value-type="string" table:number-columns-spanned="2" table:number-rows-spanned="1">
            <text:p>Helana Robinson</text:p>
          </table:table-cell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formula="of:=IFERROR(__xludf.dummyfunction(&quot;&quot;&quot;COMPUTED_VALUE&quot;&quot;&quot;);&quot;Lane Heystek&quot;)" office:value-type="string" office:string-value="Lane Heystek" calcext:value-type="string" table:number-columns-spanned="2" table:number-rows-spanned="1">
            <text:p>Lane Heystek</text:p>
          </table:table-cell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formula="of:=IFERROR(__xludf.dummyfunction(&quot;&quot;&quot;COMPUTED_VALUE&quot;&quot;&quot;);&quot;Thato Phahlane&quot;)" office:value-type="string" office:string-value="Thato Phahlane" calcext:value-type="string" table:number-columns-spanned="2" table:number-rows-spanned="1">
            <text:p>Thato Phahlane</text:p>
          </table:table-cell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formula="of:=IFERROR(__xludf.dummyfunction(&quot;&quot;&quot;COMPUTED_VALUE&quot;&quot;&quot;);&quot;Andre Kleynhans&quot;)" office:value-type="string" office:string-value="Andre Kleynhans" calcext:value-type="string" table:number-columns-spanned="2" table:number-rows-spanned="1">
            <text:p>Andre Kleynhans</text:p>
          </table:table-cell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formula="of:=IFERROR(__xludf.dummyfunction(&quot;&quot;&quot;COMPUTED_VALUE&quot;&quot;&quot;);&quot;Jayden Cloete&quot;)" office:value-type="string" office:string-value="Jayden Cloete" calcext:value-type="string" table:number-columns-spanned="2" table:number-rows-spanned="1">
            <text:p>Jayden Cloete</text:p>
          </table:table-cell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formula="of:=IFERROR(__xludf.dummyfunction(&quot;&quot;&quot;COMPUTED_VALUE&quot;&quot;&quot;);&quot;Martin Leipoldt&quot;)" office:value-type="string" office:string-value="Martin Leipoldt" calcext:value-type="string" table:number-columns-spanned="2" table:number-rows-spanned="1">
            <text:p>Martin Leipoldt</text:p>
          </table:table-cell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formula="of:=IFERROR(__xludf.dummyfunction(&quot;&quot;&quot;COMPUTED_VALUE&quot;&quot;&quot;);&quot;Zandré Rossouw&quot;)" office:value-type="string" office:string-value="Zandré Rossouw" calcext:value-type="string" table:number-columns-spanned="2" table:number-rows-spanned="1">
            <text:p>Zandré Rossouw</text:p>
          </table:table-cell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formula="of:=IFERROR(__xludf.dummyfunction(&quot;&quot;&quot;COMPUTED_VALUE&quot;&quot;&quot;);&quot;Christo Meyer&quot;)" office:value-type="string" office:string-value="Christo Meyer" calcext:value-type="string" table:number-columns-spanned="2" table:number-rows-spanned="1">
            <text:p>Christo Meyer</text:p>
          </table:table-cell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formula="of:=IFERROR(__xludf.dummyfunction(&quot;&quot;&quot;COMPUTED_VALUE&quot;&quot;&quot;);&quot;Marcel Duvenhage&quot;)" office:value-type="string" office:string-value="Marcel Duvenhage" calcext:value-type="string" table:number-columns-spanned="2" table:number-rows-spanned="1">
            <text:p>Marcel Duvenhage</text:p>
          </table:table-cell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formula="of:=IFERROR(__xludf.dummyfunction(&quot;&quot;&quot;COMPUTED_VALUE&quot;&quot;&quot;);&quot;Ruben Venter&quot;)" office:value-type="string" office:string-value="Ruben Venter" calcext:value-type="string" table:number-columns-spanned="2" table:number-rows-spanned="1">
            <text:p>Ruben Venter</text:p>
          </table:table-cell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formula="of:=IFERROR(__xludf.dummyfunction(&quot;&quot;&quot;COMPUTED_VALUE&quot;&quot;&quot;);&quot;Louis Venter&quot;)" office:value-type="string" office:string-value="Louis Venter" calcext:value-type="string" table:number-columns-spanned="2" table:number-rows-spanned="1">
            <text:p>Louis Venter</text:p>
          </table:table-cell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formula="of:=IFERROR(__xludf.dummyfunction(&quot;&quot;&quot;COMPUTED_VALUE&quot;&quot;&quot;);&quot;Kyle Boyes&quot;)" office:value-type="string" office:string-value="Kyle Boyes" calcext:value-type="string" table:number-columns-spanned="2" table:number-rows-spanned="1">
            <text:p>Kyle Boyes</text:p>
          </table:table-cell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formula="of:=IFERROR(__xludf.dummyfunction(&quot;&quot;&quot;COMPUTED_VALUE&quot;&quot;&quot;);&quot;Ruan Taljaard&quot;)" office:value-type="string" office:string-value="Ruan Taljaard" calcext:value-type="string" table:number-columns-spanned="2" table:number-rows-spanned="1">
            <text:p>Ruan Taljaard</text:p>
          </table:table-cell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formula="of:=IFERROR(__xludf.dummyfunction(&quot;&quot;&quot;COMPUTED_VALUE&quot;&quot;&quot;);&quot;Philcu Hatting&quot;)" office:value-type="string" office:string-value="Philcu Hatting" calcext:value-type="string" table:number-columns-spanned="2" table:number-rows-spanned="1">
            <text:p>Philcu Hatting</text:p>
          </table:table-cell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formula="of:=IFERROR(__xludf.dummyfunction(&quot;&quot;&quot;COMPUTED_VALUE&quot;&quot;&quot;);&quot;Marcel Lubbinge&quot;)" office:value-type="string" office:string-value="Marcel Lubbinge" calcext:value-type="string" table:number-columns-spanned="2" table:number-rows-spanned="1">
            <text:p>Marcel Lubbinge</text:p>
          </table:table-cell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formula="of:=IFERROR(__xludf.dummyfunction(&quot;&quot;&quot;COMPUTED_VALUE&quot;&quot;&quot;);&quot;David Janse van Vuuren&quot;)" office:value-type="string" office:string-value="David Janse van Vuuren" calcext:value-type="string" table:number-columns-spanned="2" table:number-rows-spanned="1">
            <text:p>David Janse van Vuuren</text:p>
          </table:table-cell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formula="of:=IFERROR(__xludf.dummyfunction(&quot;&quot;&quot;COMPUTED_VALUE&quot;&quot;&quot;);&quot;NJ Corbett&quot;)" office:value-type="string" office:string-value="NJ Corbett" calcext:value-type="string" table:number-columns-spanned="2" table:number-rows-spanned="1">
            <text:p>NJ Corbett</text:p>
          </table:table-cell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formula="of:=IFERROR(__xludf.dummyfunction(&quot;&quot;&quot;COMPUTED_VALUE&quot;&quot;&quot;);&quot;JP Palm&quot;)" office:value-type="string" office:string-value="JP Palm" calcext:value-type="string" table:number-columns-spanned="2" table:number-rows-spanned="1">
            <text:p>JP Palm</text:p>
          </table:table-cell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formula="of:=IFERROR(__xludf.dummyfunction(&quot;&quot;&quot;COMPUTED_VALUE&quot;&quot;&quot;);&quot;Werner Schultz&quot;)" office:value-type="string" office:string-value="Werner Schultz" calcext:value-type="string" table:number-columns-spanned="2" table:number-rows-spanned="1">
            <text:p>Werner Schultz</text:p>
          </table:table-cell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3" table:number-columns-spanned="2" table:number-rows-spanned="1"/>
          <table:covered-table-cell table:style-name="ce211"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3" table:number-columns-spanned="2" table:number-rows-spanned="1"/>
          <table:covered-table-cell table:style-name="ce211"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3" table:number-columns-spanned="2" table:number-rows-spanned="1"/>
          <table:covered-table-cell table:style-name="ce211"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3" table:number-columns-spanned="2" table:number-rows-spanned="1"/>
          <table:covered-table-cell table:style-name="ce211"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3" table:number-columns-spanned="2" table:number-rows-spanned="1"/>
          <table:covered-table-cell table:style-name="ce211"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3" table:number-columns-spanned="2" table:number-rows-spanned="1"/>
          <table:covered-table-cell table:style-name="ce211"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3" table:number-columns-spanned="2" table:number-rows-spanned="1"/>
          <table:covered-table-cell table:style-name="ce211"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3" table:number-columns-spanned="2" table:number-rows-spanned="1"/>
          <table:covered-table-cell table:style-name="ce211"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3" table:number-columns-spanned="2" table:number-rows-spanned="1"/>
          <table:covered-table-cell table:style-name="ce211"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3" table:number-columns-spanned="2" table:number-rows-spanned="1"/>
          <table:covered-table-cell table:style-name="ce211"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3" table:number-columns-spanned="2" table:number-rows-spanned="1"/>
          <table:covered-table-cell table:style-name="ce211"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3" table:number-columns-spanned="2" table:number-rows-spanned="1"/>
          <table:covered-table-cell table:style-name="ce211"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3" table:number-columns-spanned="2" table:number-rows-spanned="1"/>
          <table:covered-table-cell table:style-name="ce211"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3" table:number-columns-spanned="2" table:number-rows-spanned="1"/>
          <table:covered-table-cell table:style-name="ce211"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3" table:number-columns-spanned="2" table:number-rows-spanned="1"/>
          <table:covered-table-cell table:style-name="ce211"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3" table:number-columns-spanned="2" table:number-rows-spanned="1"/>
          <table:covered-table-cell table:style-name="ce211"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3" table:number-columns-spanned="2" table:number-rows-spanned="1"/>
          <table:covered-table-cell table:style-name="ce211"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3" table:number-columns-spanned="2" table:number-rows-spanned="1"/>
          <table:covered-table-cell table:style-name="ce211"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3" table:number-columns-spanned="2" table:number-rows-spanned="1"/>
          <table:covered-table-cell table:style-name="ce211"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3" table:number-columns-spanned="2" table:number-rows-spanned="1"/>
          <table:covered-table-cell table:style-name="ce211"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3" table:number-columns-spanned="2" table:number-rows-spanned="1"/>
          <table:covered-table-cell table:style-name="ce211"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3" table:number-columns-spanned="2" table:number-rows-spanned="1"/>
          <table:covered-table-cell table:style-name="ce211"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3" table:number-columns-spanned="2" table:number-rows-spanned="1"/>
          <table:covered-table-cell table:style-name="ce211"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3" table:number-columns-spanned="2" table:number-rows-spanned="1"/>
          <table:covered-table-cell table:style-name="ce211"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3" table:number-columns-spanned="2" table:number-rows-spanned="1"/>
          <table:covered-table-cell table:style-name="ce211"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4"/>
          <table:table-cell table:style-name="ce181" table:number-columns-spanned="2" table:number-rows-spanned="1"/>
          <table:covered-table-cell/>
          <table:table-cell table:style-name="ce15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7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7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7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7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7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7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7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7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7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7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7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7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7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7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7"/>
          <table:table-cell table:style-name="ce181" table:number-columns-spanned="2" table:number-rows-spanned="1"/>
          <table:covered-table-cell/>
          <table:table-cell table:style-name="ce15" table:number-columns-repeated="12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21"/>
          <table:table-cell table:number-columns-repeated="16347"/>
        </table:table-row>
        <table:table-row table:style-name="ro1" table:number-rows-repeated="54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number-columns-repeated="21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formula="of:=COUNTIF([.Q8:.Q1050];&quot;✓&quot;)" office:value-type="float" office:value="207" calcext:value-type="float">
            <text:p>207</text:p>
          </table:table-cell>
          <table:table-cell table:style-name="ce15" table:number-columns-repeated="20"/>
          <table:table-cell table:number-columns-repeated="16347"/>
        </table:table-row>
        <table:table-row table:style-name="ro1">
          <table:table-cell table:style-name="ce15"/>
          <table:table-cell table:style-name="ce20"/>
          <table:table-cell table:style-name="ce44" table:number-columns-repeated="12"/>
          <table:table-cell table:style-name="ce87"/>
          <table:table-cell table:style-name="ce98"/>
          <table:table-cell table:style-name="ce15" table:formula="of:=COUNTIF([.Q8:.Q1050];&quot;x&quot;)" office:value-type="float" office:value="46" calcext:value-type="float">
            <text:p>46</text:p>
          </table:table-cell>
          <table:table-cell table:style-name="ce15" table:number-columns-repeated="20"/>
          <table:table-cell table:number-columns-repeated="16347"/>
        </table:table-row>
        <table:table-row table:style-name="ro7" table:number-rows-repeated="1047523">
          <table:table-cell table:number-columns-repeated="16384"/>
        </table:table-row>
        <table:table-row table:style-name="ro7">
          <table:table-cell table:number-columns-repeated="16384"/>
        </table:table-row>
        <calcext:conditional-formats>
          <calcext:conditional-format calcext:target-range-address="Masterlist.B1:Masterlist.B1 Masterlist.B3:Masterlist.B1052 Masterlist.R202:Masterlist.R202">
            <calcext:condition calcext:apply-style-name="ConditionalStyle_1" calcext:value="=&quot;M&quot;" calcext:base-cell-address="Masterlist.B1"/>
            <calcext:condition calcext:apply-style-name="ConditionalStyle_2" calcext:value="=&quot;L&quot;" calcext:base-cell-address="Masterlist.B1"/>
            <calcext:condition calcext:apply-style-name="ConditionalStyle_3" calcext:value="=&quot;A&quot;" calcext:base-cell-address="Masterlist.B1"/>
            <calcext:condition calcext:apply-style-name="ConditionalStyle_4" calcext:value="=&quot;AL&quot;" calcext:base-cell-address="Masterlist.B1"/>
            <calcext:condition calcext:apply-style-name="ConditionalStyle_5" calcext:value="=&quot;p&quot;" calcext:base-cell-address="Masterlist.B1"/>
          </calcext:conditional-format>
          <calcext:conditional-format calcext:target-range-address="Masterlist.C1:Masterlist.N1 Masterlist.C3:Masterlist.N5 Masterlist.C7:Masterlist.N36 Masterlist.C38:Masterlist.N85 Masterlist.C87:Masterlist.N130 Masterlist.C132:Masterlist.N194 Masterlist.C196:Masterlist.N201 Masterlist.C203:Masterlist.N210 Masterlist.C212:Masterlist.N225 Masterlist.C227:Masterlist.N239 Masterlist.C241:Masterlist.N1052">
            <calcext:condition calcext:apply-style-name="ConditionalStyle_6" calcext:value="=&quot;yes&quot;" calcext:base-cell-address="Masterlist.C1"/>
          </calcext:conditional-format>
          <calcext:conditional-format calcext:target-range-address="Masterlist.G159:Masterlist.G167">
            <calcext:condition calcext:apply-style-name="ConditionalStyle_6" calcext:value="=&quot;yes&quot;" calcext:base-cell-address="Masterlist.G159"/>
          </calcext:conditional-format>
          <calcext:conditional-format calcext:target-range-address="Masterlist.R21:Masterlist.V21 Masterlist.R87:Masterlist.AI194 Masterlist.R199:Masterlist.V201 Masterlist.R208:Masterlist.AI210 Masterlist.R212:Masterlist.AI225 Masterlist.R268:Masterlist.AI268">
            <calcext:condition calcext:apply-style-name="ConditionalStyle_7" calcext:value="=#ref!" calcext:base-cell-address="Masterlist.R21"/>
          </calcext:conditional-format>
          <calcext:conditional-format calcext:target-range-address="Masterlist.R87:Masterlist.AI130 Masterlist.R165:Masterlist.AI165 Masterlist.R208:Masterlist.AI210 Masterlist.R267:Masterlist.Y268 Masterlist.Z268:Masterlist.AI268">
            <calcext:condition calcext:apply-style-name="ConditionalStyle_7" calcext:value="=#ref!" calcext:base-cell-address="Masterlist.R87"/>
            <calcext:condition calcext:apply-style-name="ConditionalStyle_8" calcext:value="=[.$AK$7]" calcext:base-cell-address="Masterlist.R87"/>
            <calcext:condition calcext:apply-style-name="ConditionalStyle_9" calcext:value="=[.$AK$5]" calcext:base-cell-address="Masterlist.R87"/>
          </calcext:conditional-format>
          <calcext:conditional-format calcext:target-range-address="Masterlist.R227:Masterlist.Z239">
            <calcext:condition calcext:apply-style-name="ConditionalStyle_7" calcext:value="=#ref!" calcext:base-cell-address="Masterlist.R227"/>
            <calcext:condition calcext:apply-style-name="ConditionalStyle_8" calcext:value="=[.$AK$7]" calcext:base-cell-address="Masterlist.R227"/>
            <calcext:condition calcext:apply-style-name="ConditionalStyle_9" calcext:value="=[.$AK$5]" calcext:base-cell-address="Masterlist.R227"/>
          </calcext:conditional-format>
          <calcext:conditional-format calcext:target-range-address="Masterlist.R21:Masterlist.Z21 Masterlist.R196:Masterlist.Z201">
            <calcext:condition calcext:apply-style-name="ConditionalStyle_8" calcext:value="=[.$AK$7]" calcext:base-cell-address="Masterlist.R21"/>
            <calcext:condition calcext:apply-style-name="ConditionalStyle_9" calcext:value="=[.$AK$5]" calcext:base-cell-address="Masterlist.R21"/>
          </calcext:conditional-format>
          <calcext:conditional-format calcext:target-range-address="Masterlist.R7:Masterlist.AI36 Masterlist.R38:Masterlist.AI85 Masterlist.R87:Masterlist.AI194 Masterlist.R196:Masterlist.R210 Masterlist.S196:Masterlist.AI201 Masterlist.S203:Masterlist.AI210 Masterlist.R212:Masterlist.AI225 Masterlist.R227:Masterlist.AI239 Masterlist.R241:Masterlist.AI268">
            <calcext:condition calcext:apply-style-name="ConditionalStyle_9" calcext:value="=[.$AK$5]" calcext:base-cell-address="Masterlist.R7"/>
            <calcext:condition calcext:apply-style-name="ConditionalStyle_8" calcext:value="=[.$AK$7]" calcext:base-cell-address="Masterlist.R7"/>
            <calcext:condition calcext:apply-style-name="ConditionalStyle_9" calcext:value="=[.$AK$5]" calcext:base-cell-address="Masterlist.R7"/>
            <calcext:condition calcext:apply-style-name="ConditionalStyle_8" calcext:value="=[.$AK$7]" calcext:base-cell-address="Masterlist.R7"/>
          </calcext:conditional-format>
          <calcext:conditional-format calcext:target-range-address="Masterlist.R20:Masterlist.AI21 Masterlist.R38:Masterlist.AI85 Masterlist.R87:Masterlist.AI194 Masterlist.R196:Masterlist.AI201 Masterlist.R203:Masterlist.AI210 Masterlist.R212:Masterlist.AI225 Masterlist.R227:Masterlist.AI239 Masterlist.R241:Masterlist.AI268">
            <calcext:condition calcext:apply-style-name="ConditionalStyle_7" calcext:value="=#ref!" calcext:base-cell-address="Masterlist.R20"/>
            <calcext:condition calcext:apply-style-name="ConditionalStyle_8" calcext:value="=[.$AK$7]" calcext:base-cell-address="Masterlist.R20"/>
            <calcext:condition calcext:apply-style-name="ConditionalStyle_9" calcext:value="=[.$AK$5]" calcext:base-cell-address="Masterlist.R20"/>
            <calcext:condition calcext:apply-style-name="ConditionalStyle_7" calcext:value="=#ref!" calcext:base-cell-address="Masterlist.R20"/>
            <calcext:condition calcext:apply-style-name="ConditionalStyle_8" calcext:value="=[.$AK$7]" calcext:base-cell-address="Masterlist.R20"/>
            <calcext:condition calcext:apply-style-name="ConditionalStyle_9" calcext:value="=[.$AK$5]" calcext:base-cell-address="Masterlist.R20"/>
          </calcext:conditional-format>
          <calcext:conditional-format calcext:target-range-address="Masterlist.R7:Masterlist.AI36 Masterlist.R38:Masterlist.AI85 Masterlist.R104:Masterlist.AI104 Masterlist.R131:Masterlist.AI194 Masterlist.R196:Masterlist.R210 Masterlist.S196:Masterlist.AI201 Masterlist.S203:Masterlist.AI210 Masterlist.R227:Masterlist.AI239 Masterlist.R241:Masterlist.AI267">
            <calcext:condition calcext:apply-style-name="ConditionalStyle_7" calcext:value="=#ref!" calcext:base-cell-address="Masterlist.R7"/>
          </calcext:conditional-format>
          <calcext:conditional-format calcext:target-range-address="Masterlist.R227:Masterlist.AI239">
            <calcext:condition calcext:apply-style-name="ConditionalStyle_8" calcext:value="=[.$AK$7]" calcext:base-cell-address="Masterlist.R227"/>
            <calcext:condition calcext:apply-style-name="ConditionalStyle_9" calcext:value="=[.$AK$5]" calcext:base-cell-address="Masterlist.R227"/>
            <calcext:condition calcext:apply-style-name="ConditionalStyle_8" calcext:value="=[.$AK$7]" calcext:base-cell-address="Masterlist.R227"/>
            <calcext:condition calcext:apply-style-name="ConditionalStyle_9" calcext:value="=[.$AK$5]" calcext:base-cell-address="Masterlist.R227"/>
            <calcext:condition calcext:apply-style-name="ConditionalStyle_7" calcext:value="=#ref!" calcext:base-cell-address="Masterlist.R227"/>
          </calcext:conditional-format>
          <calcext:conditional-format calcext:target-range-address="Masterlist.R20:Masterlist.AI21 Masterlist.R38:Masterlist.AI85 Masterlist.R104:Masterlist.AI104 Masterlist.R131:Masterlist.AI194 Masterlist.R196:Masterlist.AI201 Masterlist.R227:Masterlist.AI239 Masterlist.R241:Masterlist.AI267">
            <calcext:condition calcext:apply-style-name="ConditionalStyle_7" calcext:value="=#ref!" calcext:base-cell-address="Masterlist.R20"/>
          </calcext:conditional-format>
          <calcext:conditional-format calcext:target-range-address="Masterlist.R21:Masterlist.AI21 Masterlist.R100:Masterlist.AI108 Masterlist.R114:Masterlist.AI194 Masterlist.R196:Masterlist.AI201 Masterlist.R208:Masterlist.AI210">
            <calcext:condition calcext:apply-style-name="ConditionalStyle_8" calcext:value="=[.$AK$7]" calcext:base-cell-address="Masterlist.R21"/>
            <calcext:condition calcext:apply-style-name="ConditionalStyle_9" calcext:value="=[.$AK$5]" calcext:base-cell-address="Masterlist.R21"/>
            <calcext:condition calcext:apply-style-name="ConditionalStyle_8" calcext:value="=[.$AK$7]" calcext:base-cell-address="Masterlist.R21"/>
            <calcext:condition calcext:apply-style-name="ConditionalStyle_9" calcext:value="=[.$AK$5]" calcext:base-cell-address="Masterlist.R21"/>
          </calcext:conditional-format>
          <calcext:conditional-format calcext:target-range-address="Masterlist.R104:Masterlist.Y104 Masterlist.R132:Masterlist.AI194 Masterlist.R241:Masterlist.Y267">
            <calcext:condition calcext:apply-style-name="ConditionalStyle_8" calcext:value="=[.$AK$7]" calcext:base-cell-address="Masterlist.R104"/>
            <calcext:condition calcext:apply-style-name="ConditionalStyle_9" calcext:value="=[.$AK$5]" calcext:base-cell-address="Masterlist.R104"/>
          </calcext:conditional-format>
          <calcext:conditional-format calcext:target-range-address="Masterlist.R87:Masterlist.AI130 Masterlist.R165:Masterlist.AI165 Masterlist.R208:Masterlist.AI210 Masterlist.R268:Masterlist.AI268">
            <calcext:condition calcext:apply-style-name="ConditionalStyle_9" calcext:value="=[.$AK$5]" calcext:base-cell-address="Masterlist.R87"/>
          </calcext:conditional-format>
          <calcext:conditional-format calcext:target-range-address="Masterlist.R104:Masterlist.AI104 Masterlist.R241:Masterlist.AI267">
            <calcext:condition calcext:apply-style-name="ConditionalStyle_8" calcext:value="=[.$AK$7]" calcext:base-cell-address="Masterlist.R104"/>
            <calcext:condition calcext:apply-style-name="ConditionalStyle_9" calcext:value="=[.$AK$5]" calcext:base-cell-address="Masterlist.R104"/>
            <calcext:condition calcext:apply-style-name="ConditionalStyle_7" calcext:value="=#ref!" calcext:base-cell-address="Masterlist.R104"/>
            <calcext:condition calcext:apply-style-name="ConditionalStyle_8" calcext:value="=[.$AK$7]" calcext:base-cell-address="Masterlist.R104"/>
            <calcext:condition calcext:apply-style-name="ConditionalStyle_9" calcext:value="=[.$AK$5]" calcext:base-cell-address="Masterlist.R104"/>
          </calcext:conditional-format>
          <calcext:conditional-format calcext:target-range-address="Masterlist.R254:Masterlist.AI260 Masterlist.R264:Masterlist.AI264 Masterlist.R266:Masterlist.AI266">
            <calcext:condition calcext:apply-style-name="ConditionalStyle_7" calcext:value="=#ref!" calcext:base-cell-address="Masterlist.R254"/>
            <calcext:condition calcext:apply-style-name="ConditionalStyle_8" calcext:value="=[.$AK$7]" calcext:base-cell-address="Masterlist.R254"/>
            <calcext:condition calcext:apply-style-name="ConditionalStyle_9" calcext:value="=[.$AK$5]" calcext:base-cell-address="Masterlist.R254"/>
            <calcext:condition calcext:apply-style-name="ConditionalStyle_7" calcext:value="=#ref!" calcext:base-cell-address="Masterlist.R254"/>
            <calcext:condition calcext:apply-style-name="ConditionalStyle_8" calcext:value="=[.$AK$7]" calcext:base-cell-address="Masterlist.R254"/>
            <calcext:condition calcext:apply-style-name="ConditionalStyle_9" calcext:value="=[.$AK$5]" calcext:base-cell-address="Masterlist.R254"/>
          </calcext:conditional-format>
          <calcext:conditional-format calcext:target-range-address="Masterlist.R7:Masterlist.R268 Masterlist.S7:Masterlist.AI36 Masterlist.S38:Masterlist.AI85 Masterlist.S87:Masterlist.AI194 Masterlist.S196:Masterlist.AI201 Masterlist.S203:Masterlist.AI210 Masterlist.S212:Masterlist.AI225 Masterlist.S227:Masterlist.AI239 Masterlist.S241:Masterlist.AI268">
            <calcext:condition calcext:apply-style-name="ConditionalStyle_7" calcext:value="=[.$AK$8]" calcext:base-cell-address="Masterlist.R7"/>
          </calcext:conditional-format>
          <calcext:conditional-format calcext:target-range-address="Masterlist.R20:Masterlist.AI21 Masterlist.R38:Masterlist.R194 Masterlist.S38:Masterlist.AI85 Masterlist.S104:Masterlist.AI104 Masterlist.S131:Masterlist.AI194 Masterlist.R196:Masterlist.AI201 Masterlist.R212:Masterlist.R239 Masterlist.S212:Masterlist.AI225 Masterlist.S227:Masterlist.AI239 Masterlist.R241:Masterlist.AI267">
            <calcext:condition calcext:apply-style-name="ConditionalStyle_7" calcext:value="=#ref!" calcext:base-cell-address="Masterlist.R20"/>
          </calcext:conditional-format>
          <calcext:conditional-format calcext:target-range-address="Masterlist.R20:Masterlist.AI21 Masterlist.R38:Masterlist.R194 Masterlist.S38:Masterlist.AI85 Masterlist.S104:Masterlist.AI104 Masterlist.S131:Masterlist.AI194 Masterlist.R196:Masterlist.AI201 Masterlist.R226:Masterlist.R239 Masterlist.S227:Masterlist.AI239 Masterlist.R241:Masterlist.AI267">
            <calcext:condition calcext:apply-style-name="ConditionalStyle_9" calcext:value="=[.$AK$5]" calcext:base-cell-address="Masterlist.R20"/>
          </calcext:conditional-format>
          <calcext:conditional-format calcext:target-range-address="Masterlist.V87:Masterlist.V130 Masterlist.V132:Masterlist.V194 Masterlist.V208:Masterlist.V210 Masterlist.V212:Masterlist.V225 Masterlist.V227:Masterlist.V239 Masterlist.V268:Masterlist.V268">
            <calcext:condition calcext:apply-style-name="ConditionalStyle_10" calcext:value="=[.$AK$5]" calcext:base-cell-address="Masterlist.V87"/>
          </calcext:conditional-format>
          <calcext:conditional-format calcext:target-range-address="Masterlist.V20:Masterlist.V21 Masterlist.V38:Masterlist.V85 Masterlist.V104:Masterlist.V104 Masterlist.V132:Masterlist.V194 Masterlist.V196:Masterlist.V201 Masterlist.V203:Masterlist.V210 Masterlist.V227:Masterlist.V239 Masterlist.V241:Masterlist.V267">
            <calcext:condition calcext:apply-style-name="ConditionalStyle_10" calcext:value="=[.$AK$5]" calcext:base-cell-address="Masterlist.V20"/>
          </calcext:conditional-format>
        </calcext:conditional-formats>
      </table:table>
      <table:named-expressions/>
      <table:database-ranges>
        <table:database-range table:name="__Anonymous_Sheet_DB__0" table:target-range-address="Datasheet.A1:Datasheet.V1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FreeSans" svg:font-family="FreeSans" style:font-family-generic="system" style:font-pitch="variable"/>
    <style:font-face style:name="Google Sans" svg:font-family="'Google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1P0" style:volatile="true">
      <number:text>R </number:text>
      <number:number number:decimal-places="0" number:min-decimal-places="0" number:min-integer-digits="1" number:grouping="true"/>
    </number:number-style>
    <number:number-style style:name="N121">
      <number:text>R 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text>R 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R 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text>R </number:text>
      <number:number number:decimal-places="2" number:min-decimal-places="2" number:min-integer-digits="1" number:grouping="true"/>
    </number:number-style>
    <number:number-style style:name="N123">
      <number:text>R 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text>R 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R -</number:text>
      <number:number number:decimal-places="2" number:min-decimal-places="2" number:min-integer-digits="1" number:grouping="true"/>
      <style:map style:condition="value()&gt;=0" style:apply-style-name="N124P0"/>
    </number:number-style>
    <number:date-style style:name="N125">
      <number:day number:style="long"/>
      <number:text>-</number:text>
      <number:month number:textual="true"/>
      <number:text>-</number:text>
      <number:year/>
    </number:date-style>
    <number:date-style style:name="N126">
      <number:day number:style="long"/>
      <number:text>-</number:text>
      <number:month number:textual="true"/>
    </number:date-style>
    <number:date-style style:name="N127">
      <number:month number:textual="true"/>
      <number:text>-</number:text>
      <number:year/>
    </number:date-style>
    <number:date-style style:name="N128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3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3P2" style:volatile="true">
      <number:text loext:blank-width-char=" "> </number:text>
      <number:fill-character> </number:fill-character>
      <number:text loext:blank-width-char=" 1">- </number:text>
    </number:number-style>
    <number:text-style style:name="N133">
      <number:text loext:blank-width-char=" "> </number:text>
      <number:text-content/>
      <number:text loext:blank-width-char=" 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 "> R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4P1" style:volatile="true">
      <number:text loext:blank-width-char=" "> R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4P2" style:volatile="true">
      <number:text loext:blank-width-char=" "> R </number:text>
      <number:fill-character> </number:fill-character>
      <number:text loext:blank-width-char=" 1">- </number:text>
    </number:number-style>
    <number:text-style style:name="N134">
      <number:text loext:blank-width-char=" "> </number:text>
      <number:text-content/>
      <number:text loext:blank-width-char=" 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5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5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5">
      <number:text loext:blank-width-char=" "> </number:text>
      <number:text-content/>
      <number:text loext:blank-width-char=" 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 "> R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6P1" style:volatile="true">
      <number:text loext:blank-width-char=" "> R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6P2" style:volatile="true">
      <number:text loext:blank-width-char=" "> R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6">
      <number:text loext:blank-width-char=" "> </number:text>
      <number:text-content/>
      <number:text loext:blank-width-char=" 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f0066"/>
    </style:style>
    <style:style style:name="ConditionalStyle_5f_2" style:display-name="ConditionalStyle_2" style:family="table-cell" style:parent-style-name="Default">
      <style:table-cell-properties fo:background-color="#8def83"/>
    </style:style>
    <style:style style:name="ConditionalStyle_5f_3" style:display-name="ConditionalStyle_3" style:family="table-cell" style:parent-style-name="Default">
      <style:table-cell-properties fo:background-color="#ffff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e36c09"/>
    </style:style>
    <style:style style:name="ConditionalStyle_5f_6" style:display-name="ConditionalStyle_6" style:family="table-cell" style:parent-style-name="Default">
      <style:table-cell-properties fo:background-color="#ccffff"/>
    </style:style>
    <style:style style:name="ConditionalStyle_5f_7" style:display-name="ConditionalStyle_7" style:family="table-cell" style:parent-style-name="Default">
      <style:table-cell-properties fo:background-color="#d8d8d8"/>
    </style:style>
    <style:style style:name="ConditionalStyle_5f_8" style:display-name="ConditionalStyle_8" style:family="table-cell" style:parent-style-name="Default">
      <style:table-cell-properties fo:background-color="#e5b8b7"/>
    </style:style>
    <style:style style:name="ConditionalStyle_5f_9" style:display-name="ConditionalStyle_9" style:family="table-cell" style:parent-style-name="Default">
      <style:table-cell-properties fo:background-color="#c2d69b"/>
    </style:style>
    <style:style style:name="ConditionalStyle_5f_10" style:display-name="ConditionalStyle_10" style:family="table-cell" style:parent-style-name="Default">
      <style:table-cell-properties fo:background-color="#c0504d">
        <loext:background-complex-color loext:theme-type="accent2" loext:color-type="theme"/>
      </style:table-cell-properties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0000ff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42cm" fo:page-height="29.7cm" style:num-format="1" style:print-orientation="landscape" fo:margin-top="1.9cm" fo:margin-bottom="1.9cm" fo:margin-left="1.799cm" fo:margin-right="1.799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8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tasheet" style:display-name="PageStyle_Datashe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sterlist" style:display-name="PageStyle_Masterlis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18T20:58:21.964545595</dc:date>
    <meta:editing-duration>PT38M7S</meta:editing-duration>
    <meta:editing-cycles>1</meta:editing-cycles>
    <meta:document-statistic meta:table-count="2" meta:cell-count="8799" meta:object-count="0"/>
    <meta:generator>LibreOffice/24.2.7.2$Linux_X86_64 LibreOffice_project/420$Build-2</meta:generator>
  </office:meta>
</office:document-meta>
</file>